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86000002D1F77CB983.jpg" manifest:media-type="image/jpeg"/>
  <manifest:file-entry manifest:full-path="Pictures/1000000000000151000001EF2E12A5CF.jpg" manifest:media-type="image/jpeg"/>
  <manifest:file-entry manifest:full-path="Pictures/10000001000002FB000001317884277E.png" manifest:media-type="image/png"/>
  <manifest:file-entry manifest:full-path="Pictures/10000001000000CF000000E87AE6C875.gif" manifest:media-type="image/gif"/>
  <manifest:file-entry manifest:full-path="Pictures/100000000000017C0000025FC805F628.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a3" style:family="table">
      <style:table-properties style:width="15.593cm" table:align="left"/>
    </style:style>
    <style:style style:name="Tabela3.A" style:family="table-column">
      <style:table-column-properties style:column-width="3.459cm"/>
    </style:style>
    <style:style style:name="Tabela3.B" style:family="table-column">
      <style:table-column-properties style:column-width="5.613cm"/>
    </style:style>
    <style:style style:name="Tabela3.C" style:family="table-column">
      <style:table-column-properties style:column-width="6.521cm"/>
    </style:style>
    <style:style style:name="Tabela3.A1" style:family="table-cell">
      <style:table-cell-properties style:vertical-align="middle" fo:padding="0.049cm" fo:border="none"/>
    </style:style>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fo:language="pt" fo:country="BR"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fo:language="pt" fo:country="BR"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fo:language="pt" fo:country="BR" officeooo:paragraph-rsid="0095e7d4"/>
    </style:style>
    <style:style style:name="P50"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51" style:family="paragraph" style:parent-style-name="Standard">
      <loext:graphic-properties draw:fill="none"/>
      <style:paragraph-properties fo:background-color="transparent"/>
      <style:text-properties fo:language="pt" fo:country="BR" officeooo:rsid="0097d991" officeooo:paragraph-rsid="0097d991"/>
    </style:style>
    <style:style style:name="P52" style:family="paragraph" style:parent-style-name="Standard">
      <loext:graphic-properties draw:fill="none"/>
      <style:paragraph-properties fo:line-height="100%" fo:text-align="center" style:justify-single-word="false" fo:background-color="transparent"/>
      <style:text-properties fo:language="pt" fo:country="BR" officeooo:paragraph-rsid="009a385d"/>
    </style:style>
    <style:style style:name="P53"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54"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55"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6"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language="pt" fo:country="BR" fo:font-weight="normal" fo:background-color="#1f1f1f" style:font-size-asian="12pt" style:font-size-complex="12pt"/>
    </style:style>
    <style:style style:name="P57" style:family="paragraph" style:parent-style-name="Standard">
      <loext:graphic-properties draw:fill="none"/>
      <style:paragraph-properties fo:text-align="center" style:justify-single-word="false" fo:background-color="transparent"/>
      <style:text-properties fo:color="#d4d4d4" loext:opacity="100%" style:font-name="Consolas" fo:font-size="12pt" fo:language="pt" fo:country="BR" fo:font-weight="normal" officeooo:paragraph-rsid="009a385d" fo:background-color="#1f1f1f" style:font-size-asian="12pt" style:font-size-complex="12pt"/>
    </style:style>
    <style:style style:name="P58" style:family="paragraph" style:parent-style-name="Standard">
      <loext:graphic-properties draw:fill="none"/>
      <style:paragraph-properties fo:background-color="transparent"/>
      <style:text-properties fo:language="pt" fo:country="BR" officeooo:paragraph-rsid="00a119ed"/>
    </style:style>
    <style:style style:name="P59" style:family="paragraph" style:parent-style-name="Standard">
      <loext:graphic-properties draw:fill="none"/>
      <style:paragraph-properties fo:break-before="page" fo:background-color="transparent"/>
    </style:style>
    <style:style style:name="P60" style:family="paragraph" style:parent-style-name="Standard">
      <loext:graphic-properties draw:fill="none"/>
      <style:paragraph-properties fo:background-color="transparent"/>
      <style:text-properties officeooo:paragraph-rsid="009aab7b"/>
    </style:style>
    <style:style style:name="P61"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fo:background-color="#1f1f1f"/>
    </style:style>
    <style:style style:name="P62"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language="pt" fo:country="BR" fo:font-weight="normal" fo:background-color="#1f1f1f"/>
    </style:style>
    <style:style style:name="P63"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language="pt" fo:country="BR" fo:font-weight="normal" fo:background-color="#1f1f1f"/>
    </style:style>
    <style:style style:name="P64" style:family="paragraph" style:parent-style-name="Standard">
      <style:paragraph-properties fo:margin-left="0cm" fo:margin-right="0cm" fo:line-height="100%" fo:text-align="center" style:justify-single-word="false" fo:text-indent="0cm" style:auto-text-indent="false"/>
      <style:text-properties fo:language="pt" fo:country="BR"/>
    </style:style>
    <style:style style:name="P65"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language="pt" fo:country="BR" fo:font-weight="normal" fo:background-color="#1f1f1f"/>
    </style:style>
    <style:style style:name="P66" style:family="paragraph" style:parent-style-name="Standard">
      <loext:graphic-properties draw:fill="none"/>
      <style:paragraph-properties fo:background-color="transparent"/>
      <style:text-properties fo:color="#cccccc" loext:opacity="100%" style:font-name="Consolas" fo:font-size="10.5pt" fo:language="pt" fo:country="BR" fo:font-weight="normal" fo:background-color="#1f1f1f"/>
    </style:style>
    <style:style style:name="P67"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8"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language="pt" fo:country="BR" officeooo:paragraph-rsid="00a37bab"/>
    </style:style>
    <style:style style:name="P69"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0" style:family="paragraph" style:parent-style-name="Text_20_body">
      <loext:graphic-properties draw:fill="none"/>
      <style:paragraph-properties fo:line-height="100%" fo:background-color="transparent"/>
      <style:text-properties fo:language="pt" fo:country="BR" officeooo:paragraph-rsid="009f1751"/>
    </style:style>
    <style:style style:name="P71" style:family="paragraph" style:parent-style-name="Text_20_body">
      <loext:graphic-properties draw:fill="none"/>
      <style:paragraph-properties fo:line-height="100%" fo:break-before="page" fo:background-color="transparent"/>
      <style:text-properties officeooo:paragraph-rsid="009f1751"/>
    </style:style>
    <style:style style:name="P72" style:family="paragraph" style:parent-style-name="Text_20_body">
      <loext:graphic-properties draw:fill="none"/>
      <style:paragraph-properties fo:line-height="100%" fo:text-align="center" style:justify-single-word="false" fo:background-color="transparent"/>
      <style:text-properties fo:language="pt" fo:country="BR" officeooo:paragraph-rsid="009f1751"/>
    </style:style>
    <style:style style:name="P73" style:family="paragraph" style:parent-style-name="Text_20_body">
      <style:paragraph-properties fo:line-height="100%"/>
      <style:text-properties fo:language="pt" fo:country="BR" officeooo:rsid="009f1751" officeooo:paragraph-rsid="009f1751"/>
    </style:style>
    <style:style style:name="P74"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officeooo:rsid="009f1751" officeooo:paragraph-rsid="009f1751" fo:background-color="#1f1f1f"/>
    </style:style>
    <style:style style:name="P75" style:family="paragraph" style:parent-style-name="Text_20_body">
      <loext:graphic-properties draw:fill="none"/>
      <style:paragraph-properties fo:background-color="transparent"/>
      <style:text-properties fo:language="pt" fo:country="BR" officeooo:rsid="009f1751" officeooo:paragraph-rsid="009f1751"/>
    </style:style>
    <style:style style:name="P76" style:family="paragraph" style:parent-style-name="Text_20_body" style:list-style-name="">
      <style:paragraph-properties fo:text-align="center" style:justify-single-word="false"/>
      <style:text-properties fo:language="pt" fo:country="BR"/>
    </style:style>
    <style:style style:name="P77"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78" style:family="paragraph" style:parent-style-name="Text_20_body" style:list-style-name="">
      <style:paragraph-properties fo:text-align="start" style:justify-single-word="false"/>
      <style:text-properties officeooo:paragraph-rsid="009ff844"/>
    </style:style>
    <style:style style:name="P79"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officeooo:paragraph-rsid="009ff844" fo:background-color="#1f1f1f"/>
    </style:style>
    <style:style style:name="P80" style:family="paragraph" style:parent-style-name="Standard">
      <style:paragraph-properties fo:line-height="100%" fo:text-align="center" style:justify-single-word="false"/>
      <style:text-properties fo:color="#cccccc" loext:opacity="100%" style:font-name="Consolas" fo:font-size="10.5pt" fo:language="pt" fo:country="BR" fo:font-weight="normal" fo:background-color="#1f1f1f"/>
    </style:style>
    <style:style style:name="P81" style:family="paragraph" style:parent-style-name="Text_20_body" style:list-style-name="">
      <style:paragraph-properties fo:text-align="start" style:justify-single-word="false"/>
      <style:text-properties fo:language="pt" fo:country="BR" officeooo:paragraph-rsid="009ff844"/>
    </style:style>
    <style:style style:name="P82" style:family="paragraph" style:parent-style-name="Text_20_body" style:list-style-name="">
      <style:paragraph-properties fo:text-align="start" style:justify-single-word="false"/>
      <style:text-properties officeooo:paragraph-rsid="00a119ed"/>
    </style:style>
    <style:style style:name="P83" style:family="paragraph" style:parent-style-name="Standard" style:list-style-name="">
      <style:paragraph-properties fo:text-align="center" style:justify-single-word="false"/>
      <style:text-properties officeooo:paragraph-rsid="00a119ed"/>
    </style:style>
    <style:style style:name="P84" style:family="paragraph" style:parent-style-name="Text_20_body">
      <style:paragraph-properties fo:break-before="page"/>
    </style:style>
    <style:style style:name="P85" style:family="paragraph" style:parent-style-name="Text_20_body">
      <style:text-properties officeooo:paragraph-rsid="00a9626a"/>
    </style:style>
    <style:style style:name="P86" style:family="paragraph" style:parent-style-name="Text_20_body" style:list-style-name="L4">
      <style:paragraph-properties fo:margin-top="0cm" fo:margin-bottom="0cm" style:contextual-spacing="false"/>
      <style:text-properties officeooo:paragraph-rsid="00a9626a"/>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center" style:justify-single-word="false"/>
      <style:text-properties officeooo:paragraph-rsid="00aae922"/>
    </style:style>
    <style:style style:name="P89" style:family="paragraph" style:parent-style-name="Standard">
      <style:paragraph-properties fo:line-height="100%" fo:text-align="center" style:justify-single-word="false"/>
    </style:style>
    <style:style style:name="P90" style:family="paragraph" style:parent-style-name="Text_20_body">
      <loext:graphic-properties draw:fill="none"/>
      <style:paragraph-properties fo:background-color="transparent"/>
      <style:text-properties fo:language="pt" fo:country="BR" officeooo:rsid="0031f368" officeooo:paragraph-rsid="0031f368"/>
    </style:style>
    <style:style style:name="P91" style:family="paragraph" style:parent-style-name="Text_20_body">
      <loext:graphic-properties draw:fill="none"/>
      <style:paragraph-properties fo:background-color="transparent"/>
      <style:text-properties fo:language="pt" fo:country="BR" officeooo:paragraph-rsid="007dbede"/>
    </style:style>
    <style:style style:name="P92"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93"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94" style:family="paragraph" style:parent-style-name="Standard">
      <loext:graphic-properties draw:fill="none"/>
      <style:paragraph-properties fo:background-color="transparent"/>
      <style:text-properties fo:language="pt" fo:country="BR" officeooo:paragraph-rsid="00407d4e"/>
    </style:style>
    <style:style style:name="P95" style:family="paragraph" style:parent-style-name="Standard" style:list-style-name="L5">
      <loext:graphic-properties draw:fill="none"/>
      <style:paragraph-properties fo:background-color="transparent"/>
      <style:text-properties fo:language="pt" fo:country="BR"/>
    </style:style>
    <style:style style:name="P96"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99"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00"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101" style:family="paragraph" style:parent-style-name="Standard">
      <style:paragraph-properties style:line-height-at-least="0.582cm"/>
      <style:text-properties style:font-name="Consolas" fo:font-size="12pt" fo:language="pt" fo:country="BR" fo:font-weight="normal" officeooo:paragraph-rsid="003ce716"/>
    </style:style>
    <style:style style:name="P102" style:family="paragraph" style:parent-style-name="Heading_20_1">
      <style:paragraph-properties fo:margin-top="0cm" fo:margin-bottom="0cm" style:contextual-spacing="false" fo:break-before="page"/>
      <style:text-properties fo:language="pt" fo:country="BR"/>
    </style:style>
    <style:style style:name="P103" style:family="paragraph" style:parent-style-name="Text_20_body">
      <style:paragraph-properties fo:margin-top="0cm" fo:margin-bottom="0cm" style:contextual-spacing="false"/>
      <style:text-properties fo:language="pt" fo:country="BR"/>
    </style:style>
    <style:style style:name="P104" style:family="paragraph" style:parent-style-name="Text_20_body">
      <style:paragraph-properties fo:margin-top="0cm" fo:margin-bottom="0cm" style:contextual-spacing="false"/>
      <style:text-properties fo:language="pt" fo:country="BR" officeooo:rsid="0043c787" officeooo:paragraph-rsid="0043c787"/>
    </style:style>
    <style:style style:name="P105" style:family="paragraph" style:parent-style-name="Text_20_body">
      <style:paragraph-properties fo:margin-top="0cm" fo:margin-bottom="0cm" style:contextual-spacing="false"/>
      <style:text-properties fo:language="pt" fo:country="BR" officeooo:rsid="0040d845" officeooo:paragraph-rsid="0040d845"/>
    </style:style>
    <style:style style:name="P106"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07" style:family="paragraph" style:parent-style-name="Standard">
      <style:paragraph-properties style:line-height-at-least="0.582cm"/>
      <style:text-properties fo:color="#d4d4d4" loext:opacity="100%" fo:language="pt" fo:country="BR" fo:background-color="#1e1e1e"/>
    </style:style>
    <style:style style:name="P108"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109"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10" style:family="paragraph" style:parent-style-name="Text_20_body">
      <style:paragraph-properties fo:margin-top="0cm" fo:margin-bottom="0cm" style:contextual-spacing="false"/>
      <style:text-properties fo:language="pt" fo:country="BR" officeooo:paragraph-rsid="008385bb"/>
    </style:style>
    <style:style style:name="P111"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12"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14"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15"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17"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8" style:family="paragraph" style:parent-style-name="Standard">
      <loext:graphic-properties draw:fill="none"/>
      <style:paragraph-properties fo:background-color="transparent"/>
      <style:text-properties fo:language="pt" fo:country="BR" officeooo:rsid="004a1df7" officeooo:paragraph-rsid="004a1df7"/>
    </style:style>
    <style:style style:name="P119" style:family="paragraph" style:parent-style-name="Text_20_body">
      <loext:graphic-properties draw:fill="none"/>
      <style:paragraph-properties fo:background-color="transparent"/>
      <style:text-properties fo:language="pt" fo:country="BR" officeooo:rsid="004a1df7" officeooo:paragraph-rsid="004a1df7"/>
    </style:style>
    <style:style style:name="P120"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22"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23" style:family="paragraph" style:parent-style-name="Standard" style:list-style-name="L9">
      <loext:graphic-properties draw:fill="none"/>
      <style:paragraph-properties fo:background-color="transparent"/>
      <style:text-properties officeooo:paragraph-rsid="006dd2a6"/>
    </style:style>
    <style:style style:name="P124" style:family="paragraph" style:parent-style-name="Standard" style:list-style-name="L10">
      <loext:graphic-properties draw:fill="none"/>
      <style:paragraph-properties fo:background-color="transparent"/>
      <style:text-properties fo:language="pt" fo:country="BR" officeooo:paragraph-rsid="006dd2a6"/>
    </style:style>
    <style:style style:name="P125" style:family="paragraph" style:parent-style-name="Standard" style:list-style-name="L11">
      <style:text-properties fo:language="pt" fo:country="BR"/>
    </style:style>
    <style:style style:name="P12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31"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33"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40"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41"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42"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44"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45"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46"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4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4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9" style:family="paragraph" style:parent-style-name="Standard" style:list-style-name="L14">
      <loext:graphic-properties draw:fill="none"/>
      <style:paragraph-properties fo:text-align="start" style:justify-single-word="false" fo:background-color="transparent"/>
      <style:text-properties fo:language="pt" fo:country="BR" officeooo:paragraph-rsid="00b7c442"/>
    </style:style>
    <style:style style:name="P150"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51"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2"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53"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54"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5"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6" style:family="paragraph" style:parent-style-name="Heading_20_2">
      <style:paragraph-properties fo:text-align="center" style:justify-single-word="false" fo:break-before="page"/>
      <style:text-properties fo:font-variant="normal" fo:text-transform="none" fo:letter-spacing="normal" fo:language="pt" fo:country="BR" fo:font-style="normal" officeooo:rsid="009dac09"/>
    </style:style>
    <style:style style:name="P15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b6a30c"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officeooo:paragraph-rsid="00b6a30c"/>
    </style:style>
    <style:style style:name="P160" style:family="paragraph" style:parent-style-name="Standard">
      <style:paragraph-properties fo:text-align="start" style:justify-single-word="false"/>
      <style:text-properties fo:language="pt" fo:country="BR" officeooo:paragraph-rsid="00b6a30c"/>
    </style:style>
    <style:style style:name="P161"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language="pt" fo:country="BR" fo:font-weight="normal" fo:background-color="#1f1f1f"/>
    </style:style>
    <style:style style:name="P162"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fo:background-color="#1f1f1f"/>
    </style:style>
    <style:style style:name="P163"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officeooo:paragraph-rsid="00b71215" fo:background-color="#1f1f1f"/>
    </style:style>
    <style:style style:name="P164"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65"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66"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67"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68"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69"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70"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71"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72"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73"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74"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75"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7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7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8"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9"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8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8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82"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83" style:family="paragraph" style:parent-style-name="Text_20_body">
      <style:text-properties style:font-name="Liberation Serif" fo:language="pt" fo:country="BR"/>
    </style:style>
    <style:style style:name="P184" style:family="paragraph" style:parent-style-name="Text_20_body">
      <style:text-properties style:font-name="Liberation Serif" fo:language="pt" fo:country="BR" officeooo:paragraph-rsid="00103d57"/>
    </style:style>
    <style:style style:name="P185" style:family="paragraph" style:parent-style-name="Text_20_body">
      <style:paragraph-properties fo:break-before="page"/>
      <style:text-properties style:font-name="Liberation Serif" fo:language="pt" fo:country="BR" officeooo:paragraph-rsid="00103d57"/>
    </style:style>
    <style:style style:name="P186" style:family="paragraph" style:parent-style-name="Heading_20_1">
      <style:paragraph-properties fo:line-height="100%" fo:break-before="page" fo:keep-with-next="always"/>
      <style:text-properties style:font-name="Liberation Sans" fo:language="pt" fo:country="BR" officeooo:rsid="01c694eb" officeooo:paragraph-rsid="00ad5728" style:font-name-asian="Microsoft YaHei" style:font-name-complex="Mangal1"/>
    </style:style>
    <style:style style:name="P187" style:family="paragraph" style:parent-style-name="Heading_20_1">
      <style:paragraph-properties fo:line-height="100%" fo:keep-with-next="always"/>
      <style:text-properties style:font-name="Liberation Sans" fo:language="pt" fo:country="BR" officeooo:rsid="01c694eb" officeooo:paragraph-rsid="00ad5728" style:font-name-asian="Microsoft YaHei" style:font-name-complex="Mangal1"/>
    </style:style>
    <style:style style:name="P188" style:family="paragraph" style:parent-style-name="Text_20_body">
      <style:text-properties style:font-name="Liberation Serif" fo:language="pt" fo:country="BR" officeooo:paragraph-rsid="007a978e"/>
    </style:style>
    <style:style style:name="P189" style:family="paragraph" style:parent-style-name="Text_20_body">
      <style:text-properties style:font-name="Liberation Serif" fo:language="pt" fo:country="BR" officeooo:paragraph-rsid="007249aa"/>
    </style:style>
    <style:style style:name="P190" style:family="paragraph" style:parent-style-name="Text_20_body">
      <style:paragraph-properties fo:break-before="page"/>
      <style:text-properties fo:language="pt" fo:country="BR" officeooo:paragraph-rsid="007a978e"/>
    </style:style>
    <style:style style:name="P191" style:family="paragraph" style:parent-style-name="Text_20_body">
      <style:text-properties fo:language="pt" fo:country="BR" officeooo:paragraph-rsid="007a978e"/>
    </style:style>
    <style:style style:name="P192" style:family="paragraph" style:parent-style-name="Text_20_body">
      <style:text-properties fo:language="pt" fo:country="BR" officeooo:rsid="007a978e" officeooo:paragraph-rsid="007a978e"/>
    </style:style>
    <style:style style:name="P193" style:family="paragraph" style:parent-style-name="Text_20_body">
      <style:text-properties fo:language="pt" fo:country="BR" officeooo:rsid="007b90a0" officeooo:paragraph-rsid="007b90a0"/>
    </style:style>
    <style:style style:name="P194" style:family="paragraph" style:parent-style-name="Heading_20_1">
      <style:paragraph-properties fo:line-height="100%" fo:break-before="page" fo:keep-with-next="always"/>
      <style:text-properties officeooo:paragraph-rsid="00ad5728"/>
    </style:style>
    <style:style style:name="P195" style:family="paragraph" style:parent-style-name="Text_20_body">
      <style:text-properties officeooo:paragraph-rsid="00c06c93"/>
    </style:style>
    <style:style style:name="P196" style:family="paragraph" style:parent-style-name="Text_20_body" style:list-style-name="L17">
      <style:text-properties fo:language="pt" fo:country="BR" fo:font-weight="normal" officeooo:paragraph-rsid="00c06c93" style:font-weight-asian="normal" style:font-weight-complex="normal"/>
    </style:style>
    <style:style style:name="P197" style:family="paragraph" style:parent-style-name="Text_20_body" style:list-style-name="L17">
      <style:paragraph-properties fo:margin-top="0cm" fo:margin-bottom="0cm" style:contextual-spacing="false" fo:orphans="2" fo:widows="2" fo:padding="0cm" fo:border="none"/>
      <style:text-properties officeooo:paragraph-rsid="00c06c93"/>
    </style:style>
    <style:style style:name="P198" style:family="paragraph" style:parent-style-name="Text_20_body" style:list-style-name="L17">
      <style:paragraph-properties fo:orphans="2" fo:widows="2" fo:padding="0cm" fo:border="none"/>
      <style:text-properties officeooo:paragraph-rsid="00c06c93"/>
    </style:style>
    <style:style style:name="P199" style:family="paragraph" style:parent-style-name="Text_20_body">
      <style:paragraph-properties fo:orphans="2" fo:widows="2" fo:padding="0cm" fo:border="none"/>
      <style:text-properties style:font-name="Liberation Sans" fo:language="pt" fo:country="BR" fo:font-weight="normal" officeooo:rsid="01c694eb" officeooo:paragraph-rsid="00c06c93" style:font-name-asian="Microsoft YaHei" style:font-weight-asian="normal" style:font-name-complex="Mangal1" style:font-weight-complex="normal"/>
    </style:style>
    <style:style style:name="P200" style:family="paragraph" style:parent-style-name="Text_20_body">
      <style:text-properties fo:language="pt" fo:country="BR" fo:font-weight="normal" officeooo:rsid="00bcf018" officeooo:paragraph-rsid="00c06c93" style:font-weight-asian="normal" style:font-weight-complex="normal"/>
    </style:style>
    <style:style style:name="P201" style:family="paragraph" style:parent-style-name="Text_20_body" style:list-style-name="L18">
      <style:paragraph-properties fo:margin-top="0cm" fo:margin-bottom="0.146cm" style:contextual-spacing="false"/>
      <style:text-properties officeooo:paragraph-rsid="00c06c93"/>
    </style:style>
    <style:style style:name="P202" style:family="paragraph" style:parent-style-name="Text_20_body" style:list-style-name="L19">
      <style:paragraph-properties fo:margin-top="0cm" fo:margin-bottom="0cm" style:contextual-spacing="false"/>
      <style:text-properties fo:language="pt" fo:country="BR" fo:font-weight="normal" officeooo:rsid="00bcf018" officeooo:paragraph-rsid="00c0a2a3" style:font-weight-asian="normal" style:font-weight-complex="normal"/>
    </style:style>
    <style:style style:name="P203" style:family="paragraph" style:parent-style-name="Text_20_body" style:list-style-name="L20">
      <style:paragraph-properties fo:margin-top="0cm" fo:margin-bottom="0cm" style:contextual-spacing="false"/>
      <style:text-properties fo:language="pt" fo:country="BR" fo:font-weight="normal" officeooo:rsid="00bcf018" officeooo:paragraph-rsid="00c0a2a3" style:font-weight-asian="normal" style:font-weight-complex="normal"/>
    </style:style>
    <style:style style:name="P204" style:family="paragraph" style:parent-style-name="Standard">
      <style:paragraph-properties fo:orphans="2" fo:widows="2" fo:padding="0cm" fo:border="none"/>
      <style:text-properties officeooo:paragraph-rsid="00c0a2a3"/>
    </style:style>
    <style:style style:name="P205" style:family="paragraph" style:parent-style-name="Standard">
      <style:paragraph-properties fo:orphans="2" fo:widows="2" fo:padding="0cm" fo:border="none"/>
      <style:text-properties fo:color="#d4d4d4" loext:opacity="100%" style:font-name="Consolas" fo:font-size="10.5pt" fo:font-weight="normal" officeooo:paragraph-rsid="00c0a2a3" fo:background-color="#121314"/>
    </style:style>
    <style:style style:name="P206" style:family="paragraph" style:parent-style-name="Text_20_body">
      <style:paragraph-properties fo:orphans="2" fo:widows="2" fo:padding="0cm" fo:border="none"/>
      <style:text-properties style:font-name="Liberation Sans" fo:language="pt" fo:country="BR" fo:font-weight="normal" officeooo:rsid="00c06c93" officeooo:paragraph-rsid="00c06c93" style:font-name-asian="Microsoft YaHei" style:font-weight-asian="normal" style:font-name-complex="Mangal1" style:font-weight-complex="normal"/>
    </style:style>
    <style:style style:name="P207" style:family="paragraph" style:parent-style-name="Heading_20_1">
      <style:paragraph-properties fo:line-height="100%" fo:break-before="page"/>
      <style:text-properties style:font-name="Liberation Sans" fo:language="pt" fo:country="BR" officeooo:rsid="01c694eb" officeooo:paragraph-rsid="00ad5728" style:font-name-asian="Microsoft YaHei" style:font-name-complex="Mangal1"/>
    </style:style>
    <style:style style:name="P208" style:family="paragraph" style:parent-style-name="Text_20_body">
      <style:paragraph-properties fo:line-height="100%"/>
      <style:text-properties fo:language="pt" fo:country="BR" officeooo:rsid="01dcbca4" officeooo:paragraph-rsid="00ad5728"/>
    </style:style>
    <style:style style:name="P209" style:family="paragraph" style:parent-style-name="Text_20_body" style:list-style-name="L21">
      <style:paragraph-properties fo:line-height="100%"/>
      <style:text-properties officeooo:paragraph-rsid="00ad5728"/>
    </style:style>
    <style:style style:name="P210" style:family="paragraph" style:parent-style-name="Text_20_body" style:list-style-name="L21"/>
    <style:style style:name="P211" style:family="paragraph" style:parent-style-name="Text_20_body">
      <style:text-properties style:font-name="Liberation Serif" fo:language="pt" fo:country="BR" fo:font-weight="normal" style:font-weight-asian="normal" style:font-weight-complex="normal"/>
    </style:style>
    <style:style style:name="P212" style:family="paragraph" style:parent-style-name="Text_20_body" style:list-style-name="L22"/>
    <style:style style:name="P213" style:family="paragraph" style:parent-style-name="Text_20_body">
      <style:text-properties officeooo:paragraph-rsid="00d03727"/>
    </style:style>
    <style:style style:name="P214" style:family="paragraph" style:parent-style-name="Text_20_body">
      <style:text-properties officeooo:paragraph-rsid="00d0b8d6"/>
    </style:style>
    <style:style style:name="P215" style:family="paragraph" style:parent-style-name="Text_20_body">
      <style:text-properties style:font-name="Liberation Serif" fo:language="pt" fo:country="BR" fo:font-weight="normal" officeooo:paragraph-rsid="00d0b8d6" style:font-weight-asian="normal" style:font-weight-complex="normal"/>
    </style:style>
    <style:style style:name="P216" style:family="paragraph" style:parent-style-name="Text_20_body" style:list-style-name="L23">
      <style:text-properties style:font-name="Liberation Serif" fo:language="pt" fo:country="BR" fo:font-weight="normal" officeooo:paragraph-rsid="00d0b8d6" style:font-weight-asian="normal" style:font-weight-complex="normal"/>
    </style:style>
    <style:style style:name="P217" style:family="paragraph" style:parent-style-name="Text_20_body" style:list-style-name="L23">
      <style:text-properties officeooo:paragraph-rsid="00d0b8d6"/>
    </style:style>
    <style:style style:name="P218" style:family="paragraph" style:parent-style-name="Heading_20_2">
      <style:text-properties fo:language="pt" fo:country="BR" officeooo:rsid="00aeb741" officeooo:paragraph-rsid="00aeb741"/>
    </style:style>
    <style:style style:name="P219" style:family="paragraph" style:parent-style-name="Text_20_body">
      <style:text-properties officeooo:paragraph-rsid="00ad5728"/>
    </style:style>
    <style:style style:name="P220" style:family="paragraph" style:parent-style-name="Heading_20_2">
      <style:text-properties fo:language="pt" fo:country="BR"/>
    </style:style>
    <style:style style:name="P221" style:family="paragraph" style:parent-style-name="Text_20_body">
      <style:paragraph-properties fo:line-height="100%"/>
      <style:text-properties officeooo:paragraph-rsid="00ad5728"/>
    </style:style>
    <style:style style:name="P222" style:family="paragraph" style:parent-style-name="Text_20_body">
      <style:paragraph-properties fo:line-height="100%" fo:text-align="center" style:justify-single-word="false"/>
      <style:text-properties fo:language="pt" fo:country="BR" officeooo:paragraph-rsid="00ad5728"/>
    </style:style>
    <style:style style:name="P223" style:family="paragraph" style:parent-style-name="Heading_20_2">
      <style:text-properties fo:language="pt" fo:country="BR" fo:font-weight="bold" style:font-weight-asian="bold" style:font-weight-complex="bold"/>
    </style:style>
    <style:style style:name="P224" style:family="paragraph" style:parent-style-name="Text_20_body">
      <style:text-properties fo:language="pt" fo:country="BR" officeooo:rsid="00ad5728" officeooo:paragraph-rsid="00ad5728"/>
    </style:style>
    <style:style style:name="P225" style:family="paragraph" style:parent-style-name="Text_20_body">
      <style:text-properties fo:language="pt" fo:country="BR" officeooo:paragraph-rsid="00bca7d6"/>
    </style:style>
    <style:style style:name="P226" style:family="paragraph" style:parent-style-name="Text_20_body">
      <style:paragraph-properties fo:line-height="100%"/>
      <style:text-properties fo:language="pt" fo:country="BR" officeooo:paragraph-rsid="00bca7d6"/>
    </style:style>
    <style:style style:name="P227" style:family="paragraph" style:parent-style-name="Text_20_body">
      <style:text-properties fo:language="pt" fo:country="BR" officeooo:paragraph-rsid="00ad5728"/>
    </style:style>
    <style:style style:name="P228" style:family="paragraph" style:parent-style-name="Text_20_body">
      <style:paragraph-properties fo:line-height="100%"/>
      <style:text-properties fo:language="pt" fo:country="BR" officeooo:paragraph-rsid="00ad5728"/>
    </style:style>
    <style:style style:name="P229" style:family="paragraph" style:parent-style-name="Text_20_body">
      <style:text-properties fo:language="pt" fo:country="BR" officeooo:paragraph-rsid="00bb4aaa"/>
    </style:style>
    <style:style style:name="P230" style:family="paragraph" style:parent-style-name="Text_20_body" style:list-style-name="L24">
      <style:paragraph-properties fo:line-height="100%"/>
      <style:text-properties officeooo:paragraph-rsid="00ad5728"/>
    </style:style>
    <style:style style:name="P231" style:family="paragraph" style:parent-style-name="Text_20_body" style:list-style-name="L25">
      <style:paragraph-properties fo:line-height="100%"/>
      <style:text-properties officeooo:paragraph-rsid="00ad5728"/>
    </style:style>
    <style:style style:name="P232" style:family="paragraph" style:parent-style-name="Text_20_body">
      <style:text-properties fo:language="pt" fo:country="BR" officeooo:rsid="00bf1a17" officeooo:paragraph-rsid="00bf1a17"/>
    </style:style>
    <style:style style:name="P233" style:family="paragraph" style:parent-style-name="Text_20_body" style:list-style-name="L26">
      <style:paragraph-properties fo:margin-top="0cm" fo:margin-bottom="0cm" style:contextual-spacing="false"/>
      <style:text-properties fo:language="pt" fo:country="BR" officeooo:paragraph-rsid="00bf1a17"/>
    </style:style>
    <style:style style:name="P234" style:family="paragraph" style:parent-style-name="Text_20_body" style:list-style-name="L26">
      <style:paragraph-properties fo:margin-top="0cm" fo:margin-bottom="0cm" style:contextual-spacing="false"/>
      <style:text-properties fo:language="pt" fo:country="BR" fo:font-weight="normal" officeooo:paragraph-rsid="00bf1a17" style:font-weight-asian="normal" style:font-weight-complex="normal"/>
    </style:style>
    <style:style style:name="P235" style:family="paragraph" style:parent-style-name="Text_20_body">
      <style:paragraph-properties fo:margin-top="0cm" fo:margin-bottom="0cm" style:contextual-spacing="false"/>
      <style:text-properties fo:language="pt" fo:country="BR" fo:font-weight="normal" officeooo:paragraph-rsid="00bf1a17" style:font-weight-asian="normal" style:font-weight-complex="normal"/>
    </style:style>
    <style:style style:name="P236" style:family="paragraph" style:parent-style-name="Text_20_body">
      <style:text-properties officeooo:paragraph-rsid="00bf1a17"/>
    </style:style>
    <style:style style:name="P237" style:family="paragraph" style:parent-style-name="Text_20_body" style:list-style-name="L27">
      <style:text-properties fo:language="pt" fo:country="BR" officeooo:rsid="00bf1a17" officeooo:paragraph-rsid="00bf1a17"/>
    </style:style>
    <style:style style:name="P238" style:family="paragraph" style:parent-style-name="Text_20_body" style:list-style-name="L27">
      <style:text-properties fo:language="pt" fo:country="BR" officeooo:rsid="00c4e865" officeooo:paragraph-rsid="00c4e865"/>
    </style:style>
    <style:style style:name="P239" style:family="paragraph" style:parent-style-name="Text_20_body" style:list-style-name="L27">
      <style:text-properties fo:language="pt" fo:country="BR" officeooo:rsid="00c3669d" officeooo:paragraph-rsid="00c3669d"/>
    </style:style>
    <style:style style:name="P240" style:family="paragraph" style:parent-style-name="Heading_20_2">
      <style:paragraph-properties fo:line-height="100%"/>
      <style:text-properties fo:language="pt" fo:country="BR" fo:font-weight="normal" officeooo:paragraph-rsid="00ad5728" style:font-weight-asian="normal" style:font-weight-complex="normal"/>
    </style:style>
    <style:style style:name="P241" style:family="paragraph" style:parent-style-name="Text_20_body" style:list-style-name="L28">
      <style:text-properties officeooo:paragraph-rsid="00ad5728"/>
    </style:style>
    <style:style style:name="P242" style:family="paragraph" style:parent-style-name="Text_20_body">
      <style:paragraph-properties fo:line-height="100%"/>
      <style:text-properties fo:language="pt" fo:country="BR" fo:font-weight="normal" officeooo:rsid="0204338d" officeooo:paragraph-rsid="00ad5728" style:font-weight-asian="normal" style:font-weight-complex="normal"/>
    </style:style>
    <style:style style:name="P243" style:family="paragraph" style:parent-style-name="Heading_20_2">
      <style:paragraph-properties fo:keep-with-next="always"/>
      <style:text-properties style:font-name="Liberation Sans" fo:language="pt" fo:country="BR" style:font-name-asian="Microsoft YaHei" style:font-name-complex="Mangal1"/>
    </style:style>
    <style:style style:name="P244" style:family="paragraph" style:parent-style-name="Text_20_body">
      <style:paragraph-properties fo:line-height="100%"/>
      <style:text-properties fo:language="pt" fo:country="BR" fo:font-weight="normal" officeooo:rsid="00c46bbb" officeooo:paragraph-rsid="00c46bbb" style:font-weight-asian="normal" style:font-weight-complex="normal"/>
    </style:style>
    <style:style style:name="P245" style:family="paragraph" style:parent-style-name="Heading_20_2">
      <style:text-properties fo:language="pt" fo:country="BR" fo:font-weight="normal" officeooo:paragraph-rsid="00ad5728" style:font-weight-asian="normal" style:font-weight-complex="normal"/>
    </style:style>
    <style:style style:name="P246" style:family="paragraph" style:parent-style-name="Table_20_Heading">
      <style:text-properties fo:language="pt" fo:country="BR" officeooo:paragraph-rsid="00ad5728"/>
    </style:style>
    <style:style style:name="P247" style:family="paragraph" style:parent-style-name="Table_20_Heading">
      <style:text-properties officeooo:paragraph-rsid="00ad5728"/>
    </style:style>
    <style:style style:name="P248" style:family="paragraph" style:parent-style-name="Table_20_Contents">
      <style:text-properties fo:language="pt" fo:country="BR" officeooo:paragraph-rsid="00ad5728"/>
    </style:style>
    <style:style style:name="P249" style:family="paragraph" style:parent-style-name="Table_20_Contents">
      <style:text-properties officeooo:paragraph-rsid="00ad5728"/>
    </style:style>
    <style:style style:name="P250" style:family="paragraph" style:parent-style-name="Horizontal_20_Line">
      <style:text-properties fo:language="pt" fo:country="BR" officeooo:paragraph-rsid="00ad5728"/>
    </style:style>
    <style:style style:name="P251" style:family="paragraph" style:parent-style-name="Text_20_body">
      <style:paragraph-properties fo:line-height="100%"/>
      <style:text-properties officeooo:paragraph-rsid="00b20e2e"/>
    </style:style>
    <style:style style:name="P252" style:family="paragraph" style:parent-style-name="Text_20_body" style:list-style-name="L29">
      <style:paragraph-properties fo:line-height="100%"/>
      <style:text-properties officeooo:paragraph-rsid="00ad5728"/>
    </style:style>
    <style:style style:name="P253" style:family="paragraph" style:parent-style-name="Text_20_body" style:list-style-name="L30">
      <style:paragraph-properties fo:line-height="100%"/>
      <style:text-properties officeooo:paragraph-rsid="00ad5728"/>
    </style:style>
    <style:style style:name="P254" style:family="paragraph" style:parent-style-name="Heading_20_2">
      <style:text-properties officeooo:paragraph-rsid="00c86894"/>
    </style:style>
    <style:style style:name="P255" style:family="paragraph" style:parent-style-name="Text_20_body" style:list-style-name="L31">
      <style:paragraph-properties fo:line-height="100%"/>
      <style:text-properties officeooo:paragraph-rsid="00ad5728"/>
    </style:style>
    <style:style style:name="P256" style:family="paragraph" style:parent-style-name="Text_20_body" style:list-style-name="L32">
      <style:paragraph-properties fo:line-height="100%"/>
      <style:text-properties officeooo:paragraph-rsid="00ad5728"/>
    </style:style>
    <style:style style:name="P257" style:family="paragraph" style:parent-style-name="Text_20_body" style:list-style-name="L33">
      <style:paragraph-properties fo:line-height="100%"/>
      <style:text-properties officeooo:paragraph-rsid="00ad5728"/>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officeooo:rsid="0033c799"/>
    </style:style>
    <style:style style:name="T47" style:family="text">
      <style:text-properties fo:color="#9cdcfe" loext:opacity="100%" style:font-name="Consolas" fo:font-size="12pt" fo:font-weight="normal" fo:background-color="#1e1e1e" loext:char-shading-value="0"/>
    </style:style>
    <style:style style:name="T48" style:family="text">
      <style:text-properties fo:color="#9cdcfe" loext:opacity="100%" style:font-name="Consolas" fo:font-size="12pt" fo:font-weight="normal" officeooo:rsid="007d65c0" fo:background-color="#1e1e1e" loext:char-shading-value="0"/>
    </style:style>
    <style:style style:name="T49" style:family="text">
      <style:text-properties fo:color="#d4d4d4" loext:opacity="100%" style:font-name="Consolas" fo:font-size="12pt" fo:font-weight="normal" fo:background-color="#1e1e1e" loext:char-shading-value="0"/>
    </style:style>
    <style:style style:name="T50" style:family="text">
      <style:text-properties fo:color="#569cd6" loext:opacity="100%" style:font-name="Consolas" fo:font-size="12pt" fo:font-weight="normal" fo:background-color="#1e1e1e" loext:char-shading-value="0"/>
    </style:style>
    <style:style style:name="T51" style:family="text">
      <style:text-properties fo:color="#4ec9b0" loext:opacity="100%" style:font-name="Consolas" fo:font-size="12pt" fo:font-weight="normal" fo:background-color="#1e1e1e" loext:char-shading-value="0"/>
    </style:style>
    <style:style style:name="T52" style:family="text">
      <style:text-properties fo:font-weight="normal" style:font-weight-asian="normal" style:font-weight-complex="normal"/>
    </style:style>
    <style:style style:name="T53" style:family="text">
      <style:text-properties officeooo:rsid="006ce751"/>
    </style:style>
    <style:style style:name="T54" style:family="text">
      <style:text-properties officeooo:rsid="007441f8"/>
    </style:style>
    <style:style style:name="T55" style:family="text">
      <style:text-properties officeooo:rsid="007d65c0"/>
    </style:style>
    <style:style style:name="T56" style:family="text">
      <style:text-properties officeooo:rsid="00340e24"/>
    </style:style>
    <style:style style:name="T57" style:family="text">
      <style:text-properties officeooo:rsid="004495ba"/>
    </style:style>
    <style:style style:name="T58"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59" style:family="text">
      <style:text-properties fo:font-size="12pt" style:text-underline-style="none" fo:font-weight="normal" officeooo:rsid="0089288d" style:font-size-asian="12pt" style:font-weight-asian="normal" style:font-size-complex="12pt" style:font-weight-complex="normal"/>
    </style:style>
    <style:style style:name="T60" style:family="text">
      <style:text-properties fo:font-size="12pt" style:text-underline-style="none" fo:font-weight="bold" style:font-size-asian="12pt" style:font-weight-asian="bold" style:font-size-complex="12pt" style:font-weight-complex="bold"/>
    </style:style>
    <style:style style:name="T61" style:family="text">
      <style:text-properties fo:font-size="12pt" style:text-underline-style="none" fo:font-weight="bold" officeooo:rsid="006ce751" style:font-size-asian="12pt" style:font-weight-asian="bold" style:font-size-complex="12pt" style:font-weight-complex="bold"/>
    </style:style>
    <style:style style:name="T62" style:family="text">
      <style:text-properties fo:font-size="12pt" style:text-underline-style="none" fo:font-weight="normal" style:font-size-asian="12pt" style:font-weight-asian="normal" style:font-size-complex="12pt" style:font-weight-complex="normal"/>
    </style:style>
    <style:style style:name="T63" style:family="text">
      <style:text-properties fo:font-size="12pt" style:text-underline-style="none" fo:font-weight="normal" officeooo:rsid="006ce751"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5"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6"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7"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8"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69"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0"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1"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2"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3"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5"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6"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7"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8" style:family="text">
      <style:text-properties fo:font-size="12pt" style:text-underline-style="none" fo:font-weight="normal" officeooo:rsid="0019f51b" style:font-size-asian="12pt" style:font-weight-asian="normal" style:font-size-complex="12pt" style:font-weight-complex="normal"/>
    </style:style>
    <style:style style:name="T79" style:family="text">
      <style:text-properties fo:font-size="12pt" style:text-underline-style="none" fo:font-weight="bold" officeooo:rsid="0019f51b" style:font-size-asian="12pt" style:font-weight-asian="bold" style:font-size-complex="12pt" style:font-weight-complex="bold"/>
    </style:style>
    <style:style style:name="T80" style:family="text">
      <style:text-properties style:font-name="Mono" fo:font-size="12pt" style:text-underline-style="none" fo:font-weight="normal" officeooo:rsid="0019f51b" style:font-size-asian="12pt" style:font-weight-asian="normal" style:font-size-complex="12pt" style:font-weight-complex="normal"/>
    </style:style>
    <style:style style:name="T81" style:family="text">
      <style:text-properties fo:font-size="12pt" style:text-underline-style="none" fo:font-weight="normal" officeooo:rsid="007d65c0" style:font-size-asian="12pt" style:font-weight-asian="normal" style:font-size-complex="12pt" style:font-weight-complex="normal"/>
    </style:style>
    <style:style style:name="T82" style:family="text">
      <style:text-properties officeooo:rsid="001acd1e"/>
    </style:style>
    <style:style style:name="T83" style:family="text">
      <style:text-properties officeooo:rsid="0023a491"/>
    </style:style>
    <style:style style:name="T84" style:family="text">
      <style:text-properties style:text-underline-style="solid" style:text-underline-width="auto" style:text-underline-color="font-color" officeooo:rsid="007441f8"/>
    </style:style>
    <style:style style:name="T85" style:family="text">
      <style:text-properties fo:color="#2a6099" loext:opacity="100%" style:font-name="Mono" fo:font-weight="bold" style:font-weight-asian="bold" style:font-weight-complex="bold"/>
    </style:style>
    <style:style style:name="T86" style:family="text">
      <style:text-properties officeooo:rsid="007dbede"/>
    </style:style>
    <style:style style:name="T87" style:family="text">
      <style:text-properties officeooo:rsid="001eb3b8"/>
    </style:style>
    <style:style style:name="T88" style:family="text">
      <style:text-properties style:text-underline-style="none"/>
    </style:style>
    <style:style style:name="T89" style:family="text">
      <style:text-properties officeooo:rsid="001f8a00"/>
    </style:style>
    <style:style style:name="T90" style:family="text">
      <style:text-properties fo:font-weight="normal" officeooo:rsid="0023a491" style:font-weight-asian="normal" style:font-weight-complex="normal"/>
    </style:style>
    <style:style style:name="T91" style:family="text">
      <style:text-properties fo:font-weight="normal" officeooo:rsid="007dbede" style:font-weight-asian="normal" style:font-weight-complex="normal"/>
    </style:style>
    <style:style style:name="T92" style:family="text">
      <style:text-properties style:text-underline-style="solid" style:text-underline-width="auto" style:text-underline-color="font-color"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23a491" style:font-weight-asian="normal" style:font-weight-complex="normal"/>
    </style:style>
    <style:style style:name="T94" style:family="text">
      <style:text-properties style:text-underline-style="solid" style:text-underline-width="auto" style:text-underline-color="font-color" fo:font-weight="normal" officeooo:rsid="002df509" style:font-weight-asian="normal" style:font-weight-complex="normal"/>
    </style:style>
    <style:style style:name="T95" style:family="text">
      <style:text-properties officeooo:rsid="00749c05"/>
    </style:style>
    <style:style style:name="T96" style:family="text">
      <style:text-properties fo:color="#ff0000" loext:opacity="100%"/>
    </style:style>
    <style:style style:name="T97" style:family="text">
      <style:text-properties officeooo:rsid="0024baa9"/>
    </style:style>
    <style:style style:name="T98" style:family="text">
      <style:text-properties fo:font-weight="bold" officeooo:rsid="0024baa9" style:font-weight-asian="bold" style:font-weight-complex="bold"/>
    </style:style>
    <style:style style:name="T99" style:family="text">
      <style:text-properties fo:font-weight="bold" officeooo:rsid="00751323" style:font-weight-asian="bold" style:font-weight-complex="bold"/>
    </style:style>
    <style:style style:name="T100" style:family="text">
      <style:text-properties fo:font-weight="normal" officeooo:rsid="0024baa9" style:font-weight-asian="normal" style:font-weight-complex="normal"/>
    </style:style>
    <style:style style:name="T101" style:family="text">
      <style:text-properties style:font-name="Mono" officeooo:rsid="0024baa9"/>
    </style:style>
    <style:style style:name="T102" style:family="text">
      <style:text-properties fo:color="#dcdcaa" loext:opacity="100%" style:font-name="Consolas" fo:font-size="12pt" fo:font-weight="normal" officeooo:rsid="0024baa9" fo:background-color="#1e1e1e" loext:char-shading-value="0"/>
    </style:style>
    <style:style style:name="T103" style:family="text">
      <style:text-properties fo:color="#d4d4d4" loext:opacity="100%" style:font-name="Consolas" fo:font-size="12pt" fo:font-weight="normal" officeooo:rsid="0024baa9" fo:background-color="#1e1e1e" loext:char-shading-value="0"/>
    </style:style>
    <style:style style:name="T104" style:family="text">
      <style:text-properties fo:color="#ce9178" loext:opacity="100%" style:font-name="Consolas" fo:font-size="12pt" fo:font-weight="normal" officeooo:rsid="0024baa9" fo:background-color="#1e1e1e" loext:char-shading-value="0"/>
    </style:style>
    <style:style style:name="T105" style:family="text">
      <style:text-properties fo:color="#9cdcfe" loext:opacity="100%" style:font-name="Consolas" fo:font-size="12pt" fo:font-weight="normal" officeooo:rsid="0024baa9" fo:background-color="#1e1e1e" loext:char-shading-value="0"/>
    </style:style>
    <style:style style:name="T106" style:family="text">
      <style:text-properties officeooo:rsid="0095c00f"/>
    </style:style>
    <style:style style:name="T107" style:family="text">
      <style:text-properties fo:font-weight="bold" officeooo:rsid="0095c00f" style:font-weight-asian="bold" style:font-weight-complex="bold"/>
    </style:style>
    <style:style style:name="T108" style:family="text">
      <style:text-properties fo:font-weight="bold" officeooo:rsid="0097d991" style:font-weight-asian="bold" style:font-weight-complex="bold"/>
    </style:style>
    <style:style style:name="T109" style:family="text">
      <style:text-properties style:text-underline-style="none" fo:font-weight="bold" officeooo:rsid="0095c00f" style:font-weight-asian="bold" style:font-weight-complex="bold"/>
    </style:style>
    <style:style style:name="T110" style:family="text">
      <style:text-properties style:text-underline-style="none" fo:font-weight="bold" officeooo:rsid="0097d991" style:font-weight-asian="bold" style:font-weight-complex="bold"/>
    </style:style>
    <style:style style:name="T111" style:family="text">
      <style:text-properties fo:font-weight="normal" officeooo:rsid="0097d991" style:font-weight-asian="normal" style:font-weight-complex="normal"/>
    </style:style>
    <style:style style:name="T112" style:family="text">
      <style:text-properties officeooo:rsid="0097d991"/>
    </style:style>
    <style:style style:name="T113" style:family="text">
      <style:text-properties officeooo:rsid="0095e7d4"/>
    </style:style>
    <style:style style:name="T114" style:family="text">
      <style:text-properties officeooo:rsid="006d95f7"/>
    </style:style>
    <style:style style:name="T115" style:family="text">
      <style:text-properties style:text-underline-style="none" officeooo:rsid="0095c00f"/>
    </style:style>
    <style:style style:name="T116" style:family="text">
      <style:text-properties fo:font-weight="bold" officeooo:rsid="009a385d" style:font-weight-asian="bold" style:font-weight-complex="bold"/>
    </style:style>
    <style:style style:name="T117" style:family="text">
      <style:text-properties officeooo:rsid="00989d8f"/>
    </style:style>
    <style:style style:name="T118"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19"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0"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1" style:family="text">
      <style:text-properties fo:color="#569cd6" loext:opacity="100%"/>
    </style:style>
    <style:style style:name="T122" style:family="text">
      <style:text-properties fo:color="#d4d4d4" loext:opacity="100%"/>
    </style:style>
    <style:style style:name="T123" style:family="text">
      <style:text-properties fo:color="#9cdcfe" loext:opacity="100%"/>
    </style:style>
    <style:style style:name="T124" style:family="text">
      <style:text-properties fo:color="#dcdcaa" loext:opacity="100%"/>
    </style:style>
    <style:style style:name="T125" style:family="text">
      <style:text-properties fo:color="#569cd6" loext:opacity="100%" officeooo:rsid="009aaf03"/>
    </style:style>
    <style:style style:name="T126" style:family="text">
      <style:text-properties officeooo:rsid="00359951"/>
    </style:style>
    <style:style style:name="T127" style:family="text">
      <style:text-properties fo:color="#2a6099" loext:opacity="100%" style:font-name="Mono" fo:font-size="14pt" fo:language="pt" fo:country="BR" fo:font-weight="bold" style:font-size-asian="14pt" style:font-weight-asian="bold" style:font-size-complex="14pt" style:font-weight-complex="bold"/>
    </style:style>
    <style:style style:name="T128" style:family="text">
      <style:text-properties fo:language="pt" fo:country="BR" officeooo:rsid="009c4a06"/>
    </style:style>
    <style:style style:name="T129" style:family="text">
      <style:text-properties fo:language="pt" fo:country="BR" officeooo:rsid="009aaf03"/>
    </style:style>
    <style:style style:name="T130" style:family="text">
      <style:text-properties fo:language="pt" fo:country="BR" officeooo:rsid="009aab7b"/>
    </style:style>
    <style:style style:name="T131" style:family="text">
      <style:text-properties fo:language="pt" fo:country="BR" fo:font-weight="normal" style:font-weight-asian="normal" style:font-weight-complex="normal"/>
    </style:style>
    <style:style style:name="T132" style:family="text">
      <style:text-properties fo:language="pt" fo:country="BR" fo:font-weight="normal" officeooo:rsid="00a37bab" style:font-weight-asian="normal" style:font-weight-complex="normal"/>
    </style:style>
    <style:style style:name="T133" style:family="text">
      <style:text-properties fo:language="pt" fo:country="BR" fo:font-weight="normal" officeooo:rsid="009aab7b" style:font-weight-asian="normal" style:font-weight-complex="normal"/>
    </style:style>
    <style:style style:name="T134" style:family="text">
      <style:text-properties fo:color="#4ec9b0" loext:opacity="100%"/>
    </style:style>
    <style:style style:name="T135" style:family="text">
      <style:text-properties fo:color="#569cd6" loext:opacity="100%" style:font-name="Consolas" fo:font-size="10.5pt" fo:font-weight="normal" fo:background-color="#1f1f1f" loext:char-shading-value="0"/>
    </style:style>
    <style:style style:name="T136" style:family="text">
      <style:text-properties fo:color="#d4d4d4" loext:opacity="100%" style:font-name="Consolas" fo:font-size="10.5pt" fo:font-weight="normal" fo:background-color="#1f1f1f" loext:char-shading-value="0"/>
    </style:style>
    <style:style style:name="T137" style:family="text">
      <style:text-properties fo:color="#4ec9b0" loext:opacity="100%" style:font-name="Consolas" fo:font-size="10.5pt" fo:font-weight="normal" fo:background-color="#1f1f1f" loext:char-shading-value="0"/>
    </style:style>
    <style:style style:name="T138" style:family="text">
      <style:text-properties fo:color="#9cdcfe" loext:opacity="100%" style:font-name="Consolas" fo:font-size="10.5pt" fo:font-weight="normal" fo:background-color="#1f1f1f" loext:char-shading-value="0"/>
    </style:style>
    <style:style style:name="T139" style:family="text">
      <style:text-properties fo:color="#ce9178" loext:opacity="100%"/>
    </style:style>
    <style:style style:name="T140" style:family="text">
      <style:text-properties fo:color="#6a9955" loext:opacity="100%"/>
    </style:style>
    <style:style style:name="T141" style:family="text">
      <style:text-properties fo:color="#569cd6" loext:opacity="100%" style:font-name="Consolas" fo:font-size="10.5pt" fo:font-weight="normal" officeooo:rsid="009aaf03" fo:background-color="#1f1f1f" loext:char-shading-value="0"/>
    </style:style>
    <style:style style:name="T142" style:family="text">
      <style:text-properties fo:color="#d4d4d4" loext:opacity="100%" style:font-name="Consolas" fo:font-size="10.5pt" fo:font-weight="normal" officeooo:rsid="009aaf03" fo:background-color="#1f1f1f" loext:char-shading-value="0"/>
    </style:style>
    <style:style style:name="T143" style:family="text">
      <style:text-properties fo:color="#4ec9b0" loext:opacity="100%" style:font-name="Consolas" fo:font-size="10.5pt" fo:font-weight="normal" officeooo:rsid="009aaf03" fo:background-color="#1f1f1f" loext:char-shading-value="0"/>
    </style:style>
    <style:style style:name="T144" style:family="text">
      <style:text-properties fo:language="pt" fo:country="BR" fo:font-weight="bold" style:font-weight-asian="bold" style:font-weight-complex="bold"/>
    </style:style>
    <style:style style:name="T145" style:family="text">
      <style:text-properties fo:language="pt" fo:country="BR" officeooo:rsid="009f1751"/>
    </style:style>
    <style:style style:name="T146" style:family="text">
      <style:text-properties fo:color="#569cd6" loext:opacity="100%" style:font-name="Consolas" fo:font-size="10.5pt" fo:font-weight="normal" officeooo:rsid="009f1751" fo:background-color="#1f1f1f" loext:char-shading-value="0"/>
    </style:style>
    <style:style style:name="T147" style:family="text">
      <style:text-properties fo:color="#d4d4d4" loext:opacity="100%" style:font-name="Consolas" fo:font-size="10.5pt" fo:font-weight="normal" officeooo:rsid="009f1751" fo:background-color="#1f1f1f" loext:char-shading-value="0"/>
    </style:style>
    <style:style style:name="T148" style:family="text">
      <style:text-properties fo:color="#4ec9b0" loext:opacity="100%" style:font-name="Consolas" fo:font-size="10.5pt" fo:font-weight="normal" officeooo:rsid="009f1751" fo:background-color="#1f1f1f" loext:char-shading-value="0"/>
    </style:style>
    <style:style style:name="T149" style:family="text">
      <style:text-properties fo:color="#c586c0" loext:opacity="100%"/>
    </style:style>
    <style:style style:name="T150" style:family="text">
      <style:text-properties officeooo:rsid="009ff844"/>
    </style:style>
    <style:style style:name="T151" style:family="text">
      <style:text-properties fo:color="#b5cea8" loext:opacity="100%"/>
    </style:style>
    <style:style style:name="T152" style:family="text">
      <style:text-properties fo:language="pt" fo:country="BR" fo:font-weight="bold" officeooo:rsid="009ff844" style:font-weight-asian="bold" style:font-weight-complex="bold"/>
    </style:style>
    <style:style style:name="T153" style:family="text">
      <style:text-properties fo:language="pt" fo:country="BR" fo:font-weight="normal" officeooo:rsid="009ff844" style:font-weight-asian="normal" style:font-weight-complex="normal"/>
    </style:style>
    <style:style style:name="T154" style:family="text">
      <style:text-properties fo:language="pt" fo:country="BR" fo:font-weight="normal" officeooo:rsid="00a61ae8" style:font-weight-asian="normal" style:font-weight-complex="normal"/>
    </style:style>
    <style:style style:name="T155" style:family="text">
      <style:text-properties fo:color="#2a6099" loext:opacity="100%" style:font-name="Mono" fo:language="pt" fo:country="BR" fo:font-weight="bold" officeooo:rsid="009ff844" style:font-weight-asian="bold" style:font-weight-complex="bold"/>
    </style:style>
    <style:style style:name="T156" style:family="text">
      <style:text-properties fo:language="pt" fo:country="BR" officeooo:rsid="00a61ae8"/>
    </style:style>
    <style:style style:name="T157" style:family="text">
      <style:text-properties fo:language="pt" fo:country="BR" officeooo:rsid="009ff844"/>
    </style:style>
    <style:style style:name="T158" style:family="text">
      <style:text-properties fo:color="#9cdcfe" loext:opacity="100%" officeooo:rsid="009ff844"/>
    </style:style>
    <style:style style:name="T159" style:family="text">
      <style:text-properties fo:color="#d4d4d4" loext:opacity="100%" officeooo:rsid="009ff844"/>
    </style:style>
    <style:style style:name="T160" style:family="text">
      <style:text-properties fo:color="#4ec9b0" loext:opacity="100%" officeooo:rsid="009ff844"/>
    </style:style>
    <style:style style:name="T161" style:family="text">
      <style:text-properties fo:color="#dcdcaa" loext:opacity="100%" officeooo:rsid="009ff844"/>
    </style:style>
    <style:style style:name="T162" style:family="text">
      <style:text-properties fo:color="#b5cea8" loext:opacity="100%" officeooo:rsid="009ff844"/>
    </style:style>
    <style:style style:name="T163" style:family="text">
      <style:text-properties fo:color="#6a9955" loext:opacity="100%" officeooo:rsid="009ff844"/>
    </style:style>
    <style:style style:name="T164" style:family="text">
      <style:text-properties fo:color="#d4d4d4" loext:opacity="100%" officeooo:rsid="00a61ae8"/>
    </style:style>
    <style:style style:name="T165" style:family="text">
      <style:text-properties fo:language="pt" fo:country="BR" officeooo:rsid="00a119ed"/>
    </style:style>
    <style:style style:name="T166" style:family="text">
      <style:text-properties fo:color="#c586c0" loext:opacity="100%" style:font-name="Consolas" fo:font-size="10.5pt" fo:language="pt" fo:country="BR" fo:font-weight="normal" officeooo:rsid="00a119ed" fo:background-color="#1f1f1f" loext:char-shading-value="0"/>
    </style:style>
    <style:style style:name="T167" style:family="text">
      <style:text-properties fo:color="#d4d4d4" loext:opacity="100%" style:font-name="Consolas" fo:font-size="10.5pt" fo:language="pt" fo:country="BR" fo:font-weight="normal" officeooo:rsid="00a119ed" fo:background-color="#1f1f1f" loext:char-shading-value="0"/>
    </style:style>
    <style:style style:name="T168" style:family="text">
      <style:text-properties fo:color="#4ec9b0" loext:opacity="100%" style:font-name="Consolas" fo:font-size="10.5pt" fo:language="pt" fo:country="BR" fo:font-weight="normal" officeooo:rsid="00a119ed" fo:background-color="#1f1f1f" loext:char-shading-value="0"/>
    </style:style>
    <style:style style:name="T169" style:family="text">
      <style:text-properties fo:color="#dcdcaa" loext:opacity="100%" style:font-name="Consolas" fo:font-size="10.5pt" fo:language="pt" fo:country="BR" fo:font-weight="normal" officeooo:rsid="00a119ed" fo:background-color="#1f1f1f" loext:char-shading-value="0"/>
    </style:style>
    <style:style style:name="T170" style:family="text">
      <style:text-properties fo:color="#9cdcfe" loext:opacity="100%" style:font-name="Consolas" fo:font-size="10.5pt" fo:language="pt" fo:country="BR" fo:font-weight="normal" officeooo:rsid="00a119ed" fo:background-color="#1f1f1f" loext:char-shading-value="0"/>
    </style:style>
    <style:style style:name="T171" style:family="text">
      <style:text-properties fo:color="#2a6099" loext:opacity="100%" style:font-name="Mono" fo:font-size="14pt" fo:language="pt" fo:country="BR" fo:font-weight="bold" officeooo:rsid="009ff844" style:font-size-asian="14pt" style:font-weight-asian="bold" style:font-size-complex="14pt" style:font-weight-complex="bold"/>
    </style:style>
    <style:style style:name="T172" style:family="text">
      <style:text-properties style:font-name="Liberation Serif" fo:language="pt" fo:country="BR" fo:font-weight="normal" style:font-weight-asian="normal" style:font-weight-complex="normal"/>
    </style:style>
    <style:style style:name="T173" style:family="text">
      <style:text-properties style:font-name="Liberation Serif" fo:language="pt" fo:country="BR" fo:font-weight="bold" officeooo:rsid="00a9626a" style:font-weight-asian="bold" style:font-weight-complex="bold"/>
    </style:style>
    <style:style style:name="T174" style:family="text">
      <style:text-properties style:font-name="Liberation Serif" fo:language="pt" fo:country="BR" fo:font-weight="bold" style:font-weight-asian="bold" style:font-weight-complex="bold"/>
    </style:style>
    <style:style style:name="T175" style:family="text">
      <style:text-properties style:font-name="Mono" fo:language="pt" fo:country="BR" fo:font-weight="normal" style:font-weight-asian="normal" style:font-weight-complex="normal"/>
    </style:style>
    <style:style style:name="T176" style:family="text">
      <style:text-properties style:font-name="Mono" fo:language="pt" fo:country="BR" fo:font-weight="normal" style:font-name-asian="NSimSun" style:font-weight-asian="normal" style:font-name-complex="Liberation Mono" style:font-weight-complex="normal"/>
    </style:style>
    <style:style style:name="T177" style:family="text">
      <style:text-properties style:font-name="Liberation Serif" fo:language="pt" fo:country="BR" officeooo:rsid="00a9626a"/>
    </style:style>
    <style:style style:name="T178" style:family="text">
      <style:text-properties fo:color="#ff4000" loext:opacity="100%" style:font-name="Mono" fo:language="pt" fo:country="BR" fo:font-weight="bold" officeooo:rsid="00a9626a" style:font-weight-asian="bold" style:font-weight-complex="bold"/>
    </style:style>
    <style:style style:name="T179" style:family="text">
      <style:text-properties fo:color="#ff4000" loext:opacity="100%" style:font-name="Mono" fo:language="pt" fo:country="BR" fo:font-weight="bold" style:font-weight-asian="bold" style:font-weight-complex="bold"/>
    </style:style>
    <style:style style:name="T180" style:family="text">
      <style:text-properties style:font-name="Liberation Serif" fo:language="pt" fo:country="BR" officeooo:rsid="00aae922"/>
    </style:style>
    <style:style style:name="T181" style:family="text">
      <style:text-properties fo:color="#569cd6" loext:opacity="100%" style:font-name="Consolas" fo:font-size="10.5pt" fo:language="pt" fo:country="BR" fo:font-weight="normal" fo:background-color="#1f1f1f" loext:char-shading-value="0"/>
    </style:style>
    <style:style style:name="T182" style:family="text">
      <style:text-properties fo:color="#d4d4d4" loext:opacity="100%" style:font-name="Consolas" fo:font-size="10.5pt" fo:language="pt" fo:country="BR" fo:font-weight="normal" fo:background-color="#1f1f1f" loext:char-shading-value="0"/>
    </style:style>
    <style:style style:name="T183" style:family="text">
      <style:text-properties fo:color="#4ec9b0" loext:opacity="100%" style:font-name="Consolas" fo:font-size="10.5pt" fo:language="pt" fo:country="BR" fo:font-weight="normal" fo:background-color="#1f1f1f" loext:char-shading-value="0"/>
    </style:style>
    <style:style style:name="T184" style:family="text">
      <style:text-properties fo:color="#b5cea8" loext:opacity="100%" style:font-name="Consolas" fo:font-size="10.5pt" fo:font-weight="normal" fo:background-color="#1f1f1f" loext:char-shading-value="0"/>
    </style:style>
    <style:style style:name="T185" style:family="text">
      <style:text-properties officeooo:rsid="005aeb45"/>
    </style:style>
    <style:style style:name="T186" style:family="text">
      <style:text-properties officeooo:rsid="0031f368"/>
    </style:style>
    <style:style style:name="T187" style:family="text">
      <style:text-properties style:font-name="Mono" officeooo:rsid="0031f368"/>
    </style:style>
    <style:style style:name="T188" style:family="text">
      <style:text-properties fo:color="#dcdcaa" loext:opacity="100%" style:font-name="Consolas" fo:font-size="12pt" fo:font-weight="normal" fo:background-color="#1e1e1e" loext:char-shading-value="0"/>
    </style:style>
    <style:style style:name="T189" style:family="text">
      <style:text-properties style:text-underline-style="none" fo:font-weight="bold" style:font-weight-asian="bold" style:font-weight-complex="bold"/>
    </style:style>
    <style:style style:name="T190" style:family="text">
      <style:text-properties style:text-underline-style="solid" style:text-underline-width="auto" style:text-underline-color="font-color" officeooo:rsid="00751323"/>
    </style:style>
    <style:style style:name="T191" style:family="text">
      <style:text-properties officeooo:rsid="00407d4e"/>
    </style:style>
    <style:style style:name="T192" style:family="text">
      <style:text-properties fo:color="#2a6099" loext:opacity="100%" style:font-name="Mono"/>
    </style:style>
    <style:style style:name="T193" style:family="text">
      <style:text-properties fo:color="#000000" loext:opacity="100%" fo:font-weight="bold" officeooo:rsid="00aac625" style:font-weight-asian="bold" style:font-weight-complex="bold"/>
    </style:style>
    <style:style style:name="T194" style:family="text">
      <style:text-properties fo:color="#000000" loext:opacity="100%" fo:font-weight="bold" style:font-weight-asian="bold" style:font-weight-complex="bold"/>
    </style:style>
    <style:style style:name="T195" style:family="text">
      <style:text-properties fo:font-weight="bold" officeooo:rsid="00c30713" style:font-weight-asian="bold" style:font-weight-complex="bold"/>
    </style:style>
    <style:style style:name="T196" style:family="text">
      <style:text-properties officeooo:rsid="007f4c2e"/>
    </style:style>
    <style:style style:name="T197" style:family="text">
      <style:text-properties officeooo:rsid="0038c3bf"/>
    </style:style>
    <style:style style:name="T198" style:family="text">
      <style:text-properties style:text-underline-style="solid" style:text-underline-width="auto" style:text-underline-color="font-color" officeooo:rsid="0038c3bf"/>
    </style:style>
    <style:style style:name="T199" style:family="text">
      <style:text-properties style:text-underline-style="none" officeooo:rsid="0038c3bf"/>
    </style:style>
    <style:style style:name="T200" style:family="text">
      <style:text-properties style:text-underline-style="none" officeooo:rsid="007f5f7e"/>
    </style:style>
    <style:style style:name="T201"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202"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203"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20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05"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206"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207"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208"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209"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210"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211"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212"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13"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214"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215"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16"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217"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218" style:family="text">
      <style:text-properties officeooo:rsid="003cc7a3"/>
    </style:style>
    <style:style style:name="T219" style:family="text">
      <style:text-properties fo:color="#6a9955" loext:opacity="100%" officeooo:rsid="003cc7a3"/>
    </style:style>
    <style:style style:name="T220" style:family="text">
      <style:text-properties fo:color="#569cd6" loext:opacity="100%" fo:background-color="#1e1e1e" loext:char-shading-value="0"/>
    </style:style>
    <style:style style:name="T221" style:family="text">
      <style:text-properties fo:color="#d4d4d4" loext:opacity="100%" fo:background-color="#1e1e1e" loext:char-shading-value="0"/>
    </style:style>
    <style:style style:name="T222" style:family="text">
      <style:text-properties fo:color="#4ec9b0" loext:opacity="100%" fo:background-color="#1e1e1e" loext:char-shading-value="0"/>
    </style:style>
    <style:style style:name="T223" style:family="text">
      <style:text-properties fo:color="#d4d4d4" loext:opacity="100%" officeooo:rsid="003cc7a3" fo:background-color="#1e1e1e" loext:char-shading-value="0"/>
    </style:style>
    <style:style style:name="T224" style:family="text">
      <style:text-properties fo:color="#6a9955" loext:opacity="100%" fo:background-color="#1e1e1e" loext:char-shading-value="0"/>
    </style:style>
    <style:style style:name="T225" style:family="text">
      <style:text-properties officeooo:rsid="00815dd0"/>
    </style:style>
    <style:style style:name="T226"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27" style:family="text">
      <style:text-properties style:text-underline-style="solid" style:text-underline-width="auto" style:text-underline-color="font-color" officeooo:rsid="0041f22a"/>
    </style:style>
    <style:style style:name="T228" style:family="text">
      <style:text-properties officeooo:rsid="0041f22a"/>
    </style:style>
    <style:style style:name="T229" style:family="text">
      <style:text-properties fo:color="#9cdcfe" loext:opacity="100%" officeooo:rsid="007f5f7e"/>
    </style:style>
    <style:style style:name="T230" style:family="text">
      <style:text-properties fo:color="#6a9955" loext:opacity="100%" officeooo:rsid="0043c787"/>
    </style:style>
    <style:style style:name="T231" style:family="text">
      <style:text-properties fo:color="#9cdcfe" loext:opacity="100%" style:font-name="Consolas" fo:font-size="12pt" fo:font-weight="normal"/>
    </style:style>
    <style:style style:name="T232" style:family="text">
      <style:text-properties fo:color="#9cdcfe" loext:opacity="100%" style:font-name="Consolas" fo:font-size="12pt" fo:font-weight="normal" officeooo:rsid="007f5f7e"/>
    </style:style>
    <style:style style:name="T233" style:family="text">
      <style:text-properties style:font-name="Consolas" fo:font-size="12pt" fo:font-weight="normal"/>
    </style:style>
    <style:style style:name="T234" style:family="text">
      <style:text-properties fo:color="#b5cea8" loext:opacity="100%" style:font-name="Consolas" fo:font-size="12pt" fo:font-weight="normal"/>
    </style:style>
    <style:style style:name="T235" style:family="text">
      <style:text-properties fo:color="#569cd6" loext:opacity="100%" style:font-name="Consolas" fo:font-size="12pt" fo:font-weight="normal"/>
    </style:style>
    <style:style style:name="T236" style:family="text">
      <style:text-properties fo:color="#4ec9b0" loext:opacity="100%" style:font-name="Consolas" fo:font-size="12pt" fo:font-weight="normal"/>
    </style:style>
    <style:style style:name="T237" style:family="text">
      <style:text-properties fo:color="#ce9178" loext:opacity="100%" style:font-name="Consolas" fo:font-size="12pt" fo:font-weight="normal"/>
    </style:style>
    <style:style style:name="T238" style:family="text">
      <style:text-properties fo:color="#6a9955" loext:opacity="100%" style:font-name="Consolas" fo:font-size="12pt" fo:font-weight="normal" officeooo:rsid="0043c787"/>
    </style:style>
    <style:style style:name="T239"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24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41"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242"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243"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244"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245"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246"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24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4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50"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51"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52"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5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5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55"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56"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57" style:family="text">
      <style:text-properties style:text-underline-style="none" fo:font-weight="normal" style:font-weight-asian="normal" style:font-weight-complex="normal"/>
    </style:style>
    <style:style style:name="T258" style:family="text">
      <style:text-properties style:text-underline-style="none" fo:font-weight="normal" officeooo:rsid="008385bb" style:font-weight-asian="normal" style:font-weight-complex="normal"/>
    </style:style>
    <style:style style:name="T259" style:family="text">
      <style:text-properties officeooo:rsid="004b83b5"/>
    </style:style>
    <style:style style:name="T260" style:family="text">
      <style:text-properties officeooo:rsid="004e6c6e"/>
    </style:style>
    <style:style style:name="T261"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62"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63" style:family="text">
      <style:text-properties style:font-name="Liberation Serif" style:text-underline-style="none" fo:font-weight="normal" officeooo:rsid="00b9d418" style:font-weight-asian="normal" style:font-weight-complex="normal"/>
    </style:style>
    <style:style style:name="T264" style:family="text">
      <style:text-properties fo:color="#2a6099" loext:opacity="100%" style:font-name="Monospace" style:text-underline-style="none" fo:font-weight="bold" officeooo:rsid="00583ac1" style:font-weight-asian="bold" style:font-weight-complex="bold"/>
    </style:style>
    <style:style style:name="T265" style:family="text">
      <style:text-properties style:font-name="Liberation Serif" style:text-underline-style="none" fo:font-weight="normal" officeooo:rsid="00583ac1" style:font-weight-asian="normal" style:font-weight-complex="normal"/>
    </style:style>
    <style:style style:name="T266" style:family="text">
      <style:text-properties style:font-name="Liberation Serif" style:text-underline-style="none" fo:font-weight="normal" officeooo:rsid="007ee737" style:font-weight-asian="normal" style:font-weight-complex="normal"/>
    </style:style>
    <style:style style:name="T267"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68"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69"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70" style:family="text">
      <style:text-properties style:font-name="Liberation Serif" style:text-underline-style="none" fo:font-weight="normal" officeooo:rsid="006d95f7" style:font-weight-asian="normal" style:font-weight-complex="normal"/>
    </style:style>
    <style:style style:name="T271"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72"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73"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74"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75"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76"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77"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78" style:family="text">
      <style:text-properties fo:language="pt" fo:country="BR" officeooo:rsid="006d95f7"/>
    </style:style>
    <style:style style:name="T279" style:family="text">
      <style:text-properties fo:language="pt" fo:country="BR" style:text-underline-style="solid" style:text-underline-width="auto" style:text-underline-color="font-color" officeooo:rsid="006d95f7"/>
    </style:style>
    <style:style style:name="T280" style:family="text">
      <style:text-properties fo:language="pt" fo:country="BR" style:text-underline-style="solid" style:text-underline-width="auto" style:text-underline-color="font-color"/>
    </style:style>
    <style:style style:name="T281" style:family="text">
      <style:text-properties fo:language="pt" fo:country="BR" style:text-underline-style="solid" style:text-underline-width="auto" style:text-underline-color="font-color" fo:font-weight="normal" style:font-weight-asian="normal" style:font-weight-complex="normal"/>
    </style:style>
    <style:style style:name="T282" style:family="text">
      <style:text-properties fo:language="pt" fo:country="BR" style:text-underline-style="none" fo:font-weight="normal" style:font-weight-asian="normal" style:font-weight-complex="normal"/>
    </style:style>
    <style:style style:name="T283" style:family="text">
      <style:text-properties fo:language="pt" fo:country="BR" fo:font-weight="normal" officeooo:rsid="006d95f7" style:font-weight-asian="normal" style:font-weight-complex="normal"/>
    </style:style>
    <style:style style:name="T284" style:family="text">
      <style:text-properties fo:language="pt" fo:country="BR" style:text-underline-style="none" fo:font-weight="normal" officeooo:rsid="00838bc2" style:font-weight-asian="normal" style:font-weight-complex="normal"/>
    </style:style>
    <style:style style:name="T285" style:family="text">
      <style:text-properties fo:language="pt" fo:country="BR" style:text-underline-style="none" fo:font-weight="bold" officeooo:rsid="00838bc2" fo:background-color="#ffffd7" loext:char-shading-value="0" style:font-weight-asian="bold" style:font-weight-complex="bold"/>
    </style:style>
    <style:style style:name="T286" style:family="text">
      <style:text-properties fo:color="#2a6099" loext:opacity="100%" style:font-name="Mono" fo:language="pt" fo:country="BR"/>
    </style:style>
    <style:style style:name="T287" style:family="text">
      <style:text-properties fo:language="pt" fo:country="BR" officeooo:rsid="006dd2a6"/>
    </style:style>
    <style:style style:name="T288" style:family="text">
      <style:text-properties style:font-name="Mono" fo:language="pt" fo:country="BR" officeooo:rsid="006dd2a6"/>
    </style:style>
    <style:style style:name="T289"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90"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91" style:family="text">
      <style:text-properties style:text-underline-style="none" officeooo:rsid="00838bc2"/>
    </style:style>
    <style:style style:name="T292" style:family="text">
      <style:text-properties fo:font-weight="bold" fo:background-color="#ffffd7" loext:char-shading-value="0" style:font-weight-asian="bold" style:font-weight-complex="bold"/>
    </style:style>
    <style:style style:name="T293" style:family="text">
      <style:text-properties officeooo:rsid="00838bc2"/>
    </style:style>
    <style:style style:name="T294" style:family="text">
      <style:text-properties officeooo:rsid="0070a435"/>
    </style:style>
    <style:style style:name="T295" style:family="text">
      <style:text-properties officeooo:rsid="006dd2a6"/>
    </style:style>
    <style:style style:name="T296" style:family="text">
      <style:text-properties officeooo:rsid="009255e7"/>
    </style:style>
    <style:style style:name="T297" style:family="text">
      <style:text-properties officeooo:rsid="005c863b"/>
    </style:style>
    <style:style style:name="T298" style:family="text">
      <style:text-properties officeooo:rsid="00e0acc9"/>
    </style:style>
    <style:style style:name="T299" style:family="text">
      <style:text-properties style:text-underline-style="solid" style:text-underline-width="auto" style:text-underline-color="font-color" officeooo:rsid="005ac968"/>
    </style:style>
    <style:style style:name="T300" style:family="text">
      <style:text-properties officeooo:rsid="005ac968"/>
    </style:style>
    <style:style style:name="T301" style:family="text">
      <style:text-properties fo:font-weight="bold" officeooo:rsid="005f76f2" style:font-weight-asian="bold" style:font-weight-complex="bold"/>
    </style:style>
    <style:style style:name="T302" style:family="text">
      <style:text-properties fo:font-weight="bold" officeooo:rsid="005ac968" style:font-weight-asian="bold" style:font-weight-complex="bold"/>
    </style:style>
    <style:style style:name="T303" style:family="text">
      <style:text-properties fo:color="#000000" loext:opacity="100%"/>
    </style:style>
    <style:style style:name="T304" style:family="text">
      <style:text-properties officeooo:rsid="00ad3588"/>
    </style:style>
    <style:style style:name="T305" style:family="text">
      <style:text-properties officeooo:rsid="00d30fd8"/>
    </style:style>
    <style:style style:name="T306" style:family="text">
      <style:text-properties fo:font-variant="normal" fo:text-transform="none" fo:color="#000000" loext:opacity="100%" fo:letter-spacing="normal" fo:font-style="normal" officeooo:rsid="007e76c9"/>
    </style:style>
    <style:style style:name="T307" style:family="text">
      <style:text-properties style:text-underline-style="solid" style:text-underline-width="auto" style:text-underline-color="font-color" fo:font-weight="bold" officeooo:rsid="0064f6ea" style:font-weight-asian="bold" style:font-weight-complex="bold"/>
    </style:style>
    <style:style style:name="T308" style:family="text">
      <style:text-properties style:text-underline-style="solid" style:text-underline-width="auto" style:text-underline-color="font-color" officeooo:rsid="0064f6ea"/>
    </style:style>
    <style:style style:name="T309" style:family="text">
      <style:text-properties style:text-underline-style="solid" style:text-underline-width="auto" style:text-underline-color="font-color" officeooo:rsid="009430ae"/>
    </style:style>
    <style:style style:name="T310" style:family="text">
      <style:text-properties officeooo:rsid="0065ef4f"/>
    </style:style>
    <style:style style:name="T311" style:family="text">
      <style:text-properties fo:color="#000000" loext:opacity="100%" fo:font-weight="bold" officeooo:rsid="0065ef4f" style:font-weight-asian="bold" style:font-weight-complex="bold"/>
    </style:style>
    <style:style style:name="T312" style:family="text">
      <style:text-properties officeooo:rsid="0064f6ea"/>
    </style:style>
    <style:style style:name="T313" style:family="text">
      <style:text-properties fo:font-variant="normal" fo:text-transform="none" fo:color="#000000" loext:opacity="100%" fo:letter-spacing="normal" fo:font-style="normal" officeooo:rsid="00a1db32"/>
    </style:style>
    <style:style style:name="T314" style:family="text">
      <style:text-properties fo:font-variant="normal" fo:text-transform="none" fo:color="#000000" loext:opacity="100%" fo:letter-spacing="normal" fo:font-style="normal" fo:font-weight="bold" officeooo:rsid="00a1db32" style:font-weight-asian="bold" style:font-weight-complex="bold"/>
    </style:style>
    <style:style style:name="T315" style:family="text">
      <style:text-properties fo:font-variant="normal" fo:text-transform="none" fo:color="#000000" loext:opacity="100%" fo:letter-spacing="normal" fo:font-style="normal" fo:font-weight="bold" officeooo:rsid="00d30fd8" style:font-weight-asian="bold" style:font-weight-complex="bold"/>
    </style:style>
    <style:style style:name="T316" style:family="text">
      <style:text-properties fo:font-variant="normal" fo:text-transform="none" fo:color="#000000" loext:opacity="100%" fo:letter-spacing="normal" fo:font-style="normal" officeooo:rsid="005cf7b9"/>
    </style:style>
    <style:style style:name="T317" style:family="text">
      <style:text-properties fo:font-variant="normal" fo:text-transform="none" fo:color="#000000" loext:opacity="100%" fo:letter-spacing="normal" fo:font-style="normal" officeooo:rsid="00cb9a5d"/>
    </style:style>
    <style:style style:name="T318"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319" style:family="text">
      <style:text-properties fo:font-variant="normal" fo:text-transform="none" fo:color="#000000" loext:opacity="100%" fo:letter-spacing="normal" fo:font-style="normal" officeooo:rsid="00cc4db3"/>
    </style:style>
    <style:style style:name="T32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21"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22" style:family="text">
      <style:text-properties style:text-underline-style="solid" style:text-underline-width="auto" style:text-underline-color="font-color" fo:font-weight="normal" officeooo:rsid="00851681" style:font-weight-asian="normal" style:font-weight-complex="normal"/>
    </style:style>
    <style:style style:name="T323" style:family="text">
      <style:text-properties officeooo:rsid="00851681"/>
    </style:style>
    <style:style style:name="T324" style:family="text">
      <style:text-properties officeooo:rsid="008762c8"/>
    </style:style>
    <style:style style:name="T325" style:family="text">
      <style:text-properties officeooo:rsid="0085eb72"/>
    </style:style>
    <style:style style:name="T326" style:family="text">
      <style:text-properties fo:language="pt" fo:country="BR" style:text-underline-style="solid" style:text-underline-width="auto" style:text-underline-color="font-color" officeooo:rsid="00851681"/>
    </style:style>
    <style:style style:name="T327" style:family="text">
      <style:text-properties fo:language="pt" fo:country="BR" officeooo:rsid="00851681"/>
    </style:style>
    <style:style style:name="T328" style:family="text">
      <style:text-properties fo:language="pt" fo:country="BR" officeooo:rsid="008762c8"/>
    </style:style>
    <style:style style:name="T329" style:family="text">
      <style:text-properties fo:language="zxx" fo:country="none"/>
    </style:style>
    <style:style style:name="T330" style:family="text">
      <style:text-properties fo:language="pt" fo:country="BR" officeooo:rsid="00889cb6"/>
    </style:style>
    <style:style style:name="T331" style:family="text">
      <style:text-properties fo:language="pt" fo:country="BR" officeooo:rsid="008a6ac8"/>
    </style:style>
    <style:style style:name="T332" style:family="text">
      <style:text-properties fo:language="pt" fo:country="BR" style:text-underline-style="none" officeooo:rsid="00889cb6"/>
    </style:style>
    <style:style style:name="T333" style:family="text">
      <style:text-properties fo:color="#2a6099" loext:opacity="100%" style:font-name="Monospace" fo:font-weight="bold" style:font-weight-asian="bold" style:font-weight-complex="bold"/>
    </style:style>
    <style:style style:name="T334" style:family="text">
      <style:text-properties style:font-name="Liberation Serif" fo:font-size="12pt" style:text-underline-style="none" fo:font-weight="bold" officeooo:rsid="00605e01" style:font-size-asian="12pt" style:font-weight-asian="bold" style:font-size-complex="12pt" style:font-weight-complex="bold"/>
    </style:style>
    <style:style style:name="T335" style:family="text">
      <style:text-properties style:font-name="Liberation Serif" fo:font-size="12pt" style:text-underline-style="none" fo:font-weight="normal" officeooo:rsid="00605e01" style:font-size-asian="12pt" style:font-weight-asian="normal" style:font-size-complex="12pt" style:font-weight-complex="normal"/>
    </style:style>
    <style:style style:name="T336" style:family="text">
      <style:text-properties style:font-name="Liberation Serif" fo:font-size="12pt" style:text-underline-style="none" fo:font-weight="bold" officeooo:rsid="00614c29" style:font-size-asian="12pt" style:font-weight-asian="bold" style:font-size-complex="12pt" style:font-weight-complex="bold"/>
    </style:style>
    <style:style style:name="T337" style:family="text">
      <style:text-properties style:font-name="Liberation Serif" fo:font-size="12pt" style:text-underline-style="none" fo:font-weight="normal" officeooo:rsid="0067f1d4" style:font-size-asian="12pt" style:font-weight-asian="normal" style:font-size-complex="12pt" style:font-weight-complex="normal"/>
    </style:style>
    <style:style style:name="T338" style:family="text">
      <style:text-properties style:font-name="Liberation Serif" fo:font-size="12pt" style:text-underline-style="none" fo:font-weight="normal" officeooo:rsid="00b7c442" style:font-size-asian="12pt" style:font-weight-asian="normal" style:font-size-complex="12pt" style:font-weight-complex="normal"/>
    </style:style>
    <style:style style:name="T339" style:family="text">
      <style:text-properties style:font-name="Liberation Serif" fo:font-size="12pt" style:text-underline-style="none" fo:font-weight="normal" officeooo:rsid="00837b9d" style:font-size-asian="12pt" style:font-weight-asian="normal" style:font-size-complex="12pt" style:font-weight-complex="normal"/>
    </style:style>
    <style:style style:name="T340" style:family="text">
      <style:text-properties style:font-name="Liberation Serif" fo:font-size="12pt" style:text-underline-style="solid" style:text-underline-width="auto" style:text-underline-color="font-color" fo:font-weight="normal" officeooo:rsid="00849e82" style:font-size-asian="12pt" style:font-weight-asian="normal" style:font-size-complex="12pt" style:font-weight-complex="normal"/>
    </style:style>
    <style:style style:name="T341" style:family="text">
      <style:text-properties style:font-name="Liberation Serif" fo:font-size="12pt" style:text-underline-style="none" fo:font-weight="normal" officeooo:rsid="00849e82" style:font-size-asian="12pt" style:font-weight-asian="normal" style:font-size-complex="12pt" style:font-weight-complex="normal"/>
    </style:style>
    <style:style style:name="T342" style:family="text">
      <style:text-properties style:font-name="Liberation Serif" style:text-underline-style="none" fo:font-weight="bold" officeooo:rsid="00605e01" style:font-weight-asian="bold" style:font-weight-complex="bold"/>
    </style:style>
    <style:style style:name="T343" style:family="text">
      <style:text-properties style:font-name="Liberation Serif" style:text-underline-style="none" fo:font-weight="normal" officeooo:rsid="00605e01" style:font-weight-asian="normal" style:font-weight-complex="normal"/>
    </style:style>
    <style:style style:name="T344" style:family="text">
      <style:text-properties style:font-name="Liberation Serif" style:text-underline-style="none" fo:font-weight="normal" officeooo:rsid="00b7c442" style:font-weight-asian="normal" style:font-weight-complex="normal"/>
    </style:style>
    <style:style style:name="T345" style:family="text">
      <style:text-properties style:font-name="Liberation Serif" style:text-underline-style="none" fo:font-weight="normal" officeooo:rsid="00837b9d" style:font-weight-asian="normal" style:font-weight-complex="normal"/>
    </style:style>
    <style:style style:name="T346" style:family="text">
      <style:text-properties style:font-name="Liberation Serif" style:text-underline-style="none" fo:font-weight="normal" officeooo:rsid="00d30fd8" style:font-weight-asian="normal" style:font-weight-complex="normal"/>
    </style:style>
    <style:style style:name="T347" style:family="text">
      <style:text-properties fo:color="#000000" loext:opacity="100%" style:text-underline-style="solid" style:text-underline-width="auto" style:text-underline-color="font-color" officeooo:rsid="009c63ac"/>
    </style:style>
    <style:style style:name="T348" style:family="text">
      <style:text-properties fo:color="#000000" loext:opacity="100%" officeooo:rsid="009c63ac"/>
    </style:style>
    <style:style style:name="T349" style:family="text">
      <style:text-properties fo:color="#000000" loext:opacity="100%" officeooo:rsid="008a6ac8"/>
    </style:style>
    <style:style style:name="T350" style:family="text">
      <style:text-properties fo:color="#000000" loext:opacity="100%" officeooo:rsid="009dac09"/>
    </style:style>
    <style:style style:name="T351" style:family="text">
      <style:text-properties fo:font-weight="bold" officeooo:rsid="00614c29" style:font-weight-asian="bold" style:font-weight-complex="bold"/>
    </style:style>
    <style:style style:name="T352" style:family="text">
      <style:text-properties style:text-underline-style="solid" style:text-underline-width="auto" style:text-underline-color="font-color" officeooo:rsid="00866835"/>
    </style:style>
    <style:style style:name="T353" style:family="text">
      <style:text-properties officeooo:rsid="00849e82"/>
    </style:style>
    <style:style style:name="T354" style:family="text">
      <style:text-properties officeooo:rsid="006b45c5"/>
    </style:style>
    <style:style style:name="T355" style:family="text">
      <style:text-properties officeooo:rsid="00866835"/>
    </style:style>
    <style:style style:name="T356"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57" style:family="text">
      <style:text-properties style:font-name="Liberation Serif" style:text-underline-style="none" fo:font-weight="normal" officeooo:rsid="00866835" style:font-weight-asian="normal" style:font-weight-complex="normal"/>
    </style:style>
    <style:style style:name="T358"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59" style:family="text">
      <style:text-properties style:font-name="Liberation Serif" style:text-underline-style="none" fo:font-weight="normal" officeooo:rsid="00849e82" style:font-weight-asian="normal" style:font-weight-complex="normal"/>
    </style:style>
    <style:style style:name="T360"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61"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62"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63"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64"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65"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66"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67"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68" style:family="text">
      <style:text-properties fo:font-weight="bold" officeooo:rsid="005aeb45" style:font-weight-asian="bold" style:font-weight-complex="bold"/>
    </style:style>
    <style:style style:name="T369" style:family="text">
      <style:text-properties fo:font-weight="bold" officeooo:rsid="009c63ac" style:font-weight-asian="bold" style:font-weight-complex="bold"/>
    </style:style>
    <style:style style:name="T370" style:family="text">
      <style:text-properties officeooo:rsid="009c63ac"/>
    </style:style>
    <style:style style:name="T371" style:family="text">
      <style:text-properties fo:font-variant="normal" fo:text-transform="none" fo:letter-spacing="normal" fo:font-style="normal" officeooo:rsid="009dac09"/>
    </style:style>
    <style:style style:name="T372" style:family="text">
      <style:text-properties fo:font-variant="normal" fo:text-transform="none" fo:letter-spacing="normal" fo:font-style="normal" officeooo:rsid="008a6ac8"/>
    </style:style>
    <style:style style:name="T373" style:family="text">
      <style:text-properties fo:font-variant="normal" fo:text-transform="none" fo:letter-spacing="normal" fo:font-style="normal" officeooo:rsid="009c63ac"/>
    </style:style>
    <style:style style:name="T374" style:family="text">
      <style:text-properties fo:font-variant="normal" fo:text-transform="none" fo:letter-spacing="normal" fo:font-style="normal" style:text-underline-style="solid" style:text-underline-width="auto" style:text-underline-color="font-color" officeooo:rsid="009c63ac"/>
    </style:style>
    <style:style style:name="T375" style:family="text">
      <style:text-properties officeooo:rsid="00b6a30c"/>
    </style:style>
    <style:style style:name="T376" style:family="text">
      <style:text-properties fo:font-variant="normal" fo:text-transform="none" fo:color="#000000" loext:opacity="100%" style:font-name="Liberation Serif" fo:font-size="12pt" fo:letter-spacing="normal" fo:language="pt" fo:country="BR" fo:font-style="normal" style:text-underline-style="none" fo:font-weight="normal" officeooo:rsid="00a1db32" style:font-size-asian="12pt" style:font-weight-asian="normal" style:font-size-complex="12pt" style:font-weight-complex="normal"/>
    </style:style>
    <style:style style:name="T377" style:family="text">
      <style:text-properties fo:font-variant="normal" fo:text-transform="none" fo:color="#000000" loext:opacity="100%" style:font-name="Liberation Serif" fo:font-size="12pt" fo:letter-spacing="normal" fo:language="pt" fo:country="BR" fo:font-style="normal" style:text-underline-style="none" fo:font-weight="bold" officeooo:rsid="00a1db32" style:font-size-asian="12pt" style:font-weight-asian="bold" style:font-size-complex="12pt" style:font-weight-complex="bold"/>
    </style:style>
    <style:style style:name="T378" style:family="text">
      <style:text-properties fo:color="#d7ba7d" loext:opacity="100%"/>
    </style:style>
    <style:style style:name="T379" style:family="text">
      <style:text-properties officeooo:rsid="00567faf"/>
    </style:style>
    <style:style style:name="T380" style:family="text">
      <style:text-properties fo:color="#000000" loext:opacity="100%" fo:font-weight="bold" officeooo:rsid="00605e01" style:font-weight-asian="bold" style:font-weight-complex="bold"/>
    </style:style>
    <style:style style:name="T381" style:family="text">
      <style:text-properties style:text-underline-style="solid" style:text-underline-width="auto" style:text-underline-color="font-color" officeooo:rsid="00bcc788"/>
    </style:style>
    <style:style style:name="T382" style:family="text">
      <style:text-properties officeooo:rsid="00bcc788"/>
    </style:style>
    <style:style style:name="T383" style:family="text">
      <style:text-properties officeooo:rsid="0084d3d7"/>
    </style:style>
    <style:style style:name="T384" style:family="text">
      <style:text-properties officeooo:rsid="00cc5d35"/>
    </style:style>
    <style:style style:name="T385"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86" style:family="text">
      <style:text-properties fo:color="#000000" loext:opacity="100%" style:text-line-through-style="none" style:text-line-through-type="none" fo:font-style="normal" officeooo:rsid="0084f7fe" style:font-style-asian="normal" style:font-style-complex="normal"/>
    </style:style>
    <style:style style:name="T387" style:family="text">
      <style:text-properties style:text-line-through-style="none" style:text-line-through-type="none" fo:font-style="normal" style:font-style-asian="normal" style:font-style-complex="normal"/>
    </style:style>
    <style:style style:name="T388" style:family="text">
      <style:text-properties style:text-line-through-style="none" style:text-line-through-type="none" fo:font-style="normal" officeooo:rsid="00718093" style:font-style-asian="normal" style:font-style-complex="normal"/>
    </style:style>
    <style:style style:name="T389" style:family="text">
      <style:text-properties fo:color="#ff0000" loext:opacity="100%" style:text-line-through-style="none" style:text-line-through-type="none" fo:font-style="normal" style:font-style-asian="normal" style:font-style-complex="normal"/>
    </style:style>
    <style:style style:name="T390"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91" style:family="text">
      <style:text-properties fo:color="#ff0000" loext:opacity="100%" style:text-line-through-style="none" style:text-line-through-type="none" fo:font-style="normal" officeooo:rsid="006f677f" style:font-style-asian="normal" style:font-style-complex="normal"/>
    </style:style>
    <style:style style:name="T392" style:family="text">
      <style:text-properties style:text-line-through-style="none" style:text-line-through-type="none" fo:font-style="normal" officeooo:rsid="006f677f" style:font-style-asian="normal" style:font-style-complex="normal"/>
    </style:style>
    <style:style style:name="T393" style:family="text">
      <style:text-properties officeooo:rsid="00837b9d"/>
    </style:style>
    <style:style style:name="T394" style:family="text">
      <style:text-properties style:text-underline-style="solid" style:text-underline-width="auto" style:text-underline-color="font-color" officeooo:rsid="0072aa8d"/>
    </style:style>
    <style:style style:name="T395"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396"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397"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398"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399"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0"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401"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402"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403"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406"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407"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408"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409"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411" style:family="text">
      <style:text-properties fo:color="#00a933" loext:opacity="100%" fo:font-size="12pt" style:text-underline-style="none" style:font-size-asian="12pt" style:font-size-complex="12pt"/>
    </style:style>
    <style:style style:name="T412"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17"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9"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20"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21"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22"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423"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424"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25"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26"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427"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428"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429"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0"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431"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2"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433"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434"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35"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38"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39"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40"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41"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42"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3"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4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48"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9"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50"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451"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52"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53"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454"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455"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456"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457"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58"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59"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60"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6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62"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63"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64"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65"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66"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68"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69"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70"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71"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72"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73"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7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75" style:family="text">
      <style:text-properties officeooo:rsid="008d8bc7"/>
    </style:style>
    <style:style style:name="T476" style:family="text">
      <style:text-properties fo:color="#ce181e" loext:opacity="100%" fo:font-weight="bold" style:font-weight-asian="bold" style:font-weight-complex="bold"/>
    </style:style>
    <style:style style:name="T477" style:family="text">
      <style:text-properties fo:color="#ce181e" loext:opacity="100%"/>
    </style:style>
    <style:style style:name="T478" style:family="text">
      <style:text-properties officeooo:rsid="007249aa"/>
    </style:style>
    <style:style style:name="T479" style:family="text">
      <style:text-properties fo:font-weight="bold" officeooo:rsid="007249aa" style:font-weight-asian="bold" style:font-weight-complex="bold"/>
    </style:style>
    <style:style style:name="T480" style:family="text">
      <style:text-properties fo:language="pt" fo:country="BR" officeooo:rsid="00795c94"/>
    </style:style>
    <style:style style:name="T481" style:family="text">
      <style:text-properties fo:language="pt" fo:country="BR" officeooo:rsid="007a56d9"/>
    </style:style>
    <style:style style:name="T482" style:family="text">
      <style:text-properties fo:language="pt" fo:country="BR" style:text-underline-style="solid" style:text-underline-width="auto" style:text-underline-color="font-color" officeooo:rsid="00795c94"/>
    </style:style>
    <style:style style:name="T483" style:family="text">
      <style:text-properties style:font-name="Mono" fo:language="pt" fo:country="BR"/>
    </style:style>
    <style:style style:name="T484" style:family="text">
      <style:text-properties officeooo:rsid="007a978e"/>
    </style:style>
    <style:style style:name="T485" style:family="text">
      <style:text-properties style:font-name="Liberation Mono" fo:font-weight="bold" style:font-weight-asian="bold" style:font-weight-complex="bold"/>
    </style:style>
    <style:style style:name="T486" style:family="text">
      <style:text-properties fo:color="#ff8000" loext:opacity="100%" fo:font-weight="bold" fo:background-color="transparent" loext:char-shading-value="0" style:font-weight-asian="bold" style:font-weight-complex="bold"/>
    </style:style>
    <style:style style:name="T487" style:family="text">
      <style:text-properties style:font-name="Liberation Sans" fo:language="pt" fo:country="BR" officeooo:rsid="01c694eb" style:font-name-asian="Microsoft YaHei" style:font-name-complex="Mangal1"/>
    </style:style>
    <style:style style:name="T488" style:family="text">
      <style:text-properties fo:color="#2a6099" loext:opacity="100%" style:font-name="Mono" fo:language="pt" fo:country="BR" fo:font-weight="bold" style:font-weight-asian="bold" style:font-weight-complex="bold"/>
    </style:style>
    <style:style style:name="T489" style:family="text">
      <style:text-properties fo:color="#2a6099" loext:opacity="100%" style:font-name="Mono" fo:language="pt" fo:country="BR" fo:font-weight="bold" officeooo:rsid="00bcf018" style:font-weight-asian="bold" style:font-weight-complex="bold"/>
    </style:style>
    <style:style style:name="T490" style:family="text">
      <style:text-properties fo:language="pt" fo:country="BR" fo:font-weight="normal" officeooo:rsid="00bcf018" style:font-weight-asian="normal" style:font-weight-complex="normal"/>
    </style:style>
    <style:style style:name="T491" style:family="text">
      <style:text-properties style:font-name="Liberation Sans" fo:language="pt" fo:country="BR" fo:font-weight="normal" officeooo:rsid="01c694eb" style:font-name-asian="Microsoft YaHei" style:font-weight-asian="normal" style:font-name-complex="Mangal1" style:font-weight-complex="normal"/>
    </style:style>
    <style:style style:name="T492" style:family="text">
      <style:text-properties fo:language="pt" fo:country="BR" fo:font-weight="normal" officeooo:rsid="01c694eb" style:font-weight-asian="normal" style:font-weight-complex="normal"/>
    </style:style>
    <style:style style:name="T493" style:family="text">
      <style:text-properties fo:color="#2a6099" loext:opacity="100%" style:font-name="Mono" fo:language="pt" fo:country="BR" fo:font-weight="bold" officeooo:rsid="01c694eb" style:font-weight-asian="bold" style:font-weight-complex="bold"/>
    </style:style>
    <style:style style:name="T494" style:family="text">
      <style:text-properties fo:language="pt" fo:country="BR" fo:font-weight="bold" officeooo:rsid="00bcf018" style:font-weight-asian="bold" style:font-weight-complex="bold"/>
    </style:style>
    <style:style style:name="T495" style:family="text">
      <style:text-properties fo:language="pt" fo:country="BR" fo:font-weight="normal" officeooo:rsid="00ce6af4" style:font-weight-asian="normal" style:font-weight-complex="normal"/>
    </style:style>
    <style:style style:name="T496" style:family="text">
      <style:text-properties officeooo:rsid="00c0a2a3"/>
    </style:style>
    <style:style style:name="T497" style:family="text">
      <style:text-properties fo:color="#dcdcaa" loext:opacity="100%" style:font-name="Consolas" fo:font-size="10.5pt" fo:font-weight="normal" fo:background-color="#121314" loext:char-shading-value="0"/>
    </style:style>
    <style:style style:name="T498" style:family="text">
      <style:text-properties fo:color="#d4d4d4" loext:opacity="100%" style:font-name="Consolas" fo:font-size="10.5pt" fo:font-weight="normal" fo:background-color="#121314" loext:char-shading-value="0"/>
    </style:style>
    <style:style style:name="T499" style:family="text">
      <style:text-properties fo:color="#ff7b72" loext:opacity="100%" style:font-name="Consolas" fo:font-size="10.5pt" fo:font-weight="normal" fo:background-color="#121314" loext:char-shading-value="0"/>
    </style:style>
    <style:style style:name="T500" style:family="text">
      <style:text-properties fo:color="#c9d1d9" loext:opacity="100%" style:font-name="Consolas" fo:font-size="10.5pt" fo:font-weight="normal" fo:background-color="#121314" loext:char-shading-value="0"/>
    </style:style>
    <style:style style:name="T501" style:family="text">
      <style:text-properties fo:color="#a5d6ff" loext:opacity="100%" style:font-name="Consolas" fo:font-size="10.5pt" fo:font-weight="normal" fo:background-color="#121314" loext:char-shading-value="0"/>
    </style:style>
    <style:style style:name="T502" style:family="text">
      <style:text-properties fo:color="#d7ba7d" loext:opacity="100%" style:font-name="Consolas" fo:font-size="10.5pt" fo:font-weight="normal" fo:background-color="#121314" loext:char-shading-value="0"/>
    </style:style>
    <style:style style:name="T503" style:family="text">
      <style:text-properties fo:color="#569cd6" loext:opacity="100%" style:font-name="Consolas" fo:font-size="10.5pt" fo:font-weight="normal" fo:background-color="#121314" loext:char-shading-value="0"/>
    </style:style>
    <style:style style:name="T504" style:family="text">
      <style:text-properties fo:color="#79c0ff" loext:opacity="100%" style:font-name="Consolas" fo:font-size="10.5pt" fo:font-weight="normal" fo:background-color="#121314" loext:char-shading-value="0"/>
    </style:style>
    <style:style style:name="T505" style:family="text">
      <style:text-properties fo:color="#8b949e" loext:opacity="100%" style:font-name="Consolas" fo:font-size="10.5pt" fo:font-weight="normal" fo:background-color="#121314" loext:char-shading-value="0"/>
    </style:style>
    <style:style style:name="T506" style:family="text">
      <style:text-properties fo:color="#c586c0" loext:opacity="100%" style:font-name="Consolas" fo:font-size="10.5pt" fo:font-weight="normal" fo:background-color="#121314" loext:char-shading-value="0"/>
    </style:style>
    <style:style style:name="T507" style:family="text">
      <style:text-properties fo:color="#b5cea8" loext:opacity="100%" style:font-name="Consolas" fo:font-size="10.5pt" fo:font-weight="normal" fo:background-color="#121314" loext:char-shading-value="0"/>
    </style:style>
    <style:style style:name="T508" style:family="text">
      <style:text-properties fo:color="#8b949e" loext:opacity="100%" style:font-name="Consolas" fo:font-size="10.5pt" fo:font-weight="normal" officeooo:rsid="00ce6af4" fo:background-color="#121314" loext:char-shading-value="0"/>
    </style:style>
    <style:style style:name="T509" style:family="text">
      <style:text-properties fo:font-weight="normal" officeooo:rsid="00d03727" style:font-weight-asian="normal" style:font-weight-complex="normal"/>
    </style:style>
    <style:style style:name="T510" style:family="text">
      <style:text-properties officeooo:rsid="00d03727"/>
    </style:style>
    <style:style style:name="T511" style:family="text">
      <style:text-properties fo:language="pt" fo:country="BR" officeooo:rsid="00d03727"/>
    </style:style>
    <style:style style:name="T512" style:family="text">
      <style:text-properties style:font-name="Liberation Serif" fo:language="pt" fo:country="BR" fo:font-weight="normal" officeooo:rsid="00c06c93" style:font-weight-asian="normal" style:font-weight-complex="normal"/>
    </style:style>
    <style:style style:name="T513" style:family="text">
      <style:text-properties fo:color="#2a6099" loext:opacity="100%" style:font-name="Liberation Mono" fo:language="pt" fo:country="BR" fo:font-weight="bold" style:font-weight-asian="bold" style:font-weight-complex="bold"/>
    </style:style>
    <style:style style:name="T514" style:family="text">
      <style:text-properties style:font-name="Liberation Serif" fo:language="pt" fo:country="BR" fo:font-weight="normal" officeooo:rsid="00d03727" style:font-weight-asian="normal" style:font-weight-complex="normal"/>
    </style:style>
    <style:style style:name="T515" style:family="text">
      <style:text-properties style:font-name="Liberation Mono" fo:language="pt" fo:country="BR" fo:font-weight="normal" style:font-weight-asian="normal" style:font-weight-complex="normal"/>
    </style:style>
    <style:style style:name="T516" style:family="text">
      <style:text-properties style:font-name="Liberation Mono" fo:language="pt" fo:country="BR" fo:font-weight="normal" officeooo:rsid="00d03727" style:font-weight-asian="normal" style:font-weight-complex="normal"/>
    </style:style>
    <style:style style:name="T517" style:family="text">
      <style:text-properties style:font-name="Liberation Serif" fo:language="pt" fo:country="BR" fo:font-weight="normal" officeooo:rsid="00d0b8d6" style:font-weight-asian="normal" style:font-weight-complex="normal"/>
    </style:style>
    <style:style style:name="T518" style:family="text">
      <style:text-properties officeooo:rsid="00d0b8d6"/>
    </style:style>
    <style:style style:name="T519" style:family="text">
      <style:text-properties fo:language="pt" fo:country="BR" fo:font-weight="normal" officeooo:rsid="020339ba" style:font-weight-asian="normal" style:font-weight-complex="normal"/>
    </style:style>
    <style:style style:name="T520" style:family="text">
      <style:text-properties fo:language="pt" fo:country="BR" officeooo:rsid="020339ba"/>
    </style:style>
    <style:style style:name="T521" style:family="text">
      <style:text-properties fo:color="#dcdcaa" loext:opacity="100%" style:font-name="Consolas" fo:font-size="10.5pt" fo:font-weight="normal" fo:background-color="#1f1f1f" loext:char-shading-value="0"/>
    </style:style>
    <style:style style:name="T522" style:family="text">
      <style:text-properties fo:color="#d4d4d4" loext:opacity="100%" fo:background-color="#1f1f1f" loext:char-shading-value="0"/>
    </style:style>
    <style:style style:name="T523" style:family="text">
      <style:text-properties officeooo:rsid="00aeb741"/>
    </style:style>
    <style:style style:name="T524" style:family="text">
      <style:text-properties officeooo:rsid="00ad5728"/>
    </style:style>
    <style:style style:name="T525" style:family="text">
      <style:text-properties fo:color="#2a6099" loext:opacity="100%" style:font-name="Mono" fo:language="pt" fo:country="BR" fo:font-weight="bold" officeooo:rsid="00ad5728" style:font-weight-asian="bold" style:font-weight-complex="bold"/>
    </style:style>
    <style:style style:name="T526" style:family="text">
      <style:text-properties fo:language="pt" fo:country="BR" fo:font-weight="normal" officeooo:rsid="00aeb741" style:font-weight-asian="normal" style:font-weight-complex="normal"/>
    </style:style>
    <style:style style:name="T527" style:family="text">
      <style:text-properties fo:language="pt" fo:country="BR" fo:font-weight="normal" officeooo:rsid="00ad5728" style:font-weight-asian="normal" style:font-weight-complex="normal"/>
    </style:style>
    <style:style style:name="T528" style:family="text">
      <style:text-properties fo:language="pt" fo:country="BR" officeooo:rsid="00ad5728"/>
    </style:style>
    <style:style style:name="T529" style:family="text">
      <style:text-properties fo:language="pt" fo:country="BR" officeooo:rsid="007b90a0"/>
    </style:style>
    <style:style style:name="T530" style:family="text">
      <style:text-properties fo:language="pt" fo:country="BR" officeooo:rsid="00bcaafb"/>
    </style:style>
    <style:style style:name="T531" style:family="text">
      <style:text-properties style:font-name="Mono" fo:language="pt" fo:country="BR" officeooo:rsid="007b90a0"/>
    </style:style>
    <style:style style:name="T532" style:family="text">
      <style:text-properties style:font-name="Mono" fo:language="pt" fo:country="BR" officeooo:rsid="00b9f036"/>
    </style:style>
    <style:style style:name="T533" style:family="text">
      <style:text-properties fo:color="#2a6099" loext:opacity="100%" style:font-name="Mono" fo:font-weight="bold" officeooo:rsid="00ad5728" style:font-weight-asian="bold" style:font-weight-complex="bold"/>
    </style:style>
    <style:style style:name="T534" style:family="text">
      <style:text-properties fo:color="#ff4000" loext:opacity="100%" style:font-name="Mono" fo:font-weight="bold" officeooo:rsid="00bb4aaa" style:font-weight-asian="bold" style:font-weight-complex="bold"/>
    </style:style>
    <style:style style:name="T535" style:family="text">
      <style:text-properties officeooo:rsid="00bca7d6"/>
    </style:style>
    <style:style style:name="T536" style:family="text">
      <style:text-properties fo:color="#ce9178" loext:opacity="100%" style:font-name="Consolas" fo:font-size="10.5pt" fo:font-weight="normal" fo:background-color="#1f1f1f" loext:char-shading-value="0"/>
    </style:style>
    <style:style style:name="T537" style:family="text">
      <style:text-properties fo:color="#c586c0" loext:opacity="100%" style:font-name="Consolas" fo:font-size="10.5pt" fo:font-weight="normal" fo:background-color="#1f1f1f" loext:char-shading-value="0"/>
    </style:style>
    <style:style style:name="T538" style:family="text">
      <style:text-properties fo:color="#6a9955" loext:opacity="100%" style:font-name="Consolas" fo:font-size="10.5pt" fo:font-weight="normal" fo:background-color="#1f1f1f" loext:char-shading-value="0"/>
    </style:style>
    <style:style style:name="T539" style:family="text">
      <style:text-properties officeooo:rsid="00bcaafb"/>
    </style:style>
    <style:style style:name="T540" style:family="text">
      <style:text-properties fo:color="#2a6099" loext:opacity="100%" style:font-name="Mono" fo:font-weight="bold" officeooo:rsid="00bb4aaa" style:font-weight-asian="bold" style:font-weight-complex="bold"/>
    </style:style>
    <style:style style:name="T541" style:family="text">
      <style:text-properties officeooo:rsid="00bb4aaa"/>
    </style:style>
    <style:style style:name="T542" style:family="text">
      <style:text-properties style:font-name="Liberation Sans" fo:language="pt" fo:country="BR" officeooo:rsid="00b3e740" style:font-name-asian="Microsoft YaHei" style:font-name-complex="Mangal1"/>
    </style:style>
    <style:style style:name="T543" style:family="text">
      <style:text-properties style:font-name="Liberation Sans" fo:language="pt" fo:country="BR" officeooo:rsid="00c86894" style:font-name-asian="Microsoft YaHei" style:font-name-complex="Mangal1"/>
    </style:style>
    <style:style style:name="T544" style:family="text">
      <style:text-properties fo:color="#000000" loext:opacity="100%" style:font-name="Liberation Serif" fo:font-size="12pt" fo:language="pt" fo:country="BR" fo:font-weight="normal" officeooo:rsid="00c9fea1" style:font-size-asian="12pt" style:font-weight-asian="normal" style:font-size-complex="12pt" style:font-weight-complex="normal"/>
    </style:style>
    <style:style style:name="T545" style:family="text">
      <style:text-properties fo:color="#000000" loext:opacity="100%" style:font-name="Liberation Serif" fo:font-size="12pt" fo:language="pt" fo:country="BR" fo:font-weight="normal" officeooo:rsid="01fbc941" style:font-size-asian="12pt" style:font-weight-asian="normal" style:font-size-complex="12pt" style:font-weight-complex="normal"/>
    </style:style>
    <style:style style:name="T546" style:family="text">
      <style:text-properties fo:color="#000000" loext:opacity="100%" style:font-name="Liberation Serif" fo:font-size="12pt" fo:language="pt" fo:country="BR" fo:font-weight="normal" officeooo:rsid="00cb135a" style:font-size-asian="12pt" style:font-weight-asian="normal" style:font-size-complex="12pt" style:font-weight-complex="normal"/>
    </style:style>
    <style:style style:name="T547" style:family="text">
      <style:text-properties fo:color="#000000" loext:opacity="100%" style:font-name="Liberation Serif" fo:font-size="12pt" fo:language="pt" fo:country="BR" fo:font-weight="bold" officeooo:rsid="01fbc941" style:font-size-asian="12pt" style:font-weight-asian="bold" style:font-size-complex="12pt" style:font-weight-complex="bold"/>
    </style:style>
    <style:style style:name="T548" style:family="text">
      <style:text-properties fo:color="#000000" loext:opacity="100%" style:font-name="Liberation Serif" fo:font-size="12pt" fo:language="pt" fo:country="BR" fo:font-weight="normal" officeooo:rsid="020b8242" style:font-size-asian="12pt" style:font-weight-asian="normal" style:font-size-complex="12pt" style:font-weight-complex="normal"/>
    </style:style>
    <style:style style:name="T549" style:family="text">
      <style:text-properties fo:language="pt" fo:country="BR" officeooo:rsid="00bf1a17"/>
    </style:style>
    <style:style style:name="T550" style:family="text">
      <style:text-properties officeooo:rsid="00c4e865"/>
    </style:style>
    <style:style style:name="T551" style:family="text">
      <style:text-properties fo:language="pt" fo:country="BR" fo:font-weight="normal" officeooo:rsid="00bf1a17" style:font-weight-asian="normal" style:font-weight-complex="normal"/>
    </style:style>
    <style:style style:name="T552" style:family="text">
      <style:text-properties fo:language="pt" fo:country="BR" fo:font-weight="normal" officeooo:rsid="00c30b3d" style:font-weight-asian="normal" style:font-weight-complex="normal"/>
    </style:style>
    <style:style style:name="T553" style:family="text">
      <style:text-properties fo:language="pt" fo:country="BR" fo:font-weight="normal" officeooo:rsid="0204338d" style:font-weight-asian="normal" style:font-weight-complex="normal"/>
    </style:style>
    <style:style style:name="T554" style:family="text">
      <style:text-properties fo:font-weight="bold" officeooo:rsid="0204338d" style:font-weight-asian="bold" style:font-weight-complex="bold"/>
    </style:style>
    <style:style style:name="T555" style:family="text">
      <style:text-properties fo:language="pt" fo:country="BR" fo:font-weight="normal" officeooo:rsid="0200fc29" style:font-weight-asian="normal" style:font-weight-complex="normal"/>
    </style:style>
    <style:style style:name="T556" style:family="text">
      <style:text-properties fo:language="pt" fo:country="BR" fo:font-weight="bold" officeooo:rsid="01dcbca4" style:font-weight-asian="bold" style:font-weight-complex="bold"/>
    </style:style>
    <style:style style:name="T557" style:family="text">
      <style:text-properties fo:language="pt" fo:country="BR" fo:font-weight="normal" officeooo:rsid="01dcbca4" style:font-weight-asian="normal" style:font-weight-complex="normal"/>
    </style:style>
    <style:style style:name="T558" style:family="text">
      <style:text-properties fo:language="pt" fo:country="BR" fo:font-weight="normal" officeooo:rsid="020b8242" style:font-weight-asian="normal" style:font-weight-complex="normal"/>
    </style:style>
    <style:style style:name="T559" style:family="text">
      <style:text-properties fo:language="pt" fo:country="BR" officeooo:rsid="01dcbca4"/>
    </style:style>
    <style:style style:name="T560" style:family="text">
      <style:text-properties fo:language="pt" fo:country="BR" officeooo:rsid="00b0747f"/>
    </style:style>
    <style:style style:name="T561" style:family="text">
      <style:text-properties fo:language="pt" fo:country="BR" officeooo:rsid="00c868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Programação Procedural x Orientada a objetos</text:h>
      <text:p text:style-name="P3"/>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
      <text:p text:style-name="P16"/>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6">PHP</text:span>, <text:span text:style-name="T46">um exemplo d</text:span>a sintaxe de criação de um objeto é: <text:span text:style-name="T47">$p</text:span><text:span text:style-name="T48">essoa</text:span><text:span text:style-name="T47">1</text:span><text:span text:style-name="T49"> = </text:span><text:span text:style-name="T50">new</text:span><text:span text:style-name="T49"> </text:span><text:span text:style-name="T51">ContaBanco</text:span><text:span text:style-name="T49">;</text:span></text:p>
      <text:p text:style-name="P21"/>
      <text:p text:style-name="P21"><text:span text:style-name="T52">Classe</text:span> representa um conjunto de objetos que possuem <text:span text:style-name="T16">características</text:span> e <text:span text:style-name="T16">comportamentos</text:span> comuns. Quando definimos uma classe precisamos declarar <text:span text:style-name="T53">2</text:span> coisas:</text:p>
      <text:list text:style-name="L2">
        <text:list-item>
          <text:p text:style-name="P22"><text:span text:style-name="T13">Atributos</text:span>: são as características que descrevem o estado do objeto, ou seja, seu<text:span text:style-name="T54">s </text:span>valores.</text:p>
        </text:list-item>
        <text:list-item>
          <text:p text:style-name="P23"><text:span text:style-name="T13">Métodos</text:span>(): são comportamentos, o que o objeto faz. Acompanhados sempre de <text:span text:style-name="T55">parênteses</text:span><text:span text:style-name="T29">()</text:span></text:p>
        </text:list-item>
      </text:list>
      <text:p text:style-name="P21"/>
      <text:p text:style-name="P21"><text:span text:style-name="T52">Objeto</text:span> é a construção de software que encapsula estado(atributo) e comportamento (método), ou seja, é a instância de uma classe.</text:p>
      <text:p text:style-name="P21"/>
      <text:p text:style-name="P21"><text:span text:style-name="T56">O </text:span><text:span text:style-name="T13">estado</text:span> <text:span text:style-name="T56">(status) </text:span>é o significado combinado das variáveis internas do objeto.</text:p>
      <text:p text:style-name="P24"><text:span text:style-name="T55">Infelizmente, d</text:span>iferente do JAVA, o PHP não exige que cada classe esteja em um arquivo separado. Assim, é possível colocar várias classes num mesmo documento, <text:span text:style-name="T57">porém essa não é uma boa prática pois fere um dos princípios da programação orientado a objetos: o Reuso.</text:span></text:p>
      <text:p text:style-name="P25"><text:soft-page-break/>O comando <text:span text:style-name="T58">require_once</text:span><text:span text:style-name="T59"> </text:span><text:span text:style-name="T60">importa </text:span><text:span text:style-name="T61">o</text:span><text:span text:style-name="T60"> arquivo </text:span><text:span text:style-name="T61">apenas uma vez</text:span><text:span text:style-name="T62"> para dentro do documento, </text:span><text:span text:style-name="T59">prev</text:span><text:span text:style-name="T62">e</text:span><text:span text:style-name="T59">n</text:span><text:span text:style-name="T62">indo</text:span><text:span text:style-name="T59"> que </text:span><text:span text:style-name="T63">ele</text:span><text:span text:style-name="T59"> seja carregado de novo.</text:span></text:p>
      <text:p text:style-name="P26"><text:span text:style-name="T58">var_dump()</text:span><text:span text:style-name="T64">ou </text:span><text:span text:style-name="T58">print_r()</text:span><text:span text:style-name="T64">: essas funções mostram o estado atual do objeto, </text:span><text:span text:style-name="T65">útil</text:span><text:span text:style-name="T66"> para </text:span><text:span text:style-name="T67">debuggar</text:span><text:span text:style-name="T66">.</text:span></text:p>
      <text:p text:style-name="P27">Enquanto que, no Java, o padrão para referenciar atributos e métodos <text:span text:style-name="T54">é o ponto </text:span><text:span text:style-name="T68">this</text:span><text:span text:style-name="T69">.</text:span><text:span text:style-name="T70"><text:tab/></text:span>no PHP <text:span text:style-name="T53">não é ponto e sim</text:span><text:span text:style-name="T71"> </text:span><text:span text:style-name="T66">uma</text:span><text:span text:style-name="T72"> </text:span><text:span text:style-name="T73">flecha</text:span><text:span text:style-name="T72"> </text:span><text:span text:style-name="T74">-&gt;</text:span>. Exemplo:<text:span text:style-name="T75"> </text:span><text:span text:style-name="T68">$p1</text:span><text:span text:style-name="T76">→</text:span><text:span text:style-name="T68">pagarMensalidade()</text:span><text:span text:style-name="T77">;</text:span></text:p>
      <text:p text:style-name="P28"><text:span text:style-name="T78">No PHP, o </text:span><text:span text:style-name="T79">valor booleano</text:span><text:span text:style-name="T78"> ‘1’ equivale a </text:span><text:span text:style-name="T80">true</text:span><text:span text:style-name="T78">, </text:span><text:span text:style-name="T81">já </text:span><text:span text:style-name="T78">o o valor ‘0’ equivale a </text:span><text:span text:style-name="T80">false</text:span></text:p>
      <text:p text:style-name="P28"/>
      <text:h text:style-name="P29" text:outline-level="1">Aula 03 – <text:span text:style-name="T82">Configurando Visibilidade</text:span></text:h>
      <text:p text:style-name="P30"/>
      <text:p text:style-name="P31"><text:span text:style-name="T83">No PHP, a palavra reservada que declara um método é a </text:span><text:span text:style-name="T58">function</text:span></text:p>
      <text:p text:style-name="P31"/>
      <text:p text:style-name="P21"><text:span text:style-name="T13">Modificadores de visibilidade</text:span> <text:span text:style-name="T54">aplicam o princípio de </text:span><text:span text:style-name="T84">Encapsulamento</text:span><text:span text:style-name="T54">, eles </text:span>limitam o nível de acesso aos componentes (atributos e métodos) de uma classe:</text:p>
      <text:list text:style-name="L3">
        <text:list-item>
          <text:p text:style-name="P32"><text:span text:style-name="T85">+ public</text:span>: visível em qualquer classe.</text:p>
        </text:list-item>
        <text:list-item>
          <text:p text:style-name="P32"><text:span text:style-name="T85"># protected</text:span>: permite o acesso dos descendentes (só a mãe e seus filhos).<text:line-break/>*<text:span text:style-name="T86">Nota: Mesmo que um </text:span>atributo tenha <text:span text:style-name="T52">visibilidade protegida,</text:span> <text:span text:style-name="T87">um</text:span> <text:span text:style-name="T16">método público</text:span><text:span text:style-name="T88"> </text:span><text:span text:style-name="T89">pode dar</text:span> acesso a <text:span text:style-name="T87">ele porque será considerada a visibilidade do método que implementa o atributo</text:span></text:p>
        </text:list-item>
        <text:list-item>
          <text:p text:style-name="P32"><text:span text:style-name="T85">- private</text:span>: visível somente dentro da classe, ou seja, só a classe atual pode acessar seus atributos e métodos. <text:span text:style-name="T54">Funções</text:span> privad<text:span text:style-name="T54">a</text:span>s não podem ser sobrescrit<text:span text:style-name="T54">a</text:span>s <text:span text:style-name="T55">por polimorfismo</text:span>, são implicitamente final.</text:p>
        </text:list-item>
        <text:list-item>
          <text:p text:style-name="P33"><text:span text:style-name="T85"><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6">Especiais (</text:span>Getter <text:span text:style-name="T86">&amp; </text:span>Setter e Constru<text:span text:style-name="T86">c</text:span>tor<text:span text:style-name="T56">)</text:span></text:h>
      <text:p text:style-name="P38"/>
      <text:p text:style-name="P39"><text:span text:style-name="T90">Os métodos <text:s/>(Getter </text:span><text:span text:style-name="T91">&amp;</text:span><text:span text:style-name="T90"> Setter) são usados para </text:span><text:span text:style-name="T92">acessar ou </text:span><text:span text:style-name="T93">alterar atributos com visibilidade </text:span><text:span text:style-name="T94">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5">por costume, </text:span>chamado de: <text:span text:style-name="T96">is</text:span>.<text:span text:style-name="T86">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5">parâmetro</text:span> do mesmo tipo do atributo.</text:p>
      <text:p text:style-name="P41"/>
      <text:p text:style-name="P42"/>
      <text:p text:style-name="P42"/>
      <text:p text:style-name="P43"><text:span text:style-name="T97">São necessários as </text:span><text:span text:style-name="T98">chaves </text:span><text:span text:style-name="T99">{}</text:span><text:span text:style-name="T98"> </text:span><text:span text:style-name="T100">para</text:span><text:span text:style-name="T98"> interpolar</text:span><text:span text:style-name="T97"> variáveis dentro da função </text:span><text:span text:style-name="T101">print()</text:span><text:span text:style-name="T97">. Exemplo:<text:line-break/></text:span><text:span text:style-name="T102">print</text:span><text:span text:style-name="T103"> </text:span><text:span text:style-name="T104">"Eu tenho uma caneta {</text:span><text:span text:style-name="T105">$c1</text:span><text:span text:style-name="T103">-&gt;</text:span><text:span text:style-name="T102">getModelo</text:span><text:span text:style-name="T104">()} de ponta {</text:span><text:span text:style-name="T105">$c1</text:span><text:span text:style-name="T103">-&gt;</text:span><text:span text:style-name="T102">getPonta</text:span><text:span text:style-name="T104">()}"</text:span><text:span text:style-name="T103">;</text:span></text:p>
      <text:p text:style-name="P44"/>
      <text:p text:style-name="P20"/>
      <text:p text:style-name="P45"/>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
      <text:p text:style-name="P48"><text:span text:style-name="T106">Todo </text:span><text:span text:style-name="T107">método </text:span><text:span text:style-name="T108">mágico é </text:span><text:span text:style-name="T107">declarado com</text:span><text:span text:style-name="T106"> </text:span><text:span text:style-name="T109">duplo underline </text:span><text:span text:style-name="T110">e</text:span><text:span text:style-name="T109"> inicializado automaticamente</text:span><text:span text:style-name="T106"> quando o objeto é instanciado.</text:span></text:p>
      <text:p text:style-name="P48"/>
      <text:p text:style-name="P47">Toda classe possui um <text:span text:style-name="T52">método </text:span><text:span text:style-name="T111">mágico</text:span> <text:span text:style-name="T112">chamado </text:span><text:span text:style-name="T13">construtor</text:span> <text:span text:style-name="T113">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6"><text:line-break/></text:span>Para <text:span text:style-name="T114">criar um método Construtor</text:span>, <text:span text:style-name="T114">declare-o</text:span> com <text:span text:style-name="T16">duplo underline</text:span><text:span text:style-name="T88">. </text:span><text:span text:style-name="T115">Esse método </text:span><text:span text:style-name="T109">não pode ter declaração de retorno</text:span><text:span text:style-name="T115"> pois seu retorno já é implícito (o próprio objeto recém-criado). </text:span></text:p>
      <text:p text:style-name="P47"/>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0">Promoção de propriedades:</text:p>
      <text:p text:style-name="P51">Quando é definido um <text:span text:style-name="T16">modificador de acesso</text:span> no método construtor, esse <text:span text:style-name="T13">parâmetro </text:span><text:span text:style-name="T116">já </text:span><text:span text:style-name="T13">é promovido a</text:span><text:span text:style-name="T116">utomaticamente a</text:span><text:span text:style-name="T13"> uma propriedade </text:span>da <text:span text:style-name="T117">própria </text:span>classe. Exemplo:</text:p>
      <text:p text:style-name="P52"><text:line-break/><text:span text:style-name="T118">public</text:span><text:span text:style-name="T119"> </text:span><text:span text:style-name="T118">function</text:span><text:span text:style-name="T119"> </text:span><text:span text:style-name="T120">__construct</text:span><text:span text:style-name="T119">(){<text:tab/></text:span></text:p>
      <text:p text:style-name="P53"><text:span text:style-name="T121"><text:tab/>$this</text:span><text:span text:style-name="T122">-&gt;</text:span><text:span text:style-name="T123">nome</text:span><text:span text:style-name="T122"> = </text:span><text:span text:style-name="T123">$nome</text:span><text:span text:style-name="T122">;<text:tab/><text:tab/><text:tab/></text:span></text:p>
      <text:p text:style-name="P53"><text:span text:style-name="T121"><text:tab/>$this</text:span><text:span text:style-name="T122">-&gt;</text:span><text:span text:style-name="T123">preco</text:span><text:span text:style-name="T122"> = </text:span><text:span text:style-name="T123">$preco</text:span><text:span text:style-name="T122"><text:tab/><text:tab/><text:tab/></text:span></text:p>
      <text:p text:style-name="P54">}<text:tab/><text:tab/><text:tab/><text:tab/><text:tab/><text:tab/><text:tab/></text:p>
      <text:p text:style-name="P21"/>
      <text:p text:style-name="P55"><text:span text:style-name="T121">public</text:span><text:span text:style-name="T122"> </text:span><text:span text:style-name="T121">function</text:span><text:span text:style-name="T122"> </text:span><text:span text:style-name="T124">__construct</text:span><text:span text:style-name="T122">(<text:tab/><text:tab/></text:span></text:p>
      <text:p text:style-name="P56"><text:span text:style-name="T121"><text:s text:c="4"/>p</text:span><text:span text:style-name="T125">ublic</text:span><text:span text:style-name="T122"> </text:span><text:span text:style-name="T121">string</text:span><text:span text:style-name="T122"> </text:span><text:span text:style-name="T123">$nome</text:span><text:span text:style-name="T122">;<text:tab/><text:tab/><text:tab/></text:span></text:p>
      <text:p text:style-name="P55"><text:span text:style-name="T121"><text:s text:c="4"/>p</text:span><text:span text:style-name="T125">ublic</text:span><text:span text:style-name="T122"> </text:span><text:span text:style-name="T121">float</text:span><text:span text:style-name="T122"> </text:span><text:span text:style-name="T123">$preço</text:span><text:span text:style-name="T122">;<text:tab/><text:tab/><text:tab/></text:span></text:p>
      <text:p text:style-name="P57">){}<text:tab/><text:tab/><text:tab/><text:tab/><text:tab/><text:tab/><text:tab/></text:p>
      <text:p text:style-name="P21"/>
      <text:p text:style-name="P58"/>
      <text:p text:style-name="P58"/>
      <text:p text:style-name="P58"/>
      <text:p text:style-name="P58">DICA: para gerar código automaticamente de métodos acessores, constru<text:span text:style-name="T86">c</text:span>tor, loggers, equals, etc: use o atalho Alt+insert (ou botão direito + <text:s/>inserir_código) e pronto! O NetBeans implementará os métodos <text:span text:style-name="T126">automaticamente</text:span>.</text:p>
      <text:p text:style-name="P59"><text:span text:style-name="T10">No PHP 8.1, a cláusula </text:span><text:span text:style-name="Source_20_Text"><text:span text:style-name="T127">readonly</text:span></text:span><text:span text:style-name="T10"> foi introduzida para ser usada em </text:span><text:span text:style-name="Strong_20_Emphasis"><text:span text:style-name="T10">propriedades de classes</text:span></text:span><text:span text:style-name="T10">, tornando-as </text:span><text:span text:style-name="Strong_20_Emphasis"><text:span text:style-name="T10">imutáveis</text:span></text:span><text:span text:style-name="T10"> após a inicialização. Isso significa que uma propriedade </text:span><text:span text:style-name="Source_20_Text"><text:span text:style-name="T10">readonly</text:span></text:span><text:span text:style-name="T10"> só pode ser atribuída uma única vez, geralmente dentro do construtor. </text:span><text:span text:style-name="T128">Ela</text:span><text:span text:style-name="T10"> útil para garantir que certas propriedades de um objeto não sejam alteradas acidentalmente depois de inicializadas, aumentando a segurança do código </text:span><text:span text:style-name="T129">e eliminando métodos getters e setters desnecessários.</text:span></text:p>
      <text:p text:style-name="P21"/>
      <text:p text:style-name="P60"><text:span text:style-name="T130">Porém, m</text:span><text:span text:style-name="T10">esmo que </text:span><text:span text:style-name="T130">um</text:span><text:span text:style-name="T10">a propriedade seja </text:span><text:span text:style-name="Source_20_Text"><text:span text:style-name="T10">readonly</text:span></text:span><text:span text:style-name="T10">, </text:span><text:span text:style-name="Strong_20_Emphasis"><text:span text:style-name="T10">se </text:span></text:span><text:span text:style-name="Strong_20_Emphasis"><text:span text:style-name="T130">ela </text:span></text:span><text:span text:style-name="Strong_20_Emphasis"><text:span text:style-name="T10">for um objeto, seus atributos internos ainda podem ser modificados</text:span></text:span><text:span text:style-name="Strong_20_Emphasis"><text:span text:style-name="T131">, </text:span></text:span><text:span text:style-name="Strong_20_Emphasis"><text:span text:style-name="T132">pois a referência à variável se mantém a mesma. E</text:span></text:span><text:span text:style-name="Strong_20_Emphasis"><text:span text:style-name="T133">xemplo:</text:span></text:span></text:p>
      <text:p text:style-name="P61"><text:span text:style-name="T121">class</text:span><text:span text:style-name="T122"> </text:span><text:span text:style-name="T134">Endereco</text:span><text:span text:style-name="T122"> {<text:tab/><text:tab/><text:tab/><text:tab/><text:tab/><text:tab/><text:tab/><text:tab/><text:tab/></text:span></text:p>
      <text:p text:style-name="P62"><text:span text:style-name="T121"><text:tab/>public</text:span><text:span text:style-name="T122"> </text:span><text:span text:style-name="T121">string</text:span><text:span text:style-name="T122"> </text:span><text:span text:style-name="T123">$rua</text:span><text:span text:style-name="T122">;<text:tab/><text:tab/><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__construct</text:span><text:span text:style-name="T122">(</text:span><text:span text:style-name="T121">string</text:span><text:span text:style-name="T122"> </text:span><text:span text:style-name="T123">$rua</text:span><text:span text:style-name="T122">) {<text:tab/><text:tab/><text:tab/><text:tab/></text:span></text:p>
      <text:p text:style-name="P62"><text:span text:style-name="T121"><text:tab/><text:tab/>$this</text:span><text:span text:style-name="T122">-&gt;</text:span><text:span text:style-name="T123">rua</text:span><text:span text:style-name="T122"> = </text:span><text:span text:style-name="T123">$rua</text:span><text:span text:style-name="T122">;<text:tab/><text:tab/><text:tab/><text:tab/><text:tab/><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1">class</text:span><text:span text:style-name="T122"> </text:span><text:span text:style-name="T134">Cliente</text:span><text:span text:style-name="T122"> {<text:tab/><text:tab/><text:tab/><text:tab/><text:tab/><text:tab/><text:tab/><text:tab/><text:tab/></text:span></text:p>
      <text:p text:style-name="P64"><text:span text:style-name="T135"><text:tab/>public</text:span><text:span text:style-name="T136"> </text:span><text:span text:style-name="T135">readonly</text:span><text:span text:style-name="T136"> </text:span><text:span text:style-name="T137">Endereco</text:span><text:span text:style-name="T136"> </text:span><text:span text:style-name="T138">$endereco</text:span><text:span text:style-name="T136">;<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__construct</text:span><text:span text:style-name="T122">(</text:span><text:span text:style-name="T134">Endereco</text:span><text:span text:style-name="T122"> </text:span><text:span text:style-name="T123">$endereco</text:span><text:span text:style-name="T122">) {<text:tab/><text:tab/><text:tab/></text:span></text:p>
      <text:p text:style-name="P62"><text:span text:style-name="T121"><text:tab/><text:tab/>$this</text:span><text:span text:style-name="T122">-&gt;</text:span><text:span text:style-name="T123">endereco</text:span><text:span text:style-name="T122"> = </text:span><text:span text:style-name="T123">$endereco</text:span><text:span text:style-name="T122">;<text:tab/><text:tab/><text:tab/><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3">$endereco</text:span><text:span text:style-name="T122"> = </text:span><text:span text:style-name="T121">new</text:span><text:span text:style-name="T122"> </text:span><text:span text:style-name="T134">Endereco</text:span><text:span text:style-name="T122">(</text:span><text:span text:style-name="T139">"Rua A"</text:span><text:span text:style-name="T122">);<text:tab/><text:tab/><text:tab/><text:tab/><text:tab/><text:tab/></text:span></text:p>
      <text:p text:style-name="P62"><text:span text:style-name="T123">$cliente</text:span><text:span text:style-name="T122"> = </text:span><text:span text:style-name="T121">new</text:span><text:span text:style-name="T122"> </text:span><text:span text:style-name="T134">Cliente</text:span><text:span text:style-name="T122">(</text:span><text:span text:style-name="T123">$endereco</text:span><text:span text:style-name="T122">);<text:tab/><text:tab/><text:tab/><text:tab/><text:tab/><text:tab/></text:span></text:p>
      <text:p text:style-name="P63"><text:tab/><text:tab/><text:tab/><text:tab/><text:tab/><text:tab/><text:tab/><text:tab/><text:tab/><text:tab/><text:tab/></text:p>
      <text:p text:style-name="P65">// Podemos modificar os atributos do objeto Endereco<text:tab/><text:tab/><text:tab/></text:p>
      <text:p text:style-name="P62"><text:span text:style-name="T123">$cliente</text:span><text:span text:style-name="T122">-&gt;</text:span><text:span text:style-name="T123">endereco</text:span><text:span text:style-name="T122">-&gt;</text:span><text:span text:style-name="T123">rua</text:span><text:span text:style-name="T122"> = </text:span><text:span text:style-name="T139">"Rua B"</text:span><text:span text:style-name="T122">; </text:span><text:span text:style-name="T140">// Isso funciona!<text:tab/><text:tab/><text:tab/></text:span></text:p>
      <text:p text:style-name="P65"><text:tab/><text:tab/><text:tab/><text:tab/><text:tab/><text:tab/><text:tab/><text:tab/><text:tab/><text:tab/><text:tab/></text:p>
      <text:p text:style-name="P65">// Mas não podemos trocar a referência da propriedade readonly<text:tab/></text:p>
      <text:p text:style-name="P62"><text:span text:style-name="T123">$cliente</text:span><text:span text:style-name="T122">-&gt;</text:span><text:span text:style-name="T123">endereco</text:span><text:span text:style-name="T122"> = </text:span><text:span text:style-name="T121">new</text:span><text:span text:style-name="T122"> </text:span><text:span text:style-name="T134">Endereco</text:span><text:span text:style-name="T122">(</text:span><text:span text:style-name="T139">"Rua C"</text:span><text:span text:style-name="T122">); </text:span><text:span text:style-name="T140">// Erro fatal!<text:tab/><text:tab/></text:span></text:p>
      <text:p text:style-name="P66"/>
      <text:p text:style-name="P21"/>
      <text:p text:style-name="P67">Se, e somente se, todas as propriedades de uma classe forem readonly, então é possível retirar esse modificador das propriedades e atribuí-lo diretamente na classe. Exemplo:</text:p>
      <text:p text:style-name="P68"><text:span text:style-name="T141">readonly class</text:span><text:span text:style-name="T142"> </text:span><text:span text:style-name="T143">Endereco</text:span><text:span text:style-name="T142"> {</text:span></text:p>
      <text:p text:style-name="P21"/>
      <text:p text:style-name="P21"/>
      <text:p text:style-name="P21"/>
      <text:p text:style-name="P69"/>
      <text:p text:style-name="P70"/>
      <text:p text:style-name="P71"><text:span text:style-name="T10">No PHP 8.1, a cláusula </text:span><text:span text:style-name="Source_20_Text"><text:span text:style-name="T127">enum</text:span></text:span><text:span text:style-name="T10"> foi introduzida para definir </text:span><text:span text:style-name="Strong_20_Emphasis"><text:span text:style-name="T10">enumeradores</text:span></text:span><text:span text:style-name="T10">, que são </text:span><text:span text:style-name="T144">tipos especiais que representam um conjunto fixo de valores</text:span><text:span text:style-name="T10">. </text:span><text:span text:style-name="T145">Sintaxe básica:</text:span></text:p>
      <text:p text:style-name="P72"><text:span text:style-name="T146">enum</text:span><text:span text:style-name="T147"> </text:span><text:span text:style-name="T148">StatusPedido</text:span><text:span text:style-name="T147"> {<text:tab/><text:tab/><text:tab/><text:line-break/><text:tab/></text:span><text:span text:style-name="T135">case</text:span><text:span text:style-name="T136"> Pendente;<text:tab/><text:tab/><text:tab/><text:line-break/><text:tab/></text:span><text:span text:style-name="T135">case</text:span><text:span text:style-name="T136"> Processando;<text:tab/><text:tab/><text:tab/><text:line-break/><text:tab/></text:span><text:span text:style-name="T135">case</text:span><text:span text:style-name="T136"> Concluido;<text:tab/><text:tab/><text:tab/><text:line-break/>}<text:tab/><text:tab/><text:tab/><text:tab/><text:tab/><text:tab/><text:line-break/></text:span><text:span text:style-name="T138">$status</text:span><text:span text:style-name="T136"> = </text:span><text:span text:style-name="T137">StatusPedido</text:span><text:span text:style-name="T136">::Pendente;<text:tab/></text:span></text:p>
      <text:p text:style-name="P72"/>
      <text:p text:style-name="P73">Além de propriedades, <text:span text:style-name="T13">os enums podem conter métodos</text:span>. Exemplo:</text:p>
      <text:p text:style-name="P74"><text:span text:style-name="T121">enum</text:span><text:span text:style-name="T122"> </text:span><text:span text:style-name="T134">Status</text:span><text:span text:style-name="T122"> {<text:tab/><text:tab/><text:tab/><text:tab/><text:tab/><text:tab/><text:tab/><text:tab/><text:tab/></text:span></text:p>
      <text:p text:style-name="P62"><text:span text:style-name="T121"><text:tab/>case</text:span><text:span text:style-name="T122"> Ativo;<text:tab/><text:tab/><text:tab/><text:tab/><text:tab/><text:tab/><text:tab/><text:tab/><text:tab/></text:span></text:p>
      <text:p text:style-name="P62"><text:span text:style-name="T121"><text:tab/>case</text:span><text:span text:style-name="T122"> Inativo;<text:tab/><text:tab/><text:tab/><text:tab/><text:tab/><text:tab/><text:tab/><text:tab/></text:span></text:p>
      <text:p text:style-name="P64"><text:span text:style-name="T135"><text:tab/>case</text:span><text:span text:style-name="T136"> Pendente;<text:tab/><text:tab/><text:tab/><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descricao</text:span><text:span text:style-name="T122">(): </text:span><text:span text:style-name="T121">string</text:span><text:span text:style-name="T122"> {<text:tab/><text:tab/><text:tab/><text:tab/></text:span></text:p>
      <text:p text:style-name="P62"><text:span text:style-name="T149"><text:tab/><text:tab/>return</text:span><text:span text:style-name="T122"> </text:span><text:span text:style-name="T149">match</text:span><text:span text:style-name="T122">(</text:span><text:span text:style-name="T121">$this</text:span><text:span text:style-name="T122">) {<text:tab/><text:tab/><text:tab/><text:tab/><text:tab/><text:tab/></text:span></text:p>
      <text:p text:style-name="P62"><text:span text:style-name="T121"><text:tab/><text:tab/><text:tab/>self</text:span><text:span text:style-name="T122">::Ativo </text:span><text:span text:style-name="T121">=&gt;</text:span><text:span text:style-name="T122"> </text:span><text:span text:style-name="T139">"Usuário ativo"</text:span><text:span text:style-name="T122">,<text:tab/><text:tab/><text:tab/></text:span></text:p>
      <text:p text:style-name="P62"><text:span text:style-name="T121"><text:tab/><text:tab/><text:tab/>self</text:span><text:span text:style-name="T122">::Inativo </text:span><text:span text:style-name="T121">=&gt;</text:span><text:span text:style-name="T122"> </text:span><text:span text:style-name="T139">"Usuário inativo"</text:span><text:span text:style-name="T122">,<text:tab/><text:tab/><text:tab/></text:span></text:p>
      <text:p text:style-name="P62"><text:span text:style-name="T121"><text:tab/><text:tab/><text:tab/>self</text:span><text:span text:style-name="T122">::Pendente </text:span><text:span text:style-name="T121">=&gt;</text:span><text:span text:style-name="T122"> </text:span><text:span text:style-name="T139">"Usuário pendente"</text:span><text:span text:style-name="T122">,<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3">$status</text:span><text:span text:style-name="T122"> = </text:span><text:span text:style-name="T134">Status</text:span><text:span text:style-name="T122">::Pendente;<text:tab/><text:tab/><text:tab/><text:tab/><text:tab/><text:tab/><text:tab/></text:span></text:p>
      <text:p text:style-name="P62"><text:span text:style-name="T124">echo</text:span><text:span text:style-name="T122"> </text:span><text:span text:style-name="T123">$status</text:span><text:span text:style-name="T122">-&gt;</text:span><text:span text:style-name="T124">descricao</text:span><text:span text:style-name="T122">(); </text:span><text:span text:style-name="T140">// "Usuário pendente"<text:tab/><text:tab/><text:tab/><text:tab/></text:span></text:p>
      <text:p text:style-name="P75"/>
      <text:h text:style-name="P76" text:outline-level="1">Os enums podem ser <text:span text:style-name="Strong_20_Emphasis">backed enums</text:span>, ou seja, podem ter valores de <text:span text:style-name="Strong_20_Emphasis"><text:span text:style-name="T52">string</text:span></text:span> ou <text:span text:style-name="Strong_20_Emphasis"><text:span text:style-name="T52">int</text:span></text:span> associados. <text:span text:style-name="T150">Exemplo:</text:span></text:h>
      <text:h text:style-name="P77" text:outline-level="1"><text:span text:style-name="T121">enum</text:span><text:span text:style-name="T122"> </text:span><text:span text:style-name="T134">StatusPedido</text:span><text:span text:style-name="T122">: </text:span><text:span text:style-name="T121">int</text:span><text:span text:style-name="T122"> {<text:tab/><text:tab/><text:tab/></text:span></text:h>
      <text:p text:style-name="P62"><text:span text:style-name="T121"><text:tab/>case</text:span><text:span text:style-name="T122"> Pago = </text:span><text:span text:style-name="T151">1</text:span><text:span text:style-name="T122">;<text:tab/><text:tab/><text:tab/></text:span></text:p>
      <text:p text:style-name="P62"><text:span text:style-name="T121"><text:tab/>case</text:span><text:span text:style-name="T122"> Pendente = </text:span><text:span text:style-name="T151">2</text:span><text:span text:style-name="T122">;<text:tab/><text:tab/><text:tab/></text:span></text:p>
      <text:p text:style-name="P62"><text:span text:style-name="T121"><text:tab/>case</text:span><text:span text:style-name="T122"> Cancelado = </text:span><text:span text:style-name="T151">3</text:span><text:span text:style-name="T122">;<text:tab/><text:tab/></text:span></text:p>
      <text:p text:style-name="P63">}<text:tab/><text:tab/><text:tab/><text:tab/><text:tab/><text:tab/></text:p>
      <text:p text:style-name="P62"><text:span text:style-name="T124">echo</text:span><text:span text:style-name="T122"> </text:span><text:span text:style-name="T134">StatusPedido</text:span><text:span text:style-name="T122">::Pago-&gt;</text:span><text:span text:style-name="T123">value</text:span><text:span text:style-name="T122">; </text:span><text:span text:style-name="T140">// 1<text:tab/></text:span></text:p>
      <text:h text:style-name="P76" text:outline-level="1"/>
      <text:h text:style-name="P76" text:outline-level="1"/>
      <text:h text:style-name="P78" text:outline-level="1"><text:span text:style-name="T10">Quando um enum tem valores (</text:span><text:span text:style-name="Source_20_Text"><text:span text:style-name="T10">backed enum</text:span></text:span><text:span text:style-name="T10">), podemos </text:span><text:span text:style-name="T152">recuperar um enum pelo seu valor</text:span><text:span text:style-name="T153"> usando o</text:span><text:span text:style-name="T154">s</text:span><text:span text:style-name="T153"> método</text:span><text:span text:style-name="T154">s</text:span><text:span text:style-name="T153"> </text:span><text:span text:style-name="Source_20_Text"><text:span text:style-name="T155">from()</text:span></text:span><text:span text:style-name="T153"> ou </text:span><text:span text:style-name="Source_20_Text"><text:span text:style-name="T155">tryFrom()</text:span></text:span><text:span text:style-name="T10"> </text:span><text:span text:style-name="T156">e também pelas propriedades </text:span><text:span text:style-name="Source_20_Text"><text:span text:style-name="T155">value</text:span></text:span><text:span text:style-name="T156"> e </text:span><text:span text:style-name="Source_20_Text"><text:span text:style-name="T155">name</text:span></text:span><text:span text:style-name="T156">. </text:span><text:span text:style-name="T157">Exemplo:</text:span></text:h>
      <text:h text:style-name="P79" text:outline-level="1"><text:span text:style-name="T158">$status</text:span><text:span text:style-name="T159"> = </text:span><text:span text:style-name="T160">StatusPedido</text:span><text:span text:style-name="T159">::</text:span><text:span text:style-name="T161">from</text:span><text:span text:style-name="T159">(</text:span><text:span text:style-name="T162">1</text:span><text:span text:style-name="T159">); </text:span><text:span text:style-name="T163">// Retorna StatusPedido::Pago<text:tab/><text:tab/><text:tab/></text:span></text:h>
      <text:p text:style-name="P80"><text:span text:style-name="T124">echo</text:span><text:span text:style-name="T122"> </text:span><text:span text:style-name="T123">$status</text:span><text:span text:style-name="T122">-&gt;</text:span><text:span text:style-name="T123">name</text:span><text:span text:style-name="T122">; </text:span><text:span text:style-name="T140">// "Pago"<text:tab/><text:tab/><text:tab/><text:tab/><text:tab/><text:tab/><text:tab/><text:tab/><text:tab/></text:span></text:p>
      <text:p text:style-name="P80"><text:span text:style-name="T123">$status</text:span><text:span text:style-name="T122"> = </text:span><text:span text:style-name="T134">StatusPedido</text:span><text:span text:style-name="T122">::</text:span><text:span text:style-name="T124">tryFrom</text:span><text:span text:style-name="T122">(</text:span><text:span text:style-name="T151">99</text:span><text:span text:style-name="T122">); </text:span><text:span text:style-name="T140">// Retorna null (não existe esse valor)<text:tab/></text:span></text:p>
      <text:p text:style-name="P80"><text:span text:style-name="T124">var_dump</text:span><text:span text:style-name="T122">(</text:span><text:span text:style-name="T123">$objeto</text:span><text:span text:style-name="T122">→</text:span><text:span text:style-name="T164">S</text:span><text:span text:style-name="T123">tatusPedido→</text:span><text:span text:style-name="T122">na</text:span><text:span text:style-name="T123">me);</text:span><text:span text:style-name="T122"><text:tab/><text:tab/><text:tab/><text:tab/><text:tab/><text:tab/><text:tab/><text:tab/></text:span></text:p>
      <text:h text:style-name="P81" text:outline-level="1"/>
      <text:h text:style-name="P82" text:outline-level="1"><text:span text:style-name="T157">É </text:span><text:span text:style-name="T165">possí<text:tab/>vel listar todas as opções de enums através de seu método estático </text:span><text:span text:style-name="Source_20_Text"><text:span text:style-name="T155">cases()</text:span></text:span><text:span text:style-name="Source_20_Text"><text:span text:style-name="T165">. Exemplo:</text:span></text:span></text:h>
      <text:h text:style-name="P83" text:outline-level="1"><text:span text:style-name="Source_20_Text"><text:span text:style-name="T166">foreach</text:span></text:span><text:span text:style-name="Source_20_Text"><text:span text:style-name="T167"> (</text:span></text:span><text:span text:style-name="Source_20_Text"><text:span text:style-name="T168">StatusPedido</text:span></text:span><text:span text:style-name="Source_20_Text"><text:span text:style-name="T167">::</text:span></text:span><text:span text:style-name="Source_20_Text"><text:span text:style-name="T169">cases</text:span></text:span><text:span text:style-name="Source_20_Text"><text:span text:style-name="T167">() as </text:span></text:span><text:span text:style-name="Source_20_Text"><text:span text:style-name="T170">$status</text:span></text:span><text:span text:style-name="Source_20_Text"><text:span text:style-name="T167">) {</text:span></text:span></text:h>
      <text:p text:style-name="P84"><text:span text:style-name="Source_20_Text"><text:span text:style-name="T10"/></text:span></text:p>
      <text:p text:style-name="Text_20_body"><text:span text:style-name="Source_20_Text"><text:span text:style-name="T9">O modificador </text:span></text:span><text:span text:style-name="Source_20_Text"><text:span text:style-name="T171">static</text:span></text:span><text:span text:style-name="Source_20_Text"><text:span text:style-name="T9"> é usado para declarar </text:span></text:span><text:span text:style-name="Source_20_Text"><text:span text:style-name="Strong_20_Emphasis"><text:span text:style-name="T9">propriedades e métodos pertencentes à classe</text:span></text:span></text:span><text:span text:style-name="Source_20_Text"><text:span text:style-name="Strong_20_Emphasis"><text:span text:style-name="T172">, e não a instâncias individuais</text:span></text:span></text:span><text:span text:style-name="Source_20_Text"><text:span text:style-name="T172">. </text:span></text:span><text:span text:style-name="Source_20_Text"><text:span text:style-name="T9">Isso </text:span></text:span><text:span text:style-name="Source_20_Text"><text:span text:style-name="T173">permite o acesso a</text:span></text:span><text:span text:style-name="Source_20_Text"><text:span text:style-name="T9"> </text:span></text:span><text:span text:style-name="Source_20_Text"><text:span text:style-name="Strong_20_Emphasis"><text:span text:style-name="T9">métodos e propriedades estáticos sem precisar criar um objeto da classe</text:span></text:span></text:span><text:span text:style-name="Source_20_Text"><text:span text:style-name="T9">. </text:span></text:span></text:p>
      <text:p text:style-name="Text_20_body"><text:span text:style-name="Source_20_Text"><text:span text:style-name="T9">Uma </text:span></text:span><text:span text:style-name="Source_20_Text"><text:span text:style-name="Strong_20_Emphasis"><text:span text:style-name="T9">propriedade estática</text:span></text:span></text:span><text:span text:style-name="Source_20_Text"><text:span text:style-name="T9"> pertence à </text:span></text:span><text:span text:style-name="Source_20_Text"><text:span text:style-name="Strong_20_Emphasis"><text:span text:style-name="T9">classe</text:span></text:span></text:span><text:span text:style-name="Source_20_Text"><text:span text:style-name="T174"> e </text:span></text:span><text:span text:style-name="Source_20_Text"><text:span text:style-name="Strong_20_Emphasis"><text:span text:style-name="T9">não a um objeto específico </text:span></text:span></text:span><text:span text:style-name="Source_20_Text"><text:span text:style-name="T9">significa q</text:span></text:span><text:span text:style-name="Source_20_Text"><text:span text:style-name="T172">ue </text:span></text:span><text:span text:style-name="Source_20_Text"><text:span text:style-name="Strong_20_Emphasis"><text:span text:style-name="T172">todos os objetos da classe compartilham o mesmo valor dessa propriedade</text:span></text:span></text:span><text:span text:style-name="Source_20_Text"><text:span text:style-name="T172">. </text:span></text:span></text:p>
      <text:p text:style-name="Text_20_body"><text:span text:style-name="Source_20_Text"><text:span text:style-name="T9">Um </text:span></text:span><text:span text:style-name="Source_20_Text"><text:span text:style-name="Strong_20_Emphasis"><text:span text:style-name="T9">método está</text:span></text:span></text:span><text:span text:style-name="Source_20_Text"><text:span text:style-name="Strong_20_Emphasis"><text:span text:style-name="T174">tico</text:span></text:span></text:span><text:span text:style-name="Source_20_Text"><text:span text:style-name="T174"> pode ser chamado </text:span></text:span><text:span text:style-name="Source_20_Text"><text:span text:style-name="Strong_20_Emphasis"><text:span text:style-name="T174">sem inst</text:span></text:span></text:span><text:span text:style-name="Source_20_Text"><text:span text:style-name="Strong_20_Emphasis"><text:span text:style-name="T9">anciar a classe</text:span></text:span></text:span><text:span text:style-name="Source_20_Text"><text:span text:style-name="T9">. Ele </text:span></text:span><text:span text:style-name="Source_20_Text"><text:span text:style-name="Strong_20_Emphasis"><text:span text:style-name="T9">não pode acessar </text:span></text:span></text:span><text:span text:style-name="Source_20_Text"><text:span text:style-name="Strong_20_Emphasis"><text:span text:style-name="T175">$this</text:span></text:span></text:span><text:span text:style-name="Source_20_Text"><text:span text:style-name="T9">, pois </text:span></text:span><text:span text:style-name="Strong_20_Emphasis"><text:span text:style-name="T176">$this</text:span></text:span><text:span text:style-name="Source_20_Text"><text:span text:style-name="T9"> representa um objeto, e métodos estáticos pertencem à classe, não a objetos específicos. </text:span></text:span><text:span text:style-name="Source_20_Text"><text:span text:style-name="T177">E</text:span></text:span><text:span text:style-name="Source_20_Text"><text:span text:style-name="T9">ntão podemos chamá-lo diretamente com </text:span></text:span><text:span text:style-name="Source_20_Text"><text:span text:style-name="T178">Classe</text:span></text:span><text:span text:style-name="Source_20_Text"><text:span text:style-name="T179">::</text:span></text:span><text:span text:style-name="Source_20_Text"><text:span text:style-name="T178">metodo</text:span></text:span><text:span text:style-name="Source_20_Text"><text:span text:style-name="T179">()</text:span></text:span><text:span text:style-name="Source_20_Text"><text:span text:style-name="T9">, sem precisar instanciar a classe.</text:span></text:span></text:p>
      <text:p text:style-name="P85"><text:span text:style-name="Source_20_Text"><text:span text:style-name="T9">Dentro da própria classe, você pode acessar propriedades </text:span></text:span><text:span text:style-name="Source_20_Text"><text:span text:style-name="Strong_20_Emphasis"><text:span text:style-name="T9">estáticas</text:span></text:span></text:span><text:span text:style-name="Source_20_Text"><text:span text:style-name="T9"> usando </text:span></text:span><text:span text:style-name="Source_20_Text"><text:span text:style-name="T171">self::</text:span></text:span><text:span text:style-name="Source_20_Text"><text:span text:style-name="T9"> ou </text:span></text:span><text:span text:style-name="Source_20_Text"><text:span text:style-name="T171">static::</text:span></text:span></text:p>
      <text:list text:style-name="L4">
        <text:list-item>
          <text:p text:style-name="P86"><text:span text:style-name="Source_20_Text"><text:span text:style-name="T171">self::</text:span></text:span><text:span text:style-name="Source_20_Text"><text:span text:style-name="T9"> sempre chama métodos da </text:span></text:span><text:span text:style-name="Source_20_Text"><text:span text:style-name="Strong_20_Emphasis"><text:span text:style-name="T9">classe onde foi definido</text:span></text:span></text:span><text:span text:style-name="Source_20_Text"><text:span text:style-name="T9">.</text:span></text:span></text:p>
        </text:list-item>
        <text:list-item>
          <text:p text:style-name="P86"><text:span text:style-name="Source_20_Text"><text:span text:style-name="T171">static::</text:span></text:span><text:span text:style-name="Source_20_Text"><text:span text:style-name="T9"> chama métodos da </text:span></text:span><text:span text:style-name="Source_20_Text"><text:span text:style-name="Strong_20_Emphasis"><text:span text:style-name="T9">classe que está sendo instanciada</text:span></text:span></text:span><text:span text:style-name="Source_20_Text"><text:span text:style-name="T9">, sendo mais flexível para herança. </text:span></text:span></text:p>
        </text:list-item>
      </text:list>
      <text:p text:style-name="P87"><text:span text:style-name="Source_20_Text"><text:span text:style-name="T9"><draw:frame draw:style-name="fr2" draw:name="Figura28" text:anchor-type="as-char" svg:width="17.59cm" svg:height="7.029cm" draw:z-index="27"><draw:image xlink:href="Pictures/10000001000002FB000001317884277E.png" xlink:type="simple" xlink:show="embed" xlink:actuate="onLoad" draw:mime-type="image/png"/></draw:frame></text:span></text:span></text:p>
      <text:p text:style-name="P88"><text:span text:style-name="Source_20_Text"><text:span text:style-name="T180">Exemplo:</text:span></text:span></text:p>
      <text:p text:style-name="P89"><text:span text:style-name="Source_20_Text"><text:span text:style-name="T181">class</text:span></text:span><text:span text:style-name="Source_20_Text"><text:span text:style-name="T182"> </text:span></text:span><text:span text:style-name="Source_20_Text"><text:span text:style-name="T183">Filme<text:tab/><text:tab/><text:tab/><text:tab/><text:tab/><text:tab/><text:tab/><text:tab/><text:tab/></text:span></text:span></text:p>
      <text:p text:style-name="P63">{<text:tab/><text:tab/><text:tab/><text:tab/><text:tab/><text:tab/><text:tab/><text:tab/><text:tab/><text:tab/></text:p>
      <text:p text:style-name="P64"><text:span text:style-name="T135"><text:tab/>private</text:span><text:span text:style-name="T136"> </text:span><text:span text:style-name="T135">static</text:span><text:span text:style-name="T136"> </text:span><text:span text:style-name="T135">float</text:span><text:span text:style-name="T136"> </text:span><text:span text:style-name="T138">$notaMinima</text:span><text:span text:style-name="T136"> = </text:span><text:span text:style-name="T184">7.5</text:span><text:span text:style-name="T136">;<text:tab/><text:tab/><text:tab/></text:span></text:p>
      <text:p text:style-name="P63"><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boaAvaliacao</text:span><text:span text:style-name="T122">(): </text:span><text:span text:style-name="T121">bool<text:tab/></text:span><text:span text:style-name="T122">{<text:tab/><text:tab/><text:tab/></text:span></text:p>
      <text:p text:style-name="P62"><text:span text:style-name="T149"><text:tab/><text:tab/>return</text:span><text:span text:style-name="T122"> </text:span><text:span text:style-name="T121">$this</text:span><text:span text:style-name="T122">-&gt;</text:span><text:span text:style-name="T124">media</text:span><text:span text:style-name="T122">() &gt; </text:span><text:span text:style-name="T121">self</text:span><text:span text:style-name="T122">::</text:span><text:span text:style-name="T123">$notaMinima</text:span><text:span text:style-name="T122">;<text:tab/><text:tab/></text:span></text:p>
      <text:p text:style-name="P63"><text:tab/>}<text:tab/><text:tab/><text:tab/><text:tab/><text:tab/><text:tab/><text:tab/><text:tab/><text:tab/></text:p>
      <text:p text:style-name="P63">}<text:tab/><text:tab/><text:tab/><text:tab/><text:tab/><text:tab/><text:tab/><text:tab/><text:tab/><text:tab/></text:p>
      <text:p text:style-name="P87"><text:span text:style-name="Source_20_Text"><text:span text:style-name="T10"/></text:span></text:p>
      <text:h text:style-name="P37" text:outline-level="1">Aula 05 – Projeto Banco</text:h>
      <text:p text:style-name="P90"/>
      <text:p text:style-name="P90"><text:span text:style-name="T185">Exercício: </text:span>Construa um sistema <text:span text:style-name="T126">bancário </text:span>que utilize métodos como: <text:span text:style-name="T29">abrirConta(), fecharConta(), depositar(), sacar(), pagar mensalidade()</text:span></text:p>
      <text:p text:style-name="P91"><text:span text:style-name="T126">U</text:span><text:span text:style-name="T186">tilizar os métodos acessores (</text:span><text:span text:style-name="T187">get</text:span><text:span text:style-name="T186"> e </text:span><text:span text:style-name="T187">set</text:span><text:span text:style-name="T186">) aumenta a segurança do sistema pois impedem o acesso direto aos dados. Exemplo:<text:line-break/>Use </text:span><text:span text:style-name="T50">$this</text:span><text:span text:style-name="T49">-&gt;</text:span><text:span text:style-name="T188">setSaldo</text:span><text:span text:style-name="T49">(</text:span><text:span text:style-name="T50">$this</text:span><text:span text:style-name="T49">-&gt;</text:span><text:span text:style-name="T188">getSaldo</text:span><text:span text:style-name="T49">() + </text:span><text:span text:style-name="T47">$v</text:span><text:span text:style-name="T49">)</text:span> <text:span text:style-name="T186">em vez de </text:span><text:span text:style-name="T50">$this</text:span><text:span text:style-name="T49">-&gt;</text:span><text:span text:style-name="T47">saldo</text:span><text:span text:style-name="T49"> += </text:span><text:span text:style-name="T47">$v</text:span></text:p>
      <text:h text:style-name="P36" text:outline-level="1"/>
      <text:h text:style-name="P92" text:outline-level="1">Aula 06 – Encapsulamento</text:h>
      <text:p text:style-name="P93"/>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94"><text:span text:style-name="T189">Encapsular é ocultar partes que são independentes da implementação</text:span>, <text:span text:style-name="T16">restringindo </text:span><text:span text:style-name="T190">seu</text:span><text:span text:style-name="T16"> conhecimento</text:span> ao torná-las invisíveis ao mundo exterior. Assim, não é necessário conhecer a implementação interna de um objeto para poder usá-lo.</text:p>
      <text:p text:style-name="P94"><text:span text:style-name="T13">Encapsulamento</text:span><text:span text:style-name="T189"> é um mecanismo de visibilidade e interface</text:span>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5">
        <text:list-item>
          <text:p text:style-name="P95">Tornar mudanças invisíveis <text:span text:style-name="T191">(proteção)</text:span>.</text:p>
        </text:list-item>
        <text:list-item>
          <text:p text:style-name="P95">Facilitar reutilização do código.</text:p>
        </text:list-item>
        <text:list-item>
          <text:p text:style-name="P95">Reduzir efeitos colaterais <text:span text:style-name="T191">(segurança)</text:span>.</text:p>
        </text:list-item>
      </text:list>
      <text:p text:style-name="P21"/>
      <text:p text:style-name="P21">Ao encapsular, <text:span text:style-name="T16">mantenha os atributos privados</text:span>, seja como <text:span text:style-name="T192">private</text:span> ou <text:span text:style-name="T192">protected</text:span>, protegendo-os do meio externo (de fora do pacote), para que possam ser acessados apenas pelos Getters e Setters.</text:p>
      <text:p text:style-name="P96"/>
      <text:p text:style-name="P97"><text:span text:style-name="T193">I</text:span><text:span text:style-name="T194">mplementação</text:span><text:span text:style-name="T13"> </text:span><text:span text:style-name="T195">é </text:span><text:span text:style-name="T13">defin</text:span><text:span text:style-name="T195">ir</text:span><text:span text:style-name="T13"> os detalhes internos dos componentes </text:span><text:span text:style-name="T196">(ou seja, escrever as linhas de código)</text:span></text:p>
      <text:p text:style-name="P21"/>
      <text:p text:style-name="P98"><text:span text:style-name="T13">Interface</text:span> <text:span text:style-name="T197">(visualmente se parece com uma classe, só que</text:span><text:span text:style-name="T198"> sem</text:span><text:span text:style-name="T199"> </text:span><text:span text:style-name="T200">os</text:span><text:span text:style-name="T198"> atributos</text:span><text:span text:style-name="T197">) </text:span><text:span text:style-name="T16">define o comportamento comum</text:span> que pode ser implementado por um conjunto de classes. É uma <text:span text:style-name="T16">lista dos serviços</text:span><text:span text:style-name="T201"> fornecidos pelo componente, ou</text:span><text:span text:style-name="T202"> seja, é </text:span><text:span text:style-name="T203">o </text:span><text:span text:style-name="T204">contrato</text:span><text:span text:style-name="T203"> entre a classe e o mundo exterior. Quando uma classe implementa uma interface, se compromete a fornecer o comportamento publicado por esta interface. </text:span><text:span text:style-name="T205">A interface </text:span><text:span text:style-name="T202">diz quais </text:span><text:span text:style-name="T206">são os métodos determinados como públicos</text:span><text:span text:style-name="T202"> e que estão diretamente acessíveis à class</text:span><text:span text:style-name="T201">e. Com isso, cumpre-se seu </text:span><text:span text:style-name="T207">objetivo de melhorar a legibilidade</text:span><text:span text:style-name="T208"> do código pois não será preciso explorar as minúcias </text:span><text:span text:style-name="T209">implementadas </text:span><text:span text:style-name="T208">de cada método. </text:span><text:span text:style-name="T210">Uma interface pode herdar outra interface. </text:span><text:span text:style-name="T211">A interface n</text:span><text:span text:style-name="T210">ão contém um método construtor pois não precisa.</text:span></text:p>
      <text:list text:style-name="L6">
        <text:list-item>
          <text:p text:style-name="P99"><text:span text:style-name="T212">Interface{}</text:span><text:span text:style-name="T213"> é a palavra-chave para </text:span><text:span text:style-name="T214">declarar</text:span><text:span text:style-name="T213"> uma interface no PHP.</text:span></text:p>
        </text:list-item>
        <text:list-item>
          <text:p text:style-name="P99"><text:span text:style-name="T212">Implements</text:span><text:span text:style-name="T215"> </text:span><text:span text:style-name="T213">é a palavra-chave para</text:span><text:span text:style-name="T216"> </text:span><text:span text:style-name="T217">implementar</text:span><text:span text:style-name="T216"> uma interface</text:span>. <text:span text:style-name="T218">Exemplo:</text:span></text:p>
        </text:list-item>
      </text:list>
      <text:p text:style-name="P100"><text:span text:style-name="T149">require_once</text:span> <text:span text:style-name="T139">"Controlador.php"</text:span>  <text:span text:style-name="T140">//importando </text:span><text:span text:style-name="T219">o arquivo d</text:span><text:span text:style-name="T140">a interface</text:span></text:p>
      <text:p text:style-name="P101"><text:span text:style-name="T220">class</text:span><text:span text:style-name="T221"> </text:span><text:span text:style-name="T222">ControleRemoto</text:span><text:span text:style-name="T221"> </text:span><text:span text:style-name="T220">implements</text:span><text:span text:style-name="T221"> </text:span><text:span text:style-name="T222">Controlador</text:span><text:span text:style-name="T221"> {</text:span><text:span text:style-name="T223">}</text:span><text:span text:style-name="T224">//implementando a interface</text:span></text:p>
      <text:p text:style-name="P31">*<text:span text:style-name="T225">Nota: </text:span>No PHP, não é necessário explicitar o método como <text:span text:style-name="T226">abstract</text:span> ao declará-lo em um interface</text:p>
      <text:h text:style-name="P102" text:outline-level="1">Aula 07 <text:span text:style-name="T225">e 08 </text:span>– Objetos Compostos <text:span text:style-name="T114">(usando vetores) e Agregação</text:span></text:h>
      <text:p text:style-name="P103"/>
      <text:p text:style-name="P104">Criando o gerenciador de lutas UEC – Ultimate Emoticon Combat</text:p>
      <text:p text:style-name="P105">O PHP é Case_sensitive <text:span text:style-name="T227">apenas para</text:span><text:span text:style-name="T228"> declaração de </text:span><text:span text:style-name="T227">variáveis</text:span><text:span text:style-name="T228"> (e constantes)!</text:span></text:p>
      <text:p text:style-name="P106"><text:span text:style-name="T123">$L</text:span><text:span text:style-name="T229">utador</text:span> = <text:span text:style-name="T124">array</text:span>(); <text:span text:style-name="T140">//</text:span><text:span text:style-name="T230">declarando o objeto como um vetor</text:span></text:p>
      <text:p text:style-name="P107"><text:span text:style-name="T231">$L</text:span><text:span text:style-name="T232">utador</text:span><text:span text:style-name="T233">[</text:span><text:span text:style-name="T234">0</text:span><text:span text:style-name="T233">] = </text:span><text:span text:style-name="T235">new</text:span><text:span text:style-name="T233"> </text:span><text:span text:style-name="T236">Lutador</text:span><text:span text:style-name="T233">(</text:span><text:span text:style-name="T237">"Putscript"</text:span><text:span text:style-name="T233">, </text:span><text:span text:style-name="T237">"Brasil"</text:span><text:span text:style-name="T233">, </text:span><text:span text:style-name="T234">29</text:span><text:span text:style-name="T233">, </text:span><text:span text:style-name="T234">1.68</text:span><text:span text:style-name="T233">, </text:span><text:span text:style-name="T234">57.8</text:span><text:span text:style-name="T233">, </text:span><text:span text:style-name="T234">14</text:span><text:span text:style-name="T233">, </text:span><text:span text:style-name="T234">2</text:span><text:span text:style-name="T233">, </text:span><text:span text:style-name="T234">3</text:span><text:span text:style-name="T233">); </text:span><text:span text:style-name="T238">//instanciando um objeto na posição zero do vetor e valorando os atributos implementados no método Construtor</text:span></text:p>
      <text:p text:style-name="P31"/>
      <text:p text:style-name="P108"/>
      <text:p text:style-name="P109"><draw:frame draw:style-name="fr3" draw:name="Figura14" text:anchor-type="paragraph" svg:x="0.09cm" svg:y="0.106cm" svg:width="4.63cm" svg:height="6.456cm" draw:z-index="7"><draw:image xlink:href="Pictures/10000001000000CF000000E87AE6C875.gif" xlink:type="simple" xlink:show="embed" xlink:actuate="onLoad" draw:mime-type="image/gif"/></draw:frame></text:p>
      <text:p text:style-name="P109"/>
      <text:p text:style-name="P110"><text:span text:style-name="T239">Tipos de </text:span><text:span text:style-name="T240">Relacionamento</text:span><text:span text:style-name="T241"> entre classes</text:span><text:span text:style-name="T242">: geralmente as classes não estão sós e </text:span><text:span text:style-name="T243">se </text:span><text:span text:style-name="T242">relacionam entre si, </text:span><text:span text:style-name="T244">assim como os objetos têm</text:span><text:span text:style-name="T242"> relações entre eles.</text:span></text:p>
      <text:p text:style-name="P111"/>
      <text:p text:style-name="P110"><text:span text:style-name="T242">Essas relações são representadas no</text:span><text:span text:style-name="T245">s</text:span><text:span text:style-name="T242"> </text:span><text:span text:style-name="T246">3 tipos de </text:span><text:span text:style-name="T242">diagrama de classe</text:span><text:span text:style-name="T246">: </text:span><text:span text:style-name="T247">Associação, Herança </text:span><text:span text:style-name="T248">e </text:span><text:span text:style-name="T247">Dependência.</text:span></text:p>
      <text:p text:style-name="P112"/>
      <text:p text:style-name="P112"/>
      <text:p text:style-name="P112"><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112"/>
      <text:p text:style-name="P113"/>
      <text:list text:style-name="L7">
        <text:list-item>
          <text:p text:style-name="P114"><text:span text:style-name="T249">Associação</text:span><text:span text:style-name="T246"> </text:span><text:span text:style-name="T250">é subdividida em:</text:span></text:p>
          <text:list>
            <text:list-item>
              <text:p text:style-name="P114"><text:span text:style-name="T251">Agregação</text:span><text:span text:style-name="T252">: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14"><text:span text:style-name="T251">Composição</text:span><text:span text:style-name="T246">: </text:span><text:span text:style-name="T252">acontece quando temos variáveis internas que são instâncias de outras classes.<text:line-break/><text:line-break/></text:span><text:span text:style-name="T253">A diferença é</text:span><text:span text:style-name="T252"> que, n</text:span><text:span text:style-name="T246">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15"/>
            </text:list-header>
          </text:list>
        </text:list-item>
        <text:list-item>
          <text:p text:style-name="P116"><text:span text:style-name="T254">Dependência</text:span><text:span text:style-name="T255">: indica a ocorrência de um relacionamento </text:span><text:span text:style-name="T256">s</text:span><text:span text:style-name="T255">emântico entre dois ou mais elementos do modelo, onde uma classe cliente é dependente de alguns serviços da classe fornecedora, mas não tem uma dependência estrutural interna com esse fornecedor<text:line-break/></text:span></text:p>
        </text:list-item>
        <text:list-item>
          <text:p text:style-name="P117">Herança:<text:span text:style-name="T257"> </text:span><text:span text:style-name="T258">(explicado na aula 10)</text:span></text:p>
        </text:list-item>
      </text:list>
      <text:h text:style-name="P37" text:outline-level="1">Aula 09 – Exerc<text:span text:style-name="T185">í</text:span>cio</text:h>
      <text:p text:style-name="P118"/>
      <text:p text:style-name="P119">Abaixo segue o diagrama de classe para a realização do exercício <text:span text:style-name="T259">Livraria</text:span> da aula 09:</text:p>
      <text:p text:style-name="P119"><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60">e 11 </text:span>– Herança</text:h>
      <text:p text:style-name="P30"/>
      <text:p text:style-name="P120"><text:span text:style-name="T261">Herança</text:span><text:span text:style-name="T255"> é um relacionamento entre classes que permite que uma classe adquira os membros de outra classe, ou seja, uma classe mãe </text:span><text:span text:style-name="T262">compartilha seus atributos e métodos com suas classes filhas.<text:line-break/></text:span><text:span text:style-name="T263">Para isso, utilizamos as seguintes palavras reservadas:</text:span></text:p>
      <text:p text:style-name="P121"/>
      <text:list text:style-name="L9">
        <text:list-item>
          <text:list>
            <text:list-item>
              <text:p text:style-name="P122"><text:span text:style-name="T264">extends</text:span><text:span text:style-name="T265"> é a palavra reservada para que </text:span><text:span text:style-name="T266">a</text:span><text:span text:style-name="T265"> </text:span><text:span text:style-name="T267">subclasse herde </text:span><text:span text:style-name="T268">d</text:span><text:span text:style-name="T269">a</text:span><text:span text:style-name="T267"> superclasse</text:span><text:span text:style-name="T265">. </text:span><text:span text:style-name="T270">Exemplo:</text:span><text:span text:style-name="T265"><text:line-break/></text:span><text:span text:style-name="T270">No </text:span><text:span text:style-name="T265">PHP e Java: </text:span><text:span text:style-name="T271">class</text:span><text:span text:style-name="T272"> </text:span><text:span text:style-name="T273">Filha</text:span><text:span text:style-name="T272"> </text:span><text:span text:style-name="T271">extends</text:span><text:span text:style-name="T272"> </text:span><text:span text:style-name="T273">Pai</text:span><text:span text:style-name="T265"><text:line-break/></text:span><text:span text:style-name="T270">No </text:span><text:span text:style-name="T265">C++ e C#:<text:tab/></text:span><text:span text:style-name="T271">class</text:span><text:span text:style-name="T272"> </text:span><text:span text:style-name="T273">Filha</text:span><text:span text:style-name="T272"> </text:span><text:span text:style-name="T274">:</text:span><text:span text:style-name="T272"> </text:span><text:span text:style-name="T273">Pai</text:span></text:p>
            </text:list-item>
            <text:list-item>
              <text:p text:style-name="P123"><text:span text:style-name="T275">$this</text:span><text:span text:style-name="T276">-</text:span><text:span text:style-name="T277">&gt;</text:span><text:span text:style-name="T278"> Faz </text:span><text:span text:style-name="T279">r</text:span><text:span text:style-name="T280">eferência à </text:span><text:span text:style-name="T281">própria</text:span><text:span text:style-name="T280"> </text:span><text:span text:style-name="Strong_20_Emphasis"><text:span text:style-name="T281">instância</text:span></text:span><text:span text:style-name="Strong_20_Emphasis"><text:span text:style-name="T282">,</text:span></text:span><text:span text:style-name="Strong_20_Emphasis"><text:span text:style-name="T131"> </text:span></text:span><text:span text:style-name="Strong_20_Emphasis"><text:span text:style-name="T283">ou seja, t</text:span></text:span><text:span text:style-name="T10">udo </text:span><text:span text:style-name="T278">o</text:span><text:span text:style-name="T10"> que pertence </text:span><text:span text:style-name="Strong_20_Emphasis"><text:span text:style-name="T284">ao </text:span></text:span><text:span text:style-name="Strong_20_Emphasis"><text:span text:style-name="T285">objeto</text:span></text:span><text:span text:style-name="T10"> estará disponível em </text:span><text:span text:style-name="Source_20_Text"><text:span text:style-name="T286">$this→</text:span></text:span><text:span text:style-name="T10"><text:line-break/></text:span><text:span text:style-name="T278">Exceção: em PHP, os m</text:span><text:span text:style-name="T10">étodos estáticos e </text:span><text:span text:style-name="T278">as </text:span><text:span text:style-name="T10">constantes pertencem à própria </text:span><text:span text:style-name="T280">classe</text:span><text:span text:style-name="T10"> e, portanto, não são acessíve</text:span><text:span text:style-name="T278">is</text:span><text:span text:style-name="T10"> </text:span><text:span text:style-name="T287">em </text:span><text:span text:style-name="T288">$this→</text:span></text:p>
            </text:list-item>
          </text:list>
        </text:list-item>
      </text:list>
      <text:list text:style-name="L10">
        <text:list-item>
          <text:list>
            <text:list-item>
              <text:p text:style-name="P124"><text:span text:style-name="T289">parent</text:span><text:span text:style-name="T290">::</text:span> é a palavra reservada para <text:span text:style-name="T16">referenciar a superclasse</text:span><text:span text:style-name="T88">, </text:span><text:span text:style-name="T291">ou seja, </text:span><text:span text:style-name="T88">a</text:span> <text:span text:style-name="T292">classe</text:span> que foi herdada pela classe atual, <text:span text:style-name="T293">tornando</text:span> possível o acesso aos atributos e métodos da superclasse.</text:p>
            </text:list-item>
          </text:list>
        </text:list-item>
      </text:list>
      <text:list text:style-name="L11">
        <text:list-item>
          <text:list>
            <text:list-item>
              <text:p text:style-name="P125"><text:span text:style-name="T289">parent::__construct(</text:span>$variáve<text:span text:style-name="T294">is</text:span><text:span text:style-name="T289">);</text:span> <text:span text:style-name="T295">chama o método construtor da superclasse</text:span></text:p>
            </text:list-item>
          </text:list>
        </text:list-item>
      </text:list>
      <text:p text:style-name="P126"/>
      <text:p text:style-name="P127">O conceito de superclasse e subclasse é relativo, <text:span text:style-name="T296">pois </text:span>depende do seu referencial!</text:p>
      <text:p text:style-name="P127"/>
      <text:p text:style-name="P127">Toda subclasse herda todo o conteúdo de seus ancestrais, mesmo que não esteja totalmente disponível (visível). <text:span text:style-name="T296">[Há divergências entre bancas quanto a esse conceito]</text:span></text:p>
      <text:p text:style-name="P128"/>
      <text:p text:style-name="P129"><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1"><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29"><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32"><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134">Os dois pilares: <text:span text:style-name="T16">herança e encapsulamento são independentes entre si</text:span>, <text:span text:style-name="T296">ou seja, </text:span>é possível ter um sem ter o outro, <text:span text:style-name="T297">porém um bom software é construído com os 3 pilares.<text:line-break/></text:span></text:p>
      <text:p text:style-name="P135">DICA: <text:span text:style-name="T298">No Netbeans, para gerar automaticamente uma string que </text:span><text:span text:style-name="T299">apresenta</text:span><text:span text:style-name="T300"> todos atributos de sua classe, use o </text:span><text:span text:style-name="T301">atalho</text:span><text:span text:style-name="T302"> toString()</text:span><text:span text:style-name="T300"> através do menu de inserir_código (Alt+Insert)</text:span></text:p>
      <text:p text:style-name="P136"><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37"/>
      <text:p text:style-name="P137"/>
      <text:p text:style-name="P137"/>
      <text:p text:style-name="P138"><text:span text:style-name="T194">Raiz</text:span><text:span text:style-name="T303"> </text:span>é a classe que não tem <text:span text:style-name="T16">superclasse</text:span>.</text:p>
      <text:p text:style-name="P138"><text:span text:style-name="T194">Folha</text:span> é <text:span text:style-name="T304">a</text:span> classe que não tem <text:span text:style-name="T16">subclasse</text:span>.</text:p>
      <text:p text:style-name="P139"/>
      <text:p text:style-name="P138"><text:span text:style-name="T194">Ancestral</text:span> e <text:span text:style-name="T194">Descendente</text:span> desconsideram as filhas <text:span text:style-name="T304">(subclasses)</text:span>, <text:span text:style-name="T16">só valem das netas pra baixo</text:span>.</text:p>
      <text:p text:style-name="P139"/>
      <text:p text:style-name="P138"><text:span text:style-name="T194">Especialização</text:span> é quando percorre a árvore de cima para baixo</text:p>
      <text:p text:style-name="P138"><text:span text:style-name="T194">Generalização</text:span> é de baixo para cima. <text:span text:style-name="T305">É</text:span><text:span text:style-name="T306"> a capacidade de se criar superclasses que encapsulam estrutura e/ou comportamento comuns a várias subclasses</text:span></text:p>
      <text:p text:style-name="P140"/>
      <text:p text:style-name="P140"/>
      <text:p text:style-name="P140"/>
      <text:p text:style-name="P140"/>
      <text:p text:style-name="P140"/>
      <text:p text:style-name="P140"/>
      <text:p text:style-name="P140"/>
      <text:p text:style-name="P140"><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40"/>
      <text:p text:style-name="P140"/>
      <text:p text:style-name="P140"/>
      <text:p text:style-name="P140"/>
      <text:p text:style-name="P140"/>
      <text:p text:style-name="P140">Tipos de Herança:<text:line-break/></text:p>
      <text:list text:style-name="L12">
        <text:list-item>
          <text:p text:style-name="P141"><text:span text:style-name="T194">De Implementação</text:span> (ou herança <text:span text:style-name="T16">pobre</text:span>): é a mais simples, criada apenas para implementar classes abstratas/genéricas, ou seja, <text:span text:style-name="T307">não</text:span><text:span text:style-name="T308"> </text:span><text:span text:style-name="T309">possui</text:span><text:span text:style-name="T16"> novos atributos ou métodos.</text:span> <text:span text:style-name="T310">Um exemplo é a classe `Visitante`, na figura à esquerda.<text:line-break/></text:span></text:p>
        </text:list-item>
        <text:list-item>
          <text:p text:style-name="P141"><text:span text:style-name="T311">P</text:span><text:span text:style-name="T194">ara Diferença</text:span>: mais completa <text:span text:style-name="T312">pois, além de herdar os atributos e métodos da superclasse, também </text:span><text:span text:style-name="T308">possui os seus próprios atributos e métodos.</text:span></text:p>
        </text:list-item>
      </text:list>
      <text:p text:style-name="P139"/>
      <text:p text:style-name="P139"/>
      <text:p text:style-name="P142"><text:span text:style-name="T313">Diferença entre </text:span><text:span text:style-name="T314">herança simples</text:span><text:span text:style-name="T313"> </text:span><text:span text:style-name="T314">e herança</text:span><text:span text:style-name="T313"> </text:span><text:span text:style-name="T314">m</text:span><text:span text:style-name="T315">ú</text:span><text:span text:style-name="T314">ltipla </text:span><text:span text:style-name="T313">(disponível apenas em C++ e Python):</text:span></text:p>
      <text:p text:style-name="P139"><text:span text:style-name="T313">Quando uma classe herda características somente de uma classe, dizemos que esta é uma herança simples. Quando uma classe herda de duas ou mais classes, temos um caso de herança múltipla (disponível apenas em C++ e Python)<text:line-break/></text:span><text:span text:style-name="T316">É</text:span><text:span text:style-name="T317"> possível </text:span><text:span text:style-name="T313">obter herança múltipla apenas de INTERFACES através d</text:span><text:span text:style-name="T317">a palavra-chave</text:span><text:span text:style-name="T313"> </text:span><text:span text:style-name="T318">implements</text:span><text:span text:style-name="T313">, </text:span><text:span text:style-name="T319">podendo</text:span><text:span text:style-name="T313"> herdar diversos conjuntos de comportamentos sem implementações definidas. Só uma classe concreta ou abstrata pode ser herdada</text:span></text:p>
      <text:p text:style-name="P143"/>
      <text:p text:style-name="P144"><text:span text:style-name="T242">Softwares devem ser modelados antes de ser construídos, mesmo que apenas suas partes mais críticas. E na modelagem todo Analista de Sistemas deve ter como </text:span><text:span text:style-name="T320">mantra</text:span><text:span text:style-name="T242"> a ideia de </text:span><text:span text:style-name="T241">Fraco Acoplamento e Alta Coesão</text:span><text:span text:style-name="T242">, </text:span><text:span text:style-name="T321">p</text:span>ois facilita, entre outras coisas, a <text:span text:style-name="T16">manutenção</text:span> e o <text:span text:style-name="T16">reuso</text:span>.</text:p>
      <text:list text:style-name="L13">
        <text:list-item>
          <text:p text:style-name="P145"><text:span text:style-name="T322">Coesão</text:span><text:span text:style-name="T323"> é contruir </text:span><text:span text:style-name="T324">módulos (</text:span><text:span text:style-name="T323">classes</text:span><text:span text:style-name="T324">)</text:span><text:span text:style-name="T323"> com propósitos claros e bem definidos, </text:span><text:span text:style-name="T325">com poucas</text:span><text:span text:style-name="T323"> responsabilidades, </text:span><text:span text:style-name="T325">retiran</text:span>do funcionalidades supérfluas de um<text:span text:style-name="T324">a classe</text:span> e transferindo para outr<text:span text:style-name="T324">a</text:span> <text:span text:style-name="T324">classe</text:span>. “O que não é coeso, é confuso, incoerente”.</text:p>
        </text:list-item>
        <text:list-item>
          <text:p text:style-name="P146"><text:span text:style-name="T326">Acomplamento</text:span><text:span text:style-name="T327"> é </text:span><text:span text:style-name="T328">o nível de relação entre</text:span><text:span text:style-name="T10"> </text:span><text:span text:style-name="T328">as classes</text:span><text:span text:style-name="T10">, indica o quanto um</text:span><text:span text:style-name="T328">a classe</text:span><text:span text:style-name="T10"> depende de outr</text:span><text:span text:style-name="T328">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329">programar para a interface e não para a implementação</text:span></text:a><text:span text:style-name="T10">, </text:span><text:span text:style-name="T330">pois a criação de interfaces </text:span><text:span text:style-name="T331">(classes abstratas)</text:span><text:span text:style-name="T330"> reduzem o acoplamento uma vez que, tendo apenas o </text:span><text:span text:style-name="T332">contrato</text:span><text:span text:style-name="T330">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330">suas </text:span><text:span text:style-name="T10">subclasses (conceito de herança), </text:span><text:span text:style-name="T330">essa</text:span><text:span text:style-name="T10"> criação de subclasses </text:span><text:span text:style-name="T330">é</text:span><text:span text:style-name="T10"> uma das piores formas de acoplamento existentes.</text:span></text:p>
        </text:list-item>
      </text:list>
      <text:p text:style-name="P147"/>
      <text:p text:style-name="P148"><text:span text:style-name="T16">Classes e métodos</text:span> também podem ser <text:span text:style-name="T333">abstract</text:span>:<text:line-break/></text:p>
      <text:list text:style-name="L14">
        <text:list-item>
          <text:p text:style-name="P149"><text:span text:style-name="T334">Classe</text:span><text:span text:style-name="T335"> </text:span><text:span text:style-name="T336">A</text:span><text:span text:style-name="T334">bstrata</text:span><text:span text:style-name="T337"> </text:span><text:span text:style-name="T335">Não pode ser instanciada pois ainda não está completa (não é concreta). </text:span><text:span text:style-name="T338">Portanto,</text:span><text:span text:style-name="T335"> não é possível criar objetos a partir dela, </text:span><text:span text:style-name="T339">só</text:span><text:span text:style-name="T335"> pode</text:span><text:span text:style-name="T339">ndo</text:span><text:span text:style-name="T335"> servir como </text:span><text:span text:style-name="T340">superclasse</text:span><text:span text:style-name="T341"> para herança.</text:span><text:span text:style-name="T335"><text:line-break/>Se uma classe tem algum método abstrato, ela também precisa ser abstrata, </text:span><text:span text:style-name="T338">portanto, </text:span><text:span text:style-name="T335">apenas classes abstratas podem ter métodos abstratos;</text:span></text:p>
        </text:list-item>
        <text:list-item>
          <text:p text:style-name="P150"><text:span text:style-name="T342">Método</text:span><text:span text:style-name="T343"> </text:span><text:span text:style-name="T342">Abstrato</text:span><text:span text:style-name="T343"> </text:span><text:span text:style-name="T344">é</text:span><text:span text:style-name="T343"> uma forma de "obrigar" que classes filhas implementem determinado método. </text:span><text:span text:style-name="T344">É g</text:span><text:span text:style-name="T345">eralmente usado </text:span><text:span text:style-name="T346">na criação de</text:span><text:span text:style-name="T345"> Interfaces.<text:line-break/></text:span></text:p>
        </text:list-item>
      </text:list>
      <text:p text:style-name="P148"><text:span text:style-name="T347">Classes, atributos, métodos e variáveis</text:span><text:span text:style-name="T348"> declarados como </text:span><text:span text:style-name="T333">final</text:span><text:span text:style-name="T348"> não </text:span><text:span text:style-name="T349">podem ter</text:span><text:span text:style-name="T348"> o seu comportamento modificado (conceito d</text:span><text:span text:style-name="T350">a</text:span><text:span text:style-name="T348"> </text:span><text:span text:style-name="T347">imutabilidade</text:span><text:span text:style-name="T348">):<text:line-break/></text:span></text:p>
      <text:list text:continue-numbering="true" text:style-name="L14">
        <text:list-item>
          <text:p text:style-name="P151"><text:span text:style-name="T13">Classe</text:span> <text:span text:style-name="T351">F</text:span><text:span text:style-name="T13">inal</text:span> <text:span text:style-name="T352">não permite herança</text:span><text:span text:style-name="T353">, ou seja, </text:span>não pode <text:span text:style-name="T354">ter filhas/subclasses</text:span>, será <text:span text:style-name="T355">apenas </text:span>uma <text:span text:style-name="T16">folha estéril</text:span>.</text:p>
        </text:list-item>
        <text:list-item>
          <text:p text:style-name="P152"><text:span text:style-name="T342">Método</text:span><text:span text:style-name="T343"> </text:span><text:span text:style-name="T342">Final</text:span><text:span text:style-name="T343"> </text:span><text:span text:style-name="T356">não permite polimorfismo</text:span><text:span text:style-name="T357">, ou seja, </text:span><text:span text:style-name="T358">não pode ser sobrescrito</text:span><text:span text:style-name="T343"> </text:span><text:span text:style-name="T359">por</text:span><text:span text:style-name="T343"> suas subclasses</text:span><text:span text:style-name="T357">. </text:span><text:span text:style-name="T360">Use para garantir que um determinado algoritmo não possa ser modificado pelas subclasses.</text:span><text:span text:style-name="T357"> </text:span></text:p>
        </text:list-item>
      </text:list>
      <text:list text:style-name="L15">
        <text:list-item>
          <text:p text:style-name="P153"><text:span text:style-name="T361">$</text:span><text:span text:style-name="T362">Atributo </text:span><text:span text:style-name="T363">F</text:span><text:span text:style-name="Source_20_Text"><text:span text:style-name="T364">inal</text:span></text:span><text:span text:style-name="T365"> pode ter seu </text:span><text:span text:style-name="T366">valor atribuído uma única vez</text:span><text:span text:style-name="T365">, seja na própria declaração ou no construtor.</text:span><text:span text:style-name="T367"> </text:span></text:p>
        </text:list-item>
        <text:list-item>
          <text:p text:style-name="P154"><text:span text:style-name="T368">$</text:span><text:span text:style-name="T369">Variável Final</text:span><text:span text:style-name="T370"> </text:span><text:span text:style-name="T371">(</text:span><text:span text:style-name="T372">é uma </text:span><text:span text:style-name="T371">constante): </text:span><text:span text:style-name="T373">seu </text:span><text:span text:style-name="T374">valor não pode ser alterado</text:span><text:span text:style-name="T373"> por </text:span><text:span text:style-name="T371">nenhum</text:span><text:span text:style-name="T373"> obj</text:span><text:span text:style-name="T371">eto.</text:span></text:p>
        </text:list-item>
      </text:list>
      <text:p text:style-name="P155"/>
      <text:h text:style-name="P156" text:outline-level="2">Traits</text:h>
      <text:p text:style-name="P157">Traços, Características, são um mecanismo para <text:span text:style-name="T13">reúso de código</text:span> em linguagens de herança simples como o PHP, <text:span text:style-name="T375">reduzindo essa limitação ao permitir</text:span> que um desenvolvedor reutilize livremente conjuntos de métodos em várias classes independentes habitando em diferentes hierarquias de classe.</text:p>
      <text:p text:style-name="P158">Uma Trait é similar a uma classe, mas destina-se apenas a agrupar funcionalidade de uma forma refinada e consistente.</text:p>
      <text:p text:style-name="P158">Não é possível instanciar uma Trait por si só. Ela é uma adição à herança tradicional.</text:p>
      <text:p text:style-name="P159"><text:span text:style-name="Emphasis"><text:span text:style-name="T376">Trait</text:span></text:span><text:span text:style-name="T376"> s</text:span><text:span text:style-name="T377">erve para adicionar funcionalidades em uma classe</text:span><text:span text:style-name="T376">, não serve para substituir classes. </text:span></text:p>
      <text:p text:style-name="P160"/>
      <text:p text:style-name="P161"><text:span text:style-name="T121">trait</text:span><text:span text:style-name="T122"> </text:span><text:span text:style-name="T134">TraitA</text:span><text:span text:style-name="T122"> {                                              </text:span></text:p>
      <text:p text:style-name="P161"><text:span text:style-name="T121"><text:s text:c="4"/>public</text:span><text:span text:style-name="T122"> </text:span><text:span text:style-name="T121">function</text:span><text:span text:style-name="T122"> </text:span><text:span text:style-name="T124">sayHello</text:span><text:span text:style-name="T122">() {                            </text:span></text:p>
      <text:p text:style-name="P161"><text:span text:style-name="T124"><text:s text:c="8"/>echo</text:span><text:span text:style-name="T122"> </text:span><text:span text:style-name="T139">'Olá,'</text:span><text:span text:style-name="T122">;                                        </text:span></text:p>
      <text:p text:style-name="P162"><text:s text:c="4"/>}                                                       </text:p>
      <text:p text:style-name="P162">}                                                           </text:p>
      <text:p text:style-name="P163"><text:s/>                                                          <text:s/></text:p>
      <text:p text:style-name="P161"><text:span text:style-name="T121">trait</text:span><text:span text:style-name="T122"> </text:span><text:span text:style-name="T134">TraitB</text:span><text:span text:style-name="T122"> {                                              </text:span></text:p>
      <text:p text:style-name="P161"><text:span text:style-name="T121"><text:s text:c="4"/>public</text:span><text:span text:style-name="T122"> </text:span><text:span text:style-name="T121">function</text:span><text:span text:style-name="T122"> </text:span><text:span text:style-name="T124">sayWorld</text:span><text:span text:style-name="T122">() {                            </text:span></text:p>
      <text:p text:style-name="P161"><text:span text:style-name="T124"><text:s text:c="8"/>echo</text:span><text:span text:style-name="T122"> </text:span><text:span text:style-name="T139">'mundo'</text:span><text:span text:style-name="T122">;                                       </text:span></text:p>
      <text:p text:style-name="P162"><text:s text:c="4"/>}                                                       </text:p>
      <text:p text:style-name="P162">}                                                           </text:p>
      <text:p text:style-name="P162"><text:s text:c="6"/>                                                      </text:p>
      <text:p text:style-name="P161"><text:span text:style-name="T121">class</text:span><text:span text:style-name="T122"> </text:span><text:span text:style-name="T134">MyHelloWorld</text:span><text:span text:style-name="T122">                                          </text:span></text:p>
      <text:p text:style-name="P162">{                                                           </text:p>
      <text:p text:style-name="P161"><text:span text:style-name="T121"><text:s text:c="4"/>use</text:span><text:span text:style-name="T122"> </text:span><text:span text:style-name="T134">TraitA</text:span><text:span text:style-name="T122">, </text:span><text:span text:style-name="T134">TraitB</text:span><text:span text:style-name="T122">; </text:span><text:span text:style-name="T140">// Uma classe pode usar vários Trait</text:span></text:p>
      <text:p text:style-name="P163"><text:s/>                                                          <text:s/></text:p>
      <text:p text:style-name="P161"><text:span text:style-name="T121"><text:s text:c="4"/>public</text:span><text:span text:style-name="T122"> </text:span><text:span text:style-name="T121">function</text:span><text:span text:style-name="T122"> </text:span><text:span text:style-name="T124">sayHelloWorld</text:span><text:span text:style-name="T122">() {                       </text:span></text:p>
      <text:p text:style-name="P161"><text:span text:style-name="T121"><text:s text:c="8"/>$this</text:span><text:span text:style-name="T122">-&gt;</text:span><text:span text:style-name="T124">sayHello</text:span><text:span text:style-name="T122">();                                  </text:span></text:p>
      <text:p text:style-name="P161"><text:span text:style-name="T124"><text:s text:c="8"/>echo</text:span><text:span text:style-name="T122"> </text:span><text:span text:style-name="T139">' '</text:span><text:span text:style-name="T122">;                                           </text:span></text:p>
      <text:p text:style-name="P161"><text:span text:style-name="T121"><text:s text:c="8"/>$this</text:span><text:span text:style-name="T122">-&gt;</text:span><text:span text:style-name="T124">sayWorld</text:span><text:span text:style-name="T122">();                                  </text:span></text:p>
      <text:p text:style-name="P161"><text:span text:style-name="T124"><text:s text:c="8"/>echo</text:span><text:span text:style-name="T122"> </text:span><text:span text:style-name="T139">"!</text:span><text:span text:style-name="T378">\n</text:span><text:span text:style-name="T139">"</text:span><text:span text:style-name="T122">;                                         </text:span></text:p>
      <text:p text:style-name="P162"><text:s text:c="4"/>}                                                       </text:p>
      <text:p text:style-name="P162">}                                                           </text:p>
      <text:p text:style-name="P163"><text:s/>                                                          <text:s/></text:p>
      <text:p text:style-name="P161"><text:span text:style-name="T123">$myHelloWorld</text:span><text:span text:style-name="T122"> = </text:span><text:span text:style-name="T121">new</text:span><text:span text:style-name="T122"> </text:span><text:span text:style-name="T134">MyHelloWorld</text:span><text:span text:style-name="T122">();                         </text:span></text:p>
      <text:p text:style-name="P161"><text:span text:style-name="T123">$myHelloWorld</text:span><text:span text:style-name="T122">-&gt;</text:span><text:span text:style-name="T124">sayHelloWorld</text:span><text:span text:style-name="T122">();                             </text:span></text:p>
      <text:p text:style-name="P31"/>
      <text:h text:style-name="P102" text:outline-level="1">Aula 12 <text:span text:style-name="T379">e </text:span>13 – Polimorfismo</text:h>
      <text:p text:style-name="P164"/>
      <text:p text:style-name="P165"><text:span text:style-name="T380">Polimorfismo</text:span> permite que um <text:span text:style-name="T185">mesmo método (de </text:span><text:span text:style-name="T16">mesmo </text:span><text:span text:style-name="T381">nome</text:span><text:span text:style-name="T382">)</text:span> <text:span text:style-name="T383">expresse</text:span> <text:span text:style-name="T16">vários comportamentos</text:span> diferentes.<text:tab/><text:tab/><text:span text:style-name="T384">(</text:span>Polimorfo = muitas formas<text:span text:style-name="T384">)</text:span></text:p>
      <text:p text:style-name="P165"/>
      <text:p text:style-name="P166"><text:span text:style-name="T385">Assinatura de um método</text:span><text:span text:style-name="T386"> </text:span><text:span text:style-name="T387">é </text:span><text:span text:style-name="T388">a</text:span><text:span text:style-name="T387"> </text:span><text:span text:style-name="T389">quantidade</text:span><text:span text:style-name="T387"> </text:span><text:span text:style-name="T390">de atributos</text:span><text:span text:style-name="T388"> que ele recebe </text:span><text:span text:style-name="T387">e </text:span><text:span text:style-name="T388">os</text:span><text:span text:style-name="T387"> </text:span><text:span text:style-name="T389">tipo</text:span><text:span text:style-name="T391">s</text:span><text:span text:style-name="T387"> d</text:span><text:span text:style-name="T392">esses atributos. (o tipo de retorno não faz diferença).</text:span></text:p>
      <text:p text:style-name="P167"/>
      <text:p text:style-name="P165">Os <text:span text:style-name="T393">4</text:span> <text:span text:style-name="T13">tipos de Polimorfismo</text:span> são:<text:span text:style-name="T394"><text:line-break/></text:span></text:p>
      <text:list text:style-name="L16">
        <text:list-item>
          <text:p text:style-name="P168"><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395">Sobreposição</text:span><text:span text:style-name="T396">: é o mais comum, </text:span><text:span text:style-name="T397">ocorre quando os métodos das subclasses sobre</text:span><text:span text:style-name="T398">screvem</text:span><text:span text:style-name="T397"> os métodos de sua superclasse, </text:span><text:span text:style-name="T399">substituindo</text:span><text:span text:style-name="T400"> um comportamento por outro </text:span><text:span text:style-name="T399">sem mudar o nome do método.</text:span><text:span text:style-name="T400"><text:line-break/></text:span><text:span text:style-name="T401">Requisitos</text:span><text:span text:style-name="T400">: possuir a </text:span><text:span text:style-name="T402">mesma</text:span><text:span text:style-name="T403"> assinatura</text:span><text:span text:style-name="T400">, mas em </text:span><text:span text:style-name="T403">classes </text:span><text:span text:style-name="T402">diferentes</text:span><text:span text:style-name="T404"><text:line-break/></text:span><text:span text:style-name="T405">N</text:span><text:span text:style-name="T406">o PHP, não existe nenhuma palavra para indicar sobreposição</text:span><text:span text:style-name="T407">, </text:span><text:span text:style-name="T408">ela é feita automaticamente </text:span><text:span text:style-name="T407">(</text:span><text:span text:style-name="T408">diferentemente do Java que possui </text:span><text:span text:style-name="T407">a </text:span><text:span text:style-name="T409">anotação </text:span><text:span text:style-name="T410">de segurança</text:span><text:span text:style-name="T400"> </text:span><text:span text:style-name="T411">@override</text:span><text:span text:style-name="T412">)<text:line-break/>Em outras palavras, u</text:span><text:span text:style-name="T413">samos</text:span><text:span text:style-name="T414"> </text:span><text:span text:style-name="T412">polimorfismo de sobreposição </text:span><text:span text:style-name="T414">para reescrever um método que foi herdado, onde seu comportamento </text:span><text:span text:style-name="T413">implementado </text:span><text:span text:style-name="T414">na classe </text:span><text:span text:style-name="T415">Mãe</text:span><text:span text:style-name="T414"> se difere do seu comportamento</text:span><text:span text:style-name="T413"> </text:span><text:span text:style-name="T414">na classe </text:span><text:span text:style-name="T413">F</text:span><text:span text:style-name="T414">ilha, </text:span><text:span text:style-name="T416">o</text:span><text:span text:style-name="T414">u seja, eles possuem o mesmo nome, mas funcionalidades ou ações diferentes. </text:span><text:span text:style-name="T412">Lembrando que s</text:span><text:span text:style-name="T417">ó ocorre quando as </text:span><text:span text:style-name="T418">assinaturas</text:span><text:span text:style-name="T417"> dos métodos forem </text:span><text:span text:style-name="T418">iguais</text:span><text:span text:style-name="T417">.<text:line-break/></text:span></text:p>
        </text:list-item>
        <text:list-item>
          <text:p text:style-name="P169"><text:span text:style-name="T419">Sobrecarga</text:span><text:span text:style-name="T420">: </text:span><text:span text:style-name="T421">dentro de uma mesma classe, permite que um </text:span><text:span text:style-name="T422">mesmo método</text:span><text:span text:style-name="T421"> possa ser </text:span><text:span text:style-name="T423">implementado de maneiras diferentes</text:span><text:span text:style-name="T421">, sendo que cada declaração difere simplesmente no </text:span><text:span text:style-name="T422">número</text:span><text:span text:style-name="T421"> e </text:span><text:span text:style-name="T422">tipo</text:span><text:span text:style-name="T421"> de argumentos/parâmetros.</text:span><text:span text:style-name="T420"> </text:span><text:span text:style-name="T424">Ou seja, utiliza um mesmo nome de método para ter outros comportamentos </text:span><text:span text:style-name="T425">(</text:span><text:span text:style-name="T424">implementações</text:span><text:span text:style-name="T425">)</text:span><text:span text:style-name="T424">, de acordo com os tipos de parâmetros que são passados.<text:line-break/></text:span><text:span text:style-name="T426">Requisitos</text:span><text:span text:style-name="T427">: </text:span><text:span text:style-name="T428">possuir</text:span><text:span text:style-name="T429"> </text:span><text:span text:style-name="T430">assinaturas</text:span><text:span text:style-name="T431"> </text:span><text:span text:style-name="T432">diferentes</text:span><text:span text:style-name="T429">, porém dentro da </text:span><text:span text:style-name="T430">mesma classe</text:span><text:span text:style-name="T429">. </text:span><text:span text:style-name="T433">Através dessa técnica, é possível utilizar 2 ou mais métodos construtores na mesma classe.</text:span></text:p>
          <text:p text:style-name="P170"><text:span text:style-name="T434"><text:line-break/></text:span><text:span text:style-name="T435">A</text:span><text:span text:style-name="T436">tenção</text:span><text:span text:style-name="T437">: O </text:span><text:span text:style-name="T438">PHP</text:span><text:span text:style-name="T437"> </text:span><text:span text:style-name="T439">é uma linguagem dinâmica, ou seja, se</text:span><text:span text:style-name="T438">us os parâmetros podem receber qualquer tipo, </text:span><text:span text:style-name="T440">então</text:span><text:span text:style-name="T441"> o </text:span><text:span text:style-name="T442">PHP</text:span><text:span text:style-name="T438"> </text:span><text:span text:style-name="T443">não tem</text:span><text:span text:style-name="T437"> suporte ao polimorfismo por </text:span><text:span text:style-name="T443">sobrecarga</text:span><text:span text:style-name="T437"> de método!</text:span><text:span text:style-name="T444"> </text:span><text:span text:style-name="T439">(</text:span><text:span text:style-name="T445">pois não declara o tipo da variável</text:span><text:span text:style-name="T439">)</text:span><text:span text:style-name="T445">. </text:span><text:span text:style-name="T446">Para resolver isso, </text:span><text:span text:style-name="T447">foi criado o </text:span><text:span text:style-name="T448">operador splat</text:span><text:span text:style-name="T449">:</text:span><text:span text:style-name="T438"> é um operador formado por três pontos</text:span><text:span text:style-name="Source_20_Text"><text:span text:style-name="T450">...</text:span></text:span><text:span text:style-name="T438">utilizado para trabalhar com funções variádicas, </text:span><text:span text:style-name="T451">que</text:span><text:span text:style-name="T438"> pode</text:span><text:span text:style-name="T451">m</text:span><text:span text:style-name="T438"> receber um número ilimitado de parâmetros. </text:span><text:span text:style-name="T452"><text:line-break/></text:span></text:p>
        </text:list-item>
        <text:list-item>
          <text:p text:style-name="P171"><text:span text:style-name="T453">D</text:span><text:span text:style-name="T454">e</text:span><text:span text:style-name="T455"> </text:span><text:span text:style-name="T454">inclusão</text:span><text:span text:style-name="T456">…<text:line-break/></text:span></text:p>
        </text:list-item>
        <text:list-item>
          <text:p text:style-name="P172"><text:span text:style-name="T454">Paramétrico</text:span><text:span text:style-name="T456">…</text:span></text:p>
        </text:list-item>
      </text:list>
      <text:p text:style-name="P173"/>
      <text:p text:style-name="P174"><text:span text:style-name="T457">Importante</text:span><text:span text:style-name="T458">: </text:span><text:span text:style-name="T459">Quando uma classe mãe chamar um de seus próprios métodos mas este método já foi sobrescrito numa classe filha, </text:span><text:span text:style-name="T460">então </text:span><text:span text:style-name="T459">será executado aquele implementado lá na classe </text:span><text:span text:style-name="T461">filha</text:span><text:span text:style-name="T459">!</text:span></text:p>
      <text:p text:style-name="P175"><text:span text:style-name="T462">Atalho</text:span><text:span text:style-name="T463">: </text:span><text:span text:style-name="T460">também </text:span><text:span text:style-name="T463">é possível gerar overrides (métodos sobrescritos) </text:span><text:span text:style-name="T464">no NetBeans </text:span><text:span text:style-name="T463">através do </text:span><text:span text:style-name="T465">insert_code</text:span><text:span text:style-name="T463"> (Alt+Insert).</text:span><text:span text:style-name="T466"><text:line-break/></text:span><text:span text:style-name="T467">A</text:span><text:span text:style-name="T468">talho: </text:span><text:span text:style-name="T469">C</text:span><text:span text:style-name="T470">ontrol + E apaga a linha atual </text:span><text:span text:style-name="T471">(ideal para apagar aqueles comentários iniciais)</text:span><text:span text:style-name="T472">Exercício da Aula 12: </text:span><text:span text:style-name="T473">Polimorfismo por </text:span><text:span text:style-name="T474">sobreposição</text:span></text:p>
      <text:p text:style-name="P176"><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77"/>
      <text:p text:style-name="P178"><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75">no PHP </text:span>para implementar polimorfismo por <text:span text:style-name="T16">sobrecarga<text:line-break/></text:span><text:span text:style-name="T475">(mudando nome)</text:span></text:p>
      <text:p text:style-name="P176"/>
      <text:p text:style-name="P176"/>
      <text:p text:style-name="P177"/>
      <text:p text:style-name="P176"/>
      <text:p text:style-name="P176"/>
      <text:p text:style-name="P176"/>
      <text:p text:style-name="P179"><text:line-break/></text:p>
      <text:p text:style-name="P176"/>
      <text:p text:style-name="P176"/>
      <text:p text:style-name="P176"/>
      <text:p text:style-name="P176"/>
      <text:p text:style-name="P176"/>
      <text:p text:style-name="P176"/>
      <text:p text:style-name="P176"/>
      <text:p text:style-name="P176"/>
      <text:p text:style-name="P176"/>
      <text:p text:style-name="P176"/>
      <text:p text:style-name="P176"><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80"><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81"/>
      <text:p text:style-name="P182"><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83"/>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5"/>
      <text:h text:style-name="P186" text:outline-level="1">CRUD</text:h>
      <text:p text:style-name="P31"/>
      <text:p text:style-name="P31">O <text:span text:style-name="T476">CRUD</text:span> vem do inglês, das palavras (<text:span text:style-name="T477">Create, Read, Update, Delete</text:span>) que quer dizer basicamente as 4 (quatro) principais operações com um banco de dados(inserir, ler, atualizar, excluir). </text:p>
      <text:p text:style-name="P30"/>
      <text:h text:style-name="P187" text:outline-level="1">MySQL-i com PDO</text:h>
      <text:p text:style-name="P188"><text:span text:style-name="T478">Próximo passo: aprender </text:span><text:span text:style-name="T479">MySQL-i</text:span><text:span text:style-name="T478">, classe interna do PHP que utiliza a orientação a objetos para fazer acesso ao Banco de Dados.<text:line-break/>Exemplo de INSERT INTO com MySQLi_:</text:span></text:p>
      <text:p text:style-name="P189"><draw:frame draw:style-name="fr4" draw:name="Figura11" text:anchor-type="paragraph" svg:width="17.59cm" svg:height="10.248cm" draw:z-index="23"><draw:image xlink:href="Pictures/100000010000032A000001D8037C0F75.png" xlink:type="simple" xlink:show="embed" xlink:actuate="onLoad" draw:mime-type="image/png"/></draw:frame></text:p>
      <text:p text:style-name="P31">Com a constante necessidade de <text:span text:style-name="T16">segurança</text:span> e <text:span text:style-name="T16">abstração</text:span> de dados surgiu a classe <text:span text:style-name="T476">PDO</text:span> (<text:span text:style-name="T477">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329">PDO</text:span></text:a><text:span text:style-name="T10"> é uma classe desenvolvida especificamente para trabalhar com procedimentos relacionados a Banco de Dados, </text:span><text:span text:style-name="T480">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80"> </text:span><text:span text:style-name="T481">pois</text:span><text:span text:style-name="T480"> </text:span><text:span text:style-name="T482">efetua a conexão com diversos bancos de dados da mesma maneira</text:span><text:span text:style-name="T480">, modificando apenas a sua string de conexão </text:span><text:span text:style-name="T481">e </text:span><text:span text:style-name="T480">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text:soft-page-break/>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280">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83">extension=php_pdo.dll<text:line-break/>extension=php_pdo_mysql.dll</text:span></text:span></text:p>
      <text:p text:style-name="Text_20_body"><text:span text:style-name="Source_20_Text"><text:span text:style-name="T10"/></text:span></text:p>
      <text:p text:style-name="P30"><text:span text:style-name="T484">Exemplo de INSERT INTO</text:span> <text:span text:style-name="T484">com PDO:</text:span></text:p>
      <text:p text:style-name="P30"><draw:frame draw:style-name="fr4" draw:name="Figura15" text:anchor-type="paragraph" svg:width="17.59cm" svg:height="8.654cm" draw:z-index="24"><draw:image xlink:href="Pictures/10000001000003270000018D76E9B6AB.png" xlink:type="simple" xlink:show="embed" xlink:actuate="onLoad" draw:mime-type="image/png"/></draw:frame></text:p>
      <text:p text:style-name="P190"><text:span text:style-name="T484">Exemplo de UPDATE</text:span> <text:span text:style-name="T484">SET com PDO:</text:span></text:p>
      <text:p text:style-name="P191"><draw:frame draw:style-name="fr5" draw:name="Figura16" text:anchor-type="paragraph" svg:width="17.59cm" svg:height="10.998cm" draw:z-index="25"><draw:image xlink:href="Pictures/100000010000031E000001F35592122B.png" xlink:type="simple" xlink:show="embed" xlink:actuate="onLoad" draw:mime-type="image/png"/></draw:frame></text:p>
      <text:p text:style-name="P192">Exemplo de DELETE FROM com PDO:</text:p>
      <text:p text:style-name="P193"><draw:frame draw:style-name="fr4"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85">bindParam()</text:span> para receber o valor do <text:span text:style-name="T486">$id</text:span></text:p>
      <text:h text:style-name="P194" text:outline-level="1"><text:span text:style-name="Source_20_Text"><text:span text:style-name="T487">namespaces</text:span></text:span></text:h>
      <text:p text:style-name="P195"><text:span text:style-name="Source_20_Text"><text:span text:style-name="T488">namespace</text:span></text:span><text:span text:style-name="Source_20_Text"><text:span text:style-name="T489">s</text:span></text:span><text:span text:style-name="T131"> organiza</text:span><text:span text:style-name="T490">m</text:span><text:span text:style-name="T131"> sua</text:span><text:span text:style-name="T490">s</text:span><text:span text:style-name="T131"> classe</text:span><text:span text:style-name="T490">s</text:span><text:span text:style-name="T131"> dentro de um “pacote” lógico, evitando colisões de nomes e facilitando o autoload.</text:span></text:p>
      <text:list text:style-name="L17">
        <text:list-item>
          <text:p text:style-name="P196">Separar classes em namespaces permite classes com o mesmo nome em diferentes namespaces;</text:p>
        </text:list-item>
        <text:list-item>
          <text:p text:style-name="P197"><text:span text:style-name="T131">Utilizar um namespace raiz (chamado de </text:span><text:span text:style-name="Emphasis"><text:span text:style-name="T131">vendor namespace </text:span></text:span><text:span text:style-name="T131">em algumas literaturas) evita conflitos com classes de pacotes externos que venhamos a utilizar;</text:span></text:p>
        </text:list-item>
        <text:list-item>
          <text:p text:style-name="P197"><text:span text:style-name="T131">Para utilizar uma classe precisamos importá-la utilizando a palavra reservada </text:span><text:span text:style-name="Source_20_Text"><text:span text:style-name="T488">use</text:span></text:span><text:span text:style-name="Source_20_Text"><text:span text:style-name="T131"> </text:span></text:span><text:span text:style-name="T131">ou informar seu nome completo (com namespace) em todos os locais onde ela for utilizada;</text:span></text:p>
        </text:list-item>
        <text:list-item>
          <text:p text:style-name="P198"><text:span text:style-name="T491">Através de um autoloader com o PHP (exemplo, função nativa </text:span><text:span text:style-name="Source_20_Text"><text:span text:style-name="T492">spl_autoload_register</text:span></text:span><text:span text:style-name="T491">) podemos evitar de ficar utilizando </text:span><text:span text:style-name="Source_20_Text"><text:span text:style-name="T493">require</text:span></text:span><text:span text:style-name="Source_20_Text"><text:span text:style-name="T492"> em</text:span></text:span><text:span text:style-name="T491"> todos os arquivos necessários para a execução.</text:span></text:p>
        </text:list-item>
      </text:list>
      <text:p text:style-name="P199"/>
      <text:h text:style-name="P187" text:outline-level="1">Autoloader</text:h>
      <text:p text:style-name="P195"><text:span text:style-name="T490">O </text:span><text:span text:style-name="Strong_20_Emphasis"><text:span text:style-name="T490">autoloader no PHP</text:span></text:span><text:span text:style-name="T490"> serve para carregar automaticamente arquivos de classes e interfaces na memória sem que você precise digitá-los manualmente usando </text:span><text:span text:style-name="Source_20_Text"><text:span text:style-name="T490">include</text:span></text:span><text:span text:style-name="T490"> ou </text:span><text:span text:style-name="Source_20_Text"><text:span text:style-name="T490">require</text:span></text:span><text:span text:style-name="T490">.</text:span></text:p>
      <text:p text:style-name="P200">Em projetos orientados a objetos, onde dezenas ou centenas de arquivos são usados, essa automação elimina linhas de código repetitivas, evita erros de caminho e mantém a aplicação organizada.</text:p>
      <text:list text:style-name="L18">
        <text:list-item>
          <text:p text:style-name="P201"><text:span text:style-name="T494">Sem Autoloader</text:span><text:span text:style-name="T490"> (O modo antigo): Toda vez que você precisava usar uma classe, tinha que localizá-la e importá-la manualmente. Se o projeto crescesse, o topo de cada arquivo ficaria poluído com dezenas de </text:span><text:span text:style-name="Source_20_Text"><text:span text:style-name="T490">requires</text:span></text:span></text:p>
        </text:list-item>
        <text:list-item>
          <text:p text:style-name="P201"><text:span text:style-name="T494">Com Autoloader</text:span><text:span text:style-name="T490"> (O modo moderno): O autoloader monitora o momento em que você tenta instanciar um objeto e busca automaticamente o arquivo correspondente, poupando a necessidade de chamadas manuais.</text:span></text:p>
        </text:list-item>
      </text:list>
      <text:p text:style-name="P195"><text:span text:style-name="T490">A maneira padrão e mais profissional de fazer isso hoje é utilizando </text:span><text:span text:style-name="T495">a ferramenta</text:span><text:span text:style-name="T490"> </text:span><text:span text:style-name="Strong_20_Emphasis"><text:span text:style-name="T490">Composer</text:span></text:span><text:span text:style-name="T490"> (gerenciador de dependências do PHP), que automatiza esse processo seguindo um padrão da comunidade conhecido como </text:span><text:span text:style-name="Strong_20_Emphasis"><text:span text:style-name="T490">PSR-4</text:span></text:span><text:span text:style-name="T490">.</text:span></text:p>
      <text:p text:style-name="P200">Problemas ao não utilizar autoloading:</text:p>
      <text:list text:style-name="L19">
        <text:list-item>
          <text:p text:style-name="P202">Classes não são carregadas automaticamente</text:p>
        </text:list-item>
        <text:list-item>
          <text:p text:style-name="P202">Risco de erros por falta de dependências</text:p>
        </text:list-item>
        <text:list-item>
          <text:p text:style-name="P202">Dificuldade de manutenção e organização do código</text:p>
        </text:list-item>
      </text:list>
      <text:p text:style-name="P200"/>
      <text:p text:style-name="P200">Cuidados importantes:</text:p>
      <text:list text:style-name="L20">
        <text:list-item>
          <text:p text:style-name="P203">Nome do namespace deve bater com o nome da pasta</text:p>
        </text:list-item>
        <text:list-item>
          <text:p text:style-name="P203"><text:soft-page-break/>Linux é Case-sensitive</text:p>
        </text:list-item>
        <text:list-item>
          <text:p text:style-name="P203">Sempre usar 'use' para importar classes</text:p>
        </text:list-item>
      </text:list>
      <text:p text:style-name="P200"/>
      <text:p text:style-name="P200"><text:span text:style-name="T496">P</text:span>adrão PSR-4 simplificado (sem Composer):</text:p>
      <text:p text:style-name="P204"><text:span text:style-name="T497">spl_autoload_register</text:span><text:span text:style-name="T498">(</text:span><text:span text:style-name="T499">function</text:span><text:span text:style-name="T498"> (</text:span><text:span text:style-name="T500">$classe</text:span><text:span text:style-name="T498">) {<text:tab/><text:tab/><text:tab/><text:tab/><text:tab/><text:tab/><text:tab/><text:tab/><text:line-break/> <text:s/></text:span><text:span text:style-name="T500">$namespaceBase</text:span><text:span text:style-name="T498"> = </text:span><text:span text:style-name="T501">'Semae</text:span><text:span text:style-name="T502">\\</text:span><text:span text:style-name="T501">Pca</text:span><text:span text:style-name="T502">\\</text:span><text:span text:style-name="T501">'</text:span><text:span text:style-name="T498">;<text:tab/><text:tab/><text:tab/><text:tab/><text:tab/><text:tab/><text:tab/><text:tab/><text:tab/><text:line-break/> <text:s/></text:span><text:span text:style-name="T500">$diretorioBase</text:span><text:span text:style-name="T498"> = </text:span><text:span text:style-name="T503">__DIR__</text:span><text:span text:style-name="T498"> . </text:span><text:span text:style-name="T504">DIRECTORY_SEPARATOR</text:span><text:span text:style-name="T498"> . </text:span><text:span text:style-name="T501">'src'</text:span><text:span text:style-name="T498"> . </text:span><text:span text:style-name="T504">DIRECTORY_SEPARATOR</text:span><text:span text:style-name="T498">;<text:tab/><text:tab/><text:line-break/> <text:s/></text:span><text:span text:style-name="T500">$classe</text:span><text:span text:style-name="T498"> = </text:span><text:span text:style-name="T497">ltrim</text:span><text:span text:style-name="T498">(</text:span><text:span text:style-name="T500">$classe</text:span><text:span text:style-name="T498">, </text:span><text:span text:style-name="T501">'</text:span><text:span text:style-name="T502">\\</text:span><text:span text:style-name="T501">'</text:span><text:span text:style-name="T498">);<text:tab/><text:tab/><text:tab/><text:tab/><text:tab/><text:tab/><text:tab/><text:tab/><text:tab/><text:line-break/><text:tab/><text:tab/><text:tab/><text:tab/><text:tab/><text:tab/><text:tab/><text:tab/><text:tab/><text:tab/><text:tab/><text:tab/><text:tab/><text:tab/><text:line-break/> <text:s/></text:span><text:span text:style-name="T505"># se a classe não pertence ao namespace base, não faz nada<text:tab/><text:tab/><text:tab/><text:tab/><text:tab/><text:line-break/> <text:s/></text:span><text:span text:style-name="T506">if</text:span><text:span text:style-name="T498"> (</text:span><text:span text:style-name="T497">strncmp</text:span><text:span text:style-name="T498">(</text:span><text:span text:style-name="T500">$namespaceBase</text:span><text:span text:style-name="T498">, </text:span><text:span text:style-name="T500">$classe</text:span><text:span text:style-name="T498">, </text:span><text:span text:style-name="T497">strlen</text:span><text:span text:style-name="T498">(</text:span><text:span text:style-name="T500">$namespaceBase</text:span><text:span text:style-name="T498">)) !== </text:span><text:span text:style-name="T507">0</text:span><text:span text:style-name="T498">) {<text:tab/><text:tab/><text:tab/><text:line-break/><text:tab/></text:span><text:span text:style-name="T506">return</text:span><text:span text:style-name="T498">;<text:tab/><text:tab/><text:tab/><text:tab/><text:tab/><text:tab/><text:tab/><text:tab/><text:tab/><text:tab/><text:tab/><text:tab/><text:line-break/> <text:s/></text:span><text:span text:style-name="T498">}<text:tab/><text:tab/><text:tab/><text:tab/><text:tab/><text:tab/><text:tab/><text:tab/><text:tab/><text:tab/><text:tab/><text:tab/><text:tab/><text:tab/><text:line-break/><text:tab/><text:tab/><text:tab/><text:tab/><text:tab/><text:tab/><text:tab/><text:tab/><text:tab/><text:tab/><text:tab/><text:tab/><text:tab/><text:tab/><text:line-break/> <text:s/></text:span><text:span text:style-name="T505"># remove o namespace base da classe para obter o caminho relativo<text:tab/><text:tab/><text:tab/><text:tab/><text:line-break/> <text:s/></text:span><text:span text:style-name="T500">$classeRelativa</text:span><text:span text:style-name="T498"> = </text:span><text:span text:style-name="T497">substr</text:span><text:span text:style-name="T498">(</text:span><text:span text:style-name="T500">$classe</text:span><text:span text:style-name="T498">, </text:span><text:span text:style-name="T497">strlen</text:span><text:span text:style-name="T498">(</text:span><text:span text:style-name="T500">$namespaceBase</text:span><text:span text:style-name="T498">));<text:tab/><text:tab/><text:tab/><text:tab/><text:tab/><text:line-break/><text:tab/><text:tab/><text:tab/><text:tab/><text:tab/><text:tab/><text:tab/><text:tab/><text:tab/><text:tab/><text:tab/><text:tab/><text:tab/><text:tab/><text:line-break/> <text:s/></text:span><text:span text:style-name="T505"># substitui barras invertidas por barras normais </text:span><text:span text:style-name="T508">para formar o</text:span><text:span text:style-name="T505"> caminho do arquivo<text:tab/><text:line-break/> <text:s/></text:span><text:span text:style-name="T500">$classeRelativa</text:span><text:span text:style-name="T498"> = </text:span><text:span text:style-name="T497">str_replace</text:span><text:span text:style-name="T498">(</text:span><text:span text:style-name="T501">'</text:span><text:span text:style-name="T502">\\</text:span><text:span text:style-name="T501">'</text:span><text:span text:style-name="T498">, </text:span><text:span text:style-name="T504">DIRECTORY_SEPARATOR</text:span><text:span text:style-name="T498">, </text:span><text:span text:style-name="T500">$classeRelativa</text:span><text:span text:style-name="T498">);<text:tab/><text:tab/><text:line-break/><text:tab/><text:tab/><text:tab/><text:tab/><text:tab/><text:tab/><text:tab/><text:tab/><text:tab/><text:tab/><text:tab/><text:tab/><text:tab/><text:tab/><text:line-break/> <text:s/></text:span><text:span text:style-name="T505"># monta o caminho completo do arquivo da classe com extensão do PHP<text:tab/><text:tab/><text:tab/><text:line-break/> <text:s/></text:span><text:span text:style-name="T500">$arquivo</text:span><text:span text:style-name="T498"> = </text:span><text:span text:style-name="T500">$diretorioBase</text:span><text:span text:style-name="T498"> . </text:span><text:span text:style-name="T500">$classeRelativa</text:span><text:span text:style-name="T498"> . </text:span><text:span text:style-name="T501">'.php'</text:span><text:span text:style-name="T498">;<text:tab/><text:tab/><text:tab/><text:tab/><text:tab/><text:tab/><text:line-break/><text:tab/><text:tab/><text:tab/><text:tab/><text:tab/><text:tab/><text:tab/><text:tab/><text:tab/><text:tab/><text:tab/><text:tab/><text:tab/><text:tab/><text:line-break/> <text:s/></text:span><text:span text:style-name="T505">// verifica se o arquivo existe e o inclui, caso contrário registra erro e retorna<text:tab/><text:line-break/> <text:s/></text:span><text:span text:style-name="T506">if</text:span><text:span text:style-name="T498"> (</text:span><text:span text:style-name="T497">file_exists</text:span><text:span text:style-name="T498">(</text:span><text:span text:style-name="T500">$arquivo</text:span><text:span text:style-name="T498">)) {<text:tab/><text:tab/><text:tab/><text:tab/><text:tab/><text:tab/><text:tab/><text:tab/><text:tab/><text:tab/><text:line-break/><text:tab/></text:span><text:span text:style-name="T506">require_once</text:span><text:span text:style-name="T498"> </text:span><text:span text:style-name="T500">$arquivo</text:span><text:span text:style-name="T498">;<text:tab/><text:tab/><text:tab/><text:tab/><text:tab/><text:tab/><text:tab/><text:tab/><text:tab/><text:tab/><text:line-break/> <text:s/>} </text:span><text:span text:style-name="T506">else</text:span><text:span text:style-name="T498"> {<text:tab/><text:tab/><text:tab/><text:tab/><text:tab/><text:tab/><text:tab/><text:tab/><text:tab/><text:tab/><text:tab/><text:tab/><text:tab/><text:line-break/> <text:s/></text:span><text:span text:style-name="T497">error_log</text:span><text:span text:style-name="T498">(</text:span><text:span text:style-name="T501">"Autoload backend PCA falhou. Classe </text:span><text:span text:style-name="T500">$classe</text:span><text:span text:style-name="T501"> não encontrada em </text:span><text:span text:style-name="T500">$arquivo</text:span><text:span text:style-name="T501">"</text:span><text:span text:style-name="T498">);<text:line-break/><text:tab/></text:span><text:span text:style-name="T506">return</text:span><text:span text:style-name="T498"> </text:span><text:span text:style-name="T503">false</text:span><text:span text:style-name="T498">;<text:tab/><text:tab/><text:tab/><text:tab/><text:tab/><text:tab/><text:tab/><text:tab/><text:tab/><text:tab/><text:tab/><text:line-break/> <text:s/></text:span><text:span text:style-name="T498">}<text:tab/><text:tab/><text:tab/><text:tab/><text:tab/><text:tab/><text:tab/><text:tab/><text:tab/><text:tab/><text:tab/><text:tab/><text:tab/><text:tab/><text:line-break/>});<text:tab/><text:tab/><text:tab/><text:tab/><text:tab/><text:tab/><text:tab/><text:tab/><text:tab/><text:tab/><text:tab/><text:tab/><text:tab/><text:tab/></text:span></text:p>
      <text:p text:style-name="P205"><text:span text:style-name="T498"/></text:p>
      <text:p text:style-name="P206"/>
      <text:h text:style-name="P207" text:outline-level="1">Composer</text:h>
      <text:p text:style-name="P208"><text:span text:style-name="Strong_20_Emphasis"><text:span text:style-name="T52">Composer</text:span></text:span> é um <text:span text:style-name="Strong_20_Emphasis">gerenciador de dependências para PHP</text:span>. Ele permite que você:</text:p>
      <text:list text:style-name="L21">
        <text:list-item>
          <text:p text:style-name="P209"><text:span text:style-name="Strong_20_Emphasis"><text:span text:style-name="T509">Tenha um </text:span></text:span><text:span text:style-name="Strong_20_Emphasis">Autoload</text:span><text:span text:style-name="Strong_20_Emphasis"><text:span text:style-name="T510">er</text:span></text:span> <text:span text:style-name="T510">para </text:span>carregar automaticamente suas próprias classes PHP de forma organizada, usando namespaces. Evit<text:span text:style-name="T510">ando de</text:span> ter que dar vários <text:span text:style-name="Source_20_Text">require</text:span> ou <text:span text:style-name="Source_20_Text">include</text:span> manuais.</text:p>
        </text:list-item>
        <text:list-item>
          <text:p text:style-name="P209"><text:span text:style-name="T10">Instale bibliotecas de terceiros (como </text:span><text:span text:style-name="T511">PHPUnit, </text:span><text:span text:style-name="T10">PHPMailer, etc).</text:span></text:p>
        </text:list-item>
        <text:list-item>
          <text:p text:style-name="P210"><text:span text:style-name="T10">Gerencie configurações do projeto num arquivo </text:span><text:span text:style-name="Source_20_Text"><text:span text:style-name="T10">composer.json </text:span></text:span><text:span text:style-name="Source_20_Text"><text:span text:style-name="T9">para, por exemplo, </text:span></text:span><text:span text:style-name="Source_20_Text"><text:span text:style-name="T172">chamar </text:span></text:span><text:span text:style-name="Source_20_Text"><text:span text:style-name="T512">o </text:span></text:span><text:span text:style-name="Source_20_Text"><text:span text:style-name="T172">arquivo principal de autoload</text:span></text:span></text:p>
        </text:list-item>
      </text:list>
      <text:p text:style-name="P211"/>
      <text:p text:style-name="Text_20_body"><text:span text:style-name="T172">O comando </text:span><text:span text:style-name="Source_20_Text"><text:span text:style-name="T513">composer init</text:span></text:span><text:span text:style-name="Source_20_Text"><text:span text:style-name="T172"> </text:span></text:span><text:span text:style-name="Strong_20_Emphasis"><text:span text:style-name="T172">não instala nenhuma dependência</text:span></text:span><text:span text:style-name="T172">. Ele apenas:</text:span></text:p>
      <text:list text:style-name="L22">
        <text:list-item>
          <text:p text:style-name="P212"><text:span text:style-name="T172">cria o </text:span><text:span text:style-name="T514">arquivo</text:span><text:span text:style-name="T172"> </text:span><text:span text:style-name="Source_20_Text"><text:span text:style-name="T515">composer.json</text:span></text:span><text:span text:style-name="T172">;</text:span></text:p>
        </text:list-item>
        <text:list-item>
          <text:p text:style-name="P212"><text:span text:style-name="T172">gera o autoloader do Composer </text:span><text:span text:style-name="T514">(dentro da pasta </text:span><text:span text:style-name="Source_20_Text"><text:span text:style-name="T172">vendor/autoload.php</text:span></text:span><text:span text:style-name="T172">);</text:span></text:p>
        </text:list-item>
        <text:list-item>
          <text:p text:style-name="P212"><text:span text:style-name="Source_20_Text"><text:span text:style-name="T172">cria a pasta vendor com os arquivos necessários para o próprio Composer.</text:span></text:span></text:p>
        </text:list-item>
      </text:list>
      <text:p text:style-name="Text_20_body"><text:span text:style-name="Source_20_Text"><text:span text:style-name="T172"/></text:span></text:p>
      <text:p text:style-name="P213"><text:span text:style-name="Source_20_Text"><text:span text:style-name="T513">composer.json</text:span></text:span><text:span text:style-name="T172"> </text:span><text:span text:style-name="T514">é</text:span><text:span text:style-name="T172"> a </text:span><text:span text:style-name="Strong_20_Emphasis"><text:span text:style-name="T172">lista de requisitos</text:span></text:span><text:span text:style-name="T172"> do projeto. Exempl</text:span><text:span text:style-name="T514">o: </text:span></text:p>
      <text:p text:style-name="P213"><text:span text:style-name="Source_20_Text"><text:span text:style-name="T516"><text:tab/></text:span></text:span><text:span text:style-name="Source_20_Text"><text:span text:style-name="T131">"require-dev": { <text:s text:c="3"/>"phpunit/phpunit": "^10.5"}</text:span></text:span></text:p>
      <text:p text:style-name="P211"><text:span text:style-name="T510"><text:tab/>Que significa</text:span>: "Quero qualquer versão 10 compatível."</text:p>
      <text:p text:style-name="Text_20_body"><text:span text:style-name="T172"/></text:p>
      <text:p text:style-name="Text_20_body"><text:span text:style-name="Source_20_Text"><text:span text:style-name="T513">composer.lock</text:span></text:span><text:span text:style-name="T172"> </text:span><text:span text:style-name="T514">é</text:span><text:span text:style-name="T172"> a </text:span><text:span text:style-name="Strong_20_Emphasis"><text:span text:style-name="T172">lista exata do que foi instalado</text:span></text:span><text:span text:style-name="T172">. </text:span><text:span text:style-name="T514">Exemplo</text:span><text:span text:style-name="T172">:</text:span></text:p>
      <text:p text:style-name="Text_20_body"><text:span text:style-name="T514"><text:tab/></text:span><text:span text:style-name="T516">p</text:span><text:span text:style-name="Source_20_Text"><text:span text:style-name="T515">hpunit/phpunit 10.5.45sebastian/diff 5.1.0</text:span></text:span></text:p>
      <text:p text:style-name="Text_20_body"><text:span text:style-name="Source_20_Text"><text:span text:style-name="T515"><text:tab/>sebastian/type 4.0.0</text:span></text:span></text:p>
      <text:p text:style-name="P214"><text:span text:style-name="T517">Esse</text:span><text:span text:style-name="T172"> arquivo </text:span><text:span text:style-name="Source_20_Text"><text:span text:style-name="T515">composer.lock</text:span></text:span><text:span text:style-name="Strong_20_Emphasis"><text:span text:style-name="T172"> só é criado quando existe pelo menos uma dependência instalada</text:span></text:span><text:span text:style-name="T172">.</text:span></text:p>
      <text:p text:style-name="P214"><text:span text:style-name="T172">Por exemplo, quando você executar: </text:span><text:span text:style-name="Source_20_Text"><text:span text:style-name="T515">composer require --dev phpunit/phpunit:^10</text:span></text:span></text:p>
      <text:p text:style-name="P215"><text:span text:style-name="T518">O</text:span> Composer irá:</text:p>
      <text:list text:style-name="L23">
        <text:list-item>
          <text:p text:style-name="P216">baixar o PHPUnit;</text:p>
        </text:list-item>
        <text:list-item>
          <text:p text:style-name="P216">baixar todas as dependências dele;</text:p>
        </text:list-item>
        <text:list-item>
          <text:p text:style-name="P217"><text:span text:style-name="Source_20_Text"><text:span text:style-name="T172">criar o composer.lock.</text:span></text:span></text:p>
        </text:list-item>
      </text:list>
      <text:p text:style-name="Text_20_body"><text:span text:style-name="T172">Assim, amanhã, daqui a seis meses ou em outro computador, ao executar </text:span><text:span text:style-name="Source_20_Text"><text:span text:style-name="T513">composer install</text:span></text:span><text:span text:style-name="Source_20_Text"><text:span text:style-name="T172"> </text:span></text:span><text:span text:style-name="T172">o Composer instalará </text:span><text:span text:style-name="Strong_20_Emphasis"><text:span text:style-name="T172">as mesmas versões</text:span></text:span><text:span text:style-name="T172">, garantindo um ambiente reproduzível. Por isso, em aplicações, o </text:span><text:span text:style-name="T514">arquivo</text:span><text:span text:style-name="T172"> </text:span><text:span text:style-name="Source_20_Text"><text:span text:style-name="T515">composer.lock</text:span></text:span><text:span text:style-name="T172"> deve ser versionado junto com o código.</text:span></text:p>
      <text:h text:style-name="P186" text:outline-level="1">Miscelaneas</text:h>
      <text:h text:style-name="P218" text:outline-level="2">readonly</text:h>
      <text:p text:style-name="P219"><text:span text:style-name="T131">propriedades com </text:span><text:span text:style-name="Source_20_Text"><text:span text:style-name="T488">readonly</text:span></text:span><text:span text:style-name="T131"> (PHP 8.1+) se tornam </text:span><text:span text:style-name="Strong_20_Emphasis"><text:span text:style-name="T10">imutáveis</text:span></text:span><text:span text:style-name="T131"> após atribuídas no construtor, evitando alterações acidentais. </text:span><text:span text:style-name="T519">É</text:span><text:span text:style-name="T10"> uma camada extra de segurança. </text:span><text:span text:style-name="T520">Exemplo de aplicação prática: quandos os dados são apresentados numa view.</text:span></text:p>
      <text:h text:style-name="P220" text:outline-level="2">Property promotion</text:h>
      <text:p text:style-name="P221"><text:span text:style-name="Strong_20_Emphasis"><text:span text:style-name="T10">property promotion</text:span></text:span><text:span text:style-name="T10"> (PHP 8.0+), pode reduzir </text:span><text:span text:style-name="T520">o</text:span><text:span text:style-name="T10"> código </text:span><text:span text:style-name="T520">de um método __constructor. No exemplo a seguir, </text:span><text:span text:style-name="T10">declara e inicializa as propriedades numa única linha:</text:span></text:p>
      <text:p text:style-name="P222"><text:span text:style-name="T135">public</text:span><text:span text:style-name="T136"> </text:span><text:span text:style-name="T135">function</text:span><text:span text:style-name="T136"> </text:span><text:span text:style-name="T521">__construct</text:span><text:span text:style-name="T136">(<text:tab/><text:tab/><text:line-break/><text:tab/></text:span><text:span text:style-name="T135">public</text:span><text:span text:style-name="T136"> </text:span><text:span text:style-name="T135">readonly</text:span><text:span text:style-name="T136"> </text:span><text:span text:style-name="T135">string</text:span><text:span text:style-name="T136"> </text:span><text:span text:style-name="T138">$CPF</text:span><text:span text:style-name="T136">,<text:tab/><text:line-break/><text:tab/></text:span><text:span text:style-name="T135">public</text:span><text:span text:style-name="T136"> </text:span><text:span text:style-name="T135">readonly</text:span><text:span text:style-name="T136"> </text:span><text:span text:style-name="T135">string</text:span><text:span text:style-name="T136"> </text:span><text:span text:style-name="T138">$Nome</text:span><text:span text:style-name="T136">,<text:tab/><text:line-break/></text:span><text:span text:style-name="T522">…<text:tab/><text:tab/><text:tab/><text:tab/><text:tab/><text:tab/></text:span><text:span text:style-name="T138"><text:line-break/></text:span><text:span text:style-name="T136">) {}<text:tab/><text:tab/><text:tab/><text:tab/><text:tab/><text:tab/></text:span></text:p>
      <text:h text:style-name="P223" text:outline-level="2"><text:span text:style-name="T523">E</text:span><text:span text:style-name="T524">numerations</text:span></text:h>
      <text:p text:style-name="P219"><text:span text:style-name="T488">E</text:span><text:span text:style-name="T525">num</text:span><text:span text:style-name="T526">s</text:span><text:span text:style-name="T527"> </text:span><text:span text:style-name="T131">são </text:span><text:span text:style-name="Strong_20_Emphasis"><text:span text:style-name="T10">tipos especiais</text:span></text:span><text:span text:style-name="T131"> que representam um </text:span><text:span text:style-name="Strong_20_Emphasis"><text:span text:style-name="T10">conjunto fixo de valores possíveis</text:span></text:span><text:span text:style-name="T131">. </text:span><text:span text:style-name="T10">Pense nos enums como uma </text:span><text:span text:style-name="Strong_20_Emphasis"><text:span text:style-name="T10">lista de opções válidas </text:span></text:span><text:span text:style-name="Strong_20_Emphasis"><text:span text:style-name="T528">onde cada case representa um par de chave-valor</text:span></text:span><text:span text:style-name="T10">, por exemplo: status de pedido, situação de cadastro, tipo de usuário etc.<text:line-break/></text:span><text:span text:style-name="T528">É possível adicionar </text:span><text:span text:style-name="T10">métodos dentro da enum para </text:span><text:span text:style-name="T528">o</text:span><text:span text:style-name="T10">bter descrições, </text:span><text:span text:style-name="T528">f</text:span><text:span text:style-name="T10">azer traduções, </text:span><text:span text:style-name="T528">d</text:span><text:span text:style-name="T10">efinir comportamentos. </text:span><text:span text:style-name="T528">etc</text:span></text:p>
      <text:h text:style-name="P220" text:outline-level="2">Principais Métodos mágicos</text:h>
      <text:p text:style-name="P224"><text:span text:style-name="T85">__construct()</text:span>: Chamado automaticamente ao instanciar a classe. Ideal para iniciar propriedades.</text:p>
      <text:p text:style-name="P219"><text:span text:style-name="T525">__toString()</text:span><text:span text:style-name="T528">: </text:span><text:span text:style-name="T529">Esse método permite que um objeto seja tratado como uma string quando usado em um contexto que espera-</text:span><text:span text:style-name="T530">se</text:span><text:span text:style-name="T529"> uma string, como no caso do </text:span><text:span text:style-name="Source_20_Text"><text:span text:style-name="T531">echo</text:span></text:span><text:span text:style-name="T531"> </text:span><text:span text:style-name="T532">$obj. </text:span><text:span text:style-name="T529">Objetos de resposta HTTP, por exemplo, geralmente implementam esse método retornando o corpo da resposta. </text:span></text:p>
      <text:p text:style-name="P225"><text:span text:style-name="T533">__get(</text:span><text:span text:style-name="T534">$atributo</text:span><text:span text:style-name="T533">)</text:span><text:span text:style-name="T524"> e </text:span><text:span text:style-name="T533">__set(</text:span><text:span text:style-name="T534">$atributo, $valor</text:span><text:span text:style-name="T533">)</text:span><text:span text:style-name="T524">: Acessar e atribuir valores a propriedades inacessíveis. </text:span><text:span text:style-name="T535">Exemplo:</text:span></text:p>
      <text:p text:style-name="P226"><text:span text:style-name="T135">class</text:span><text:span text:style-name="T136"> </text:span><text:span text:style-name="T137">Produto<text:tab/><text:tab/><text:tab/><text:tab/><text:tab/><text:tab/><text:tab/><text:tab/><text:tab/><text:tab/><text:tab/><text:tab/><text:line-break/></text:span><text:span text:style-name="T136">{<text:tab/><text:tab/><text:tab/><text:tab/><text:tab/><text:tab/><text:tab/><text:tab/><text:tab/><text:tab/><text:tab/><text:tab/><text:tab/><text:tab/><text:line-break/><text:tab/></text:span><text:span text:style-name="T135">private</text:span><text:span text:style-name="T136"> </text:span><text:span text:style-name="T135">array</text:span><text:span text:style-name="T136"> </text:span><text:span text:style-name="T138">$dados</text:span><text:span text:style-name="T136"> = [<text:tab/><text:tab/><text:tab/><text:tab/><text:tab/><text:tab/><text:tab/><text:tab/><text:tab/><text:tab/><text:line-break/><text:tab/><text:tab/></text:span><text:span text:style-name="T536">'nome'</text:span><text:span text:style-name="T136"> =&gt; </text:span><text:span text:style-name="T536">'Notebook'</text:span><text:span text:style-name="T136">,<text:tab/><text:tab/><text:tab/><text:tab/><text:tab/><text:tab/><text:tab/><text:tab/><text:tab/><text:line-break/><text:tab/><text:tab/></text:span><text:span text:style-name="T536">'preco'</text:span><text:span text:style-name="T136"> =&gt; </text:span><text:span text:style-name="T184">3500<text:tab/><text:tab/><text:tab/><text:tab/><text:tab/><text:tab/><text:tab/><text:tab/><text:tab/><text:tab/><text:line-break/></text:span><text:span text:style-name="T136"><text:tab/>];<text:tab/><text:tab/><text:tab/><text:tab/><text:tab/><text:tab/><text:tab/><text:tab/><text:tab/><text:tab/><text:tab/><text:tab/><text:tab/><text:line-break/><text:tab/><text:tab/><text:tab/><text:tab/><text:tab/><text:tab/><text:tab/><text:tab/><text:tab/><text:tab/><text:tab/><text:tab/><text:tab/><text:tab/><text:line-break/><text:tab/></text:span><text:span text:style-name="T135">public</text:span><text:span text:style-name="T136"> </text:span><text:span text:style-name="T135">function</text:span><text:span text:style-name="T136"> </text:span><text:span text:style-name="T521">__get</text:span><text:span text:style-name="T136">(</text:span><text:span text:style-name="T135">string</text:span><text:span text:style-name="T136"> </text:span><text:span text:style-name="T138">$atributo</text:span><text:span text:style-name="T136">)<text:tab/><text:tab/><text:tab/><text:tab/><text:tab/><text:tab/><text:tab/><text:line-break/><text:tab/>{<text:tab/><text:tab/><text:tab/><text:tab/><text:tab/><text:tab/><text:tab/><text:tab/><text:tab/><text:tab/><text:tab/><text:tab/><text:tab/><text:line-break/><text:tab/><text:tab/></text:span><text:span text:style-name="T537">return</text:span><text:span text:style-name="T136"> </text:span><text:span text:style-name="T135">$this</text:span><text:span text:style-name="T136">-&gt;</text:span><text:span text:style-name="T138">dados</text:span><text:span text:style-name="T136">[</text:span><text:span text:style-name="T138">$atributo</text:span><text:span text:style-name="T136">] ?? </text:span><text:span text:style-name="T135">null</text:span><text:span text:style-name="T136">;<text:tab/><text:tab/><text:tab/><text:tab/><text:tab/><text:tab/><text:line-break/></text:span><text:soft-page-break/><text:span text:style-name="T136"><text:tab/>}<text:tab/><text:tab/><text:tab/><text:tab/><text:tab/><text:tab/><text:tab/><text:tab/><text:tab/><text:tab/><text:tab/><text:tab/><text:tab/><text:line-break/><text:tab/><text:tab/><text:tab/><text:tab/><text:tab/><text:tab/><text:tab/><text:tab/><text:tab/><text:tab/><text:tab/><text:tab/><text:tab/><text:tab/><text:line-break/><text:tab/></text:span><text:span text:style-name="T135">public</text:span><text:span text:style-name="T136"> </text:span><text:span text:style-name="T135">function</text:span><text:span text:style-name="T136"> </text:span><text:span text:style-name="T521">__set</text:span><text:span text:style-name="T136">(</text:span><text:span text:style-name="T135">string</text:span><text:span text:style-name="T136"> </text:span><text:span text:style-name="T138">$atributo</text:span><text:span text:style-name="T136">, </text:span><text:span text:style-name="T138">$valor</text:span><text:span text:style-name="T136">): </text:span><text:span text:style-name="T135">void<text:tab/><text:tab/><text:tab/><text:tab/><text:tab/><text:line-break/><text:tab/></text:span><text:span text:style-name="T136">{<text:tab/><text:tab/><text:tab/><text:tab/><text:tab/><text:tab/><text:tab/><text:tab/><text:tab/><text:tab/><text:tab/><text:tab/><text:tab/><text:line-break/><text:tab/><text:tab/></text:span><text:span text:style-name="T538">#útil para combinar com lógica de validação<text:tab/><text:tab/><text:tab/><text:tab/><text:tab/><text:line-break/><text:tab/><text:tab/></text:span><text:span text:style-name="T537">if</text:span><text:span text:style-name="T136"> (!</text:span><text:span text:style-name="T521">array_key_exists</text:span><text:span text:style-name="T136">(</text:span><text:span text:style-name="T138">$atributo</text:span><text:span text:style-name="T136">, </text:span><text:span text:style-name="T135">$this</text:span><text:span text:style-name="T136">-&gt;</text:span><text:span text:style-name="T138">dados</text:span><text:span text:style-name="T136">)) </text:span><text:span text:style-name="T537">throw</text:span><text:span text:style-name="T136"> </text:span><text:span text:style-name="T135">new<text:tab/><text:tab/><text:tab/><text:line-break/><text:tab/><text:tab/><text:tab/></text:span><text:span text:style-name="T137">InvalidArgumentException</text:span><text:span text:style-name="T136">(</text:span><text:span text:style-name="T536">"Atributo '</text:span><text:span text:style-name="T138">$atributo</text:span><text:span text:style-name="T536">' não existe"</text:span><text:span text:style-name="T136">);<text:tab/><text:tab/><text:line-break/><text:tab/><text:tab/></text:span><text:span text:style-name="T537">if</text:span><text:span text:style-name="T136"> (</text:span><text:span text:style-name="T138">$atributo</text:span><text:span text:style-name="T136"> === </text:span><text:span text:style-name="T536">'preco'</text:span><text:span text:style-name="T136"> &amp;&amp; </text:span><text:span text:style-name="T138">$valor</text:span><text:span text:style-name="T136"> &lt; </text:span><text:span text:style-name="T184">0</text:span><text:span text:style-name="T136">) </text:span><text:span text:style-name="T537">throw</text:span><text:span text:style-name="T136"> </text:span><text:span text:style-name="T135">new</text:span><text:span text:style-name="T136"> <text:tab/><text:tab/><text:tab/><text:tab/><text:tab/><text:tab/><text:tab/></text:span><text:span text:style-name="T137">InvalidArgumentException</text:span><text:span text:style-name="T136">(</text:span><text:span text:style-name="T536">"Preço inválido"</text:span><text:span text:style-name="T136">);<text:tab/><text:tab/><text:tab/><text:tab/><text:tab/><text:tab/><text:tab/><text:tab/><text:tab/><text:tab/><text:tab/><text:tab/><text:tab/><text:tab/><text:tab/><text:tab/><text:tab/><text:tab/><text:line-break/><text:tab/><text:tab/><text:tab/><text:tab/><text:tab/><text:tab/><text:tab/><text:tab/><text:tab/><text:tab/><text:tab/><text:tab/><text:tab/><text:tab/><text:line-break/><text:tab/><text:tab/></text:span><text:span text:style-name="T135">$this</text:span><text:span text:style-name="T136">-&gt;</text:span><text:span text:style-name="T138">dados</text:span><text:span text:style-name="T136">[</text:span><text:span text:style-name="T138">$atributo</text:span><text:span text:style-name="T136">] = </text:span><text:span text:style-name="T138">$valor</text:span><text:span text:style-name="T136">;<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span><text:span text:style-name="T138">$p</text:span><text:span text:style-name="T136"> = </text:span><text:span text:style-name="T135">new</text:span><text:span text:style-name="T136"> </text:span><text:span text:style-name="T137">Produto</text:span><text:span text:style-name="T136">();<text:tab/><text:tab/><text:tab/><text:tab/><text:tab/><text:tab/><text:tab/><text:tab/><text:tab/><text:tab/><text:tab/><text:line-break/></text:span><text:span text:style-name="T521">echo</text:span><text:span text:style-name="T136"> </text:span><text:span text:style-name="T138">$p</text:span><text:span text:style-name="T136">-&gt;</text:span><text:span text:style-name="T138">nome</text:span><text:span text:style-name="T136">;  </text:span><text:span text:style-name="T538">// Notebook<text:tab/><text:tab/><text:tab/><text:tab/><text:tab/><text:tab/><text:tab/><text:tab/><text:tab/><text:tab/><text:line-break/></text:span><text:span text:style-name="T138">$p</text:span><text:span text:style-name="T136">-&gt;</text:span><text:span text:style-name="T138">nome</text:span><text:span text:style-name="T136"> = </text:span><text:span text:style-name="T536">'Smartphone'</text:span><text:span text:style-name="T136">;<text:tab/><text:tab/><text:tab/><text:tab/><text:tab/><text:tab/><text:tab/><text:tab/><text:tab/><text:tab/><text:tab/><text:line-break/></text:span><text:span text:style-name="T521">echo</text:span><text:span text:style-name="T136"> </text:span><text:span text:style-name="T138">$p</text:span><text:span text:style-name="T136">-&gt;</text:span><text:span text:style-name="T138">nome</text:span><text:span text:style-name="T136">; </text:span><text:span text:style-name="T538">// Smartphone<text:tab/><text:tab/><text:tab/><text:tab/><text:tab/><text:tab/><text:tab/><text:tab/><text:tab/><text:tab/><text:line-break/></text:span></text:p>
      <text:p text:style-name="P227"><text:span text:style-name="T533">__call()</text:span><text:span text:style-name="T524">: </text:span><text:span text:style-name="T539">executado ao tentar chamar um método não existente do objeto.</text:span></text:p>
      <text:p text:style-name="P228"><text:span text:style-name="T533">__invoke()</text:span><text:span text:style-name="T524">: </text:span><text:span text:style-name="T539">O</text:span><text:span text:style-name="T524"> objeto </text:span><text:span text:style-name="T539">pode ser</text:span><text:span text:style-name="T524"> chamado como função </text:span><text:span text:style-name="T539">em algum lugar que espera um callable</text:span><text:span text:style-name="T524">.<text:line-break/></text:span><text:tab/><text:span text:style-name="T138">$controller</text:span><text:span text:style-name="T136"> = </text:span><text:span text:style-name="T135">new</text:span><text:span text:style-name="T136"> </text:span><text:span text:style-name="T137">ControllerDeExemplo</text:span><text:span text:style-name="T136">();<text:tab/><text:tab/><text:tab/><text:tab/><text:line-break/></text:span><text:tab/><text:span text:style-name="T138">$controller</text:span><text:span text:style-name="T136">(</text:span><text:span text:style-name="T184">1</text:span><text:span text:style-name="T136">, </text:span><text:span text:style-name="T536">'Teste'</text:span><text:span text:style-name="T136">); </text:span><text:span text:style-name="T538">// Isso executará o método __invoke<text:tab/></text:span></text:p>
      <text:p text:style-name="P229"><text:span text:style-name="T533">__destruct()</text:span><text:span text:style-name="T524">: Executado quando o objeto é destruído (fim da execução).</text:span></text:p>
      <text:p text:style-name="P229"><text:span text:style-name="T533">__</text:span><text:span text:style-name="T540">debugInfo</text:span><text:span text:style-name="T533">()</text:span><text:span text:style-name="T524">: </text:span><text:span text:style-name="T541">vardump do objeto instanciado</text:span></text:p>
      <text:h text:style-name="P194" text:outline-level="1"><text:span text:style-name="Strong_20_Emphasis"><text:span text:style-name="T542">Camadas </text:span></text:span><text:span text:style-name="Strong_20_Emphasis"><text:span text:style-name="T543">Clean Architecture (uncle Bob)</text:span></text:span></text:h>
      <text:p text:style-name="P221"><text:span text:style-name="Strong_20_Emphasis"><text:span text:style-name="T544"/></text:span></text:p>
      <text:p text:style-name="P221"><text:span text:style-name="Strong_20_Emphasis"><text:span text:style-name="T544">S</text:span></text:span><text:span text:style-name="Strong_20_Emphasis"><text:span text:style-name="T545">epar</text:span></text:span><text:span text:style-name="Strong_20_Emphasis"><text:span text:style-name="T544">ar</text:span></text:span><text:span text:style-name="Strong_20_Emphasis"><text:span text:style-name="T545"> entrada, aplicação, domínio e infraestrutura</text:span></text:span></text:p>
      <text:p text:style-name="P221"><text:span text:style-name="Strong_20_Emphasis"><text:span text:style-name="T546">T</text:span></text:span><text:span text:style-name="Strong_20_Emphasis"><text:span text:style-name="T545">ransformar a estrutura em uma arquitetura com dependência “para dentro”, onde:</text:span></text:span></text:p>
      <text:list text:style-name="L24">
        <text:list-item>
          <text:p text:style-name="P230"><text:span text:style-name="Strong_20_Emphasis"><text:span text:style-name="T545">a camada de apresentação depende da aplicação</text:span></text:span></text:p>
        </text:list-item>
        <text:list-item>
          <text:p text:style-name="P230"><text:span text:style-name="Strong_20_Emphasis"><text:span text:style-name="T545">a aplicação depende do domínio</text:span></text:span></text:p>
        </text:list-item>
        <text:list-item>
          <text:p text:style-name="P230"><text:span text:style-name="Strong_20_Emphasis"><text:span text:style-name="T545">a infraestrutura depende de tudo isso, mas nunca o inverso</text:span></text:span></text:p>
        </text:list-item>
      </text:list>
      <text:p text:style-name="P221"><text:span text:style-name="Strong_20_Emphasis"><text:span text:style-name="T545">Em outras palavras: Presentation -&gt; Application -&gt; Domain &lt;- Infrastructure</text:span></text:span></text:p>
      <text:h text:style-name="Heading_20_2" text:outline-level="2"><text:span text:style-name="Strong_20_Emphasis"><text:span text:style-name="T10">Controller</text:span></text:span></text:h>
      <text:p text:style-name="P221"><text:span text:style-name="Strong_20_Emphasis"><text:span text:style-name="T545">O controller deve ficar bem fino:</text:span></text:span></text:p>
      <text:list text:style-name="L25">
        <text:list-item>
          <text:p text:style-name="P231"><text:span text:style-name="Strong_20_Emphasis"><text:span text:style-name="T545">receber os dados</text:span></text:span></text:p>
        </text:list-item>
        <text:list-item>
          <text:p text:style-name="P231"><text:span text:style-name="Strong_20_Emphasis"><text:span text:style-name="T545">converter para um request</text:span></text:span></text:p>
        </text:list-item>
        <text:list-item>
          <text:p text:style-name="P231"><text:span text:style-name="Strong_20_Emphasis"><text:span text:style-name="T545">chamar o use case</text:span></text:span></text:p>
        </text:list-item>
        <text:list-item>
          <text:p text:style-name="P231"><text:span text:style-name="Strong_20_Emphasis"><text:span text:style-name="T545">devolver uma resposta HTTP</text:span></text:span></text:p>
        </text:list-item>
      </text:list>
      <text:p text:style-name="P221"><text:span text:style-name="Strong_20_Emphasis"><text:span text:style-name="T545">As regras de negócio e validações mais relevantes devem ir para o use case ou para um validador específico</text:span></text:span></text:p>
      <text:p text:style-name="P221"><text:span text:style-name="Strong_20_Emphasis"><text:span text:style-name="T547">Controller</text:span></text:span><text:span text:style-name="T545"> </text:span><text:span text:style-name="T548">orquestra o processo, </text:span><text:span text:style-name="T545">é uma parte do código que </text:span><text:span text:style-name="Strong_20_Emphasis"><text:span text:style-name="T545">recebe os dados da interface (HTML)</text:span></text:span><text:span text:style-name="T545">, </text:span><text:span text:style-name="Strong_20_Emphasis"><text:span text:style-name="T545">processa a lógica</text:span></text:span><text:span text:style-name="T545">, </text:span><text:span text:style-name="Strong_20_Emphasis"><text:span text:style-name="T545">chama serviços se necessário</text:span></text:span><text:span text:style-name="T545"> e </text:span><text:span text:style-name="Strong_20_Emphasis"><text:span text:style-name="T545">devolve uma resposta</text:span></text:span><text:span text:style-name="T545"> (pode ser uma página, uma mensagem, um JSON, etc). </text:span><text:span text:style-name="T131">Ele é o </text:span><text:span text:style-name="Strong_20_Emphasis"><text:span text:style-name="T131">intermediário entre o formulário (HTML)</text:span></text:span><text:span text:style-name="T131"> e a </text:span><text:span text:style-name="Strong_20_Emphasis"><text:span text:style-name="T131">lógica PHP de negócio</text:span></text:span><text:span text:style-name="T131">.</text:span></text:p>
      <text:p text:style-name="P232">Deve atender aos <text:span text:style-name="T13">princípios</text:span>:</text:p>
      <text:list text:style-name="L26">
        <text:list-item>
          <text:p text:style-name="P233">Não conhece regra</text:p>
        </text:list-item>
        <text:list-item>
          <text:p text:style-name="P233">Não decide fluxo</text:p>
        </text:list-item>
        <text:list-item>
          <text:p text:style-name="P234">Só orquestra entrada → saída </text:p>
        </text:list-item>
      </text:list>
      <text:p text:style-name="P235"/>
      <text:p text:style-name="P236"><text:span text:style-name="T549">O Controller </text:span><text:span text:style-name="Strong_20_Emphasis"><text:span text:style-name="T549">pode decidir fluxo simples</text:span></text:span><text:span text:style-name="T549">, como:</text:span></text:p>
      <text:list text:style-name="L27">
        <text:list-item>
          <text:p text:style-name="P237">validar input </text:p>
        </text:list-item>
        <text:list-item>
          <text:p text:style-name="P237">escolher qual service chamar </text:p>
        </text:list-item>
        <text:list-item>
          <text:p text:style-name="P237">tratar <text:span text:style-name="T550">respostas</text:span></text:p>
        </text:list-item>
        <text:list-item>
          <text:p text:style-name="P238">tratar erros: lançar exceções, configurar http_response_code, registrar logs, </text:p>
        </text:list-item>
        <text:list-item>
          <text:p text:style-name="P239">devolver resposta</text:p>
        </text:list-item>
      </text:list>
      <text:p text:style-name="P236"><text:span text:style-name="T551">Mas </text:span><text:span text:style-name="T552">e</text:span><text:span text:style-name="T551">le </text:span><text:span text:style-name="Strong_20_Emphasis"><text:span text:style-name="T551">n</text:span></text:span><text:span text:style-name="Strong_20_Emphasis"><text:span text:style-name="T552">ão</text:span></text:span><text:span text:style-name="Strong_20_Emphasis"><text:span text:style-name="T551"> deve conter regra de neg</text:span></text:span><text:span text:style-name="Strong_20_Emphasis"><text:span text:style-name="T552">ócio</text:span></text:span><text:span text:style-name="Strong_20_Emphasis"><text:span text:style-name="T551"> complexa</text:span></text:span></text:p>
      <text:h text:style-name="P240" text:outline-level="2"><text:soft-page-break/>Princípio-chave: Separação de Domínio x Apresentação</text:h>
      <text:list text:style-name="L28">
        <text:list-item>
          <text:p text:style-name="P241"><text:span text:style-name="Strong_20_Emphasis"><text:span text:style-name="T10">Domínio</text:span></text:span><text:span text:style-name="T10">: suas classes de Parser, DTO, Collection, Validator etc.</text:span></text:p>
        </text:list-item>
        <text:list-item>
          <text:p text:style-name="P241"><text:span text:style-name="Strong_20_Emphasis"><text:span text:style-name="T10">Apresentação</text:span></text:span><text:span text:style-name="T10">: quem consome o controller — view PHP, JSON, template engine, API layer etc.</text:span></text:p>
        </text:list-item>
      </text:list>
      <text:p text:style-name="P219"><text:span text:style-name="T10">O controller deve </text:span><text:span text:style-name="Strong_20_Emphasis"><text:span text:style-name="T10">orquestrar</text:span></text:span><text:span text:style-name="T10"> o fluxo, mas </text:span><text:span text:style-name="Strong_20_Emphasis"><text:span text:style-name="T10">devolver uma resposta genérica</text:span></text:span><text:span text:style-name="T10"> (string HTML, JSON ou um objeto </text:span><text:span text:style-name="Source_20_Text"><text:span text:style-name="T10">ResponseInterface</text:span></text:span><text:span text:style-name="T10">), não um objeto de domínio puro. Ele </text:span><text:span text:style-name="Strong_20_Emphasis"><text:span text:style-name="T10">não</text:span></text:span><text:span text:style-name="T10"> deve expor diretamente objetos de domínio (Collection/DTO) na assinatura do método </text:span></text:p>
      <text:h text:style-name="P220" text:outline-level="2">Parser</text:h>
      <text:p text:style-name="P221"><text:span text:style-name="T131">O </text:span><text:span text:style-name="Strong_20_Emphasis"><text:span text:style-name="T10">parser</text:span></text:span><text:span text:style-name="T131"> tem como papel extrair, interpretar e montar os dados recebidos da </text:span><text:span text:style-name="T553">response (exemplo XML)</text:span></text:p>
      <text:p text:style-name="P242"/>
      <text:h text:style-name="P243" text:outline-level="2">Repository</text:h>
      <text:p text:style-name="P244">repositories servem para isolamento da camada de acesso a dados; </text:p>
      <text:h text:style-name="P220" text:outline-level="2"><text:span text:style-name="T554">D</text:span><text:span text:style-name="T13">TO</text:span></text:h>
      <text:p text:style-name="P219"><text:span text:style-name="Strong_20_Emphasis"><text:span text:style-name="T10">DTO</text:span></text:span><text:span text:style-name="T131"> - </text:span><text:span text:style-name="Strong_20_Emphasis"><text:span text:style-name="T131">Data Transfer Object</text:span></text:span><text:span text:style-name="T131"> </text:span><text:span text:style-name="T10">(Objeto de Transferência de Dados) </text:span><text:span text:style-name="T131">é uma </text:span><text:span text:style-name="Strong_20_Emphasis"><text:span text:style-name="T131">classe simples que serve apenas para carregar dados de forma estruturada</text:span></text:span><text:span text:style-name="T131"> entre camadas de uma aplicação (ex: controller → view, service → controller).</text:span><text:span text:style-name="T10"> <text:line-break/>E</text:span><text:span text:style-name="T131">le </text:span><text:span text:style-name="Strong_20_Emphasis"><text:span text:style-name="T131">não contém regras de negócio</text:span></text:span><text:span text:style-name="T131"> ou</text:span><text:span text:style-name="T10"> lógica complexa. Seu único</text:span><text:span text:style-name="T131"> objetivo é </text:span><text:span text:style-name="Strong_20_Emphasis"><text:span text:style-name="T131">transportar dados</text:span></text:span><text:span text:style-name="T131">.<text:line-break/></text:span><text:span text:style-name="T555">O</text:span><text:span text:style-name="Strong_20_Emphasis"><text:span text:style-name="T131">bjetos DTO oferecem contrato, segurança, validação e encapsulamento</text:span></text:span><text:span text:style-name="T131">. Mesmo que o resultado final volte a ser um array, </text:span><text:span text:style-name="Strong_20_Emphasis"><text:span text:style-name="T131">não é o mesmo array desestruturado e frágil que veio da resposta da API</text:span></text:span><text:span text:style-name="T131">. Ou seja, </text:span><text:span text:style-name="Strong_20_Emphasis"><text:span text:style-name="T131">você não retorna "array do XML"</text:span></text:span><text:span text:style-name="T131">, mas </text:span><text:span text:style-name="Strong_20_Emphasis"><text:span text:style-name="T131">um array de objetos tipados e validados</text:span></text:span><text:span text:style-name="T131">. </text:span></text:p>
      <text:h text:style-name="P245" text:outline-level="2">📚 Explicação técnica</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246">Item</text:p>
            </table:table-cell>
            <table:table-cell table:style-name="Tabela3.A1" office:value-type="string">
              <text:p text:style-name="P246">Array direto do XML</text:p>
            </table:table-cell>
            <table:table-cell table:style-name="Tabela3.A1" office:value-type="string">
              <text:p text:style-name="P247"><text:span text:style-name="T10">DTO (</text:span><text:span text:style-name="Source_20_Text"><text:span text:style-name="T10">ConsultarCPFDTO</text:span></text:span><text:span text:style-name="T10">)</text:span></text:p>
            </table:table-cell>
          </table:table-row>
        </table:table-header-rows>
        <table:table-row>
          <table:table-cell table:style-name="Tabela3.A1" office:value-type="string">
            <text:p text:style-name="P248">Tipagem</text:p>
          </table:table-cell>
          <table:table-cell table:style-name="Tabela3.A1" office:value-type="string">
            <text:p text:style-name="P248">❌ Nenhuma segurança</text:p>
          </table:table-cell>
          <table:table-cell table:style-name="Tabela3.A1" office:value-type="string">
            <text:p text:style-name="P248">✅ Campos fortemente tipados</text:p>
          </table:table-cell>
        </table:table-row>
        <table:table-row>
          <table:table-cell table:style-name="Tabela3.A1" office:value-type="string">
            <text:p text:style-name="P248">Validação</text:p>
          </table:table-cell>
          <table:table-cell table:style-name="Tabela3.A1" office:value-type="string">
            <text:p text:style-name="P248">❌ Nula ou manual</text:p>
          </table:table-cell>
          <table:table-cell table:style-name="Tabela3.A1" office:value-type="string">
            <text:p text:style-name="P249"><text:span text:style-name="T10">✅ Centralizada no </text:span><text:span text:style-name="Source_20_Text"><text:span text:style-name="T10">fromArray()</text:span></text:span></text:p>
          </table:table-cell>
        </table:table-row>
        <table:table-row>
          <table:table-cell table:style-name="Tabela3.A1" office:value-type="string">
            <text:p text:style-name="P248">IDE/autocompletar</text:p>
          </table:table-cell>
          <table:table-cell table:style-name="Tabela3.A1" office:value-type="string">
            <text:p text:style-name="P248">❌ Não ajuda</text:p>
          </table:table-cell>
          <table:table-cell table:style-name="Tabela3.A1" office:value-type="string">
            <text:p text:style-name="P248">✅ Mostra propriedades e tipos</text:p>
          </table:table-cell>
        </table:table-row>
        <table:table-row>
          <table:table-cell table:style-name="Tabela3.A1" office:value-type="string">
            <text:p text:style-name="P248">Contrato fixo</text:p>
          </table:table-cell>
          <table:table-cell table:style-name="Tabela3.A1" office:value-type="string">
            <text:p text:style-name="P248">❌ Não garantido</text:p>
          </table:table-cell>
          <table:table-cell table:style-name="Tabela3.A1" office:value-type="string">
            <text:p text:style-name="P248">✅ Garantido</text:p>
          </table:table-cell>
        </table:table-row>
        <table:table-row>
          <table:table-cell table:style-name="Tabela3.A1" office:value-type="string">
            <text:p text:style-name="P248">Evolução segura</text:p>
          </table:table-cell>
          <table:table-cell table:style-name="Tabela3.A1" office:value-type="string">
            <text:p text:style-name="P248">❌ Quebra tudo com mudanças</text:p>
          </table:table-cell>
          <table:table-cell table:style-name="Tabela3.A1" office:value-type="string">
            <text:p text:style-name="P248">✅ DTOs adaptam-se com versões</text:p>
          </table:table-cell>
        </table:table-row>
        <table:table-row>
          <table:table-cell table:style-name="Tabela3.A1" office:value-type="string">
            <text:p text:style-name="P248">Semântica</text:p>
          </table:table-cell>
          <table:table-cell table:style-name="Tabela3.A1" office:value-type="string">
            <text:p text:style-name="P248">❌ Apenas strings associativas</text:p>
          </table:table-cell>
          <table:table-cell table:style-name="Tabela3.A1" office:value-type="string">
            <text:p text:style-name="P248">✅ Objetos com significado claro</text:p>
          </table:table-cell>
        </table:table-row>
      </table:table>
      <text:p text:style-name="P250"/>
      <text:p text:style-name="P221"><text:span text:style-name="Strong_20_Emphasis"><text:span text:style-name="T10"/></text:span></text:p>
      <text:h text:style-name="Heading_20_2" text:outline-level="2"><text:span text:style-name="Strong_20_Emphasis"><text:span text:style-name="T10">Collection</text:span></text:span></text:h>
      <text:p text:style-name="P221"><text:span text:style-name="Strong_20_Emphasis"><text:span text:style-name="T556">Collection</text:span></text:span><text:span text:style-name="Strong_20_Emphasis"><text:span text:style-name="T557"> deve apenas armazenar, organizar e oferecer acesso aos objetos. Ela não deve transformar dados. </text:span></text:span></text:p>
      <text:h text:style-name="Heading_20_2" text:outline-level="2"><text:soft-page-break/><text:span text:style-name="Strong_20_Emphasis"><text:span text:style-name="T10">Presenter</text:span></text:span></text:h>
      <text:p text:style-name="P251"><text:span text:style-name="Strong_20_Emphasis"><text:span text:style-name="T556">Presenter</text:span></text:span><text:span text:style-name="Strong_20_Emphasis"><text:span text:style-name="T557"> é um padrão de design usado para tradução de domínio, formatar, organizar e preparar os dados que serão enviados da aplicação para a camada de visualização (HTML, JSON, PDF, etc). </text:span></text:span><text:span text:style-name="Strong_20_Emphasis"><text:span text:style-name="T558">Sua</text:span></text:span><text:span text:style-name="Strong_20_Emphasis"><text:span text:style-name="T557"> função é atuar entre a Collection e o HTML, com foco em </text:span></text:span><text:span text:style-name="Strong_20_Emphasis"><text:span text:style-name="T559">formatação e apresentação</text:span></text:span><text:span text:style-name="Strong_20_Emphasis"><text:span text:style-name="T557">. Objetivo: </text:span></text:span><text:span text:style-name="T131">Evit</text:span><text:span text:style-name="T10">ar que a camada de visualiz</text:span><text:span text:style-name="Strong_20_Emphasis"><text:span text:style-name="T557">ação (</text:span></text:span><text:span text:style-name="Strong_20_Emphasis"><text:span text:style-name="T558">result</text:span></text:span><text:span text:style-name="Strong_20_Emphasis"><text:span text:style-name="T557">.php) precise:</text:span></text:span></text:p>
      <text:list text:style-name="L29">
        <text:list-item>
          <text:p text:style-name="P252"><text:span text:style-name="Strong_20_Emphasis"><text:span text:style-name="T557">Fazer if, foreach, isset para mostrar os dados;</text:span></text:span></text:p>
        </text:list-item>
        <text:list-item>
          <text:p text:style-name="P252"><text:span text:style-name="Strong_20_Emphasis"><text:span text:style-name="T557">Tratar nomes de campos, máscaras ou vazios diretamente;</text:span></text:span></text:p>
        </text:list-item>
        <text:list-item>
          <text:p text:style-name="P252"><text:span text:style-name="Strong_20_Emphasis"><text:span text:style-name="T557">Repetir lógicas que deveriam estar encapsuladas.</text:span></text:span></text:p>
        </text:list-item>
      </text:list>
      <text:p text:style-name="P221"><text:span text:style-name="Strong_20_Emphasis"><text:span text:style-name="T557">Vantagens</text:span></text:span></text:p>
      <text:list text:style-name="L30">
        <text:list-item>
          <text:p text:style-name="P253"><text:span text:style-name="Strong_20_Emphasis"><text:span text:style-name="T557">Mantém o HTML limpo e sem lógica PHP.</text:span></text:span></text:p>
        </text:list-item>
        <text:list-item>
          <text:p text:style-name="P253"><text:span text:style-name="Strong_20_Emphasis"><text:span text:style-name="T557">Facilita manutenção e testes.</text:span></text:span></text:p>
        </text:list-item>
        <text:list-item>
          <text:p text:style-name="P253"><text:span text:style-name="Strong_20_Emphasis"><text:span text:style-name="T557">Centraliza formatações, máscaras e padrões.</text:span></text:span></text:p>
        </text:list-item>
      </text:list>
      <text:p text:style-name="P221"><text:span text:style-name="Strong_20_Emphasis"><text:span text:style-name="T557">ResultPresenterFactory detecta automaticamente o tipo de Collection (como ConsultarCPFCollection ou ConsultarCNPJCollection) e retorna o Presenter correspondente. </text:span></text:span></text:p>
      <text:h text:style-name="P254" text:outline-level="2"><text:span text:style-name="Strong_20_Emphasis"><text:span text:style-name="T560">View</text:span></text:span></text:h>
      <text:h text:style-name="P254" text:outline-level="2"><text:span text:style-name="Strong_20_Emphasis"><text:span text:style-name="T561">Domain/Entities</text:span></text:span></text:h>
      <text:p text:style-name="P221"><text:span text:style-name="Strong_20_Emphasis"><text:span text:style-name="T557">A pasta Entities é o lugar natural para modelar as regras e estruturas do domínio (objetos com identidade e comportamento). Mantê‑la faz sentido se houver lógica de negócio além de consultas/CRUD.</text:span></text:span></text:p>
      <text:p text:style-name="P221"><text:span text:style-name="Strong_20_Emphasis"><text:span text:style-name="T557">Quando usar Domain/Entities (exemplos)</text:span></text:span></text:p>
      <text:list text:style-name="L31">
        <text:list-item>
          <text:p text:style-name="P255"><text:span text:style-name="Strong_20_Emphasis"><text:span text:style-name="T557">Plano — representa um plano de contratação; campos: id, unidadeId, ano, versao, dataHomologacao, dataPublicacao. Métodos possíveis: isPublicado(), precisaRetificar(Plano $publicado).</text:span></text:span></text:p>
        </text:list-item>
        <text:list-item>
          <text:p text:style-name="P255"><text:span text:style-name="Strong_20_Emphasis"><text:span text:style-name="T557">Demanda — representando itens: id, numeroItem, descricao, quantidade, valorUnitario, dataDesejada. Métodos: valorTotal(), toPncpItem().</text:span></text:span></text:p>
        </text:list-item>
        <text:list-item>
          <text:p text:style-name="P255"><text:span text:style-name="Strong_20_Emphasis"><text:span text:style-name="T557">Unidade (ou Orgao) — codigo, nome, regras de validação de código.</text:span></text:span></text:p>
        </text:list-item>
        <text:list-item>
          <text:p text:style-name="P255"><text:span text:style-name="Strong_20_Emphasis"><text:span text:style-name="T557">PublicacaoHistorico — agrega informações sobre tentativas e erro/sucesso, útil para auditoria e reprocessamento.</text:span></text:span></text:p>
        </text:list-item>
      </text:list>
      <text:p text:style-name="P221"><text:span text:style-name="Strong_20_Emphasis"><text:span text:style-name="T557">Esses objetos encapsulam validações e transformações (por exemplo toPncpPayload() ou normalizeDescricao()), evitando espalhar regras por controllers/repositories.</text:span></text:span></text:p>
      <text:p text:style-name="P221"><text:span text:style-name="Strong_20_Emphasis"><text:span text:style-name="T557">Exemplo mínimo (conceitual)</text:span></text:span></text:p>
      <text:list text:style-name="L32">
        <text:list-item>
          <text:p text:style-name="P256"><text:span text:style-name="Strong_20_Emphasis"><text:span text:style-name="T557">class Plano { private int $id; public function needsRetification(Plano $published): bool { ... } }</text:span></text:span></text:p>
        </text:list-item>
        <text:list-item>
          <text:p text:style-name="P256"><text:span text:style-name="Strong_20_Emphasis"><text:span text:style-name="T557">class Demanda { public function toPncpItem(): array { ... } }</text:span></text:span></text:p>
        </text:list-item>
      </text:list>
      <text:p text:style-name="P221"><text:soft-page-break/><text:span text:style-name="Strong_20_Emphasis"><text:span text:style-name="T557">Decidir apagar ou manter</text:span></text:span></text:p>
      <text:list text:style-name="L33">
        <text:list-item>
          <text:p text:style-name="P257"><text:span text:style-name="Strong_20_Emphasis"><text:span text:style-name="T557">Mantenha a pasta quando:</text:span></text:span></text:p>
          <text:list>
            <text:list-item>
              <text:p text:style-name="P257"><text:span text:style-name="Strong_20_Emphasis"><text:span text:style-name="T557">Você tem regras de negócio não triviais (decisão de publicar/retificar, cálculos, validações, transformações).</text:span></text:span></text:p>
            </text:list-item>
            <text:list-item>
              <text:p text:style-name="P257"><text:span text:style-name="Strong_20_Emphasis"><text:span text:style-name="T557">Deseja testes unitários focados em regras do domínio.</text:span></text:span></text:p>
            </text:list-item>
          </text:list>
        </text:list-item>
        <text:list-item>
          <text:p text:style-name="P257"><text:span text:style-name="Strong_20_Emphasis"><text:span text:style-name="T557">Pode apagar (ou arquivar) quando:</text:span></text:span></text:p>
          <text:list>
            <text:list-item>
              <text:p text:style-name="P257"><text:span text:style-name="Strong_20_Emphasis"><text:span text:style-name="T557">Projeto for apenas orquestração de ETL/CRUD e toda lógica está em SQL ou services muito simples.</text:span></text:span></text:p>
            </text:list-item>
            <text:list-item>
              <text:p text:style-name="P257"><text:span text:style-name="Strong_20_Emphasis"><text:span text:style-name="T557">Você prefere começar menor e só introduzir entidades quando a complexidade justificar</text:span></text:span></text:p>
            </text:list-item>
          </text:list>
        </text:list-item>
      </text:list>
      <text:p text:style-name="P221"><text:span text:style-name="Strong_20_Emphasis"><text:span text:style-name="T557"/></text:span></text:p>
      <text:p text:style-name="P221"><text:span text:style-name="Strong_20_Emphasis"><text:span text:style-name="T55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0-20T23:40:51.940000000</meta:creation-date>
    <meta:generator>LibreOffice/25.2.7.2$Windows_X86_64 LibreOffice_project/5cbfd1ab6520636bb5f7b99185aa69bd7456825d</meta:generator>
    <dc:date>2026-07-07T10:18:31.461866200</dc:date>
    <meta:editing-duration>P1DT13H19M47S</meta:editing-duration>
    <meta:editing-cycles>109</meta:editing-cycles>
    <meta:document-statistic meta:table-count="1" meta:image-count="28" meta:object-count="0" meta:page-count="35" meta:paragraph-count="422" meta:word-count="6043" meta:character-count="42092" meta:non-whitespace-character-count="34167"/>
  </office:meta>
</office:document-meta>
</file>