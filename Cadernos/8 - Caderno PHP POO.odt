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fo:language="pt" fo:country="BR"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50"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1" style:family="paragraph" style:parent-style-name="Standard">
      <loext:graphic-properties draw:fill="none"/>
      <style:paragraph-properties fo:background-color="transparent"/>
      <style:text-properties fo:language="pt" fo:country="BR" officeooo:rsid="0097d991" officeooo:paragraph-rsid="0097d991"/>
    </style:style>
    <style:style style:name="P52"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5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4"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57" style:family="paragraph" style:parent-style-name="Standard">
      <loext:graphic-properties draw:fill="none"/>
      <style:paragraph-properties fo:text-align="center" style:justify-single-word="false" fo:background-color="transparent"/>
      <style:text-properties fo:color="#d4d4d4" loext:opacity="100%" style:font-name="Consolas" fo:font-size="12pt" fo:language="pt" fo:country="BR" fo:font-weight="normal" officeooo:paragraph-rsid="009a385d" fo:background-color="#1f1f1f" style:font-size-asian="12pt" style:font-size-complex="12pt"/>
    </style:style>
    <style:style style:name="P58" style:family="paragraph" style:parent-style-name="Standard">
      <loext:graphic-properties draw:fill="none"/>
      <style:paragraph-properties fo:background-color="transparent"/>
      <style:text-properties fo:language="pt" fo:country="BR" officeooo:paragraph-rsid="00a119ed"/>
    </style:style>
    <style:style style:name="P59" style:family="paragraph" style:parent-style-name="Standard">
      <loext:graphic-properties draw:fill="none"/>
      <style:paragraph-properties fo:break-before="page" fo:background-color="transparent"/>
    </style:style>
    <style:style style:name="P60" style:family="paragraph" style:parent-style-name="Standard">
      <loext:graphic-properties draw:fill="none"/>
      <style:paragraph-properties fo:background-color="transparent"/>
      <style:text-properties officeooo:paragraph-rsid="009aab7b"/>
    </style:style>
    <style:style style:name="P6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62"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65"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66"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0" style:family="paragraph" style:parent-style-name="Text_20_body">
      <loext:graphic-properties draw:fill="none"/>
      <style:paragraph-properties fo:line-height="100%" fo:background-color="transparent"/>
      <style:text-properties fo:language="pt" fo:country="BR" officeooo:paragraph-rsid="009f1751"/>
    </style:style>
    <style:style style:name="P71" style:family="paragraph" style:parent-style-name="Text_20_body">
      <loext:graphic-properties draw:fill="none"/>
      <style:paragraph-properties fo:line-height="100%" fo:break-before="page" fo:background-color="transparent"/>
      <style:text-properties officeooo:paragraph-rsid="009f1751"/>
    </style:style>
    <style:style style:name="P72"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73" style:family="paragraph" style:parent-style-name="Text_20_body">
      <style:paragraph-properties fo:line-height="100%"/>
      <style:text-properties fo:language="pt" fo:country="BR" officeooo:rsid="009f1751" officeooo:paragraph-rsid="009f1751"/>
    </style:style>
    <style:style style:name="P74"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75" style:family="paragraph" style:parent-style-name="Text_20_body">
      <loext:graphic-properties draw:fill="none"/>
      <style:paragraph-properties fo:background-color="transparent"/>
      <style:text-properties fo:language="pt" fo:country="BR" officeooo:rsid="009f1751" officeooo:paragraph-rsid="009f1751"/>
    </style:style>
    <style:style style:name="P76" style:family="paragraph" style:parent-style-name="Text_20_body" style:list-style-name="">
      <style:paragraph-properties fo:text-align="center" style:justify-single-word="false"/>
      <style:text-properties fo:language="pt" fo:country="BR"/>
    </style:style>
    <style:style style:name="P77"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8" style:family="paragraph" style:parent-style-name="Text_20_body" style:list-style-name="">
      <style:paragraph-properties fo:text-align="start" style:justify-single-word="false"/>
      <style:text-properties officeooo:paragraph-rsid="009ff844"/>
    </style:style>
    <style:style style:name="P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80"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81" style:family="paragraph" style:parent-style-name="Text_20_body" style:list-style-name="">
      <style:paragraph-properties fo:text-align="start" style:justify-single-word="false"/>
      <style:text-properties fo:language="pt" fo:country="BR" officeooo:paragraph-rsid="009ff844"/>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16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7"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8"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9"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0"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3"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4"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9"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2"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3" style:family="paragraph" style:parent-style-name="Text_20_body">
      <style:text-properties style:font-name="Liberation Serif" fo:language="pt" fo:country="BR"/>
    </style:style>
    <style:style style:name="P184" style:family="paragraph" style:parent-style-name="Text_20_body">
      <style:text-properties style:font-name="Liberation Serif" fo:language="pt" fo:country="BR" officeooo:paragraph-rsid="00103d57"/>
    </style:style>
    <style:style style:name="P185" style:family="paragraph" style:parent-style-name="Text_20_body">
      <style:paragraph-properties fo:break-before="page"/>
      <style:text-properties style:font-name="Liberation Serif" fo:language="pt" fo:country="BR" officeooo:paragraph-rsid="00103d57"/>
    </style:style>
    <style:style style:name="P186"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7" style:family="paragraph" style:parent-style-name="Heading_20_1">
      <style:paragraph-properties fo:line-height="100%" fo:keep-with-next="always"/>
      <style:text-properties style:font-name="Liberation Sans" fo:language="pt" fo:country="BR" officeooo:rsid="01c694eb" officeooo:paragraph-rsid="00ad5728" style:font-name-asian="Microsoft YaHei" style:font-name-complex="Mangal1"/>
    </style:style>
    <style:style style:name="P188" style:family="paragraph" style:parent-style-name="Text_20_body">
      <style:text-properties style:font-name="Liberation Serif" fo:language="pt" fo:country="BR" officeooo:paragraph-rsid="007a978e"/>
    </style:style>
    <style:style style:name="P189" style:family="paragraph" style:parent-style-name="Text_20_body">
      <style:text-properties style:font-name="Liberation Serif" fo:language="pt" fo:country="BR" officeooo:paragraph-rsid="007249aa"/>
    </style:style>
    <style:style style:name="P190" style:family="paragraph" style:parent-style-name="Text_20_body">
      <style:paragraph-properties fo:break-before="page"/>
      <style:text-properties fo:language="pt" fo:country="BR" officeooo:paragraph-rsid="007a978e"/>
    </style:style>
    <style:style style:name="P191" style:family="paragraph" style:parent-style-name="Text_20_body">
      <style:text-properties fo:language="pt" fo:country="BR" officeooo:paragraph-rsid="007a978e"/>
    </style:style>
    <style:style style:name="P192" style:family="paragraph" style:parent-style-name="Text_20_body">
      <style:text-properties fo:language="pt" fo:country="BR" officeooo:rsid="007a978e" officeooo:paragraph-rsid="007a978e"/>
    </style:style>
    <style:style style:name="P193" style:family="paragraph" style:parent-style-name="Text_20_body">
      <style:text-properties fo:language="pt" fo:country="BR" officeooo:rsid="007b90a0" officeooo:paragraph-rsid="007b90a0"/>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Text_20_body">
      <style:text-properties officeooo:paragraph-rsid="00c06c93"/>
    </style:style>
    <style:style style:name="P196" style:family="paragraph" style:parent-style-name="Text_20_body" style:list-style-name="L17">
      <style:text-properties fo:language="pt" fo:country="BR" fo:font-weight="normal" officeooo:paragraph-rsid="00c06c93" style:font-weight-asian="normal" style:font-weight-complex="normal"/>
    </style:style>
    <style:style style:name="P197" style:family="paragraph" style:parent-style-name="Text_20_body" style:list-style-name="L17">
      <style:paragraph-properties fo:margin-top="0cm" fo:margin-bottom="0cm" style:contextual-spacing="false" fo:orphans="2" fo:widows="2" fo:padding="0cm" fo:border="none"/>
      <style:text-properties officeooo:paragraph-rsid="00c06c93"/>
    </style:style>
    <style:style style:name="P198" style:family="paragraph" style:parent-style-name="Text_20_body" style:list-style-name="L17">
      <style:paragraph-properties fo:orphans="2" fo:widows="2" fo:padding="0cm" fo:border="none"/>
      <style:text-properties officeooo:paragraph-rsid="00c06c93"/>
    </style:style>
    <style:style style:name="P199" style:family="paragraph" style:parent-style-name="Text_20_body">
      <style:paragraph-properties fo:orphans="2" fo:widows="2" fo:padding="0cm" fo:border="none"/>
      <style:text-properties style:font-name="Liberation Sans" fo:language="pt" fo:country="BR" fo:font-weight="normal" officeooo:rsid="01c694eb" officeooo:paragraph-rsid="00c06c93" style:font-name-asian="Microsoft YaHei" style:font-weight-asian="normal" style:font-name-complex="Mangal1" style:font-weight-complex="normal"/>
    </style:style>
    <style:style style:name="P200" style:family="paragraph" style:parent-style-name="Text_20_body">
      <style:text-properties fo:language="pt" fo:country="BR" fo:font-weight="normal" officeooo:rsid="00bcf018" officeooo:paragraph-rsid="00c06c93" style:font-weight-asian="normal" style:font-weight-complex="normal"/>
    </style:style>
    <style:style style:name="P201" style:family="paragraph" style:parent-style-name="Text_20_body" style:list-style-name="L18">
      <style:paragraph-properties fo:margin-top="0cm" fo:margin-bottom="0.146cm" style:contextual-spacing="false"/>
      <style:text-properties officeooo:paragraph-rsid="00c06c93"/>
    </style:style>
    <style:style style:name="P202" style:family="paragraph" style:parent-style-name="Text_20_body" style:list-style-name="L19">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3" style:family="paragraph" style:parent-style-name="Text_20_body" style:list-style-name="L20">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4" style:family="paragraph" style:parent-style-name="Standard">
      <style:paragraph-properties fo:orphans="2" fo:widows="2" fo:padding="0cm" fo:border="none"/>
      <style:text-properties officeooo:paragraph-rsid="00c0a2a3"/>
    </style:style>
    <style:style style:name="P205" style:family="paragraph" style:parent-style-name="Standard">
      <style:paragraph-properties fo:orphans="2" fo:widows="2" fo:padding="0cm" fo:border="none"/>
      <style:text-properties fo:color="#d4d4d4" loext:opacity="100%" style:font-name="Consolas" fo:font-size="10.5pt" fo:font-weight="normal" officeooo:paragraph-rsid="00c0a2a3" fo:background-color="#121314"/>
    </style:style>
    <style:style style:name="P206" style:family="paragraph" style:parent-style-name="Standard">
      <style:paragraph-properties fo:orphans="2" fo:widows="2" fo:padding="0cm" fo:border="none"/>
      <style:text-properties fo:color="#8b949e" loext:opacity="100%" officeooo:paragraph-rsid="00c0a2a3" fo:background-color="#121314"/>
    </style:style>
    <style:style style:name="P207" style:family="paragraph" style:parent-style-name="Text_20_body">
      <style:paragraph-properties fo:orphans="2" fo:widows="2" fo:padding="0cm" fo:border="none"/>
      <style:text-properties style:font-name="Liberation Sans" fo:language="pt" fo:country="BR" fo:font-weight="normal" officeooo:rsid="00c06c93" officeooo:paragraph-rsid="00c06c93" style:font-name-asian="Microsoft YaHei" style:font-weight-asian="normal" style:font-name-complex="Mangal1" style:font-weight-complex="normal"/>
    </style:style>
    <style:style style:name="P208" style:family="paragraph" style:parent-style-name="Heading_20_1">
      <style:paragraph-properties fo:line-height="100%"/>
      <style:text-properties style:font-name="Liberation Sans" fo:language="pt" fo:country="BR" officeooo:rsid="01c694eb" officeooo:paragraph-rsid="00ad5728" style:font-name-asian="Microsoft YaHei" style:font-name-complex="Mangal1"/>
    </style:style>
    <style:style style:name="P209" style:family="paragraph" style:parent-style-name="Text_20_body">
      <style:paragraph-properties fo:line-height="100%"/>
      <style:text-properties fo:language="pt" fo:country="BR" officeooo:rsid="01dcbca4" officeooo:paragraph-rsid="00ad5728"/>
    </style:style>
    <style:style style:name="P210" style:family="paragraph" style:parent-style-name="Text_20_body" style:list-style-name="L21">
      <style:paragraph-properties fo:line-height="100%"/>
      <style:text-properties fo:language="pt" fo:country="BR" officeooo:paragraph-rsid="00ad5728"/>
    </style:style>
    <style:style style:name="P211" style:family="paragraph" style:parent-style-name="Text_20_body" style:list-style-name="L21">
      <style:paragraph-properties fo:line-height="100%"/>
      <style:text-properties officeooo:paragraph-rsid="00ad5728"/>
    </style:style>
    <style:style style:name="P212" style:family="paragraph" style:parent-style-name="Text_20_body">
      <style:paragraph-properties fo:line-height="100%"/>
      <style:text-properties fo:language="pt" fo:country="BR" officeooo:paragraph-rsid="00ad5728"/>
    </style:style>
    <style:style style:name="P213" style:family="paragraph" style:parent-style-name="Heading_20_2">
      <style:text-properties fo:language="pt" fo:country="BR" officeooo:rsid="00aeb741" officeooo:paragraph-rsid="00aeb741"/>
    </style:style>
    <style:style style:name="P214" style:family="paragraph" style:parent-style-name="Text_20_body">
      <style:text-properties officeooo:paragraph-rsid="00ad5728"/>
    </style:style>
    <style:style style:name="P215" style:family="paragraph" style:parent-style-name="Heading_20_2">
      <style:text-properties fo:language="pt" fo:country="BR"/>
    </style:style>
    <style:style style:name="P216" style:family="paragraph" style:parent-style-name="Text_20_body">
      <style:paragraph-properties fo:line-height="100%"/>
      <style:text-properties officeooo:paragraph-rsid="00ad5728"/>
    </style:style>
    <style:style style:name="P217" style:family="paragraph" style:parent-style-name="Text_20_body">
      <style:paragraph-properties fo:line-height="100%" fo:text-align="center" style:justify-single-word="false"/>
      <style:text-properties fo:language="pt" fo:country="BR" officeooo:paragraph-rsid="00ad5728"/>
    </style:style>
    <style:style style:name="P218" style:family="paragraph" style:parent-style-name="Heading_20_2">
      <style:text-properties fo:language="pt" fo:country="BR" fo:font-weight="bold" style:font-weight-asian="bold" style:font-weight-complex="bold"/>
    </style:style>
    <style:style style:name="P219" style:family="paragraph" style:parent-style-name="Text_20_body">
      <style:text-properties fo:language="pt" fo:country="BR" officeooo:rsid="00ad5728" officeooo:paragraph-rsid="00ad5728"/>
    </style:style>
    <style:style style:name="P220" style:family="paragraph" style:parent-style-name="Text_20_body">
      <style:text-properties fo:language="pt" fo:country="BR" officeooo:paragraph-rsid="00bca7d6"/>
    </style:style>
    <style:style style:name="P221" style:family="paragraph" style:parent-style-name="Text_20_body">
      <style:paragraph-properties fo:line-height="100%"/>
      <style:text-properties fo:language="pt" fo:country="BR" officeooo:paragraph-rsid="00bca7d6"/>
    </style:style>
    <style:style style:name="P222" style:family="paragraph" style:parent-style-name="Text_20_body">
      <style:text-properties fo:language="pt" fo:country="BR" officeooo:paragraph-rsid="00ad5728"/>
    </style:style>
    <style:style style:name="P223" style:family="paragraph" style:parent-style-name="Text_20_body">
      <style:text-properties fo:language="pt" fo:country="BR" officeooo:paragraph-rsid="00bb4aaa"/>
    </style:style>
    <style:style style:name="P224" style:family="paragraph" style:parent-style-name="Text_20_body">
      <style:text-properties fo:language="pt" fo:country="BR" officeooo:rsid="00bf1a17" officeooo:paragraph-rsid="00bf1a17"/>
    </style:style>
    <style:style style:name="P225" style:family="paragraph" style:parent-style-name="Text_20_body" style:list-style-name="L22">
      <style:paragraph-properties fo:margin-top="0cm" fo:margin-bottom="0cm" style:contextual-spacing="false"/>
      <style:text-properties fo:language="pt" fo:country="BR" officeooo:paragraph-rsid="00bf1a17"/>
    </style:style>
    <style:style style:name="P226" style:family="paragraph" style:parent-style-name="Text_20_body" style:list-style-name="L22">
      <style:paragraph-properties fo:margin-top="0cm" fo:margin-bottom="0cm" style:contextual-spacing="false"/>
      <style:text-properties fo:language="pt" fo:country="BR" fo:font-weight="normal" officeooo:paragraph-rsid="00bf1a17" style:font-weight-asian="normal" style:font-weight-complex="normal"/>
    </style:style>
    <style:style style:name="P227" style:family="paragraph" style:parent-style-name="Text_20_body">
      <style:paragraph-properties fo:margin-top="0cm" fo:margin-bottom="0cm" style:contextual-spacing="false"/>
      <style:text-properties fo:language="pt" fo:country="BR" fo:font-weight="normal" officeooo:paragraph-rsid="00bf1a17" style:font-weight-asian="normal" style:font-weight-complex="normal"/>
    </style:style>
    <style:style style:name="P228" style:family="paragraph" style:parent-style-name="Text_20_body">
      <style:text-properties officeooo:paragraph-rsid="00bf1a17"/>
    </style:style>
    <style:style style:name="P229" style:family="paragraph" style:parent-style-name="Text_20_body" style:list-style-name="L23">
      <style:text-properties fo:language="pt" fo:country="BR" officeooo:rsid="00bf1a17" officeooo:paragraph-rsid="00bf1a17"/>
    </style:style>
    <style:style style:name="P230" style:family="paragraph" style:parent-style-name="Text_20_body" style:list-style-name="L23">
      <style:text-properties fo:language="pt" fo:country="BR" officeooo:rsid="00c4e865" officeooo:paragraph-rsid="00c4e865"/>
    </style:style>
    <style:style style:name="P231" style:family="paragraph" style:parent-style-name="Text_20_body" style:list-style-name="L23">
      <style:text-properties fo:language="pt" fo:country="BR" officeooo:rsid="00c3669d" officeooo:paragraph-rsid="00c3669d"/>
    </style:style>
    <style:style style:name="P232" style:family="paragraph" style:parent-style-name="Heading_20_2">
      <style:paragraph-properties fo:line-height="100%"/>
      <style:text-properties fo:language="pt" fo:country="BR" fo:font-weight="normal" officeooo:paragraph-rsid="00ad5728" style:font-weight-asian="normal" style:font-weight-complex="normal"/>
    </style:style>
    <style:style style:name="P233" style:family="paragraph" style:parent-style-name="Text_20_body" style:list-style-name="L24">
      <style:text-properties officeooo:paragraph-rsid="00ad5728"/>
    </style:style>
    <style:style style:name="P234" style:family="paragraph" style:parent-style-name="Text_20_body">
      <style:paragraph-properties fo:line-height="100%"/>
      <style:text-properties fo:language="pt" fo:country="BR" fo:font-weight="normal" officeooo:rsid="0204338d" officeooo:paragraph-rsid="00ad5728" style:font-weight-asian="normal" style:font-weight-complex="normal"/>
    </style:style>
    <style:style style:name="P235" style:family="paragraph" style:parent-style-name="Heading_20_2">
      <style:paragraph-properties fo:keep-with-next="always"/>
      <style:text-properties style:font-name="Liberation Sans" fo:language="pt" fo:country="BR" style:font-name-asian="Microsoft YaHei" style:font-name-complex="Mangal1"/>
    </style:style>
    <style:style style:name="P236" style:family="paragraph" style:parent-style-name="Text_20_body">
      <style:paragraph-properties fo:line-height="100%"/>
      <style:text-properties fo:language="pt" fo:country="BR" fo:font-weight="normal" officeooo:rsid="00c46bbb" officeooo:paragraph-rsid="00c46bbb" style:font-weight-asian="normal" style:font-weight-complex="normal"/>
    </style:style>
    <style:style style:name="P237" style:family="paragraph" style:parent-style-name="Heading_20_2">
      <style:text-properties fo:language="pt" fo:country="BR" fo:font-weight="normal" officeooo:paragraph-rsid="00ad5728" style:font-weight-asian="normal" style:font-weight-complex="normal"/>
    </style:style>
    <style:style style:name="P238" style:family="paragraph" style:parent-style-name="Table_20_Heading">
      <style:text-properties fo:language="pt" fo:country="BR" officeooo:paragraph-rsid="00ad5728"/>
    </style:style>
    <style:style style:name="P239" style:family="paragraph" style:parent-style-name="Table_20_Heading">
      <style:text-properties officeooo:paragraph-rsid="00ad5728"/>
    </style:style>
    <style:style style:name="P240" style:family="paragraph" style:parent-style-name="Table_20_Contents">
      <style:text-properties fo:language="pt" fo:country="BR" officeooo:paragraph-rsid="00ad5728"/>
    </style:style>
    <style:style style:name="P241" style:family="paragraph" style:parent-style-name="Table_20_Contents">
      <style:text-properties officeooo:paragraph-rsid="00ad5728"/>
    </style:style>
    <style:style style:name="P242" style:family="paragraph" style:parent-style-name="Horizontal_20_Line">
      <style:text-properties fo:language="pt" fo:country="BR" officeooo:paragraph-rsid="00ad5728"/>
    </style:style>
    <style:style style:name="P243" style:family="paragraph" style:parent-style-name="Text_20_body">
      <style:paragraph-properties fo:line-height="100%"/>
      <style:text-properties officeooo:paragraph-rsid="00b20e2e"/>
    </style:style>
    <style:style style:name="P244" style:family="paragraph" style:parent-style-name="Text_20_body" style:list-style-name="L25">
      <style:paragraph-properties fo:line-height="100%"/>
      <style:text-properties officeooo:paragraph-rsid="00ad5728"/>
    </style:style>
    <style:style style:name="P245" style:family="paragraph" style:parent-style-name="Text_20_body" style:list-style-name="L26">
      <style:paragraph-properties fo:line-height="100%"/>
      <style:text-properties officeooo:paragraph-rsid="00ad5728"/>
    </style:style>
    <style:style style:name="P246" style:family="paragraph" style:parent-style-name="Heading_20_2">
      <style:text-properties officeooo:paragraph-rsid="00c86894"/>
    </style:style>
    <style:style style:name="P247" style:family="paragraph" style:parent-style-name="Text_20_body" style:list-style-name="L27">
      <style:paragraph-properties fo:line-height="100%"/>
      <style:text-properties officeooo:paragraph-rsid="00ad5728"/>
    </style:style>
    <style:style style:name="P248" style:family="paragraph" style:parent-style-name="Text_20_body" style:list-style-name="L28">
      <style:paragraph-properties fo:line-height="100%"/>
      <style:text-properties officeooo:paragraph-rsid="00ad5728"/>
    </style:style>
    <style:style style:name="P249" style:family="paragraph" style:parent-style-name="Text_20_body" style:list-style-name="L29">
      <style:paragraph-properties fo:line-height="100%"/>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officeooo:rsid="0095c00f"/>
    </style:style>
    <style:style style:name="T107" style:family="text">
      <style:text-properties fo:font-weight="bold" officeooo:rsid="0095c00f" style:font-weight-asian="bold" style:font-weight-complex="bold"/>
    </style:style>
    <style:style style:name="T108" style:family="text">
      <style:text-properties fo:font-weight="bold" officeooo:rsid="0097d991" style:font-weight-asian="bold" style:font-weight-complex="bold"/>
    </style:style>
    <style:style style:name="T109" style:family="text">
      <style:text-properties style:text-underline-style="none" fo:font-weight="bold" officeooo:rsid="0095c00f" style:font-weight-asian="bold" style:font-weight-complex="bold"/>
    </style:style>
    <style:style style:name="T110" style:family="text">
      <style:text-properties style:text-underline-style="none" fo:font-weight="bold" officeooo:rsid="0097d991" style:font-weight-asian="bold" style:font-weight-complex="bold"/>
    </style:style>
    <style:style style:name="T111" style:family="text">
      <style:text-properties fo:font-weight="normal" officeooo:rsid="0097d991" style:font-weight-asian="normal" style:font-weight-complex="normal"/>
    </style:style>
    <style:style style:name="T112" style:family="text">
      <style:text-properties officeooo:rsid="0097d991"/>
    </style:style>
    <style:style style:name="T113" style:family="text">
      <style:text-properties officeooo:rsid="0095e7d4"/>
    </style:style>
    <style:style style:name="T114" style:family="text">
      <style:text-properties officeooo:rsid="006d95f7"/>
    </style:style>
    <style:style style:name="T115" style:family="text">
      <style:text-properties style:text-underline-style="none" officeooo:rsid="0095c00f"/>
    </style:style>
    <style:style style:name="T116" style:family="text">
      <style:text-properties fo:font-weight="bold" officeooo:rsid="009a385d" style:font-weight-asian="bold" style:font-weight-complex="bold"/>
    </style:style>
    <style:style style:name="T117" style:family="text">
      <style:text-properties officeooo:rsid="00989d8f"/>
    </style:style>
    <style:style style:name="T118"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19"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0"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1" style:family="text">
      <style:text-properties fo:color="#569cd6" loext:opacity="100%"/>
    </style:style>
    <style:style style:name="T122" style:family="text">
      <style:text-properties fo:color="#d4d4d4" loext:opacity="100%"/>
    </style:style>
    <style:style style:name="T123" style:family="text">
      <style:text-properties fo:color="#9cdcfe" loext:opacity="100%"/>
    </style:style>
    <style:style style:name="T124" style:family="text">
      <style:text-properties fo:color="#dcdcaa" loext:opacity="100%"/>
    </style:style>
    <style:style style:name="T125" style:family="text">
      <style:text-properties fo:color="#569cd6" loext:opacity="100%" officeooo:rsid="009aaf03"/>
    </style:style>
    <style:style style:name="T126" style:family="text">
      <style:text-properties officeooo:rsid="00359951"/>
    </style:style>
    <style:style style:name="T127" style:family="text">
      <style:text-properties fo:color="#2a6099" loext:opacity="100%" style:font-name="Mono" fo:font-size="14pt" fo:language="pt" fo:country="BR" fo:font-weight="bold" style:font-size-asian="14pt" style:font-weight-asian="bold" style:font-size-complex="14pt" style:font-weight-complex="bold"/>
    </style:style>
    <style:style style:name="T128" style:family="text">
      <style:text-properties fo:language="pt" fo:country="BR" officeooo:rsid="009c4a06"/>
    </style:style>
    <style:style style:name="T129" style:family="text">
      <style:text-properties fo:language="pt" fo:country="BR" officeooo:rsid="009aaf03"/>
    </style:style>
    <style:style style:name="T130" style:family="text">
      <style:text-properties fo:language="pt" fo:country="BR" officeooo:rsid="009aab7b"/>
    </style:style>
    <style:style style:name="T131" style:family="text">
      <style:text-properties fo:language="pt" fo:country="BR" fo:font-weight="normal" style:font-weight-asian="normal" style:font-weight-complex="normal"/>
    </style:style>
    <style:style style:name="T132" style:family="text">
      <style:text-properties fo:language="pt" fo:country="BR" fo:font-weight="normal" officeooo:rsid="00a37bab" style:font-weight-asian="normal" style:font-weight-complex="normal"/>
    </style:style>
    <style:style style:name="T133" style:family="text">
      <style:text-properties fo:language="pt" fo:country="BR" fo:font-weight="normal" officeooo:rsid="009aab7b" style:font-weight-asian="normal" style:font-weight-complex="normal"/>
    </style:style>
    <style:style style:name="T134" style:family="text">
      <style:text-properties fo:color="#4ec9b0" loext:opacity="100%"/>
    </style:style>
    <style:style style:name="T135" style:family="text">
      <style:text-properties fo:color="#569cd6" loext:opacity="100%" style:font-name="Consolas" fo:font-size="10.5pt" fo:font-weight="normal" fo:background-color="#1f1f1f" loext:char-shading-value="0"/>
    </style:style>
    <style:style style:name="T136" style:family="text">
      <style:text-properties fo:color="#d4d4d4" loext:opacity="100%" style:font-name="Consolas" fo:font-size="10.5pt" fo:font-weight="normal" fo:background-color="#1f1f1f" loext:char-shading-value="0"/>
    </style:style>
    <style:style style:name="T137" style:family="text">
      <style:text-properties fo:color="#4ec9b0" loext:opacity="100%" style:font-name="Consolas" fo:font-size="10.5pt" fo:font-weight="normal" fo:background-color="#1f1f1f" loext:char-shading-value="0"/>
    </style:style>
    <style:style style:name="T138" style:family="text">
      <style:text-properties fo:color="#9cdcfe" loext:opacity="100%" style:font-name="Consolas" fo:font-size="10.5pt" fo:font-weight="normal" fo:background-color="#1f1f1f" loext:char-shading-value="0"/>
    </style:style>
    <style:style style:name="T139" style:family="text">
      <style:text-properties fo:color="#ce9178" loext:opacity="100%"/>
    </style:style>
    <style:style style:name="T140" style:family="text">
      <style:text-properties fo:color="#6a9955" loext:opacity="100%"/>
    </style:style>
    <style:style style:name="T141" style:family="text">
      <style:text-properties fo:color="#569cd6" loext:opacity="100%" style:font-name="Consolas" fo:font-size="10.5pt" fo:font-weight="normal" officeooo:rsid="009aaf03" fo:background-color="#1f1f1f" loext:char-shading-value="0"/>
    </style:style>
    <style:style style:name="T142" style:family="text">
      <style:text-properties fo:color="#d4d4d4" loext:opacity="100%" style:font-name="Consolas" fo:font-size="10.5pt" fo:font-weight="normal" officeooo:rsid="009aaf03" fo:background-color="#1f1f1f" loext:char-shading-value="0"/>
    </style:style>
    <style:style style:name="T143" style:family="text">
      <style:text-properties fo:color="#4ec9b0" loext:opacity="100%" style:font-name="Consolas" fo:font-size="10.5pt" fo:font-weight="normal" officeooo:rsid="009aaf03" fo:background-color="#1f1f1f" loext:char-shading-value="0"/>
    </style:style>
    <style:style style:name="T144" style:family="text">
      <style:text-properties fo:language="pt" fo:country="BR" fo:font-weight="bold" style:font-weight-asian="bold" style:font-weight-complex="bold"/>
    </style:style>
    <style:style style:name="T145" style:family="text">
      <style:text-properties fo:language="pt" fo:country="BR" officeooo:rsid="009f1751"/>
    </style:style>
    <style:style style:name="T146" style:family="text">
      <style:text-properties fo:color="#569cd6" loext:opacity="100%" style:font-name="Consolas" fo:font-size="10.5pt" fo:font-weight="normal" officeooo:rsid="009f1751" fo:background-color="#1f1f1f" loext:char-shading-value="0"/>
    </style:style>
    <style:style style:name="T147" style:family="text">
      <style:text-properties fo:color="#d4d4d4" loext:opacity="100%" style:font-name="Consolas" fo:font-size="10.5pt" fo:font-weight="normal" officeooo:rsid="009f1751" fo:background-color="#1f1f1f" loext:char-shading-value="0"/>
    </style:style>
    <style:style style:name="T148" style:family="text">
      <style:text-properties fo:color="#4ec9b0" loext:opacity="100%" style:font-name="Consolas" fo:font-size="10.5pt" fo:font-weight="normal" officeooo:rsid="009f1751" fo:background-color="#1f1f1f" loext:char-shading-value="0"/>
    </style:style>
    <style:style style:name="T149" style:family="text">
      <style:text-properties fo:color="#c586c0" loext:opacity="100%"/>
    </style:style>
    <style:style style:name="T150" style:family="text">
      <style:text-properties officeooo:rsid="009ff844"/>
    </style:style>
    <style:style style:name="T151" style:family="text">
      <style:text-properties fo:color="#b5cea8" loext:opacity="100%"/>
    </style:style>
    <style:style style:name="T152" style:family="text">
      <style:text-properties fo:language="pt" fo:country="BR" fo:font-weight="bold" officeooo:rsid="009ff844" style:font-weight-asian="bold" style:font-weight-complex="bold"/>
    </style:style>
    <style:style style:name="T153" style:family="text">
      <style:text-properties fo:language="pt" fo:country="BR" fo:font-weight="normal" officeooo:rsid="009ff844" style:font-weight-asian="normal" style:font-weight-complex="normal"/>
    </style:style>
    <style:style style:name="T154" style:family="text">
      <style:text-properties fo:language="pt" fo:country="BR" fo:font-weight="normal" officeooo:rsid="00a61ae8" style:font-weight-asian="normal" style:font-weight-complex="normal"/>
    </style:style>
    <style:style style:name="T155" style:family="text">
      <style:text-properties fo:color="#2a6099" loext:opacity="100%" style:font-name="Mono" fo:language="pt" fo:country="BR" fo:font-weight="bold" officeooo:rsid="009ff844" style:font-weight-asian="bold" style:font-weight-complex="bold"/>
    </style:style>
    <style:style style:name="T156" style:family="text">
      <style:text-properties fo:language="pt" fo:country="BR" officeooo:rsid="00a61ae8"/>
    </style:style>
    <style:style style:name="T157" style:family="text">
      <style:text-properties fo:language="pt" fo:country="BR" officeooo:rsid="009ff844"/>
    </style:style>
    <style:style style:name="T158" style:family="text">
      <style:text-properties fo:color="#9cdcfe" loext:opacity="100%" officeooo:rsid="009ff844"/>
    </style:style>
    <style:style style:name="T159" style:family="text">
      <style:text-properties fo:color="#d4d4d4" loext:opacity="100%" officeooo:rsid="009ff844"/>
    </style:style>
    <style:style style:name="T160" style:family="text">
      <style:text-properties fo:color="#4ec9b0" loext:opacity="100%" officeooo:rsid="009ff844"/>
    </style:style>
    <style:style style:name="T161" style:family="text">
      <style:text-properties fo:color="#dcdcaa" loext:opacity="100%" officeooo:rsid="009ff844"/>
    </style:style>
    <style:style style:name="T162" style:family="text">
      <style:text-properties fo:color="#b5cea8" loext:opacity="100%" officeooo:rsid="009ff844"/>
    </style:style>
    <style:style style:name="T163" style:family="text">
      <style:text-properties fo:color="#6a9955" loext:opacity="100%" officeooo:rsid="009ff844"/>
    </style:style>
    <style:style style:name="T164" style:family="text">
      <style:text-properties fo:color="#d4d4d4" loext:opacity="100%" officeooo:rsid="00a61ae8"/>
    </style:style>
    <style:style style:name="T165" style:family="text">
      <style:text-properties fo:language="pt" fo:country="BR" officeooo:rsid="00a119ed"/>
    </style:style>
    <style:style style:name="T166" style:family="text">
      <style:text-properties fo:color="#c586c0" loext:opacity="100%" style:font-name="Consolas" fo:font-size="10.5pt" fo:language="pt" fo:country="BR" fo:font-weight="normal" officeooo:rsid="00a119ed" fo:background-color="#1f1f1f" loext:char-shading-value="0"/>
    </style:style>
    <style:style style:name="T167" style:family="text">
      <style:text-properties fo:color="#d4d4d4" loext:opacity="100%" style:font-name="Consolas" fo:font-size="10.5pt" fo:language="pt" fo:country="BR" fo:font-weight="normal" officeooo:rsid="00a119ed" fo:background-color="#1f1f1f" loext:char-shading-value="0"/>
    </style:style>
    <style:style style:name="T168" style:family="text">
      <style:text-properties fo:color="#4ec9b0" loext:opacity="100%" style:font-name="Consolas" fo:font-size="10.5pt" fo:language="pt" fo:country="BR" fo:font-weight="normal" officeooo:rsid="00a119ed" fo:background-color="#1f1f1f" loext:char-shading-value="0"/>
    </style:style>
    <style:style style:name="T169" style:family="text">
      <style:text-properties fo:color="#dcdcaa" loext:opacity="100%" style:font-name="Consolas" fo:font-size="10.5pt" fo:language="pt" fo:country="BR" fo:font-weight="normal" officeooo:rsid="00a119ed" fo:background-color="#1f1f1f" loext:char-shading-value="0"/>
    </style:style>
    <style:style style:name="T170" style:family="text">
      <style:text-properties fo:color="#9cdcfe" loext:opacity="100%" style:font-name="Consolas" fo:font-size="10.5pt" fo:language="pt" fo:country="BR" fo:font-weight="normal" officeooo:rsid="00a119ed" fo:background-color="#1f1f1f" loext:char-shading-value="0"/>
    </style:style>
    <style:style style:name="T171"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172" style:family="text">
      <style:text-properties style:font-name="Liberation Serif" fo:language="pt" fo:country="BR" fo:font-weight="normal" style:font-weight-asian="normal" style:font-weight-complex="normal"/>
    </style:style>
    <style:style style:name="T173" style:family="text">
      <style:text-properties style:font-name="Liberation Serif" fo:language="pt" fo:country="BR" fo:font-weight="bold" officeooo:rsid="00a9626a" style:font-weight-asian="bold" style:font-weight-complex="bold"/>
    </style:style>
    <style:style style:name="T174" style:family="text">
      <style:text-properties style:font-name="Liberation Serif" fo:language="pt" fo:country="BR" fo:font-weight="bold" style:font-weight-asian="bold" style:font-weight-complex="bold"/>
    </style:style>
    <style:style style:name="T175" style:family="text">
      <style:text-properties style:font-name="Mono" fo:language="pt" fo:country="BR" fo:font-weight="normal" style:font-weight-asian="normal" style:font-weight-complex="normal"/>
    </style:style>
    <style:style style:name="T176" style:family="text">
      <style:text-properties style:font-name="Mono" fo:language="pt" fo:country="BR" fo:font-weight="normal" style:font-name-asian="NSimSun" style:font-weight-asian="normal" style:font-name-complex="Liberation Mono" style:font-weight-complex="normal"/>
    </style:style>
    <style:style style:name="T177" style:family="text">
      <style:text-properties style:font-name="Liberation Serif" fo:language="pt" fo:country="BR" officeooo:rsid="00a9626a"/>
    </style:style>
    <style:style style:name="T178" style:family="text">
      <style:text-properties fo:color="#ff4000" loext:opacity="100%" style:font-name="Mono" fo:language="pt" fo:country="BR" fo:font-weight="bold" officeooo:rsid="00a9626a" style:font-weight-asian="bold" style:font-weight-complex="bold"/>
    </style:style>
    <style:style style:name="T179" style:family="text">
      <style:text-properties fo:color="#ff4000" loext:opacity="100%" style:font-name="Mono" fo:language="pt" fo:country="BR" fo:font-weight="bold" style:font-weight-asian="bold" style:font-weight-complex="bold"/>
    </style:style>
    <style:style style:name="T180" style:family="text">
      <style:text-properties style:font-name="Liberation Serif" fo:language="pt" fo:country="BR" officeooo:rsid="00aae922"/>
    </style:style>
    <style:style style:name="T181" style:family="text">
      <style:text-properties fo:color="#569cd6" loext:opacity="100%" style:font-name="Consolas" fo:font-size="10.5pt" fo:language="pt" fo:country="BR" fo:font-weight="normal" fo:background-color="#1f1f1f" loext:char-shading-value="0"/>
    </style:style>
    <style:style style:name="T182" style:family="text">
      <style:text-properties fo:color="#d4d4d4" loext:opacity="100%" style:font-name="Consolas" fo:font-size="10.5pt" fo:language="pt" fo:country="BR" fo:font-weight="normal" fo:background-color="#1f1f1f" loext:char-shading-value="0"/>
    </style:style>
    <style:style style:name="T183" style:family="text">
      <style:text-properties fo:color="#4ec9b0" loext:opacity="100%" style:font-name="Consolas" fo:font-size="10.5pt" fo:language="pt" fo:country="BR" fo:font-weight="normal" fo:background-color="#1f1f1f" loext:char-shading-value="0"/>
    </style:style>
    <style:style style:name="T184" style:family="text">
      <style:text-properties fo:color="#b5cea8" loext:opacity="100%" style:font-name="Consolas" fo:font-size="10.5pt" fo:font-weight="normal" fo:background-color="#1f1f1f" loext:char-shading-value="0"/>
    </style:style>
    <style:style style:name="T185" style:family="text">
      <style:text-properties officeooo:rsid="005aeb45"/>
    </style:style>
    <style:style style:name="T186" style:family="text">
      <style:text-properties officeooo:rsid="0031f368"/>
    </style:style>
    <style:style style:name="T187" style:family="text">
      <style:text-properties style:font-name="Mono" officeooo:rsid="0031f368"/>
    </style:style>
    <style:style style:name="T188" style:family="text">
      <style:text-properties fo:color="#dcdcaa" loext:opacity="100%" style:font-name="Consolas" fo:font-size="12pt" fo:font-weight="normal" fo:background-color="#1e1e1e" loext:char-shading-value="0"/>
    </style:style>
    <style:style style:name="T189" style:family="text">
      <style:text-properties style:text-underline-style="none" fo:font-weight="bold" style:font-weight-asian="bold" style:font-weight-complex="bold"/>
    </style:style>
    <style:style style:name="T190" style:family="text">
      <style:text-properties style:text-underline-style="solid" style:text-underline-width="auto" style:text-underline-color="font-color" officeooo:rsid="00751323"/>
    </style:style>
    <style:style style:name="T191" style:family="text">
      <style:text-properties officeooo:rsid="00407d4e"/>
    </style:style>
    <style:style style:name="T192" style:family="text">
      <style:text-properties fo:color="#2a6099" loext:opacity="100%" style:font-name="Mono"/>
    </style:style>
    <style:style style:name="T193" style:family="text">
      <style:text-properties fo:color="#000000" loext:opacity="100%" fo:font-weight="bold" officeooo:rsid="00aac625" style:font-weight-asian="bold" style:font-weight-complex="bold"/>
    </style:style>
    <style:style style:name="T194" style:family="text">
      <style:text-properties fo:color="#000000" loext:opacity="100%" fo:font-weight="bold" style:font-weight-asian="bold" style:font-weight-complex="bold"/>
    </style:style>
    <style:style style:name="T195" style:family="text">
      <style:text-properties fo:font-weight="bold" officeooo:rsid="00c30713" style:font-weight-asian="bold" style:font-weight-complex="bold"/>
    </style:style>
    <style:style style:name="T196" style:family="text">
      <style:text-properties officeooo:rsid="007f4c2e"/>
    </style:style>
    <style:style style:name="T197" style:family="text">
      <style:text-properties officeooo:rsid="0038c3bf"/>
    </style:style>
    <style:style style:name="T198" style:family="text">
      <style:text-properties style:text-underline-style="solid" style:text-underline-width="auto" style:text-underline-color="font-color" officeooo:rsid="0038c3bf"/>
    </style:style>
    <style:style style:name="T199" style:family="text">
      <style:text-properties style:text-underline-style="none" officeooo:rsid="0038c3bf"/>
    </style:style>
    <style:style style:name="T200" style:family="text">
      <style:text-properties style:text-underline-style="none" officeooo:rsid="007f5f7e"/>
    </style:style>
    <style:style style:name="T201"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2"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5"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7"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8"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9"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0"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1"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13"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5"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7"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8" style:family="text">
      <style:text-properties officeooo:rsid="003cc7a3"/>
    </style:style>
    <style:style style:name="T219" style:family="text">
      <style:text-properties fo:color="#6a9955" loext:opacity="100%" officeooo:rsid="003cc7a3"/>
    </style:style>
    <style:style style:name="T220" style:family="text">
      <style:text-properties fo:color="#569cd6" loext:opacity="100%" fo:background-color="#1e1e1e" loext:char-shading-value="0"/>
    </style:style>
    <style:style style:name="T221" style:family="text">
      <style:text-properties fo:color="#d4d4d4" loext:opacity="100%" fo:background-color="#1e1e1e" loext:char-shading-value="0"/>
    </style:style>
    <style:style style:name="T222" style:family="text">
      <style:text-properties fo:color="#4ec9b0" loext:opacity="100%" fo:background-color="#1e1e1e" loext:char-shading-value="0"/>
    </style:style>
    <style:style style:name="T223" style:family="text">
      <style:text-properties fo:color="#d4d4d4" loext:opacity="100%" officeooo:rsid="003cc7a3" fo:background-color="#1e1e1e" loext:char-shading-value="0"/>
    </style:style>
    <style:style style:name="T224" style:family="text">
      <style:text-properties fo:color="#6a9955" loext:opacity="100%" fo:background-color="#1e1e1e" loext:char-shading-value="0"/>
    </style:style>
    <style:style style:name="T225" style:family="text">
      <style:text-properties officeooo:rsid="00815dd0"/>
    </style:style>
    <style:style style:name="T22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7" style:family="text">
      <style:text-properties style:text-underline-style="solid" style:text-underline-width="auto" style:text-underline-color="font-color" officeooo:rsid="0041f22a"/>
    </style:style>
    <style:style style:name="T228" style:family="text">
      <style:text-properties officeooo:rsid="0041f22a"/>
    </style:style>
    <style:style style:name="T229" style:family="text">
      <style:text-properties fo:color="#9cdcfe" loext:opacity="100%" officeooo:rsid="007f5f7e"/>
    </style:style>
    <style:style style:name="T230" style:family="text">
      <style:text-properties fo:color="#6a9955" loext:opacity="100%" officeooo:rsid="0043c787"/>
    </style:style>
    <style:style style:name="T231" style:family="text">
      <style:text-properties fo:color="#9cdcfe" loext:opacity="100%" style:font-name="Consolas" fo:font-size="12pt" fo:font-weight="normal"/>
    </style:style>
    <style:style style:name="T232" style:family="text">
      <style:text-properties fo:color="#9cdcfe" loext:opacity="100%" style:font-name="Consolas" fo:font-size="12pt" fo:font-weight="normal" officeooo:rsid="007f5f7e"/>
    </style:style>
    <style:style style:name="T233" style:family="text">
      <style:text-properties style:font-name="Consolas" fo:font-size="12pt" fo:font-weight="normal"/>
    </style:style>
    <style:style style:name="T234" style:family="text">
      <style:text-properties fo:color="#b5cea8" loext:opacity="100%" style:font-name="Consolas" fo:font-size="12pt" fo:font-weight="normal"/>
    </style:style>
    <style:style style:name="T235" style:family="text">
      <style:text-properties fo:color="#569cd6" loext:opacity="100%" style:font-name="Consolas" fo:font-size="12pt" fo:font-weight="normal"/>
    </style:style>
    <style:style style:name="T236" style:family="text">
      <style:text-properties fo:color="#4ec9b0" loext:opacity="100%" style:font-name="Consolas" fo:font-size="12pt" fo:font-weight="normal"/>
    </style:style>
    <style:style style:name="T237" style:family="text">
      <style:text-properties fo:color="#ce9178" loext:opacity="100%" style:font-name="Consolas" fo:font-size="12pt" fo:font-weight="normal"/>
    </style:style>
    <style:style style:name="T238" style:family="text">
      <style:text-properties fo:color="#6a9955" loext:opacity="100%" style:font-name="Consolas" fo:font-size="12pt" fo:font-weight="normal" officeooo:rsid="0043c787"/>
    </style:style>
    <style:style style:name="T23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1"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5"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6"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08385bb" style:font-weight-asian="normal" style:font-weight-complex="normal"/>
    </style:style>
    <style:style style:name="T259" style:family="text">
      <style:text-properties officeooo:rsid="004b83b5"/>
    </style:style>
    <style:style style:name="T260" style:family="text">
      <style:text-properties officeooo:rsid="004e6c6e"/>
    </style:style>
    <style:style style:name="T26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3" style:family="text">
      <style:text-properties style:font-name="Liberation Serif" style:text-underline-style="none" fo:font-weight="normal" officeooo:rsid="00b9d418" style:font-weight-asian="normal" style:font-weight-complex="normal"/>
    </style:style>
    <style:style style:name="T264" style:family="text">
      <style:text-properties fo:color="#2a6099" loext:opacity="100%" style:font-name="Monospace" style:text-underline-style="none" fo:font-weight="bold" officeooo:rsid="00583ac1" style:font-weight-asian="bold" style:font-weight-complex="bold"/>
    </style:style>
    <style:style style:name="T265" style:family="text">
      <style:text-properties style:font-name="Liberation Serif" style:text-underline-style="none" fo:font-weight="normal" officeooo:rsid="00583ac1" style:font-weight-asian="normal" style:font-weight-complex="normal"/>
    </style:style>
    <style:style style:name="T266" style:family="text">
      <style:text-properties style:font-name="Liberation Serif" style:text-underline-style="none" fo:font-weight="normal" officeooo:rsid="007ee737" style:font-weight-asian="normal" style:font-weight-complex="normal"/>
    </style:style>
    <style:style style:name="T26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0" style:family="text">
      <style:text-properties style:font-name="Liberation Serif" style:text-underline-style="none" fo:font-weight="normal" officeooo:rsid="006d95f7" style:font-weight-asian="normal" style:font-weight-complex="normal"/>
    </style:style>
    <style:style style:name="T27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72"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6"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7"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8" style:family="text">
      <style:text-properties fo:language="pt" fo:country="BR" officeooo:rsid="006d95f7"/>
    </style:style>
    <style:style style:name="T279" style:family="text">
      <style:text-properties fo:language="pt" fo:country="BR" style:text-underline-style="solid" style:text-underline-width="auto" style:text-underline-color="font-color" officeooo:rsid="006d95f7"/>
    </style:style>
    <style:style style:name="T280" style:family="text">
      <style:text-properties fo:language="pt" fo:country="BR" style:text-underline-style="solid" style:text-underline-width="auto" style:text-underline-color="font-color"/>
    </style:style>
    <style:style style:name="T281" style:family="text">
      <style:text-properties fo:language="pt" fo:country="BR" style:text-underline-style="solid" style:text-underline-width="auto" style:text-underline-color="font-color" fo:font-weight="normal" style:font-weight-asian="normal" style:font-weight-complex="normal"/>
    </style:style>
    <style:style style:name="T282" style:family="text">
      <style:text-properties fo:language="pt" fo:country="BR" style:text-underline-style="none" fo:font-weight="normal" style:font-weight-asian="normal" style:font-weight-complex="normal"/>
    </style:style>
    <style:style style:name="T283" style:family="text">
      <style:text-properties fo:language="pt" fo:country="BR" fo:font-weight="normal" officeooo:rsid="006d95f7" style:font-weight-asian="normal" style:font-weight-complex="normal"/>
    </style:style>
    <style:style style:name="T284" style:family="text">
      <style:text-properties fo:language="pt" fo:country="BR" style:text-underline-style="none" fo:font-weight="normal" officeooo:rsid="00838bc2" style:font-weight-asian="normal" style:font-weight-complex="normal"/>
    </style:style>
    <style:style style:name="T285" style:family="text">
      <style:text-properties fo:language="pt" fo:country="BR" style:text-underline-style="none" fo:font-weight="bold" officeooo:rsid="00838bc2" fo:background-color="#ffffd7" loext:char-shading-value="0" style:font-weight-asian="bold" style:font-weight-complex="bold"/>
    </style:style>
    <style:style style:name="T286" style:family="text">
      <style:text-properties fo:color="#2a6099" loext:opacity="100%" style:font-name="Mono" fo:language="pt" fo:country="BR"/>
    </style:style>
    <style:style style:name="T287" style:family="text">
      <style:text-properties fo:language="pt" fo:country="BR" officeooo:rsid="006dd2a6"/>
    </style:style>
    <style:style style:name="T288" style:family="text">
      <style:text-properties style:font-name="Mono" fo:language="pt" fo:country="BR" officeooo:rsid="006dd2a6"/>
    </style:style>
    <style:style style:name="T28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1" style:family="text">
      <style:text-properties style:text-underline-style="none" officeooo:rsid="00838bc2"/>
    </style:style>
    <style:style style:name="T292" style:family="text">
      <style:text-properties fo:font-weight="bold" fo:background-color="#ffffd7" loext:char-shading-value="0" style:font-weight-asian="bold" style:font-weight-complex="bold"/>
    </style:style>
    <style:style style:name="T293" style:family="text">
      <style:text-properties officeooo:rsid="00838bc2"/>
    </style:style>
    <style:style style:name="T294" style:family="text">
      <style:text-properties officeooo:rsid="0070a435"/>
    </style:style>
    <style:style style:name="T295" style:family="text">
      <style:text-properties officeooo:rsid="006dd2a6"/>
    </style:style>
    <style:style style:name="T296" style:family="text">
      <style:text-properties officeooo:rsid="009255e7"/>
    </style:style>
    <style:style style:name="T297" style:family="text">
      <style:text-properties officeooo:rsid="005c863b"/>
    </style:style>
    <style:style style:name="T298" style:family="text">
      <style:text-properties officeooo:rsid="00e0acc9"/>
    </style:style>
    <style:style style:name="T299" style:family="text">
      <style:text-properties style:text-underline-style="solid" style:text-underline-width="auto" style:text-underline-color="font-color" officeooo:rsid="005ac968"/>
    </style:style>
    <style:style style:name="T300" style:family="text">
      <style:text-properties officeooo:rsid="005ac968"/>
    </style:style>
    <style:style style:name="T301" style:family="text">
      <style:text-properties fo:font-weight="bold" officeooo:rsid="005f76f2" style:font-weight-asian="bold" style:font-weight-complex="bold"/>
    </style:style>
    <style:style style:name="T302" style:family="text">
      <style:text-properties fo:font-weight="bold" officeooo:rsid="005ac968" style:font-weight-asian="bold" style:font-weight-complex="bold"/>
    </style:style>
    <style:style style:name="T303" style:family="text">
      <style:text-properties fo:color="#000000" loext:opacity="100%"/>
    </style:style>
    <style:style style:name="T304" style:family="text">
      <style:text-properties officeooo:rsid="00ad3588"/>
    </style:style>
    <style:style style:name="T305" style:family="text">
      <style:text-properties officeooo:rsid="00d30fd8"/>
    </style:style>
    <style:style style:name="T306" style:family="text">
      <style:text-properties fo:font-variant="normal" fo:text-transform="none" fo:color="#000000" loext:opacity="100%" fo:letter-spacing="normal" fo:font-style="normal" officeooo:rsid="007e76c9"/>
    </style:style>
    <style:style style:name="T307" style:family="text">
      <style:text-properties style:text-underline-style="solid" style:text-underline-width="auto" style:text-underline-color="font-color" fo:font-weight="bold" officeooo:rsid="0064f6ea" style:font-weight-asian="bold" style:font-weight-complex="bold"/>
    </style:style>
    <style:style style:name="T308" style:family="text">
      <style:text-properties style:text-underline-style="solid" style:text-underline-width="auto" style:text-underline-color="font-color" officeooo:rsid="0064f6ea"/>
    </style:style>
    <style:style style:name="T309" style:family="text">
      <style:text-properties style:text-underline-style="solid" style:text-underline-width="auto" style:text-underline-color="font-color" officeooo:rsid="009430ae"/>
    </style:style>
    <style:style style:name="T310" style:family="text">
      <style:text-properties officeooo:rsid="0065ef4f"/>
    </style:style>
    <style:style style:name="T311" style:family="text">
      <style:text-properties fo:color="#000000" loext:opacity="100%" fo:font-weight="bold" officeooo:rsid="0065ef4f" style:font-weight-asian="bold" style:font-weight-complex="bold"/>
    </style:style>
    <style:style style:name="T312" style:family="text">
      <style:text-properties officeooo:rsid="0064f6ea"/>
    </style:style>
    <style:style style:name="T313" style:family="text">
      <style:text-properties fo:font-variant="normal" fo:text-transform="none" fo:color="#000000" loext:opacity="100%" fo:letter-spacing="normal" fo:font-style="normal" officeooo:rsid="00a1db32"/>
    </style:style>
    <style:style style:name="T314" style:family="text">
      <style:text-properties fo:font-variant="normal" fo:text-transform="none" fo:color="#000000" loext:opacity="100%" fo:letter-spacing="normal" fo:font-style="normal" fo:font-weight="bold" officeooo:rsid="00a1db32" style:font-weight-asian="bold" style:font-weight-complex="bold"/>
    </style:style>
    <style:style style:name="T315" style:family="text">
      <style:text-properties fo:font-variant="normal" fo:text-transform="none" fo:color="#000000" loext:opacity="100%" fo:letter-spacing="normal" fo:font-style="normal" fo:font-weight="bold" officeooo:rsid="00d30fd8" style:font-weight-asian="bold" style:font-weight-complex="bold"/>
    </style:style>
    <style:style style:name="T316" style:family="text">
      <style:text-properties fo:font-variant="normal" fo:text-transform="none" fo:color="#000000" loext:opacity="100%" fo:letter-spacing="normal" fo:font-style="normal" officeooo:rsid="005cf7b9"/>
    </style:style>
    <style:style style:name="T317" style:family="text">
      <style:text-properties fo:font-variant="normal" fo:text-transform="none" fo:color="#000000" loext:opacity="100%" fo:letter-spacing="normal" fo:font-style="normal" officeooo:rsid="00cb9a5d"/>
    </style:style>
    <style:style style:name="T31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9" style:family="text">
      <style:text-properties fo:font-variant="normal" fo:text-transform="none" fo:color="#000000" loext:opacity="100%" fo:letter-spacing="normal" fo:font-style="normal" officeooo:rsid="00cc4db3"/>
    </style:style>
    <style:style style:name="T3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2" style:family="text">
      <style:text-properties style:text-underline-style="solid" style:text-underline-width="auto" style:text-underline-color="font-color" fo:font-weight="normal" officeooo:rsid="00851681" style:font-weight-asian="normal" style:font-weight-complex="normal"/>
    </style:style>
    <style:style style:name="T323" style:family="text">
      <style:text-properties officeooo:rsid="00851681"/>
    </style:style>
    <style:style style:name="T324" style:family="text">
      <style:text-properties officeooo:rsid="008762c8"/>
    </style:style>
    <style:style style:name="T325" style:family="text">
      <style:text-properties officeooo:rsid="0085eb72"/>
    </style:style>
    <style:style style:name="T326" style:family="text">
      <style:text-properties fo:language="pt" fo:country="BR" style:text-underline-style="solid" style:text-underline-width="auto" style:text-underline-color="font-color" officeooo:rsid="00851681"/>
    </style:style>
    <style:style style:name="T327" style:family="text">
      <style:text-properties fo:language="pt" fo:country="BR" officeooo:rsid="00851681"/>
    </style:style>
    <style:style style:name="T328" style:family="text">
      <style:text-properties fo:language="pt" fo:country="BR" officeooo:rsid="008762c8"/>
    </style:style>
    <style:style style:name="T329" style:family="text">
      <style:text-properties fo:language="zxx" fo:country="none"/>
    </style:style>
    <style:style style:name="T330" style:family="text">
      <style:text-properties fo:language="pt" fo:country="BR" officeooo:rsid="00889cb6"/>
    </style:style>
    <style:style style:name="T331" style:family="text">
      <style:text-properties fo:language="pt" fo:country="BR" officeooo:rsid="008a6ac8"/>
    </style:style>
    <style:style style:name="T332" style:family="text">
      <style:text-properties fo:language="pt" fo:country="BR" style:text-underline-style="none" officeooo:rsid="00889cb6"/>
    </style:style>
    <style:style style:name="T333" style:family="text">
      <style:text-properties fo:color="#2a6099" loext:opacity="100%" style:font-name="Monospace" fo:font-weight="bold" style:font-weight-asian="bold" style:font-weight-complex="bold"/>
    </style:style>
    <style:style style:name="T334"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335"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336"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337"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338"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339"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340"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341"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342" style:family="text">
      <style:text-properties style:font-name="Liberation Serif" style:text-underline-style="none" fo:font-weight="bold" officeooo:rsid="00605e01" style:font-weight-asian="bold" style:font-weight-complex="bold"/>
    </style:style>
    <style:style style:name="T343" style:family="text">
      <style:text-properties style:font-name="Liberation Serif" style:text-underline-style="none" fo:font-weight="normal" officeooo:rsid="00605e01" style:font-weight-asian="normal" style:font-weight-complex="normal"/>
    </style:style>
    <style:style style:name="T344" style:family="text">
      <style:text-properties style:font-name="Liberation Serif" style:text-underline-style="none" fo:font-weight="normal" officeooo:rsid="00b7c442" style:font-weight-asian="normal" style:font-weight-complex="normal"/>
    </style:style>
    <style:style style:name="T345" style:family="text">
      <style:text-properties style:font-name="Liberation Serif" style:text-underline-style="none" fo:font-weight="normal" officeooo:rsid="00837b9d" style:font-weight-asian="normal" style:font-weight-complex="normal"/>
    </style:style>
    <style:style style:name="T346" style:family="text">
      <style:text-properties style:font-name="Liberation Serif" style:text-underline-style="none" fo:font-weight="normal" officeooo:rsid="00d30fd8" style:font-weight-asian="normal" style:font-weight-complex="normal"/>
    </style:style>
    <style:style style:name="T347" style:family="text">
      <style:text-properties fo:color="#000000" loext:opacity="100%" style:text-underline-style="solid" style:text-underline-width="auto" style:text-underline-color="font-color" officeooo:rsid="009c63ac"/>
    </style:style>
    <style:style style:name="T348" style:family="text">
      <style:text-properties fo:color="#000000" loext:opacity="100%" officeooo:rsid="009c63ac"/>
    </style:style>
    <style:style style:name="T349" style:family="text">
      <style:text-properties fo:color="#000000" loext:opacity="100%" officeooo:rsid="008a6ac8"/>
    </style:style>
    <style:style style:name="T350" style:family="text">
      <style:text-properties fo:color="#000000" loext:opacity="100%" officeooo:rsid="009dac09"/>
    </style:style>
    <style:style style:name="T351" style:family="text">
      <style:text-properties fo:font-weight="bold" officeooo:rsid="00614c29" style:font-weight-asian="bold" style:font-weight-complex="bold"/>
    </style:style>
    <style:style style:name="T352" style:family="text">
      <style:text-properties style:text-underline-style="solid" style:text-underline-width="auto" style:text-underline-color="font-color" officeooo:rsid="00866835"/>
    </style:style>
    <style:style style:name="T353" style:family="text">
      <style:text-properties officeooo:rsid="00849e82"/>
    </style:style>
    <style:style style:name="T354" style:family="text">
      <style:text-properties officeooo:rsid="006b45c5"/>
    </style:style>
    <style:style style:name="T355" style:family="text">
      <style:text-properties officeooo:rsid="00866835"/>
    </style:style>
    <style:style style:name="T35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7" style:family="text">
      <style:text-properties style:font-name="Liberation Serif" style:text-underline-style="none" fo:font-weight="normal" officeooo:rsid="00866835" style:font-weight-asian="normal" style:font-weight-complex="normal"/>
    </style:style>
    <style:style style:name="T35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59" style:family="text">
      <style:text-properties style:font-name="Liberation Serif" style:text-underline-style="none" fo:font-weight="normal" officeooo:rsid="00849e82" style:font-weight-asian="normal" style:font-weight-complex="normal"/>
    </style:style>
    <style:style style:name="T36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68" style:family="text">
      <style:text-properties fo:font-weight="bold" officeooo:rsid="005aeb45" style:font-weight-asian="bold" style:font-weight-complex="bold"/>
    </style:style>
    <style:style style:name="T369" style:family="text">
      <style:text-properties fo:font-weight="bold" officeooo:rsid="009c63ac" style:font-weight-asian="bold" style:font-weight-complex="bold"/>
    </style:style>
    <style:style style:name="T370" style:family="text">
      <style:text-properties officeooo:rsid="009c63ac"/>
    </style:style>
    <style:style style:name="T371" style:family="text">
      <style:text-properties fo:font-variant="normal" fo:text-transform="none" fo:letter-spacing="normal" fo:font-style="normal" officeooo:rsid="009dac09"/>
    </style:style>
    <style:style style:name="T372" style:family="text">
      <style:text-properties fo:font-variant="normal" fo:text-transform="none" fo:letter-spacing="normal" fo:font-style="normal" officeooo:rsid="008a6ac8"/>
    </style:style>
    <style:style style:name="T373" style:family="text">
      <style:text-properties fo:font-variant="normal" fo:text-transform="none" fo:letter-spacing="normal" fo:font-style="normal" officeooo:rsid="009c63ac"/>
    </style:style>
    <style:style style:name="T374" style:family="text">
      <style:text-properties fo:font-variant="normal" fo:text-transform="none" fo:letter-spacing="normal" fo:font-style="normal" style:text-underline-style="solid" style:text-underline-width="auto" style:text-underline-color="font-color" officeooo:rsid="009c63ac"/>
    </style:style>
    <style:style style:name="T375" style:family="text">
      <style:text-properties officeooo:rsid="00b6a30c"/>
    </style:style>
    <style:style style:name="T376"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77"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78" style:family="text">
      <style:text-properties fo:color="#d7ba7d" loext:opacity="100%"/>
    </style:style>
    <style:style style:name="T379" style:family="text">
      <style:text-properties officeooo:rsid="00567faf"/>
    </style:style>
    <style:style style:name="T380" style:family="text">
      <style:text-properties fo:color="#000000" loext:opacity="100%" fo:font-weight="bold" officeooo:rsid="00605e01" style:font-weight-asian="bold" style:font-weight-complex="bold"/>
    </style:style>
    <style:style style:name="T381" style:family="text">
      <style:text-properties style:text-underline-style="solid" style:text-underline-width="auto" style:text-underline-color="font-color" officeooo:rsid="00bcc788"/>
    </style:style>
    <style:style style:name="T382" style:family="text">
      <style:text-properties officeooo:rsid="00bcc788"/>
    </style:style>
    <style:style style:name="T383" style:family="text">
      <style:text-properties officeooo:rsid="0084d3d7"/>
    </style:style>
    <style:style style:name="T384" style:family="text">
      <style:text-properties officeooo:rsid="00cc5d35"/>
    </style:style>
    <style:style style:name="T385"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6" style:family="text">
      <style:text-properties fo:color="#000000" loext:opacity="100%" style:text-line-through-style="none" style:text-line-through-type="none" fo:font-style="normal" officeooo:rsid="0084f7fe" style:font-style-asian="normal" style:font-style-complex="normal"/>
    </style:style>
    <style:style style:name="T387" style:family="text">
      <style:text-properties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officeooo:rsid="00718093" style:font-style-asian="normal" style:font-style-complex="normal"/>
    </style:style>
    <style:style style:name="T389" style:family="text">
      <style:text-properties fo:color="#ff0000" loext:opacity="100%" style:text-line-through-style="none" style:text-line-through-type="none" fo:font-style="normal" style:font-style-asian="normal" style:font-style-complex="normal"/>
    </style:style>
    <style:style style:name="T390"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1" style:family="text">
      <style:text-properties fo:color="#ff0000" loext:opacity="100%" style:text-line-through-style="none" style:text-line-through-type="none" fo:font-style="normal" officeooo:rsid="006f677f" style:font-style-asian="normal" style:font-style-complex="normal"/>
    </style:style>
    <style:style style:name="T392" style:family="text">
      <style:text-properties style:text-line-through-style="none" style:text-line-through-type="none" fo:font-style="normal" officeooo:rsid="006f677f" style:font-style-asian="normal" style:font-style-complex="normal"/>
    </style:style>
    <style:style style:name="T393" style:family="text">
      <style:text-properties officeooo:rsid="00837b9d"/>
    </style:style>
    <style:style style:name="T394" style:family="text">
      <style:text-properties style:text-underline-style="solid" style:text-underline-width="auto" style:text-underline-color="font-color" officeooo:rsid="0072aa8d"/>
    </style:style>
    <style:style style:name="T39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color="#00a933" loext:opacity="100%" fo:font-size="12pt" style:text-underline-style="none" style:font-size-asian="12pt" style:font-size-complex="12pt"/>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5" style:family="text">
      <style:text-properties officeooo:rsid="008d8bc7"/>
    </style:style>
    <style:style style:name="T476" style:family="text">
      <style:text-properties fo:color="#ce181e" loext:opacity="100%" fo:font-weight="bold" style:font-weight-asian="bold" style:font-weight-complex="bold"/>
    </style:style>
    <style:style style:name="T477" style:family="text">
      <style:text-properties fo:color="#ce181e" loext:opacity="100%"/>
    </style:style>
    <style:style style:name="T478" style:family="text">
      <style:text-properties officeooo:rsid="007249aa"/>
    </style:style>
    <style:style style:name="T479" style:family="text">
      <style:text-properties fo:font-weight="bold" officeooo:rsid="007249aa" style:font-weight-asian="bold" style:font-weight-complex="bold"/>
    </style:style>
    <style:style style:name="T480" style:family="text">
      <style:text-properties fo:language="pt" fo:country="BR" officeooo:rsid="00795c94"/>
    </style:style>
    <style:style style:name="T481" style:family="text">
      <style:text-properties fo:language="pt" fo:country="BR" officeooo:rsid="007a56d9"/>
    </style:style>
    <style:style style:name="T482" style:family="text">
      <style:text-properties fo:language="pt" fo:country="BR" style:text-underline-style="solid" style:text-underline-width="auto" style:text-underline-color="font-color" officeooo:rsid="00795c94"/>
    </style:style>
    <style:style style:name="T483" style:family="text">
      <style:text-properties style:font-name="Mono" fo:language="pt" fo:country="BR"/>
    </style:style>
    <style:style style:name="T484" style:family="text">
      <style:text-properties officeooo:rsid="007a978e"/>
    </style:style>
    <style:style style:name="T485" style:family="text">
      <style:text-properties style:font-name="Liberation Mono" fo:font-weight="bold" style:font-weight-asian="bold" style:font-weight-complex="bold"/>
    </style:style>
    <style:style style:name="T486" style:family="text">
      <style:text-properties fo:color="#ff8000" loext:opacity="100%" fo:font-weight="bold" fo:background-color="transparent" loext:char-shading-value="0" style:font-weight-asian="bold" style:font-weight-complex="bold"/>
    </style:style>
    <style:style style:name="T487" style:family="text">
      <style:text-properties style:font-name="Liberation Sans" fo:language="pt" fo:country="BR" officeooo:rsid="01c694eb" style:font-name-asian="Microsoft YaHei" style:font-name-complex="Mangal1"/>
    </style:style>
    <style:style style:name="T488" style:family="text">
      <style:text-properties fo:color="#2a6099" loext:opacity="100%" style:font-name="Mono" fo:language="pt" fo:country="BR" fo:font-weight="bold" style:font-weight-asian="bold" style:font-weight-complex="bold"/>
    </style:style>
    <style:style style:name="T489" style:family="text">
      <style:text-properties fo:color="#2a6099" loext:opacity="100%" style:font-name="Mono" fo:language="pt" fo:country="BR" fo:font-weight="bold" officeooo:rsid="00bcf018" style:font-weight-asian="bold" style:font-weight-complex="bold"/>
    </style:style>
    <style:style style:name="T490" style:family="text">
      <style:text-properties fo:language="pt" fo:country="BR" fo:font-weight="normal" officeooo:rsid="00bcf018" style:font-weight-asian="normal" style:font-weight-complex="normal"/>
    </style:style>
    <style:style style:name="T491" style:family="text">
      <style:text-properties style:font-name="Liberation Sans" fo:language="pt" fo:country="BR" fo:font-weight="normal" officeooo:rsid="01c694eb" style:font-name-asian="Microsoft YaHei" style:font-weight-asian="normal" style:font-name-complex="Mangal1" style:font-weight-complex="normal"/>
    </style:style>
    <style:style style:name="T492" style:family="text">
      <style:text-properties fo:language="pt" fo:country="BR" fo:font-weight="normal" officeooo:rsid="01c694eb" style:font-weight-asian="normal" style:font-weight-complex="normal"/>
    </style:style>
    <style:style style:name="T493" style:family="text">
      <style:text-properties fo:color="#2a6099" loext:opacity="100%" style:font-name="Mono" fo:language="pt" fo:country="BR" fo:font-weight="bold" officeooo:rsid="01c694eb" style:font-weight-asian="bold" style:font-weight-complex="bold"/>
    </style:style>
    <style:style style:name="T494" style:family="text">
      <style:text-properties fo:language="pt" fo:country="BR" fo:font-weight="bold" officeooo:rsid="00bcf018" style:font-weight-asian="bold" style:font-weight-complex="bold"/>
    </style:style>
    <style:style style:name="T495" style:family="text">
      <style:text-properties officeooo:rsid="00c0a2a3"/>
    </style:style>
    <style:style style:name="T496" style:family="text">
      <style:text-properties fo:color="#dcdcaa"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7" style:family="text">
      <style:text-properties fo:color="#d4d4d4"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8" style:family="text">
      <style:text-properties fo:color="#ff7b72"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9" style:family="text">
      <style:text-properties fo:color="#c9d1d9"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500" style:family="text">
      <style:text-properties fo:color="#c9d1d9" loext:opacity="100%" style:font-name="Consolas" fo:font-size="10.5pt" fo:font-weight="normal" fo:background-color="#121314" loext:char-shading-value="0"/>
    </style:style>
    <style:style style:name="T501" style:family="text">
      <style:text-properties fo:color="#d4d4d4" loext:opacity="100%" style:font-name="Consolas" fo:font-size="10.5pt" fo:font-weight="normal" fo:background-color="#121314" loext:char-shading-value="0"/>
    </style:style>
    <style:style style:name="T502" style:family="text">
      <style:text-properties fo:color="#a5d6ff" loext:opacity="100%" style:font-name="Consolas" fo:font-size="10.5pt" fo:font-weight="normal" fo:background-color="#121314" loext:char-shading-value="0"/>
    </style:style>
    <style:style style:name="T503" style:family="text">
      <style:text-properties fo:color="#d7ba7d" loext:opacity="100%" style:font-name="Consolas" fo:font-size="10.5pt" fo:font-weight="normal" fo:background-color="#121314" loext:char-shading-value="0"/>
    </style:style>
    <style:style style:name="T504" style:family="text">
      <style:text-properties fo:color="#569cd6" loext:opacity="100%" style:font-name="Consolas" fo:font-size="10.5pt" fo:font-weight="normal" fo:background-color="#121314" loext:char-shading-value="0"/>
    </style:style>
    <style:style style:name="T505" style:family="text">
      <style:text-properties fo:color="#8b949e" loext:opacity="100%" style:font-name="Consolas" fo:font-size="10.5pt" fo:font-weight="normal" fo:background-color="#121314" loext:char-shading-value="0"/>
    </style:style>
    <style:style style:name="T506" style:family="text">
      <style:text-properties fo:color="#c586c0" loext:opacity="100%" style:font-name="Consolas" fo:font-size="10.5pt" fo:font-weight="normal" fo:background-color="#121314" loext:char-shading-value="0"/>
    </style:style>
    <style:style style:name="T507" style:family="text">
      <style:text-properties fo:color="#dcdcaa" loext:opacity="100%" style:font-name="Consolas" fo:font-size="10.5pt" fo:font-weight="normal" fo:background-color="#121314" loext:char-shading-value="0"/>
    </style:style>
    <style:style style:name="T508" style:family="text">
      <style:text-properties fo:color="#b5cea8" loext:opacity="100%" style:font-name="Consolas" fo:font-size="10.5pt" fo:font-weight="normal" fo:background-color="#121314" loext:char-shading-value="0"/>
    </style:style>
    <style:style style:name="T509" style:family="text">
      <style:text-properties fo:color="#d4d4d4" loext:opacity="100%" style:font-name="Consolas" fo:font-size="10.5pt" fo:font-weight="normal"/>
    </style:style>
    <style:style style:name="T510" style:family="text">
      <style:text-properties style:font-name="Consolas" fo:font-size="10.5pt" fo:font-weight="normal"/>
    </style:style>
    <style:style style:name="T511" style:family="text">
      <style:text-properties fo:color="#c586c0" loext:opacity="100%" style:font-name="Consolas" fo:font-size="10.5pt" fo:font-weight="normal"/>
    </style:style>
    <style:style style:name="T512" style:family="text">
      <style:text-properties fo:color="#dcdcaa" loext:opacity="100%" style:font-name="Consolas" fo:font-size="10.5pt" fo:font-weight="normal"/>
    </style:style>
    <style:style style:name="T513" style:family="text">
      <style:text-properties fo:color="#c9d1d9" loext:opacity="100%" style:font-name="Consolas" fo:font-size="10.5pt" fo:font-weight="normal"/>
    </style:style>
    <style:style style:name="T514" style:family="text">
      <style:text-properties fo:color="#a5d6ff" loext:opacity="100%" style:font-name="Consolas" fo:font-size="10.5pt" fo:font-weight="normal"/>
    </style:style>
    <style:style style:name="T515" style:family="text">
      <style:text-properties style:font-name="Liberation Serif" fo:language="pt" fo:country="BR" officeooo:rsid="00c06c93"/>
    </style:style>
    <style:style style:name="T516" style:family="text">
      <style:text-properties fo:language="pt" fo:country="BR" fo:font-weight="normal" officeooo:rsid="020339ba" style:font-weight-asian="normal" style:font-weight-complex="normal"/>
    </style:style>
    <style:style style:name="T517" style:family="text">
      <style:text-properties fo:language="pt" fo:country="BR" officeooo:rsid="020339ba"/>
    </style:style>
    <style:style style:name="T518" style:family="text">
      <style:text-properties fo:color="#dcdcaa" loext:opacity="100%" style:font-name="Consolas" fo:font-size="10.5pt" fo:font-weight="normal" fo:background-color="#1f1f1f" loext:char-shading-value="0"/>
    </style:style>
    <style:style style:name="T519" style:family="text">
      <style:text-properties fo:color="#d4d4d4" loext:opacity="100%" fo:background-color="#1f1f1f" loext:char-shading-value="0"/>
    </style:style>
    <style:style style:name="T520" style:family="text">
      <style:text-properties officeooo:rsid="00aeb741"/>
    </style:style>
    <style:style style:name="T521" style:family="text">
      <style:text-properties officeooo:rsid="00ad5728"/>
    </style:style>
    <style:style style:name="T522" style:family="text">
      <style:text-properties fo:color="#2a6099" loext:opacity="100%" style:font-name="Mono" fo:language="pt" fo:country="BR" fo:font-weight="bold" officeooo:rsid="00ad5728" style:font-weight-asian="bold" style:font-weight-complex="bold"/>
    </style:style>
    <style:style style:name="T523" style:family="text">
      <style:text-properties fo:language="pt" fo:country="BR" fo:font-weight="normal" officeooo:rsid="00aeb741" style:font-weight-asian="normal" style:font-weight-complex="normal"/>
    </style:style>
    <style:style style:name="T524" style:family="text">
      <style:text-properties fo:language="pt" fo:country="BR" fo:font-weight="normal" officeooo:rsid="00ad5728" style:font-weight-asian="normal" style:font-weight-complex="normal"/>
    </style:style>
    <style:style style:name="T525" style:family="text">
      <style:text-properties fo:language="pt" fo:country="BR" officeooo:rsid="00ad5728"/>
    </style:style>
    <style:style style:name="T526" style:family="text">
      <style:text-properties fo:language="pt" fo:country="BR" officeooo:rsid="007b90a0"/>
    </style:style>
    <style:style style:name="T527" style:family="text">
      <style:text-properties fo:language="pt" fo:country="BR" officeooo:rsid="00bcaafb"/>
    </style:style>
    <style:style style:name="T528" style:family="text">
      <style:text-properties style:font-name="Mono" fo:language="pt" fo:country="BR" officeooo:rsid="007b90a0"/>
    </style:style>
    <style:style style:name="T529" style:family="text">
      <style:text-properties style:font-name="Mono" fo:language="pt" fo:country="BR" officeooo:rsid="00b9f036"/>
    </style:style>
    <style:style style:name="T530" style:family="text">
      <style:text-properties fo:color="#2a6099" loext:opacity="100%" style:font-name="Mono" fo:font-weight="bold" officeooo:rsid="00ad5728" style:font-weight-asian="bold" style:font-weight-complex="bold"/>
    </style:style>
    <style:style style:name="T531" style:family="text">
      <style:text-properties fo:color="#ff4000" loext:opacity="100%" style:font-name="Mono" fo:font-weight="bold" officeooo:rsid="00bb4aaa" style:font-weight-asian="bold" style:font-weight-complex="bold"/>
    </style:style>
    <style:style style:name="T532" style:family="text">
      <style:text-properties officeooo:rsid="00bca7d6"/>
    </style:style>
    <style:style style:name="T533" style:family="text">
      <style:text-properties fo:color="#ce9178" loext:opacity="100%" style:font-name="Consolas" fo:font-size="10.5pt" fo:font-weight="normal" fo:background-color="#1f1f1f" loext:char-shading-value="0"/>
    </style:style>
    <style:style style:name="T534" style:family="text">
      <style:text-properties fo:color="#c586c0" loext:opacity="100%" style:font-name="Consolas" fo:font-size="10.5pt" fo:font-weight="normal" fo:background-color="#1f1f1f" loext:char-shading-value="0"/>
    </style:style>
    <style:style style:name="T535" style:family="text">
      <style:text-properties fo:color="#6a9955" loext:opacity="100%" style:font-name="Consolas" fo:font-size="10.5pt" fo:font-weight="normal" fo:background-color="#1f1f1f" loext:char-shading-value="0"/>
    </style:style>
    <style:style style:name="T536" style:family="text">
      <style:text-properties officeooo:rsid="00bcaafb"/>
    </style:style>
    <style:style style:name="T537" style:family="text">
      <style:text-properties fo:color="#2a6099" loext:opacity="100%" style:font-name="Mono" fo:font-weight="bold" officeooo:rsid="00bb4aaa" style:font-weight-asian="bold" style:font-weight-complex="bold"/>
    </style:style>
    <style:style style:name="T538" style:family="text">
      <style:text-properties officeooo:rsid="00bb4aaa"/>
    </style:style>
    <style:style style:name="T539" style:family="text">
      <style:text-properties style:font-name="Liberation Sans" fo:language="pt" fo:country="BR" officeooo:rsid="00b3e740" style:font-name-asian="Microsoft YaHei" style:font-name-complex="Mangal1"/>
    </style:style>
    <style:style style:name="T540" style:family="text">
      <style:text-properties style:font-name="Liberation Sans" fo:language="pt" fo:country="BR" officeooo:rsid="00c86894" style:font-name-asian="Microsoft YaHei" style:font-name-complex="Mangal1"/>
    </style:style>
    <style:style style:name="T541"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42"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43"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44" style:family="text">
      <style:text-properties fo:language="pt" fo:country="BR" officeooo:rsid="00bf1a17"/>
    </style:style>
    <style:style style:name="T545" style:family="text">
      <style:text-properties officeooo:rsid="00c4e865"/>
    </style:style>
    <style:style style:name="T546" style:family="text">
      <style:text-properties fo:language="pt" fo:country="BR" fo:font-weight="normal" officeooo:rsid="00bf1a17" style:font-weight-asian="normal" style:font-weight-complex="normal"/>
    </style:style>
    <style:style style:name="T547" style:family="text">
      <style:text-properties fo:language="pt" fo:country="BR" fo:font-weight="normal" officeooo:rsid="00c30b3d" style:font-weight-asian="normal" style:font-weight-complex="normal"/>
    </style:style>
    <style:style style:name="T548" style:family="text">
      <style:text-properties fo:language="pt" fo:country="BR" fo:font-weight="normal" officeooo:rsid="0204338d" style:font-weight-asian="normal" style:font-weight-complex="normal"/>
    </style:style>
    <style:style style:name="T549" style:family="text">
      <style:text-properties fo:font-weight="bold" officeooo:rsid="0204338d" style:font-weight-asian="bold" style:font-weight-complex="bold"/>
    </style:style>
    <style:style style:name="T550" style:family="text">
      <style:text-properties fo:language="pt" fo:country="BR" fo:font-weight="normal" officeooo:rsid="0200fc29" style:font-weight-asian="normal" style:font-weight-complex="normal"/>
    </style:style>
    <style:style style:name="T551" style:family="text">
      <style:text-properties fo:language="pt" fo:country="BR" fo:font-weight="bold" officeooo:rsid="01dcbca4" style:font-weight-asian="bold" style:font-weight-complex="bold"/>
    </style:style>
    <style:style style:name="T552" style:family="text">
      <style:text-properties fo:language="pt" fo:country="BR" fo:font-weight="normal" officeooo:rsid="01dcbca4" style:font-weight-asian="normal" style:font-weight-complex="normal"/>
    </style:style>
    <style:style style:name="T553" style:family="text">
      <style:text-properties fo:language="pt" fo:country="BR" fo:font-weight="normal" officeooo:rsid="020b8242" style:font-weight-asian="normal" style:font-weight-complex="normal"/>
    </style:style>
    <style:style style:name="T554" style:family="text">
      <style:text-properties fo:language="pt" fo:country="BR" officeooo:rsid="01dcbca4"/>
    </style:style>
    <style:style style:name="T555" style:family="text">
      <style:text-properties fo:language="pt" fo:country="BR" officeooo:rsid="00b0747f"/>
    </style:style>
    <style:style style:name="T556" style:family="text">
      <style:text-properties fo:language="pt" fo:country="BR" officeooo:rsid="00c86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oda classe possui um <text:span text:style-name="T52">método </text:span><text:span text:style-name="T111">mágico</text:span> <text:span text:style-name="T112">chamado </text:span><text:span text:style-name="T13">construtor</text:span> <text:span text:style-name="T113">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Para <text:span text:style-name="T114">criar um método Construtor</text:span>, <text:span text:style-name="T114">declare-o</text:span> com <text:span text:style-name="T16">duplo underline</text:span><text:span text:style-name="T88">. </text:span><text:span text:style-name="T115">Esse método </text:span><text:span text:style-name="T109">não pode ter declaração de retorno</text:span><text:span text:style-name="T115"> pois seu retorno já é implícito (o próprio objeto recém-criado). </text:span></text:p>
      <text:p text:style-name="P47"/>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0">Promoção de propriedades:</text:p>
      <text:p text:style-name="P51">Quando é definido um <text:span text:style-name="T16">modificador de acesso</text:span> no método construtor, esse <text:span text:style-name="T13">parâmetro </text:span><text:span text:style-name="T116">já </text:span><text:span text:style-name="T13">é promovido a</text:span><text:span text:style-name="T116">utomaticamente a</text:span><text:span text:style-name="T13"> uma propriedade </text:span>da <text:span text:style-name="T117">própria </text:span>classe. Exemplo:</text:p>
      <text:p text:style-name="P52"><text:line-break/><text:span text:style-name="T118">public</text:span><text:span text:style-name="T119"> </text:span><text:span text:style-name="T118">function</text:span><text:span text:style-name="T119"> </text:span><text:span text:style-name="T120">__construct</text:span><text:span text:style-name="T119">(){<text:tab/></text:span></text:p>
      <text:p text:style-name="P53"><text:span text:style-name="T121"><text:tab/>$this</text:span><text:span text:style-name="T122">-&gt;</text:span><text:span text:style-name="T123">nome</text:span><text:span text:style-name="T122"> = </text:span><text:span text:style-name="T123">$nome</text:span><text:span text:style-name="T122">;<text:tab/><text:tab/><text:tab/></text:span></text:p>
      <text:p text:style-name="P53"><text:span text:style-name="T121"><text:tab/>$this</text:span><text:span text:style-name="T122">-&gt;</text:span><text:span text:style-name="T123">preco</text:span><text:span text:style-name="T122"> = </text:span><text:span text:style-name="T123">$preco</text:span><text:span text:style-name="T122"><text:tab/><text:tab/><text:tab/></text:span></text:p>
      <text:p text:style-name="P54">}<text:tab/><text:tab/><text:tab/><text:tab/><text:tab/><text:tab/><text:tab/></text:p>
      <text:p text:style-name="P21"/>
      <text:p text:style-name="P55"><text:span text:style-name="T121">public</text:span><text:span text:style-name="T122"> </text:span><text:span text:style-name="T121">function</text:span><text:span text:style-name="T122"> </text:span><text:span text:style-name="T124">__construct</text:span><text:span text:style-name="T122">(<text:tab/><text:tab/></text:span></text:p>
      <text:p text:style-name="P56"><text:span text:style-name="T121"><text:s text:c="4"/>p</text:span><text:span text:style-name="T125">ublic</text:span><text:span text:style-name="T122"> </text:span><text:span text:style-name="T121">string</text:span><text:span text:style-name="T122"> </text:span><text:span text:style-name="T123">$nome</text:span><text:span text:style-name="T122">;<text:tab/><text:tab/><text:tab/></text:span></text:p>
      <text:p text:style-name="P55"><text:span text:style-name="T121"><text:s text:c="4"/>p</text:span><text:span text:style-name="T125">ublic</text:span><text:span text:style-name="T122"> </text:span><text:span text:style-name="T121">float</text:span><text:span text:style-name="T122"> </text:span><text:span text:style-name="T123">$preço</text:span><text:span text:style-name="T122">;<text:tab/><text:tab/><text:tab/></text:span></text:p>
      <text:p text:style-name="P57">){}<text:tab/><text:tab/><text:tab/><text:tab/><text:tab/><text:tab/><text:tab/></text:p>
      <text:p text:style-name="P21"/>
      <text:p text:style-name="P58"/>
      <text:p text:style-name="P58"/>
      <text:p text:style-name="P58"/>
      <text:p text:style-name="P58">DICA: para gerar código automaticamente de métodos acessores, constru<text:span text:style-name="T86">c</text:span>tor, loggers, equals, etc: use o atalho Alt+insert (ou botão direito + <text:s/>inserir_código) e pronto! O NetBeans implementará os métodos <text:span text:style-name="T126">automaticamente</text:span>.</text:p>
      <text:p text:style-name="P59"><text:span text:style-name="T10">No PHP 8.1, a cláusula </text:span><text:span text:style-name="Source_20_Text"><text:span text:style-name="T127">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28">Ela</text:span><text:span text:style-name="T10"> útil para garantir que certas propriedades de um objeto não sejam alteradas acidentalmente depois de inicializadas, aumentando a segurança do código </text:span><text:span text:style-name="T129">e eliminando métodos getters e setters desnecessários.</text:span></text:p>
      <text:p text:style-name="P21"/>
      <text:p text:style-name="P60"><text:span text:style-name="T130">Porém, m</text:span><text:span text:style-name="T10">esmo que </text:span><text:span text:style-name="T130">um</text:span><text:span text:style-name="T10">a propriedade seja </text:span><text:span text:style-name="Source_20_Text"><text:span text:style-name="T10">readonly</text:span></text:span><text:span text:style-name="T10">, </text:span><text:span text:style-name="Strong_20_Emphasis"><text:span text:style-name="T10">se </text:span></text:span><text:span text:style-name="Strong_20_Emphasis"><text:span text:style-name="T130">ela </text:span></text:span><text:span text:style-name="Strong_20_Emphasis"><text:span text:style-name="T10">for um objeto, seus atributos internos ainda podem ser modificados</text:span></text:span><text:span text:style-name="Strong_20_Emphasis"><text:span text:style-name="T131">, </text:span></text:span><text:span text:style-name="Strong_20_Emphasis"><text:span text:style-name="T132">pois a referência à variável se mantém a mesma. E</text:span></text:span><text:span text:style-name="Strong_20_Emphasis"><text:span text:style-name="T133">xemplo:</text:span></text:span></text:p>
      <text:p text:style-name="P61"><text:span text:style-name="T121">class</text:span><text:span text:style-name="T122"> </text:span><text:span text:style-name="T134">Endereco</text:span><text:span text:style-name="T122"> {<text:tab/><text:tab/><text:tab/><text:tab/><text:tab/><text:tab/><text:tab/><text:tab/><text:tab/></text:span></text:p>
      <text:p text:style-name="P62"><text:span text:style-name="T121"><text:tab/>public</text:span><text:span text:style-name="T122"> </text:span><text:span text:style-name="T121">string</text:span><text:span text:style-name="T122"> </text:span><text:span text:style-name="T123">$rua</text:span><text:span text:style-name="T122">;<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21">string</text:span><text:span text:style-name="T122"> </text:span><text:span text:style-name="T123">$rua</text:span><text:span text:style-name="T122">) {<text:tab/><text:tab/><text:tab/><text:tab/></text:span></text:p>
      <text:p text:style-name="P62"><text:span text:style-name="T121"><text:tab/><text:tab/>$this</text:span><text:span text:style-name="T122">-&gt;</text:span><text:span text:style-name="T123">rua</text:span><text:span text:style-name="T122"> = </text:span><text:span text:style-name="T123">$rua</text:span><text:span text:style-name="T122">;<text:tab/><text:tab/><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1">class</text:span><text:span text:style-name="T122"> </text:span><text:span text:style-name="T134">Cliente</text:span><text:span text:style-name="T122"> {<text:tab/><text:tab/><text:tab/><text:tab/><text:tab/><text:tab/><text:tab/><text:tab/><text:tab/></text:span></text:p>
      <text:p text:style-name="P64"><text:span text:style-name="T135"><text:tab/>public</text:span><text:span text:style-name="T136"> </text:span><text:span text:style-name="T135">readonly</text:span><text:span text:style-name="T136"> </text:span><text:span text:style-name="T137">Endereco</text:span><text:span text:style-name="T136"> </text:span><text:span text:style-name="T138">$endereco</text:span><text:span text:style-name="T136">;<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34">Endereco</text:span><text:span text:style-name="T122"> </text:span><text:span text:style-name="T123">$endereco</text:span><text:span text:style-name="T122">) {<text:tab/><text:tab/><text:tab/></text:span></text:p>
      <text:p text:style-name="P62"><text:span text:style-name="T121"><text:tab/><text:tab/>$this</text:span><text:span text:style-name="T122">-&gt;</text:span><text:span text:style-name="T123">endereco</text:span><text:span text:style-name="T122"> = </text:span><text:span text:style-name="T123">$endereco</text:span><text:span text:style-name="T122">;<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endereco</text:span><text:span text:style-name="T122"> = </text:span><text:span text:style-name="T121">new</text:span><text:span text:style-name="T122"> </text:span><text:span text:style-name="T134">Endereco</text:span><text:span text:style-name="T122">(</text:span><text:span text:style-name="T139">"Rua A"</text:span><text:span text:style-name="T122">);<text:tab/><text:tab/><text:tab/><text:tab/><text:tab/><text:tab/></text:span></text:p>
      <text:p text:style-name="P62"><text:span text:style-name="T123">$cliente</text:span><text:span text:style-name="T122"> = </text:span><text:span text:style-name="T121">new</text:span><text:span text:style-name="T122"> </text:span><text:span text:style-name="T134">Cliente</text:span><text:span text:style-name="T122">(</text:span><text:span text:style-name="T123">$endereco</text:span><text:span text:style-name="T122">);<text:tab/><text:tab/><text:tab/><text:tab/><text:tab/><text:tab/></text:span></text:p>
      <text:p text:style-name="P63"><text:tab/><text:tab/><text:tab/><text:tab/><text:tab/><text:tab/><text:tab/><text:tab/><text:tab/><text:tab/><text:tab/></text:p>
      <text:p text:style-name="P65">// Podemos modificar os atributos do objeto Endereco<text:tab/><text:tab/><text:tab/></text:p>
      <text:p text:style-name="P62"><text:span text:style-name="T123">$cliente</text:span><text:span text:style-name="T122">-&gt;</text:span><text:span text:style-name="T123">endereco</text:span><text:span text:style-name="T122">-&gt;</text:span><text:span text:style-name="T123">rua</text:span><text:span text:style-name="T122"> = </text:span><text:span text:style-name="T139">"Rua B"</text:span><text:span text:style-name="T122">; </text:span><text:span text:style-name="T140">// Isso funciona!<text:tab/><text:tab/><text:tab/></text:span></text:p>
      <text:p text:style-name="P65"><text:tab/><text:tab/><text:tab/><text:tab/><text:tab/><text:tab/><text:tab/><text:tab/><text:tab/><text:tab/><text:tab/></text:p>
      <text:p text:style-name="P65">// Mas não podemos trocar a referência da propriedade readonly<text:tab/></text:p>
      <text:p text:style-name="P62"><text:span text:style-name="T123">$cliente</text:span><text:span text:style-name="T122">-&gt;</text:span><text:span text:style-name="T123">endereco</text:span><text:span text:style-name="T122"> = </text:span><text:span text:style-name="T121">new</text:span><text:span text:style-name="T122"> </text:span><text:span text:style-name="T134">Endereco</text:span><text:span text:style-name="T122">(</text:span><text:span text:style-name="T139">"Rua C"</text:span><text:span text:style-name="T122">); </text:span><text:span text:style-name="T140">// Erro fatal!<text:tab/><text:tab/></text:span></text:p>
      <text:p text:style-name="P66"/>
      <text:p text:style-name="P21"/>
      <text:p text:style-name="P67">Se, e somente se, todas as propriedades de uma classe forem readonly, então é possível retirar esse modificador das propriedades e atribuí-lo diretamente na classe. Exemplo:</text:p>
      <text:p text:style-name="P68"><text:span text:style-name="T141">readonly class</text:span><text:span text:style-name="T142"> </text:span><text:span text:style-name="T143">Endereco</text:span><text:span text:style-name="T142"> {</text:span></text:p>
      <text:p text:style-name="P21"/>
      <text:p text:style-name="P21"/>
      <text:p text:style-name="P21"/>
      <text:p text:style-name="P69"/>
      <text:p text:style-name="P70"/>
      <text:p text:style-name="P71"><text:span text:style-name="T10">No PHP 8.1, a cláusula </text:span><text:span text:style-name="Source_20_Text"><text:span text:style-name="T127">enum</text:span></text:span><text:span text:style-name="T10"> foi introduzida para definir </text:span><text:span text:style-name="Strong_20_Emphasis"><text:span text:style-name="T10">enumeradores</text:span></text:span><text:span text:style-name="T10">, que são </text:span><text:span text:style-name="T144">tipos especiais que representam um conjunto fixo de valores</text:span><text:span text:style-name="T10">. </text:span><text:span text:style-name="T145">Sintaxe básica:</text:span></text:p>
      <text:p text:style-name="P72"><text:span text:style-name="T146">enum</text:span><text:span text:style-name="T147"> </text:span><text:span text:style-name="T148">StatusPedido</text:span><text:span text:style-name="T147"> {<text:tab/><text:tab/><text:tab/><text:line-break/><text:tab/></text:span><text:span text:style-name="T135">case</text:span><text:span text:style-name="T136"> Pendente;<text:tab/><text:tab/><text:tab/><text:line-break/><text:tab/></text:span><text:span text:style-name="T135">case</text:span><text:span text:style-name="T136"> Processando;<text:tab/><text:tab/><text:tab/><text:line-break/><text:tab/></text:span><text:span text:style-name="T135">case</text:span><text:span text:style-name="T136"> Concluido;<text:tab/><text:tab/><text:tab/><text:line-break/>}<text:tab/><text:tab/><text:tab/><text:tab/><text:tab/><text:tab/><text:line-break/></text:span><text:span text:style-name="T138">$status</text:span><text:span text:style-name="T136"> = </text:span><text:span text:style-name="T137">StatusPedido</text:span><text:span text:style-name="T136">::Pendente;<text:tab/></text:span></text:p>
      <text:p text:style-name="P72"/>
      <text:p text:style-name="P73">Além de propriedades, <text:span text:style-name="T13">os enums podem conter métodos</text:span>. Exemplo:</text:p>
      <text:p text:style-name="P74"><text:span text:style-name="T121">enum</text:span><text:span text:style-name="T122"> </text:span><text:span text:style-name="T134">Status</text:span><text:span text:style-name="T122"> {<text:tab/><text:tab/><text:tab/><text:tab/><text:tab/><text:tab/><text:tab/><text:tab/><text:tab/></text:span></text:p>
      <text:p text:style-name="P62"><text:span text:style-name="T121"><text:tab/>case</text:span><text:span text:style-name="T122"> Ativo;<text:tab/><text:tab/><text:tab/><text:tab/><text:tab/><text:tab/><text:tab/><text:tab/><text:tab/></text:span></text:p>
      <text:p text:style-name="P62"><text:span text:style-name="T121"><text:tab/>case</text:span><text:span text:style-name="T122"> Inativo;<text:tab/><text:tab/><text:tab/><text:tab/><text:tab/><text:tab/><text:tab/><text:tab/></text:span></text:p>
      <text:p text:style-name="P64"><text:span text:style-name="T135"><text:tab/>case</text:span><text:span text:style-name="T136"> Pendente;<text:tab/><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descricao</text:span><text:span text:style-name="T122">(): </text:span><text:span text:style-name="T121">string</text:span><text:span text:style-name="T122"> {<text:tab/><text:tab/><text:tab/><text:tab/></text:span></text:p>
      <text:p text:style-name="P62"><text:span text:style-name="T149"><text:tab/><text:tab/>return</text:span><text:span text:style-name="T122"> </text:span><text:span text:style-name="T149">match</text:span><text:span text:style-name="T122">(</text:span><text:span text:style-name="T121">$this</text:span><text:span text:style-name="T122">) {<text:tab/><text:tab/><text:tab/><text:tab/><text:tab/><text:tab/></text:span></text:p>
      <text:p text:style-name="P62"><text:span text:style-name="T121"><text:tab/><text:tab/><text:tab/>self</text:span><text:span text:style-name="T122">::Ativo </text:span><text:span text:style-name="T121">=&gt;</text:span><text:span text:style-name="T122"> </text:span><text:span text:style-name="T139">"Usuário ativo"</text:span><text:span text:style-name="T122">,<text:tab/><text:tab/><text:tab/></text:span></text:p>
      <text:p text:style-name="P62"><text:span text:style-name="T121"><text:tab/><text:tab/><text:tab/>self</text:span><text:span text:style-name="T122">::Inativo </text:span><text:span text:style-name="T121">=&gt;</text:span><text:span text:style-name="T122"> </text:span><text:span text:style-name="T139">"Usuário inativo"</text:span><text:span text:style-name="T122">,<text:tab/><text:tab/><text:tab/></text:span></text:p>
      <text:p text:style-name="P62"><text:span text:style-name="T121"><text:tab/><text:tab/><text:tab/>self</text:span><text:span text:style-name="T122">::Pendente </text:span><text:span text:style-name="T121">=&gt;</text:span><text:span text:style-name="T122"> </text:span><text:span text:style-name="T139">"Usuário pendente"</text:span><text:span text:style-name="T122">,<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status</text:span><text:span text:style-name="T122"> = </text:span><text:span text:style-name="T134">Status</text:span><text:span text:style-name="T122">::Pendente;<text:tab/><text:tab/><text:tab/><text:tab/><text:tab/><text:tab/><text:tab/></text:span></text:p>
      <text:p text:style-name="P62"><text:span text:style-name="T124">echo</text:span><text:span text:style-name="T122"> </text:span><text:span text:style-name="T123">$status</text:span><text:span text:style-name="T122">-&gt;</text:span><text:span text:style-name="T124">descricao</text:span><text:span text:style-name="T122">(); </text:span><text:span text:style-name="T140">// "Usuário pendente"<text:tab/><text:tab/><text:tab/><text:tab/></text:span></text:p>
      <text:p text:style-name="P75"/>
      <text:h text:style-name="P76"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0">Exemplo:</text:span></text:h>
      <text:h text:style-name="P77" text:outline-level="1"><text:span text:style-name="T121">enum</text:span><text:span text:style-name="T122"> </text:span><text:span text:style-name="T134">StatusPedido</text:span><text:span text:style-name="T122">: </text:span><text:span text:style-name="T121">int</text:span><text:span text:style-name="T122"> {<text:tab/><text:tab/><text:tab/></text:span></text:h>
      <text:p text:style-name="P62"><text:span text:style-name="T121"><text:tab/>case</text:span><text:span text:style-name="T122"> Pago = </text:span><text:span text:style-name="T151">1</text:span><text:span text:style-name="T122">;<text:tab/><text:tab/><text:tab/></text:span></text:p>
      <text:p text:style-name="P62"><text:span text:style-name="T121"><text:tab/>case</text:span><text:span text:style-name="T122"> Pendente = </text:span><text:span text:style-name="T151">2</text:span><text:span text:style-name="T122">;<text:tab/><text:tab/><text:tab/></text:span></text:p>
      <text:p text:style-name="P62"><text:span text:style-name="T121"><text:tab/>case</text:span><text:span text:style-name="T122"> Cancelado = </text:span><text:span text:style-name="T151">3</text:span><text:span text:style-name="T122">;<text:tab/><text:tab/></text:span></text:p>
      <text:p text:style-name="P63">}<text:tab/><text:tab/><text:tab/><text:tab/><text:tab/><text:tab/></text:p>
      <text:p text:style-name="P62"><text:span text:style-name="T124">echo</text:span><text:span text:style-name="T122"> </text:span><text:span text:style-name="T134">StatusPedido</text:span><text:span text:style-name="T122">::Pago-&gt;</text:span><text:span text:style-name="T123">value</text:span><text:span text:style-name="T122">; </text:span><text:span text:style-name="T140">// 1<text:tab/></text:span></text:p>
      <text:h text:style-name="P76" text:outline-level="1"/>
      <text:h text:style-name="P76" text:outline-level="1"/>
      <text:h text:style-name="P78" text:outline-level="1"><text:span text:style-name="T10">Quando um enum tem valores (</text:span><text:span text:style-name="Source_20_Text"><text:span text:style-name="T10">backed enum</text:span></text:span><text:span text:style-name="T10">), podemos </text:span><text:span text:style-name="T152">recuperar um enum pelo seu valor</text:span><text:span text:style-name="T153"> usando o</text:span><text:span text:style-name="T154">s</text:span><text:span text:style-name="T153"> método</text:span><text:span text:style-name="T154">s</text:span><text:span text:style-name="T153"> </text:span><text:span text:style-name="Source_20_Text"><text:span text:style-name="T155">from()</text:span></text:span><text:span text:style-name="T153"> ou </text:span><text:span text:style-name="Source_20_Text"><text:span text:style-name="T155">tryFrom()</text:span></text:span><text:span text:style-name="T10"> </text:span><text:span text:style-name="T156">e também pelas propriedades </text:span><text:span text:style-name="Source_20_Text"><text:span text:style-name="T155">value</text:span></text:span><text:span text:style-name="T156"> e </text:span><text:span text:style-name="Source_20_Text"><text:span text:style-name="T155">name</text:span></text:span><text:span text:style-name="T156">. </text:span><text:span text:style-name="T157">Exemplo:</text:span></text:h>
      <text:h text:style-name="P79" text:outline-level="1"><text:span text:style-name="T158">$status</text:span><text:span text:style-name="T159"> = </text:span><text:span text:style-name="T160">StatusPedido</text:span><text:span text:style-name="T159">::</text:span><text:span text:style-name="T161">from</text:span><text:span text:style-name="T159">(</text:span><text:span text:style-name="T162">1</text:span><text:span text:style-name="T159">); </text:span><text:span text:style-name="T163">// Retorna StatusPedido::Pago<text:tab/><text:tab/><text:tab/></text:span></text:h>
      <text:p text:style-name="P80"><text:span text:style-name="T124">echo</text:span><text:span text:style-name="T122"> </text:span><text:span text:style-name="T123">$status</text:span><text:span text:style-name="T122">-&gt;</text:span><text:span text:style-name="T123">name</text:span><text:span text:style-name="T122">; </text:span><text:span text:style-name="T140">// "Pago"<text:tab/><text:tab/><text:tab/><text:tab/><text:tab/><text:tab/><text:tab/><text:tab/><text:tab/></text:span></text:p>
      <text:p text:style-name="P80"><text:span text:style-name="T123">$status</text:span><text:span text:style-name="T122"> = </text:span><text:span text:style-name="T134">StatusPedido</text:span><text:span text:style-name="T122">::</text:span><text:span text:style-name="T124">tryFrom</text:span><text:span text:style-name="T122">(</text:span><text:span text:style-name="T151">99</text:span><text:span text:style-name="T122">); </text:span><text:span text:style-name="T140">// Retorna null (não existe esse valor)<text:tab/></text:span></text:p>
      <text:p text:style-name="P80"><text:span text:style-name="T124">var_dump</text:span><text:span text:style-name="T122">(</text:span><text:span text:style-name="T123">$objeto</text:span><text:span text:style-name="T122">→</text:span><text:span text:style-name="T164">S</text:span><text:span text:style-name="T123">tatusPedido→</text:span><text:span text:style-name="T122">na</text:span><text:span text:style-name="T123">me);</text:span><text:span text:style-name="T122"><text:tab/><text:tab/><text:tab/><text:tab/><text:tab/><text:tab/><text:tab/><text:tab/></text:span></text:p>
      <text:h text:style-name="P81" text:outline-level="1"/>
      <text:h text:style-name="P82" text:outline-level="1"><text:span text:style-name="T157">É </text:span><text:span text:style-name="T165">possí<text:tab/>vel listar todas as opções de enums através de seu método estático </text:span><text:span text:style-name="Source_20_Text"><text:span text:style-name="T155">cases()</text:span></text:span><text:span text:style-name="Source_20_Text"><text:span text:style-name="T165">. Exemplo:</text:span></text:span></text:h>
      <text:h text:style-name="P83" text:outline-level="1"><text:span text:style-name="Source_20_Text"><text:span text:style-name="T166">foreach</text:span></text:span><text:span text:style-name="Source_20_Text"><text:span text:style-name="T167"> (</text:span></text:span><text:span text:style-name="Source_20_Text"><text:span text:style-name="T168">StatusPedido</text:span></text:span><text:span text:style-name="Source_20_Text"><text:span text:style-name="T167">::</text:span></text:span><text:span text:style-name="Source_20_Text"><text:span text:style-name="T169">cases</text:span></text:span><text:span text:style-name="Source_20_Text"><text:span text:style-name="T167">() as </text:span></text:span><text:span text:style-name="Source_20_Text"><text:span text:style-name="T170">$status</text:span></text:span><text:span text:style-name="Source_20_Text"><text:span text:style-name="T167">) {</text:span></text:span></text:h>
      <text:p text:style-name="P84"><text:span text:style-name="Source_20_Text"><text:span text:style-name="T10"/></text:span></text:p>
      <text:p text:style-name="Text_20_body"><text:span text:style-name="Source_20_Text"><text:span text:style-name="T9">O modificador </text:span></text:span><text:span text:style-name="Source_20_Text"><text:span text:style-name="T171">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2">, e não a instâncias individuais</text:span></text:span></text:span><text:span text:style-name="Source_20_Text"><text:span text:style-name="T172">. </text:span></text:span><text:span text:style-name="Source_20_Text"><text:span text:style-name="T9">Isso </text:span></text:span><text:span text:style-name="Source_20_Text"><text:span text:style-name="T173">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74">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2">ue </text:span></text:span><text:span text:style-name="Source_20_Text"><text:span text:style-name="Strong_20_Emphasis"><text:span text:style-name="T172">todos os objetos da classe compartilham o mesmo valor dessa propriedade</text:span></text:span></text:span><text:span text:style-name="Source_20_Text"><text:span text:style-name="T172">.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74">tico</text:span></text:span></text:span><text:span text:style-name="Source_20_Text"><text:span text:style-name="T174"> pode ser chamado </text:span></text:span><text:span text:style-name="Source_20_Text"><text:span text:style-name="Strong_20_Emphasis"><text:span text:style-name="T174">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75">$this</text:span></text:span></text:span><text:span text:style-name="Source_20_Text"><text:span text:style-name="T9">, pois </text:span></text:span><text:span text:style-name="Strong_20_Emphasis"><text:span text:style-name="T176">$this</text:span></text:span><text:span text:style-name="Source_20_Text"><text:span text:style-name="T9"> representa um objeto, e métodos estáticos pertencem à classe, não a objetos específicos. </text:span></text:span><text:span text:style-name="Source_20_Text"><text:span text:style-name="T177">E</text:span></text:span><text:span text:style-name="Source_20_Text"><text:span text:style-name="T9">ntão podemos chamá-lo diretamente com </text:span></text:span><text:span text:style-name="Source_20_Text"><text:span text:style-name="T178">Classe</text:span></text:span><text:span text:style-name="Source_20_Text"><text:span text:style-name="T179">::</text:span></text:span><text:span text:style-name="Source_20_Text"><text:span text:style-name="T178">metodo</text:span></text:span><text:span text:style-name="Source_20_Text"><text:span text:style-name="T179">()</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1">self::</text:span></text:span><text:span text:style-name="Source_20_Text"><text:span text:style-name="T9"> ou </text:span></text:span><text:span text:style-name="Source_20_Text"><text:span text:style-name="T171">static::</text:span></text:span></text:p>
      <text:list text:style-name="L4">
        <text:list-item>
          <text:p text:style-name="P86"><text:span text:style-name="Source_20_Text"><text:span text:style-name="T171">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1">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0">Exemplo:</text:span></text:span></text:p>
      <text:p text:style-name="P89"><text:span text:style-name="Source_20_Text"><text:span text:style-name="T181">class</text:span></text:span><text:span text:style-name="Source_20_Text"><text:span text:style-name="T182"> </text:span></text:span><text:span text:style-name="Source_20_Text"><text:span text:style-name="T183">Filme<text:tab/><text:tab/><text:tab/><text:tab/><text:tab/><text:tab/><text:tab/><text:tab/><text:tab/></text:span></text:span></text:p>
      <text:p text:style-name="P63">{<text:tab/><text:tab/><text:tab/><text:tab/><text:tab/><text:tab/><text:tab/><text:tab/><text:tab/><text:tab/></text:p>
      <text:p text:style-name="P64"><text:span text:style-name="T135"><text:tab/>private</text:span><text:span text:style-name="T136"> </text:span><text:span text:style-name="T135">static</text:span><text:span text:style-name="T136"> </text:span><text:span text:style-name="T135">float</text:span><text:span text:style-name="T136"> </text:span><text:span text:style-name="T138">$notaMinima</text:span><text:span text:style-name="T136"> = </text:span><text:span text:style-name="T184">7.5</text:span><text:span text:style-name="T136">;<text:tab/><text:tab/><text:tab/></text:span></text:p>
      <text:p text:style-name="P63"><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boaAvaliacao</text:span><text:span text:style-name="T122">(): </text:span><text:span text:style-name="T121">bool<text:tab/></text:span><text:span text:style-name="T122">{<text:tab/><text:tab/><text:tab/></text:span></text:p>
      <text:p text:style-name="P62"><text:span text:style-name="T149"><text:tab/><text:tab/>return</text:span><text:span text:style-name="T122"> </text:span><text:span text:style-name="T121">$this</text:span><text:span text:style-name="T122">-&gt;</text:span><text:span text:style-name="T124">media</text:span><text:span text:style-name="T122">() &gt; </text:span><text:span text:style-name="T121">self</text:span><text:span text:style-name="T122">::</text:span><text:span text:style-name="T123">$notaMinima</text:span><text:span text:style-name="T122">;<text:tab/><text:tab/></text:span></text:p>
      <text:p text:style-name="P63"><text:tab/>}<text:tab/><text:tab/><text:tab/><text:tab/><text:tab/><text:tab/><text:tab/><text:tab/><text:tab/></text:p>
      <text:p text:style-name="P63">}<text:tab/><text:tab/><text:tab/><text:tab/><text:tab/><text:tab/><text:tab/><text:tab/><text:tab/><text:tab/></text:p>
      <text:p text:style-name="P87"><text:span text:style-name="Source_20_Text"><text:span text:style-name="T10"/></text:span></text:p>
      <text:h text:style-name="P37" text:outline-level="1">Aula 05 – Projeto Banco</text:h>
      <text:p text:style-name="P90"/>
      <text:p text:style-name="P90"><text:span text:style-name="T185">Exercício: </text:span>Construa um sistema <text:span text:style-name="T126">bancário </text:span>que utilize métodos como: <text:span text:style-name="T29">abrirConta(), fecharConta(), depositar(), sacar(), pagar mensalidade()</text:span></text:p>
      <text:p text:style-name="P91"><text:span text:style-name="T126">U</text:span><text:span text:style-name="T186">tilizar os métodos acessores (</text:span><text:span text:style-name="T187">get</text:span><text:span text:style-name="T186"> e </text:span><text:span text:style-name="T187">set</text:span><text:span text:style-name="T186">) aumenta a segurança do sistema pois impedem o acesso direto aos dados. Exemplo:<text:line-break/>Use </text:span><text:span text:style-name="T50">$this</text:span><text:span text:style-name="T49">-&gt;</text:span><text:span text:style-name="T188">setSaldo</text:span><text:span text:style-name="T49">(</text:span><text:span text:style-name="T50">$this</text:span><text:span text:style-name="T49">-&gt;</text:span><text:span text:style-name="T188">getSaldo</text:span><text:span text:style-name="T49">() + </text:span><text:span text:style-name="T47">$v</text:span><text:span text:style-name="T49">)</text:span> <text:span text:style-name="T186">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89">Encapsular é ocultar partes que são independentes da implementação</text:span>, <text:span text:style-name="T16">restringindo </text:span><text:span text:style-name="T190">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89">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1">(proteção)</text:span>.</text:p>
        </text:list-item>
        <text:list-item>
          <text:p text:style-name="P95">Facilitar reutilização do código.</text:p>
        </text:list-item>
        <text:list-item>
          <text:p text:style-name="P95">Reduzir efeitos colaterais <text:span text:style-name="T191">(segurança)</text:span>.</text:p>
        </text:list-item>
      </text:list>
      <text:p text:style-name="P21"/>
      <text:p text:style-name="P21">Ao encapsular, <text:span text:style-name="T16">mantenha os atributos privados</text:span>, seja como <text:span text:style-name="T192">private</text:span> ou <text:span text:style-name="T192">protected</text:span>, protegendo-os do meio externo (de fora do pacote), para que possam ser acessados apenas pelos Getters e Setters.</text:p>
      <text:p text:style-name="P96"/>
      <text:p text:style-name="P97"><text:span text:style-name="T193">I</text:span><text:span text:style-name="T194">mplementação</text:span><text:span text:style-name="T13"> </text:span><text:span text:style-name="T195">é </text:span><text:span text:style-name="T13">defin</text:span><text:span text:style-name="T195">ir</text:span><text:span text:style-name="T13"> os detalhes internos dos componentes </text:span><text:span text:style-name="T196">(ou seja, escrever as linhas de código)</text:span></text:p>
      <text:p text:style-name="P21"/>
      <text:p text:style-name="P98"><text:span text:style-name="T13">Interface</text:span> <text:span text:style-name="T197">(visualmente se parece com uma classe, só que</text:span><text:span text:style-name="T198"> sem</text:span><text:span text:style-name="T199"> </text:span><text:span text:style-name="T200">os</text:span><text:span text:style-name="T198"> atributos</text:span><text:span text:style-name="T197">) </text:span><text:span text:style-name="T16">define o comportamento comum</text:span> que pode ser implementado por um conjunto de classes. É uma <text:span text:style-name="T16">lista dos serviços</text:span><text:span text:style-name="T201"> fornecidos pelo componente, ou</text:span><text:span text:style-name="T202"> seja, é </text:span><text:span text:style-name="T203">o </text:span><text:span text:style-name="T204">contrato</text:span><text:span text:style-name="T203"> entre a classe e o mundo exterior. Quando uma classe implementa uma interface, se compromete a fornecer o comportamento publicado por esta interface. </text:span><text:span text:style-name="T205">A interface </text:span><text:span text:style-name="T202">diz quais </text:span><text:span text:style-name="T206">são os métodos determinados como públicos</text:span><text:span text:style-name="T202"> e que estão diretamente acessíveis à class</text:span><text:span text:style-name="T201">e. Com isso, cumpre-se seu </text:span><text:span text:style-name="T207">objetivo de melhorar a legibilidade</text:span><text:span text:style-name="T208"> do código pois não será preciso explorar as minúcias </text:span><text:span text:style-name="T209">implementadas </text:span><text:span text:style-name="T208">de cada método. </text:span><text:span text:style-name="T210">Uma interface pode herdar outra interface. </text:span><text:span text:style-name="T211">A interface n</text:span><text:span text:style-name="T210">ão contém um método construtor pois não precisa.</text:span></text:p>
      <text:list text:style-name="L6">
        <text:list-item>
          <text:p text:style-name="P99"><text:span text:style-name="T212">Interface{}</text:span><text:span text:style-name="T213"> é a palavra-chave para </text:span><text:span text:style-name="T214">declarar</text:span><text:span text:style-name="T213"> uma interface no PHP.</text:span></text:p>
        </text:list-item>
        <text:list-item>
          <text:p text:style-name="P99"><text:span text:style-name="T212">Implements</text:span><text:span text:style-name="T215"> </text:span><text:span text:style-name="T213">é a palavra-chave para</text:span><text:span text:style-name="T216"> </text:span><text:span text:style-name="T217">implementar</text:span><text:span text:style-name="T216"> uma interface</text:span>. <text:span text:style-name="T218">Exemplo:</text:span></text:p>
        </text:list-item>
      </text:list>
      <text:p text:style-name="P100"><text:span text:style-name="T149">require_once</text:span> <text:span text:style-name="T139">"Controlador.php"</text:span>  <text:span text:style-name="T140">//importando </text:span><text:span text:style-name="T219">o arquivo d</text:span><text:span text:style-name="T140">a interface</text:span></text:p>
      <text:p text:style-name="P101"><text:span text:style-name="T220">class</text:span><text:span text:style-name="T221"> </text:span><text:span text:style-name="T222">ControleRemoto</text:span><text:span text:style-name="T221"> </text:span><text:span text:style-name="T220">implements</text:span><text:span text:style-name="T221"> </text:span><text:span text:style-name="T222">Controlador</text:span><text:span text:style-name="T221"> {</text:span><text:span text:style-name="T223">}</text:span><text:span text:style-name="T224">//implementando a interface</text:span></text:p>
      <text:p text:style-name="P31">*<text:span text:style-name="T225">Nota: </text:span>No PHP, não é necessário explicitar o método como <text:span text:style-name="T226">abstract</text:span> ao declará-lo em um interface</text:p>
      <text:h text:style-name="P102" text:outline-level="1">Aula 07 <text:span text:style-name="T225">e 08 </text:span>– Objetos Compostos <text:span text:style-name="T114">(usando vetores) e Agregação</text:span></text:h>
      <text:p text:style-name="P103"/>
      <text:p text:style-name="P104">Criando o gerenciador de lutas UEC – Ultimate Emoticon Combat</text:p>
      <text:p text:style-name="P105">O PHP é Case_sensitive <text:span text:style-name="T227">apenas para</text:span><text:span text:style-name="T228"> declaração de </text:span><text:span text:style-name="T227">variáveis</text:span><text:span text:style-name="T228"> (e constantes)!</text:span></text:p>
      <text:p text:style-name="P106"><text:span text:style-name="T123">$L</text:span><text:span text:style-name="T229">utador</text:span> = <text:span text:style-name="T124">array</text:span>(); <text:span text:style-name="T140">//</text:span><text:span text:style-name="T230">declarando o objeto como um vetor</text:span></text:p>
      <text:p text:style-name="P107"><text:span text:style-name="T231">$L</text:span><text:span text:style-name="T232">utador</text:span><text:span text:style-name="T233">[</text:span><text:span text:style-name="T234">0</text:span><text:span text:style-name="T233">] = </text:span><text:span text:style-name="T235">new</text:span><text:span text:style-name="T233"> </text:span><text:span text:style-name="T236">Lutador</text:span><text:span text:style-name="T233">(</text:span><text:span text:style-name="T237">"Putscript"</text:span><text:span text:style-name="T233">, </text:span><text:span text:style-name="T237">"Brasil"</text:span><text:span text:style-name="T233">, </text:span><text:span text:style-name="T234">29</text:span><text:span text:style-name="T233">, </text:span><text:span text:style-name="T234">1.68</text:span><text:span text:style-name="T233">, </text:span><text:span text:style-name="T234">57.8</text:span><text:span text:style-name="T233">, </text:span><text:span text:style-name="T234">14</text:span><text:span text:style-name="T233">, </text:span><text:span text:style-name="T234">2</text:span><text:span text:style-name="T233">, </text:span><text:span text:style-name="T234">3</text:span><text:span text:style-name="T233">); </text:span><text:span text:style-name="T238">//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39">Tipos de </text:span><text:span text:style-name="T240">Relacionamento</text:span><text:span text:style-name="T241"> entre classes</text:span><text:span text:style-name="T242">: geralmente as classes não estão sós e </text:span><text:span text:style-name="T243">se </text:span><text:span text:style-name="T242">relacionam entre si, </text:span><text:span text:style-name="T244">assim como os objetos têm</text:span><text:span text:style-name="T242"> relações entre eles.</text:span></text:p>
      <text:p text:style-name="P111"/>
      <text:p text:style-name="P110"><text:span text:style-name="T242">Essas relações são representadas no</text:span><text:span text:style-name="T245">s</text:span><text:span text:style-name="T242"> </text:span><text:span text:style-name="T246">3 tipos de </text:span><text:span text:style-name="T242">diagrama de classe</text:span><text:span text:style-name="T246">: </text:span><text:span text:style-name="T247">Associação, Herança </text:span><text:span text:style-name="T248">e </text:span><text:span text:style-name="T247">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49">Associação</text:span><text:span text:style-name="T246"> </text:span><text:span text:style-name="T250">é subdividida em:</text:span></text:p>
          <text:list>
            <text:list-item>
              <text:p text:style-name="P114"><text:span text:style-name="T251">Agregação</text:span><text:span text:style-name="T252">: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1">Composição</text:span><text:span text:style-name="T246">: </text:span><text:span text:style-name="T252">acontece quando temos variáveis internas que são instâncias de outras classes.<text:line-break/><text:line-break/></text:span><text:span text:style-name="T253">A diferença é</text:span><text:span text:style-name="T252"> que, n</text:span><text:span text:style-name="T24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54">Dependência</text:span><text:span text:style-name="T255">: indica a ocorrência de um relacionamento </text:span><text:span text:style-name="T256">s</text:span><text:span text:style-name="T255">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57"> </text:span><text:span text:style-name="T258">(explicado na aula 10)</text:span></text:p>
        </text:list-item>
      </text:list>
      <text:h text:style-name="P37" text:outline-level="1">Aula 09 – Exerc<text:span text:style-name="T185">í</text:span>cio</text:h>
      <text:p text:style-name="P118"/>
      <text:p text:style-name="P119">Abaixo segue o diagrama de classe para a realização do exercício <text:span text:style-name="T259">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0">e 11 </text:span>– Herança</text:h>
      <text:p text:style-name="P30"/>
      <text:p text:style-name="P120"><text:span text:style-name="T261">Herança</text:span><text:span text:style-name="T255"> é um relacionamento entre classes que permite que uma classe adquira os membros de outra classe, ou seja, uma classe mãe </text:span><text:span text:style-name="T262">compartilha seus atributos e métodos com suas classes filhas.<text:line-break/></text:span><text:span text:style-name="T263">Para isso, utilizamos as seguintes palavras reservadas:</text:span></text:p>
      <text:p text:style-name="P121"/>
      <text:list text:style-name="L9">
        <text:list-item>
          <text:list>
            <text:list-item>
              <text:p text:style-name="P122"><text:span text:style-name="T264">extends</text:span><text:span text:style-name="T265"> é a palavra reservada para que </text:span><text:span text:style-name="T266">a</text:span><text:span text:style-name="T265"> </text:span><text:span text:style-name="T267">subclasse herde </text:span><text:span text:style-name="T268">d</text:span><text:span text:style-name="T269">a</text:span><text:span text:style-name="T267"> superclasse</text:span><text:span text:style-name="T265">. </text:span><text:span text:style-name="T270">Exemplo:</text:span><text:span text:style-name="T265"><text:line-break/></text:span><text:span text:style-name="T270">No </text:span><text:span text:style-name="T265">PHP e Java: </text:span><text:span text:style-name="T271">class</text:span><text:span text:style-name="T272"> </text:span><text:span text:style-name="T273">Filha</text:span><text:span text:style-name="T272"> </text:span><text:span text:style-name="T271">extends</text:span><text:span text:style-name="T272"> </text:span><text:span text:style-name="T273">Pai</text:span><text:span text:style-name="T265"><text:line-break/></text:span><text:span text:style-name="T270">No </text:span><text:span text:style-name="T265">C++ e C#:<text:tab/></text:span><text:span text:style-name="T271">class</text:span><text:span text:style-name="T272"> </text:span><text:span text:style-name="T273">Filha</text:span><text:span text:style-name="T272"> </text:span><text:span text:style-name="T274">:</text:span><text:span text:style-name="T272"> </text:span><text:span text:style-name="T273">Pai</text:span></text:p>
            </text:list-item>
            <text:list-item>
              <text:p text:style-name="P123"><text:span text:style-name="T275">$this</text:span><text:span text:style-name="T276">-</text:span><text:span text:style-name="T277">&gt;</text:span><text:span text:style-name="T278"> Faz </text:span><text:span text:style-name="T279">r</text:span><text:span text:style-name="T280">eferência à </text:span><text:span text:style-name="T281">própria</text:span><text:span text:style-name="T280"> </text:span><text:span text:style-name="Strong_20_Emphasis"><text:span text:style-name="T281">instância</text:span></text:span><text:span text:style-name="Strong_20_Emphasis"><text:span text:style-name="T282">,</text:span></text:span><text:span text:style-name="Strong_20_Emphasis"><text:span text:style-name="T131"> </text:span></text:span><text:span text:style-name="Strong_20_Emphasis"><text:span text:style-name="T283">ou seja, t</text:span></text:span><text:span text:style-name="T10">udo </text:span><text:span text:style-name="T278">o</text:span><text:span text:style-name="T10"> que pertence </text:span><text:span text:style-name="Strong_20_Emphasis"><text:span text:style-name="T284">ao </text:span></text:span><text:span text:style-name="Strong_20_Emphasis"><text:span text:style-name="T285">objeto</text:span></text:span><text:span text:style-name="T10"> estará disponível em </text:span><text:span text:style-name="Source_20_Text"><text:span text:style-name="T286">$this→</text:span></text:span><text:span text:style-name="T10"><text:line-break/></text:span><text:span text:style-name="T278">Exceção: em PHP, os m</text:span><text:span text:style-name="T10">étodos estáticos e </text:span><text:span text:style-name="T278">as </text:span><text:span text:style-name="T10">constantes pertencem à própria </text:span><text:span text:style-name="T280">classe</text:span><text:span text:style-name="T10"> e, portanto, não são acessíve</text:span><text:span text:style-name="T278">is</text:span><text:span text:style-name="T10"> </text:span><text:span text:style-name="T287">em </text:span><text:span text:style-name="T288">$this→</text:span></text:p>
            </text:list-item>
          </text:list>
        </text:list-item>
      </text:list>
      <text:list text:style-name="L10">
        <text:list-item>
          <text:list>
            <text:list-item>
              <text:p text:style-name="P124"><text:span text:style-name="T289">parent</text:span><text:span text:style-name="T290">::</text:span> é a palavra reservada para <text:span text:style-name="T16">referenciar a superclasse</text:span><text:span text:style-name="T88">, </text:span><text:span text:style-name="T291">ou seja, </text:span><text:span text:style-name="T88">a</text:span> <text:span text:style-name="T292">classe</text:span> que foi herdada pela classe atual, <text:span text:style-name="T293">tornando</text:span> possível o acesso aos atributos e métodos da superclasse.</text:p>
            </text:list-item>
          </text:list>
        </text:list-item>
      </text:list>
      <text:list text:style-name="L11">
        <text:list-item>
          <text:list>
            <text:list-item>
              <text:p text:style-name="P125"><text:span text:style-name="T289">parent::__construct(</text:span>$variáve<text:span text:style-name="T294">is</text:span><text:span text:style-name="T289">);</text:span> <text:span text:style-name="T295">chama o método construtor da superclasse</text:span></text:p>
            </text:list-item>
          </text:list>
        </text:list-item>
      </text:list>
      <text:p text:style-name="P126"/>
      <text:p text:style-name="P127">O conceito de superclasse e subclasse é relativo, <text:span text:style-name="T296">pois </text:span>depende do seu referencial!</text:p>
      <text:p text:style-name="P127"/>
      <text:p text:style-name="P127">Toda subclasse herda todo o conteúdo de seus ancestrais, mesmo que não esteja totalmente disponível (visível). <text:span text:style-name="T296">[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296">ou seja, </text:span>é possível ter um sem ter o outro, <text:span text:style-name="T297">porém um bom software é construído com os 3 pilares.<text:line-break/></text:span></text:p>
      <text:p text:style-name="P135">DICA: <text:span text:style-name="T298">No Netbeans, para gerar automaticamente uma string que </text:span><text:span text:style-name="T299">apresenta</text:span><text:span text:style-name="T300"> todos atributos de sua classe, use o </text:span><text:span text:style-name="T301">atalho</text:span><text:span text:style-name="T302"> toString()</text:span><text:span text:style-name="T300">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194">Raiz</text:span><text:span text:style-name="T303"> </text:span>é a classe que não tem <text:span text:style-name="T16">superclasse</text:span>.</text:p>
      <text:p text:style-name="P138"><text:span text:style-name="T194">Folha</text:span> é <text:span text:style-name="T304">a</text:span> classe que não tem <text:span text:style-name="T16">subclasse</text:span>.</text:p>
      <text:p text:style-name="P139"/>
      <text:p text:style-name="P138"><text:span text:style-name="T194">Ancestral</text:span> e <text:span text:style-name="T194">Descendente</text:span> desconsideram as filhas <text:span text:style-name="T304">(subclasses)</text:span>, <text:span text:style-name="T16">só valem das netas pra baixo</text:span>.</text:p>
      <text:p text:style-name="P139"/>
      <text:p text:style-name="P138"><text:span text:style-name="T194">Especialização</text:span> é quando percorre a árvore de cima para baixo</text:p>
      <text:p text:style-name="P138"><text:span text:style-name="T194">Generalização</text:span> é de baixo para cima. <text:span text:style-name="T305">É</text:span><text:span text:style-name="T306">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194">De Implementação</text:span> (ou herança <text:span text:style-name="T16">pobre</text:span>): é a mais simples, criada apenas para implementar classes abstratas/genéricas, ou seja, <text:span text:style-name="T307">não</text:span><text:span text:style-name="T308"> </text:span><text:span text:style-name="T309">possui</text:span><text:span text:style-name="T16"> novos atributos ou métodos.</text:span> <text:span text:style-name="T310">Um exemplo é a classe `Visitante`, na figura à esquerda.<text:line-break/></text:span></text:p>
        </text:list-item>
        <text:list-item>
          <text:p text:style-name="P141"><text:span text:style-name="T311">P</text:span><text:span text:style-name="T194">ara Diferença</text:span>: mais completa <text:span text:style-name="T312">pois, além de herdar os atributos e métodos da superclasse, também </text:span><text:span text:style-name="T308">possui os seus próprios atributos e métodos.</text:span></text:p>
        </text:list-item>
      </text:list>
      <text:p text:style-name="P139"/>
      <text:p text:style-name="P139"/>
      <text:p text:style-name="P142"><text:span text:style-name="T313">Diferença entre </text:span><text:span text:style-name="T314">herança simples</text:span><text:span text:style-name="T313"> </text:span><text:span text:style-name="T314">e herança</text:span><text:span text:style-name="T313"> </text:span><text:span text:style-name="T314">m</text:span><text:span text:style-name="T315">ú</text:span><text:span text:style-name="T314">ltipla </text:span><text:span text:style-name="T313">(disponível apenas em C++ e Python):</text:span></text:p>
      <text:p text:style-name="P139"><text:span text:style-name="T313">Quando uma classe herda características somente de uma classe, dizemos que esta é uma herança simples. Quando uma classe herda de duas ou mais classes, temos um caso de herança múltipla (disponível apenas em C++ e Python)<text:line-break/></text:span><text:span text:style-name="T316">É</text:span><text:span text:style-name="T317"> possível </text:span><text:span text:style-name="T313">obter herança múltipla apenas de INTERFACES através d</text:span><text:span text:style-name="T317">a palavra-chave</text:span><text:span text:style-name="T313"> </text:span><text:span text:style-name="T318">implements</text:span><text:span text:style-name="T313">, </text:span><text:span text:style-name="T319">podendo</text:span><text:span text:style-name="T313"> herdar diversos conjuntos de comportamentos sem implementações definidas. Só uma classe concreta ou abstrata pode ser herdada</text:span></text:p>
      <text:p text:style-name="P143"/>
      <text:p text:style-name="P144"><text:span text:style-name="T242">Softwares devem ser modelados antes de ser construídos, mesmo que apenas suas partes mais críticas. E na modelagem todo Analista de Sistemas deve ter como </text:span><text:span text:style-name="T320">mantra</text:span><text:span text:style-name="T242"> a ideia de </text:span><text:span text:style-name="T241">Fraco Acoplamento e Alta Coesão</text:span><text:span text:style-name="T242">, </text:span><text:span text:style-name="T321">p</text:span>ois facilita, entre outras coisas, a <text:span text:style-name="T16">manutenção</text:span> e o <text:span text:style-name="T16">reuso</text:span>.</text:p>
      <text:list text:style-name="L13">
        <text:list-item>
          <text:p text:style-name="P145"><text:span text:style-name="T322">Coesão</text:span><text:span text:style-name="T323"> é contruir </text:span><text:span text:style-name="T324">módulos (</text:span><text:span text:style-name="T323">classes</text:span><text:span text:style-name="T324">)</text:span><text:span text:style-name="T323"> com propósitos claros e bem definidos, </text:span><text:span text:style-name="T325">com poucas</text:span><text:span text:style-name="T323"> responsabilidades, </text:span><text:span text:style-name="T325">retiran</text:span>do funcionalidades supérfluas de um<text:span text:style-name="T324">a classe</text:span> e transferindo para outr<text:span text:style-name="T324">a</text:span> <text:span text:style-name="T324">classe</text:span>. “O que não é coeso, é confuso, incoerente”.</text:p>
        </text:list-item>
        <text:list-item>
          <text:p text:style-name="P146"><text:span text:style-name="T326">Acomplamento</text:span><text:span text:style-name="T327"> é </text:span><text:span text:style-name="T328">o nível de relação entre</text:span><text:span text:style-name="T10"> </text:span><text:span text:style-name="T328">as classes</text:span><text:span text:style-name="T10">, indica o quanto um</text:span><text:span text:style-name="T328">a classe</text:span><text:span text:style-name="T10"> depende de outr</text:span><text:span text:style-name="T32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9">programar para a interface e não para a implementação</text:span></text:a><text:span text:style-name="T10">, </text:span><text:span text:style-name="T330">pois a criação de interfaces </text:span><text:span text:style-name="T331">(classes abstratas)</text:span><text:span text:style-name="T330"> reduzem o acoplamento uma vez que, tendo apenas o </text:span><text:span text:style-name="T332">contrato</text:span><text:span text:style-name="T33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0">suas </text:span><text:span text:style-name="T10">subclasses (conceito de herança), </text:span><text:span text:style-name="T330">essa</text:span><text:span text:style-name="T10"> criação de subclasses </text:span><text:span text:style-name="T330">é</text:span><text:span text:style-name="T10"> uma das piores formas de acoplamento existentes.</text:span></text:p>
        </text:list-item>
      </text:list>
      <text:p text:style-name="P147"/>
      <text:p text:style-name="P148"><text:span text:style-name="T16">Classes e métodos</text:span> também podem ser <text:span text:style-name="T333">abstract</text:span>:<text:line-break/></text:p>
      <text:list text:style-name="L14">
        <text:list-item>
          <text:p text:style-name="P149"><text:span text:style-name="T334">Classe</text:span><text:span text:style-name="T335"> </text:span><text:span text:style-name="T336">A</text:span><text:span text:style-name="T334">bstrata</text:span><text:span text:style-name="T337"> </text:span><text:span text:style-name="T335">Não pode ser instanciada pois ainda não está completa (não é concreta). </text:span><text:span text:style-name="T338">Portanto,</text:span><text:span text:style-name="T335"> não é possível criar objetos a partir dela, </text:span><text:span text:style-name="T339">só</text:span><text:span text:style-name="T335"> pode</text:span><text:span text:style-name="T339">ndo</text:span><text:span text:style-name="T335"> servir como </text:span><text:span text:style-name="T340">superclasse</text:span><text:span text:style-name="T341"> para herança.</text:span><text:span text:style-name="T335"><text:line-break/>Se uma classe tem algum método abstrato, ela também precisa ser abstrata, </text:span><text:span text:style-name="T338">portanto, </text:span><text:span text:style-name="T335">apenas classes abstratas podem ter métodos abstratos;</text:span></text:p>
        </text:list-item>
        <text:list-item>
          <text:p text:style-name="P150"><text:span text:style-name="T342">Método</text:span><text:span text:style-name="T343"> </text:span><text:span text:style-name="T342">Abstrato</text:span><text:span text:style-name="T343"> </text:span><text:span text:style-name="T344">é</text:span><text:span text:style-name="T343"> uma forma de "obrigar" que classes filhas implementem determinado método. </text:span><text:span text:style-name="T344">É g</text:span><text:span text:style-name="T345">eralmente usado </text:span><text:span text:style-name="T346">na criação de</text:span><text:span text:style-name="T345"> Interfaces.<text:line-break/></text:span></text:p>
        </text:list-item>
      </text:list>
      <text:p text:style-name="P148"><text:span text:style-name="T347">Classes, atributos, métodos e variáveis</text:span><text:span text:style-name="T348"> declarados como </text:span><text:span text:style-name="T333">final</text:span><text:span text:style-name="T348"> não </text:span><text:span text:style-name="T349">podem ter</text:span><text:span text:style-name="T348"> o seu comportamento modificado (conceito d</text:span><text:span text:style-name="T350">a</text:span><text:span text:style-name="T348"> </text:span><text:span text:style-name="T347">imutabilidade</text:span><text:span text:style-name="T348">):<text:line-break/></text:span></text:p>
      <text:list text:continue-numbering="true" text:style-name="L14">
        <text:list-item>
          <text:p text:style-name="P151"><text:span text:style-name="T13">Classe</text:span> <text:span text:style-name="T351">F</text:span><text:span text:style-name="T13">inal</text:span> <text:span text:style-name="T352">não permite herança</text:span><text:span text:style-name="T353">, ou seja, </text:span>não pode <text:span text:style-name="T354">ter filhas/subclasses</text:span>, será <text:span text:style-name="T355">apenas </text:span>uma <text:span text:style-name="T16">folha estéril</text:span>.</text:p>
        </text:list-item>
        <text:list-item>
          <text:p text:style-name="P152"><text:span text:style-name="T342">Método</text:span><text:span text:style-name="T343"> </text:span><text:span text:style-name="T342">Final</text:span><text:span text:style-name="T343"> </text:span><text:span text:style-name="T356">não permite polimorfismo</text:span><text:span text:style-name="T357">, ou seja, </text:span><text:span text:style-name="T358">não pode ser sobrescrito</text:span><text:span text:style-name="T343"> </text:span><text:span text:style-name="T359">por</text:span><text:span text:style-name="T343"> suas subclasses</text:span><text:span text:style-name="T357">. </text:span><text:span text:style-name="T360">Use para garantir que um determinado algoritmo não possa ser modificado pelas subclasses.</text:span><text:span text:style-name="T357"> </text:span></text:p>
        </text:list-item>
      </text:list>
      <text:list text:style-name="L15">
        <text:list-item>
          <text:p text:style-name="P153"><text:span text:style-name="T361">$</text:span><text:span text:style-name="T362">Atributo </text:span><text:span text:style-name="T363">F</text:span><text:span text:style-name="Source_20_Text"><text:span text:style-name="T364">inal</text:span></text:span><text:span text:style-name="T365"> pode ter seu </text:span><text:span text:style-name="T366">valor atribuído uma única vez</text:span><text:span text:style-name="T365">, seja na própria declaração ou no construtor.</text:span><text:span text:style-name="T367"> </text:span></text:p>
        </text:list-item>
        <text:list-item>
          <text:p text:style-name="P154"><text:span text:style-name="T368">$</text:span><text:span text:style-name="T369">Variável Final</text:span><text:span text:style-name="T370"> </text:span><text:span text:style-name="T371">(</text:span><text:span text:style-name="T372">é uma </text:span><text:span text:style-name="T371">constante): </text:span><text:span text:style-name="T373">seu </text:span><text:span text:style-name="T374">valor não pode ser alterado</text:span><text:span text:style-name="T373"> por </text:span><text:span text:style-name="T371">nenhum</text:span><text:span text:style-name="T373"> obj</text:span><text:span text:style-name="T371">eto.</text:span></text:p>
        </text:list-item>
      </text:list>
      <text:p text:style-name="P155"/>
      <text:h text:style-name="P156" text:outline-level="2">Traits</text:h>
      <text:p text:style-name="P157">Traços, Características, são um mecanismo para <text:span text:style-name="T13">reúso de código</text:span> em linguagens de herança simples como o PHP, <text:span text:style-name="T375">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76">Trait</text:span></text:span><text:span text:style-name="T376"> s</text:span><text:span text:style-name="T377">erve para adicionar funcionalidades em uma classe</text:span><text:span text:style-name="T376">, não serve para substituir classes. </text:span></text:p>
      <text:p text:style-name="P160"/>
      <text:p text:style-name="P161"><text:span text:style-name="T121">trait</text:span><text:span text:style-name="T122"> </text:span><text:span text:style-name="T134">TraitA</text:span><text:span text:style-name="T122"> {                                              </text:span></text:p>
      <text:p text:style-name="P161"><text:span text:style-name="T121"><text:s text:c="4"/>public</text:span><text:span text:style-name="T122"> </text:span><text:span text:style-name="T121">function</text:span><text:span text:style-name="T122"> </text:span><text:span text:style-name="T124">sayHello</text:span><text:span text:style-name="T122">() {                            </text:span></text:p>
      <text:p text:style-name="P161"><text:span text:style-name="T124"><text:s text:c="8"/>echo</text:span><text:span text:style-name="T122"> </text:span><text:span text:style-name="T139">'Olá,'</text:span><text:span text:style-name="T122">;                                        </text:span></text:p>
      <text:p text:style-name="P162"><text:s text:c="4"/>}                                                       </text:p>
      <text:p text:style-name="P162">}                                                           </text:p>
      <text:p text:style-name="P163"><text:s/>                                                          <text:s/></text:p>
      <text:p text:style-name="P161"><text:span text:style-name="T121">trait</text:span><text:span text:style-name="T122"> </text:span><text:span text:style-name="T134">TraitB</text:span><text:span text:style-name="T122"> {                                              </text:span></text:p>
      <text:p text:style-name="P161"><text:span text:style-name="T121"><text:s text:c="4"/>public</text:span><text:span text:style-name="T122"> </text:span><text:span text:style-name="T121">function</text:span><text:span text:style-name="T122"> </text:span><text:span text:style-name="T124">sayWorld</text:span><text:span text:style-name="T122">() {                            </text:span></text:p>
      <text:p text:style-name="P161"><text:span text:style-name="T124"><text:s text:c="8"/>echo</text:span><text:span text:style-name="T122"> </text:span><text:span text:style-name="T139">'mundo'</text:span><text:span text:style-name="T122">;                                       </text:span></text:p>
      <text:p text:style-name="P162"><text:s text:c="4"/>}                                                       </text:p>
      <text:p text:style-name="P162">}                                                           </text:p>
      <text:p text:style-name="P162"><text:s text:c="6"/>                                                      </text:p>
      <text:p text:style-name="P161"><text:span text:style-name="T121">class</text:span><text:span text:style-name="T122"> </text:span><text:span text:style-name="T134">MyHelloWorld</text:span><text:span text:style-name="T122">                                          </text:span></text:p>
      <text:p text:style-name="P162">{                                                           </text:p>
      <text:p text:style-name="P161"><text:span text:style-name="T121"><text:s text:c="4"/>use</text:span><text:span text:style-name="T122"> </text:span><text:span text:style-name="T134">TraitA</text:span><text:span text:style-name="T122">, </text:span><text:span text:style-name="T134">TraitB</text:span><text:span text:style-name="T122">; </text:span><text:span text:style-name="T140">// Uma classe pode usar vários Trait</text:span></text:p>
      <text:p text:style-name="P163"><text:s/>                                                          <text:s/></text:p>
      <text:p text:style-name="P161"><text:span text:style-name="T121"><text:s text:c="4"/>public</text:span><text:span text:style-name="T122"> </text:span><text:span text:style-name="T121">function</text:span><text:span text:style-name="T122"> </text:span><text:span text:style-name="T124">sayHelloWorld</text:span><text:span text:style-name="T122">() {                       </text:span></text:p>
      <text:p text:style-name="P161"><text:span text:style-name="T121"><text:s text:c="8"/>$this</text:span><text:span text:style-name="T122">-&gt;</text:span><text:span text:style-name="T124">sayHello</text:span><text:span text:style-name="T122">();                                  </text:span></text:p>
      <text:p text:style-name="P161"><text:span text:style-name="T124"><text:s text:c="8"/>echo</text:span><text:span text:style-name="T122"> </text:span><text:span text:style-name="T139">' '</text:span><text:span text:style-name="T122">;                                           </text:span></text:p>
      <text:p text:style-name="P161"><text:span text:style-name="T121"><text:s text:c="8"/>$this</text:span><text:span text:style-name="T122">-&gt;</text:span><text:span text:style-name="T124">sayWorld</text:span><text:span text:style-name="T122">();                                  </text:span></text:p>
      <text:p text:style-name="P161"><text:span text:style-name="T124"><text:s text:c="8"/>echo</text:span><text:span text:style-name="T122"> </text:span><text:span text:style-name="T139">"!</text:span><text:span text:style-name="T378">\n</text:span><text:span text:style-name="T139">"</text:span><text:span text:style-name="T122">;                                         </text:span></text:p>
      <text:p text:style-name="P162"><text:s text:c="4"/>}                                                       </text:p>
      <text:p text:style-name="P162">}                                                           </text:p>
      <text:p text:style-name="P163"><text:s/>                                                          <text:s/></text:p>
      <text:p text:style-name="P161"><text:span text:style-name="T123">$myHelloWorld</text:span><text:span text:style-name="T122"> = </text:span><text:span text:style-name="T121">new</text:span><text:span text:style-name="T122"> </text:span><text:span text:style-name="T134">MyHelloWorld</text:span><text:span text:style-name="T122">();                         </text:span></text:p>
      <text:p text:style-name="P161"><text:span text:style-name="T123">$myHelloWorld</text:span><text:span text:style-name="T122">-&gt;</text:span><text:span text:style-name="T124">sayHelloWorld</text:span><text:span text:style-name="T122">();                             </text:span></text:p>
      <text:p text:style-name="P31"/>
      <text:h text:style-name="P102" text:outline-level="1">Aula 12 <text:span text:style-name="T379">e </text:span>13 – Polimorfismo</text:h>
      <text:p text:style-name="P164"/>
      <text:p text:style-name="P165"><text:span text:style-name="T380">Polimorfismo</text:span> permite que um <text:span text:style-name="T185">mesmo método (de </text:span><text:span text:style-name="T16">mesmo </text:span><text:span text:style-name="T381">nome</text:span><text:span text:style-name="T382">)</text:span> <text:span text:style-name="T383">expresse</text:span> <text:span text:style-name="T16">vários comportamentos</text:span> diferentes.<text:tab/><text:tab/><text:span text:style-name="T384">(</text:span>Polimorfo = muitas formas<text:span text:style-name="T384">)</text:span></text:p>
      <text:p text:style-name="P165"/>
      <text:p text:style-name="P166"><text:span text:style-name="T385">Assinatura de um método</text:span><text:span text:style-name="T386"> </text:span><text:span text:style-name="T387">é </text:span><text:span text:style-name="T388">a</text:span><text:span text:style-name="T387"> </text:span><text:span text:style-name="T389">quantidade</text:span><text:span text:style-name="T387"> </text:span><text:span text:style-name="T390">de atributos</text:span><text:span text:style-name="T388"> que ele recebe </text:span><text:span text:style-name="T387">e </text:span><text:span text:style-name="T388">os</text:span><text:span text:style-name="T387"> </text:span><text:span text:style-name="T389">tipo</text:span><text:span text:style-name="T391">s</text:span><text:span text:style-name="T387"> d</text:span><text:span text:style-name="T392">esses atributos. (o tipo de retorno não faz diferença).</text:span></text:p>
      <text:p text:style-name="P167"/>
      <text:p text:style-name="P165">Os <text:span text:style-name="T393">4</text:span> <text:span text:style-name="T13">tipos de Polimorfismo</text:span> são:<text:span text:style-name="T394"><text:line-break/></text:span></text:p>
      <text:list text:style-name="L16">
        <text:list-item>
          <text:p text:style-name="P168"><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5">Sobreposição</text:span><text:span text:style-name="T396">: é o mais comum, </text:span><text:span text:style-name="T397">ocorre quando os métodos das subclasses sobre</text:span><text:span text:style-name="T398">screvem</text:span><text:span text:style-name="T397"> os métodos de sua superclasse, </text:span><text:span text:style-name="T399">substituindo</text:span><text:span text:style-name="T400"> um comportamento por outro </text:span><text:span text:style-name="T399">sem mudar o nome do método.</text:span><text:span text:style-name="T400"><text:line-break/></text:span><text:span text:style-name="T401">Requisitos</text:span><text:span text:style-name="T400">: possuir a </text:span><text:span text:style-name="T402">mesma</text:span><text:span text:style-name="T403"> assinatura</text:span><text:span text:style-name="T400">, mas em </text:span><text:span text:style-name="T403">classes </text:span><text:span text:style-name="T402">diferentes</text:span><text:span text:style-name="T404"><text:line-break/></text:span><text:span text:style-name="T405">N</text:span><text:span text:style-name="T406">o PHP, não existe nenhuma palavra para indicar sobreposição</text:span><text:span text:style-name="T407">, </text:span><text:span text:style-name="T408">ela é feita automaticamente </text:span><text:span text:style-name="T407">(</text:span><text:span text:style-name="T408">diferentemente do Java que possui </text:span><text:span text:style-name="T407">a </text:span><text:span text:style-name="T409">anotação </text:span><text:span text:style-name="T410">de segurança</text:span><text:span text:style-name="T400"> </text:span><text:span text:style-name="T411">@override</text:span><text:span text:style-name="T412">)<text:line-break/>Em outras palavras, u</text:span><text:span text:style-name="T413">samos</text:span><text:span text:style-name="T414"> </text:span><text:span text:style-name="T412">polimorfismo de sobreposição </text:span><text:span text:style-name="T414">para reescrever um método que foi herdado, onde seu comportamento </text:span><text:span text:style-name="T413">implementado </text:span><text:span text:style-name="T414">na classe </text:span><text:span text:style-name="T415">Mãe</text:span><text:span text:style-name="T414"> se difere do seu comportamento</text:span><text:span text:style-name="T413"> </text:span><text:span text:style-name="T414">na classe </text:span><text:span text:style-name="T413">F</text:span><text:span text:style-name="T414">ilha, </text:span><text:span text:style-name="T416">o</text:span><text:span text:style-name="T414">u seja, eles possuem o mesmo nome, mas funcionalidades ou ações diferentes. </text:span><text:span text:style-name="T412">Lembrando que s</text:span><text:span text:style-name="T417">ó ocorre quando as </text:span><text:span text:style-name="T418">assinaturas</text:span><text:span text:style-name="T417"> dos métodos forem </text:span><text:span text:style-name="T418">iguais</text:span><text:span text:style-name="T417">.<text:line-break/></text:span></text:p>
        </text:list-item>
        <text:list-item>
          <text:p text:style-name="P169"><text:span text:style-name="T419">Sobrecarga</text:span><text:span text:style-name="T420">: </text:span><text:span text:style-name="T421">dentro de uma mesma classe, permite que um </text:span><text:span text:style-name="T422">mesmo método</text:span><text:span text:style-name="T421"> possa ser </text:span><text:span text:style-name="T423">implementado de maneiras diferentes</text:span><text:span text:style-name="T421">, sendo que cada declaração difere simplesmente no </text:span><text:span text:style-name="T422">número</text:span><text:span text:style-name="T421"> e </text:span><text:span text:style-name="T422">tipo</text:span><text:span text:style-name="T421"> de argumentos/parâmetros.</text:span><text:span text:style-name="T420"> </text:span><text:span text:style-name="T424">Ou seja, utiliza um mesmo nome de método para ter outros comportamentos </text:span><text:span text:style-name="T425">(</text:span><text:span text:style-name="T424">implementações</text:span><text:span text:style-name="T425">)</text:span><text:span text:style-name="T424">, de acordo com os tipos de parâmetros que são passados.<text:line-break/></text:span><text:span text:style-name="T426">Requisitos</text:span><text:span text:style-name="T427">: </text:span><text:span text:style-name="T428">possuir</text:span><text:span text:style-name="T429"> </text:span><text:span text:style-name="T430">assinaturas</text:span><text:span text:style-name="T431"> </text:span><text:span text:style-name="T432">diferentes</text:span><text:span text:style-name="T429">, porém dentro da </text:span><text:span text:style-name="T430">mesma classe</text:span><text:span text:style-name="T429">. </text:span><text:span text:style-name="T433">Através dessa técnica, é possível utilizar 2 ou mais métodos construtores na mesma classe.</text:span></text:p>
          <text:p text:style-name="P170"><text:span text:style-name="T434"><text:line-break/></text:span><text:span text:style-name="T435">A</text:span><text:span text:style-name="T436">tenção</text:span><text:span text:style-name="T437">: O </text:span><text:span text:style-name="T438">PHP</text:span><text:span text:style-name="T437"> </text:span><text:span text:style-name="T439">é uma linguagem dinâmica, ou seja, se</text:span><text:span text:style-name="T438">us os parâmetros podem receber qualquer tipo, </text:span><text:span text:style-name="T440">então</text:span><text:span text:style-name="T441"> o </text:span><text:span text:style-name="T442">PHP</text:span><text:span text:style-name="T438"> </text:span><text:span text:style-name="T443">não tem</text:span><text:span text:style-name="T437"> suporte ao polimorfismo por </text:span><text:span text:style-name="T443">sobrecarga</text:span><text:span text:style-name="T437"> de método!</text:span><text:span text:style-name="T444"> </text:span><text:span text:style-name="T439">(</text:span><text:span text:style-name="T445">pois não declara o tipo da variável</text:span><text:span text:style-name="T439">)</text:span><text:span text:style-name="T445">. </text:span><text:span text:style-name="T446">Para resolver isso, </text:span><text:span text:style-name="T447">foi criado o </text:span><text:span text:style-name="T448">operador splat</text:span><text:span text:style-name="T449">:</text:span><text:span text:style-name="T438"> é um operador formado por três pontos</text:span><text:span text:style-name="Source_20_Text"><text:span text:style-name="T450">...</text:span></text:span><text:span text:style-name="T438">utilizado para trabalhar com funções variádicas, </text:span><text:span text:style-name="T451">que</text:span><text:span text:style-name="T438"> pode</text:span><text:span text:style-name="T451">m</text:span><text:span text:style-name="T438"> receber um número ilimitado de parâmetros. </text:span><text:span text:style-name="T452"><text:line-break/></text:span></text:p>
        </text:list-item>
        <text:list-item>
          <text:p text:style-name="P171"><text:span text:style-name="T453">D</text:span><text:span text:style-name="T454">e</text:span><text:span text:style-name="T455"> </text:span><text:span text:style-name="T454">inclusão</text:span><text:span text:style-name="T456">…<text:line-break/></text:span></text:p>
        </text:list-item>
        <text:list-item>
          <text:p text:style-name="P172"><text:span text:style-name="T454">Paramétrico</text:span><text:span text:style-name="T456">…</text:span></text:p>
        </text:list-item>
      </text:list>
      <text:p text:style-name="P173"/>
      <text:p text:style-name="P174"><text:span text:style-name="T457">Importante</text:span><text:span text:style-name="T458">: </text:span><text:span text:style-name="T459">Quando uma classe mãe chamar um de seus próprios métodos mas este método já foi sobrescrito numa classe filha, </text:span><text:span text:style-name="T460">então </text:span><text:span text:style-name="T459">será executado aquele implementado lá na classe </text:span><text:span text:style-name="T461">filha</text:span><text:span text:style-name="T459">!</text:span></text:p>
      <text:p text:style-name="P175"><text:span text:style-name="T462">Atalho</text:span><text:span text:style-name="T463">: </text:span><text:span text:style-name="T460">também </text:span><text:span text:style-name="T463">é possível gerar overrides (métodos sobrescritos) </text:span><text:span text:style-name="T464">no NetBeans </text:span><text:span text:style-name="T463">através do </text:span><text:span text:style-name="T465">insert_code</text:span><text:span text:style-name="T463"> (Alt+Insert).</text:span><text:span text:style-name="T466"><text:line-break/></text:span><text:span text:style-name="T467">A</text:span><text:span text:style-name="T468">talho: </text:span><text:span text:style-name="T469">C</text:span><text:span text:style-name="T470">ontrol + E apaga a linha atual </text:span><text:span text:style-name="T471">(ideal para apagar aqueles comentários iniciais)</text:span><text:span text:style-name="T472">Exercício da Aula 12: </text:span><text:span text:style-name="T473">Polimorfismo por </text:span><text:span text:style-name="T474">sobreposição</text:span></text:p>
      <text:p text:style-name="P176"><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7"/>
      <text:p text:style-name="P178"><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5">no PHP </text:span>para implementar polimorfismo por <text:span text:style-name="T16">sobrecarga<text:line-break/></text:span><text:span text:style-name="T475">(mudando nome)</text:span></text:p>
      <text:p text:style-name="P176"/>
      <text:p text:style-name="P176"/>
      <text:p text:style-name="P177"/>
      <text:p text:style-name="P176"/>
      <text:p text:style-name="P176"/>
      <text:p text:style-name="P176"/>
      <text:p text:style-name="P179"><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80"><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1"/>
      <text:p text:style-name="P182"><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h text:style-name="P186" text:outline-level="1">CRUD</text:h>
      <text:p text:style-name="P31"/>
      <text:p text:style-name="P31">O <text:span text:style-name="T476">CRUD</text:span> vem do inglês, das palavras (<text:span text:style-name="T477">Create, Read, Update, Delete</text:span>) que quer dizer basicamente as 4 (quatro) principais operações com um banco de dados(inserir, ler, atualizar, excluir). </text:p>
      <text:p text:style-name="P30"/>
      <text:h text:style-name="P187" text:outline-level="1">MySQL-i com PDO</text:h>
      <text:p text:style-name="P188"><text:span text:style-name="T478">Próximo passo: aprender </text:span><text:span text:style-name="T479">MySQL-i</text:span><text:span text:style-name="T478">, classe interna do PHP que utiliza a orientação a objetos para fazer acesso ao Banco de Dados.<text:line-break/>Exemplo de INSERT INTO com MySQLi_:</text:span></text:p>
      <text:p text:style-name="P189"><draw:frame draw:style-name="fr4" draw:name="Figura11" text:anchor-type="paragraph" svg:width="17.59cm" svg:height="10.248cm" draw:z-index="23"><draw:image xlink:href="Pictures/100000010000032A000001D8037C0F75.png" xlink:type="simple" xlink:show="embed" xlink:actuate="onLoad" draw:mime-type="image/png"/></draw:frame></text:p>
      <text:p text:style-name="P31">Com a constante necessidade de <text:span text:style-name="T16">segurança</text:span> e <text:span text:style-name="T16">abstração</text:span> de dados surgiu a classe <text:span text:style-name="T476">PDO</text:span> (<text:span text:style-name="T47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9">PDO</text:span></text:a><text:span text:style-name="T10"> é uma classe desenvolvida especificamente para trabalhar com procedimentos relacionados a Banco de Dados, </text:span><text:span text:style-name="T48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0"> </text:span><text:span text:style-name="T481">pois</text:span><text:span text:style-name="T480"> </text:span><text:span text:style-name="T482">efetua a conexão com diversos bancos de dados da mesma maneira</text:span><text:span text:style-name="T480">, modificando apenas a sua string de conexão </text:span><text:span text:style-name="T481">e </text:span><text:span text:style-name="T48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text:soft-page-break/>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280">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3">extension=php_pdo.dll<text:line-break/>extension=php_pdo_mysql.dll</text:span></text:span></text:p>
      <text:p text:style-name="Text_20_body"><text:span text:style-name="Source_20_Text"><text:span text:style-name="T10"/></text:span></text:p>
      <text:p text:style-name="P30"><text:span text:style-name="T484">Exemplo de INSERT INTO</text:span> <text:span text:style-name="T484">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p>
      <text:p text:style-name="P190"><text:span text:style-name="T484">Exemplo de UPDATE</text:span> <text:span text:style-name="T484">SET com PDO:</text:span></text:p>
      <text:p text:style-name="P191"><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92">Exemplo de DELETE FROM com PDO:</text:p>
      <text:p text:style-name="P193"><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5">bindParam()</text:span> para receber o valor do <text:span text:style-name="T486">$id</text:span></text:p>
      <text:h text:style-name="P194" text:outline-level="1"><text:span text:style-name="Source_20_Text"><text:span text:style-name="T487">namespaces</text:span></text:span></text:h>
      <text:p text:style-name="P195"><text:span text:style-name="Source_20_Text"><text:span text:style-name="T488">namespace</text:span></text:span><text:span text:style-name="Source_20_Text"><text:span text:style-name="T489">s</text:span></text:span><text:span text:style-name="T131"> organiza</text:span><text:span text:style-name="T490">m</text:span><text:span text:style-name="T131"> sua</text:span><text:span text:style-name="T490">s</text:span><text:span text:style-name="T131"> classe</text:span><text:span text:style-name="T490">s</text:span><text:span text:style-name="T131"> dentro de um “pacote” lógico, evitando colisões de nomes e facilitando o autoload.</text:span></text:p>
      <text:list text:style-name="L17">
        <text:list-item>
          <text:p text:style-name="P196">Separar classes em namespaces permite classes com o mesmo nome em diferentes namespaces;</text:p>
        </text:list-item>
        <text:list-item>
          <text:p text:style-name="P197"><text:span text:style-name="T131">Utilizar um namespace raiz (chamado de </text:span><text:span text:style-name="Emphasis"><text:span text:style-name="T131">vendor namespace </text:span></text:span><text:span text:style-name="T131">em algumas literaturas) evita conflitos com classes de pacotes externos que venhamos a utilizar;</text:span></text:p>
        </text:list-item>
        <text:list-item>
          <text:p text:style-name="P197"><text:span text:style-name="T131">Para utilizar uma classe precisamos importá-la utilizando a palavra reservada </text:span><text:span text:style-name="Source_20_Text"><text:span text:style-name="T488">use</text:span></text:span><text:span text:style-name="Source_20_Text"><text:span text:style-name="T131"> </text:span></text:span><text:span text:style-name="T131">ou informar seu nome completo (com namespace) em todos os locais onde ela for utilizada;</text:span></text:p>
        </text:list-item>
        <text:list-item>
          <text:p text:style-name="P198"><text:span text:style-name="T491">Através de um autoloader com o PHP (exemplo, função nativa </text:span><text:span text:style-name="Source_20_Text"><text:span text:style-name="T492">spl_autoload_register</text:span></text:span><text:span text:style-name="T491">) podemos evitar de ficar utilizando </text:span><text:span text:style-name="Source_20_Text"><text:span text:style-name="T493">require</text:span></text:span><text:span text:style-name="Source_20_Text"><text:span text:style-name="T492"> em</text:span></text:span><text:span text:style-name="T491"> todos os arquivos necessários para a execução.</text:span></text:p>
        </text:list-item>
      </text:list>
      <text:p text:style-name="P199"/>
      <text:h text:style-name="P187" text:outline-level="1">Autoloader</text:h>
      <text:p text:style-name="P195"><text:span text:style-name="T490">O </text:span><text:span text:style-name="Strong_20_Emphasis"><text:span text:style-name="T490">autoloader no PHP</text:span></text:span><text:span text:style-name="T490"> serve para carregar automaticamente arquivos de classes e interfaces na memória sem que você precise digitá-los manualmente usando </text:span><text:span text:style-name="Source_20_Text"><text:span text:style-name="T490">include</text:span></text:span><text:span text:style-name="T490"> ou </text:span><text:span text:style-name="Source_20_Text"><text:span text:style-name="T490">require</text:span></text:span><text:span text:style-name="T490">.</text:span></text:p>
      <text:p text:style-name="P200">Em projetos orientados a objetos, onde dezenas ou centenas de arquivos são usados, essa automação elimina linhas de código repetitivas, evita erros de caminho e mantém a aplicação organizada.</text:p>
      <text:list text:style-name="L18">
        <text:list-item>
          <text:p text:style-name="P201"><text:span text:style-name="T494">Sem Autoloader</text:span><text:span text:style-name="T490"> (O modo antigo): Toda vez que você precisava usar uma classe, tinha que localizá-la e importá-la manualmente. Se o projeto crescesse, o topo de cada arquivo ficaria poluído com dezenas de </text:span><text:span text:style-name="Source_20_Text"><text:span text:style-name="T490">requires</text:span></text:span></text:p>
        </text:list-item>
        <text:list-item>
          <text:p text:style-name="P201"><text:span text:style-name="T494">Com Autoloader</text:span><text:span text:style-name="T490"> (O modo moderno): O autoloader monitora o momento em que você tenta instanciar um objeto e busca automaticamente o arquivo correspondente, poupando a necessidade de chamadas manuais.</text:span></text:p>
        </text:list-item>
      </text:list>
      <text:p text:style-name="P195"><text:span text:style-name="T490">A maneira padrão e mais profissional de fazer isso hoje é utilizando o </text:span><text:span text:style-name="Strong_20_Emphasis"><text:span text:style-name="T490">Composer</text:span></text:span><text:span text:style-name="T490"> (gerenciador de dependências do PHP), que automatiza esse processo seguindo um padrão da comunidade conhecido como </text:span><text:span text:style-name="Strong_20_Emphasis"><text:span text:style-name="T490">PSR-4</text:span></text:span><text:span text:style-name="T490">.</text:span></text:p>
      <text:p text:style-name="P200">Problemas ao não utilizar autoloading:</text:p>
      <text:list text:style-name="L19">
        <text:list-item>
          <text:p text:style-name="P202">Classes não são carregadas automaticamente</text:p>
        </text:list-item>
        <text:list-item>
          <text:p text:style-name="P202">Risco de erros por falta de dependências</text:p>
        </text:list-item>
        <text:list-item>
          <text:p text:style-name="P202">Dificuldade de manutenção e organização do código</text:p>
        </text:list-item>
      </text:list>
      <text:p text:style-name="P200"/>
      <text:p text:style-name="P200">Cuidados importantes:</text:p>
      <text:list text:style-name="L20">
        <text:list-item>
          <text:p text:style-name="P203">Nome do namespace deve bater com o nome da pasta</text:p>
        </text:list-item>
        <text:list-item>
          <text:p text:style-name="P203"><text:soft-page-break/>Linux é Case-sensitive</text:p>
        </text:list-item>
        <text:list-item>
          <text:p text:style-name="P203">Sempre usar 'use' para importar classes</text:p>
        </text:list-item>
      </text:list>
      <text:p text:style-name="P200"/>
      <text:p text:style-name="P200"><text:span text:style-name="T495">P</text:span>adrão PSR-4 simplificado (sem Composer):</text:p>
      <text:p text:style-name="P204"><text:span text:style-name="T496">spl_autoload_register</text:span><text:span text:style-name="T497">(</text:span><text:span text:style-name="T498">function</text:span><text:span text:style-name="T497"> (</text:span><text:span text:style-name="T499">$class</text:span><text:span text:style-name="T497">) {<text:tab/><text:tab/><text:tab/><text:tab/><text:tab/><text:tab/><text:tab/><text:line-break/><text:tab/></text:span><text:span text:style-name="T500">$namespaceBase</text:span><text:span text:style-name="T501"> = </text:span><text:span text:style-name="T502">'Semae</text:span><text:span text:style-name="T503">\\</text:span><text:span text:style-name="T502">Pca</text:span><text:span text:style-name="T503">\\</text:span><text:span text:style-name="T502">'</text:span><text:span text:style-name="T501">;<text:tab/><text:tab/><text:tab/><text:tab/><text:tab/><text:tab/><text:tab/><text:line-break/><text:tab/></text:span><text:span text:style-name="T500">diretorioBase</text:span><text:span text:style-name="T501"> = </text:span><text:span text:style-name="T504">__DIR__</text:span><text:span text:style-name="T501"> . </text:span><text:span text:style-name="T502">'/src/'</text:span><text:span text:style-name="T501">;<text:tab/><text:tab/><text:tab/><text:tab/><text:tab/><text:tab/><text:tab/><text:line-break/><text:tab/><text:tab/><text:tab/><text:tab/><text:tab/><text:tab/><text:tab/><text:tab/><text:tab/><text:tab/><text:tab/><text:tab/><text:tab/><text:line-break/><text:tab/></text:span><text:span text:style-name="T505">// Se a classe não pertence ao namespace, ignora<text:tab/><text:tab/><text:tab/><text:tab/><text:tab/></text:span><text:span text:style-name="T501"><text:line-break/><text:tab/></text:span><text:span text:style-name="T506">if</text:span><text:span text:style-name="T501"> (</text:span><text:span text:style-name="T507">strncmp</text:span><text:span text:style-name="T501">(</text:span><text:span text:style-name="T500">$namespaceBase</text:span><text:span text:style-name="T501">, </text:span><text:span text:style-name="T500">$class</text:span><text:span text:style-name="T501">, </text:span><text:span text:style-name="T507">strlen</text:span><text:span text:style-name="T501">(</text:span><text:span text:style-name="T500">$namespaceBase</text:span><text:span text:style-name="T501">)) !== </text:span><text:span text:style-name="T508">0</text:span><text:span text:style-name="T501">) {<text:tab/></text:span></text:p>
      <text:p text:style-name="P204"><text:span text:style-name="T501"><text:tab/><text:tab/></text:span><text:span text:style-name="T506">return</text:span><text:span text:style-name="T501">;<text:tab/><text:tab/><text:tab/><text:tab/><text:tab/><text:tab/><text:tab/><text:tab/><text:tab/><text:tab/></text:span></text:p>
      <text:p text:style-name="P205"><text:tab/>}<text:tab/><text:tab/><text:tab/><text:tab/><text:tab/><text:tab/><text:tab/><text:tab/><text:tab/><text:tab/><text:tab/><text:tab/></text:p>
      <text:p text:style-name="P205"><text:tab/><text:tab/><text:tab/><text:tab/><text:tab/><text:tab/><text:tab/><text:tab/><text:tab/><text:tab/><text:tab/><text:tab/><text:tab/></text:p>
      <text:p text:style-name="P206"><text:span text:style-name="T509"><text:tab/></text:span><text:span text:style-name="T510">// Remove o prefixo do namespace<text:tab/><text:tab/><text:tab/><text:tab/><text:tab/><text:tab/><text:tab/></text:span></text:p>
      <text:p text:style-name="P204"><text:span text:style-name="T501"><text:tab/></text:span><text:span text:style-name="T500">$relativeClass</text:span><text:span text:style-name="T501"> = </text:span><text:span text:style-name="T507">substr</text:span><text:span text:style-name="T501">(</text:span><text:span text:style-name="T500">$class</text:span><text:span text:style-name="T501">, </text:span><text:span text:style-name="T507">strlen</text:span><text:span text:style-name="T501">(</text:span><text:span text:style-name="T500">$namespaceBase</text:span><text:span text:style-name="T501">));<text:tab/><text:tab/><text:tab/></text:span></text:p>
      <text:p text:style-name="P205"><text:tab/><text:tab/><text:tab/><text:tab/><text:tab/><text:tab/><text:tab/><text:tab/><text:tab/><text:tab/><text:tab/><text:tab/><text:tab/></text:p>
      <text:p text:style-name="P206"><text:span text:style-name="T509"><text:tab/></text:span><text:span text:style-name="T510">// Converte namespace em caminho<text:tab/><text:tab/><text:tab/><text:tab/><text:tab/><text:tab/><text:tab/></text:span></text:p>
      <text:p text:style-name="P204"><text:span text:style-name="T501"><text:tab/></text:span><text:span text:style-name="T500">$file</text:span><text:span text:style-name="T501"> = </text:span><text:span text:style-name="T500">$diretorioBase</text:span><text:span text:style-name="T501"> . </text:span><text:span text:style-name="T507">str_replace</text:span><text:span text:style-name="T501">(</text:span><text:span text:style-name="T502">'</text:span><text:span text:style-name="T503">\\</text:span><text:span text:style-name="T502">'</text:span><text:span text:style-name="T501">, </text:span><text:span text:style-name="T502">'/'</text:span><text:span text:style-name="T501">, </text:span><text:span text:style-name="T500">$relativeClass</text:span><text:span text:style-name="T501">) . </text:span><text:span text:style-name="T502">'.php'</text:span><text:span text:style-name="T501">;<text:tab/></text:span></text:p>
      <text:p text:style-name="P205"><text:tab/><text:tab/><text:tab/><text:tab/><text:tab/><text:tab/><text:tab/><text:tab/><text:tab/><text:tab/><text:tab/><text:tab/><text:tab/></text:p>
      <text:p text:style-name="P206"><text:span text:style-name="T509"><text:tab/></text:span><text:span text:style-name="T510">// Carrega se existir<text:tab/><text:tab/><text:tab/><text:tab/><text:tab/><text:tab/><text:tab/><text:tab/><text:tab/></text:span></text:p>
      <text:p text:style-name="P206"><text:span text:style-name="T509"><text:tab/></text:span><text:span text:style-name="T511">if</text:span><text:span text:style-name="T509"> (</text:span><text:span text:style-name="T512">file_exists</text:span><text:span text:style-name="T509">(</text:span><text:span text:style-name="T513">$file</text:span><text:span text:style-name="T509">)) {<text:tab/><text:tab/><text:tab/><text:tab/><text:tab/><text:tab/><text:tab/><text:tab/></text:span></text:p>
      <text:p text:style-name="P206"><text:span text:style-name="T509"><text:tab/><text:tab/></text:span><text:span text:style-name="T511">require_once</text:span><text:span text:style-name="T509"> </text:span><text:span text:style-name="T513">$file</text:span><text:span text:style-name="T509">;<text:tab/><text:tab/><text:tab/><text:tab/><text:tab/><text:tab/><text:tab/><text:tab/></text:span></text:p>
      <text:p text:style-name="P206"><text:span text:style-name="T509"><text:tab/>} </text:span><text:span text:style-name="T511">else</text:span><text:span text:style-name="T509"> {<text:tab/><text:tab/><text:tab/><text:tab/><text:tab/><text:tab/><text:tab/><text:tab/><text:tab/><text:tab/><text:tab/></text:span></text:p>
      <text:p text:style-name="P206"><text:span text:style-name="T509"><text:tab/><text:tab/></text:span><text:span text:style-name="T512">error_log</text:span><text:span text:style-name="T509">(</text:span><text:span text:style-name="T514">"Autoload falhou: </text:span><text:span text:style-name="T513">$file</text:span><text:span text:style-name="T514">"</text:span><text:span text:style-name="T509">);<text:tab/><text:tab/><text:tab/><text:tab/><text:tab/><text:tab/></text:span></text:p>
      <text:p text:style-name="P205"><text:tab/>}<text:tab/><text:tab/><text:tab/><text:tab/><text:tab/><text:tab/><text:tab/><text:tab/><text:tab/><text:tab/><text:tab/><text:tab/></text:p>
      <text:p text:style-name="P205">}, <text:span text:style-name="T121">true</text:span>, <text:span text:style-name="T121">true</text:span>);<text:tab/><text:tab/><text:tab/><text:tab/><text:tab/><text:tab/><text:tab/><text:tab/><text:tab/><text:tab/><text:tab/></text:p>
      <text:p text:style-name="P207"/>
      <text:h text:style-name="P208" text:outline-level="1">Composer</text:h>
      <text:p text:style-name="P209"><text:span text:style-name="Strong_20_Emphasis"><text:span text:style-name="T52">Composer</text:span></text:span> é um <text:span text:style-name="Strong_20_Emphasis">gerenciador de dependências para PHP</text:span>. Ele permite que você:</text:p>
      <text:list text:style-name="L21">
        <text:list-item>
          <text:p text:style-name="P210">Instale bibliotecas de terceiros (como Guzzle, PHPMailer, etc.).</text:p>
        </text:list-item>
        <text:list-item>
          <text:p text:style-name="P211"><text:span text:style-name="Strong_20_Emphasis"><text:span text:style-name="T10">Autoload</text:span></text:span><text:span text:style-name="T10"> (carregar automaticamente) suas próprias classes PHP de forma organizada, usando namespaces.</text:span></text:p>
        </text:list-item>
        <text:list-item>
          <text:p text:style-name="P211"><text:span text:style-name="T10">Evite ter que dar vários </text:span><text:span text:style-name="Source_20_Text"><text:span text:style-name="T10">require</text:span></text:span><text:span text:style-name="T10"> ou </text:span><text:span text:style-name="Source_20_Text"><text:span text:style-name="T10">include</text:span></text:span><text:span text:style-name="T10"> manuais.</text:span></text:p>
        </text:list-item>
        <text:list-item>
          <text:p text:style-name="P211"><text:span text:style-name="T10">Gerencie configurações do seu projeto num arquivo </text:span><text:span text:style-name="Source_20_Text"><text:span text:style-name="T10">composer.json </text:span></text:span><text:span text:style-name="Source_20_Text"><text:span text:style-name="T9">para, por exemplo, chamar </text:span></text:span><text:span text:style-name="Source_20_Text"><text:span text:style-name="T515">o </text:span></text:span><text:span text:style-name="Source_20_Text"><text:span text:style-name="T9">arquivo principal de autoload.</text:span></text:span></text:p>
        </text:list-item>
      </text:list>
      <text:p text:style-name="P212"/>
      <text:p text:style-name="P212"/>
      <text:h text:style-name="P186" text:outline-level="1">Miscelaneas</text:h>
      <text:h text:style-name="P213" text:outline-level="2">readonly</text:h>
      <text:p text:style-name="P214"><text:span text:style-name="T131">propriedades com </text:span><text:span text:style-name="Source_20_Text"><text:span text:style-name="T488">readonly</text:span></text:span><text:span text:style-name="T131"> (PHP 8.1+) se tornam </text:span><text:span text:style-name="Strong_20_Emphasis"><text:span text:style-name="T10">imutáveis</text:span></text:span><text:span text:style-name="T131"> após atribuídas no construtor, evitando alterações acidentais. </text:span><text:span text:style-name="T516">É</text:span><text:span text:style-name="T10"> uma camada extra de segurança. </text:span><text:span text:style-name="T517">Exemplo de aplicação prática: quandos os dados são apresentados numa view.</text:span></text:p>
      <text:h text:style-name="P215" text:outline-level="2">Property promotion</text:h>
      <text:p text:style-name="P216"><text:span text:style-name="Strong_20_Emphasis"><text:span text:style-name="T10">property promotion</text:span></text:span><text:span text:style-name="T10"> (PHP 8.0+), pode reduzir </text:span><text:span text:style-name="T517">o</text:span><text:span text:style-name="T10"> código </text:span><text:span text:style-name="T517">de um método __constructor. No exemplo a seguir, </text:span><text:span text:style-name="T10">declara e inicializa as propriedades numa única linha:</text:span></text:p>
      <text:p text:style-name="P217"><text:span text:style-name="T135">public</text:span><text:span text:style-name="T136"> </text:span><text:span text:style-name="T135">function</text:span><text:span text:style-name="T136"> </text:span><text:span text:style-name="T518">__construct</text:span><text:span text:style-name="T136">(<text:tab/><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CPF</text:span><text:span text:style-name="T136">,<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Nome</text:span><text:span text:style-name="T136">,<text:tab/><text:line-break/></text:span><text:span text:style-name="T519">…<text:tab/><text:tab/><text:tab/><text:tab/><text:tab/><text:tab/></text:span><text:span text:style-name="T138"><text:line-break/></text:span><text:span text:style-name="T136">) {}<text:tab/><text:tab/><text:tab/><text:tab/><text:tab/><text:tab/></text:span></text:p>
      <text:h text:style-name="P218" text:outline-level="2"><text:span text:style-name="T520">E</text:span><text:span text:style-name="T521">numerations</text:span></text:h>
      <text:p text:style-name="P214"><text:span text:style-name="T488">E</text:span><text:span text:style-name="T522">num</text:span><text:span text:style-name="T523">s</text:span><text:span text:style-name="T524"> </text:span><text:span text:style-name="T131">são </text:span><text:span text:style-name="Strong_20_Emphasis"><text:span text:style-name="T10">tipos especiais</text:span></text:span><text:span text:style-name="T131"> que representam um </text:span><text:span text:style-name="Strong_20_Emphasis"><text:span text:style-name="T10">conjunto fixo de valores possíveis</text:span></text:span><text:span text:style-name="T131">. </text:span><text:span text:style-name="T10">Pense nos enums como uma </text:span><text:span text:style-name="Strong_20_Emphasis"><text:span text:style-name="T10">lista de opções válidas </text:span></text:span><text:span text:style-name="Strong_20_Emphasis"><text:span text:style-name="T525">onde cada case representa um par de chave-valor</text:span></text:span><text:span text:style-name="T10">, por exemplo: status de pedido, situação de cadastro, tipo de usuário etc.<text:line-break/></text:span><text:span text:style-name="T525">É possível adicionar </text:span><text:span text:style-name="T10">métodos dentro da enum para </text:span><text:span text:style-name="T525">o</text:span><text:span text:style-name="T10">bter descrições, </text:span><text:span text:style-name="T525">f</text:span><text:span text:style-name="T10">azer traduções, </text:span><text:span text:style-name="T525">d</text:span><text:span text:style-name="T10">efinir comportamentos. </text:span><text:span text:style-name="T525">etc</text:span></text:p>
      <text:h text:style-name="P215" text:outline-level="2">Principais Métodos mágicos</text:h>
      <text:p text:style-name="P219"><text:span text:style-name="T85">__construct()</text:span>: Chamado automaticamente ao instanciar a classe. Ideal para iniciar propriedades.</text:p>
      <text:p text:style-name="P214"><text:span text:style-name="T522">__toString()</text:span><text:span text:style-name="T525">: </text:span><text:span text:style-name="T526">Esse método permite que um objeto seja tratado como uma string quando usado em um contexto que espera-</text:span><text:span text:style-name="T527">se</text:span><text:span text:style-name="T526"> uma string, como no caso do </text:span><text:span text:style-name="Source_20_Text"><text:span text:style-name="T528">echo</text:span></text:span><text:span text:style-name="T528"> </text:span><text:span text:style-name="T529">$obj. </text:span><text:span text:style-name="T526">Objetos de resposta HTTP, por exemplo, geralmente implementam esse método retornando o corpo da resposta. </text:span></text:p>
      <text:p text:style-name="P220"><text:span text:style-name="T530">__get(</text:span><text:span text:style-name="T531">$atributo</text:span><text:span text:style-name="T530">)</text:span><text:span text:style-name="T521"> e </text:span><text:span text:style-name="T530">__set(</text:span><text:span text:style-name="T531">$atributo, $valor</text:span><text:span text:style-name="T530">)</text:span><text:span text:style-name="T521">: Acessar e atribuir valores a propriedades inacessíveis. </text:span><text:span text:style-name="T532">Exemplo:</text:span></text:p>
      <text:p text:style-name="P221"><text:span text:style-name="T135">class</text:span><text:span text:style-name="T136"> </text:span><text:span text:style-name="T137">Produto<text:tab/><text:tab/><text:tab/><text:tab/><text:tab/><text:tab/><text:tab/><text:tab/><text:tab/><text:tab/><text:tab/><text:tab/><text:line-break/></text:span><text:span text:style-name="T136">{<text:tab/><text:tab/><text:tab/><text:tab/><text:tab/><text:tab/><text:tab/><text:tab/><text:tab/><text:tab/><text:tab/><text:tab/><text:tab/><text:tab/><text:line-break/><text:tab/></text:span><text:span text:style-name="T135">private</text:span><text:span text:style-name="T136"> </text:span><text:span text:style-name="T135">array</text:span><text:span text:style-name="T136"> </text:span><text:span text:style-name="T138">$dados</text:span><text:span text:style-name="T136"> = [<text:tab/><text:tab/><text:tab/><text:tab/><text:tab/><text:tab/><text:tab/><text:tab/><text:tab/><text:tab/><text:line-break/><text:tab/><text:tab/></text:span><text:span text:style-name="T533">'nome'</text:span><text:span text:style-name="T136"> =&gt; </text:span><text:span text:style-name="T533">'Notebook'</text:span><text:span text:style-name="T136">,<text:tab/><text:tab/><text:tab/><text:tab/><text:tab/><text:tab/><text:tab/><text:tab/><text:tab/><text:line-break/><text:tab/><text:tab/></text:span><text:span text:style-name="T533">'preco'</text:span><text:span text:style-name="T136"> =&gt; </text:span><text:span text:style-name="T184">3500<text:tab/><text:tab/><text:tab/><text:tab/><text:tab/><text:tab/><text:tab/><text:tab/><text:tab/><text:tab/><text:line-break/></text:span><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18">__get</text:span><text:span text:style-name="T136">(</text:span><text:span text:style-name="T135">string</text:span><text:span text:style-name="T136"> </text:span><text:span text:style-name="T138">$atributo</text:span><text:span text:style-name="T136">)<text:tab/><text:tab/><text:tab/><text:tab/><text:tab/><text:tab/><text:tab/><text:line-break/><text:tab/>{<text:tab/><text:tab/><text:tab/><text:tab/><text:tab/><text:tab/><text:tab/><text:tab/><text:tab/><text:tab/><text:tab/><text:tab/><text:tab/><text:line-break/><text:tab/><text:tab/></text:span><text:span text:style-name="T534">return</text:span><text:span text:style-name="T136"> </text:span><text:span text:style-name="T135">$this</text:span><text:span text:style-name="T136">-&gt;</text:span><text:span text:style-name="T138">dados</text:span><text:span text:style-name="T136">[</text:span><text:span text:style-name="T138">$atributo</text:span><text:span text:style-name="T136">] ?? </text:span><text:span text:style-name="T135">null</text:span><text:span text:style-name="T136">;<text:tab/><text:tab/><text:tab/><text:tab/><text:tab/><text:tab/><text:line-break/></text:span><text:soft-page-break/><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18">__set</text:span><text:span text:style-name="T136">(</text:span><text:span text:style-name="T135">string</text:span><text:span text:style-name="T136"> </text:span><text:span text:style-name="T138">$atributo</text:span><text:span text:style-name="T136">, </text:span><text:span text:style-name="T138">$valor</text:span><text:span text:style-name="T136">): </text:span><text:span text:style-name="T135">void<text:tab/><text:tab/><text:tab/><text:tab/><text:tab/><text:line-break/><text:tab/></text:span><text:span text:style-name="T136">{<text:tab/><text:tab/><text:tab/><text:tab/><text:tab/><text:tab/><text:tab/><text:tab/><text:tab/><text:tab/><text:tab/><text:tab/><text:tab/><text:line-break/><text:tab/><text:tab/></text:span><text:span text:style-name="T535">#útil para combinar com lógica de validação<text:tab/><text:tab/><text:tab/><text:tab/><text:tab/><text:line-break/><text:tab/><text:tab/></text:span><text:span text:style-name="T534">if</text:span><text:span text:style-name="T136"> (!</text:span><text:span text:style-name="T518">array_key_exists</text:span><text:span text:style-name="T136">(</text:span><text:span text:style-name="T138">$atributo</text:span><text:span text:style-name="T136">, </text:span><text:span text:style-name="T135">$this</text:span><text:span text:style-name="T136">-&gt;</text:span><text:span text:style-name="T138">dados</text:span><text:span text:style-name="T136">)) </text:span><text:span text:style-name="T534">throw</text:span><text:span text:style-name="T136"> </text:span><text:span text:style-name="T135">new<text:tab/><text:tab/><text:tab/><text:line-break/><text:tab/><text:tab/><text:tab/></text:span><text:span text:style-name="T137">InvalidArgumentException</text:span><text:span text:style-name="T136">(</text:span><text:span text:style-name="T533">"Atributo '</text:span><text:span text:style-name="T138">$atributo</text:span><text:span text:style-name="T533">' não existe"</text:span><text:span text:style-name="T136">);<text:tab/><text:tab/><text:line-break/><text:tab/><text:tab/></text:span><text:span text:style-name="T534">if</text:span><text:span text:style-name="T136"> (</text:span><text:span text:style-name="T138">$atributo</text:span><text:span text:style-name="T136"> === </text:span><text:span text:style-name="T533">'preco'</text:span><text:span text:style-name="T136"> &amp;&amp; </text:span><text:span text:style-name="T138">$valor</text:span><text:span text:style-name="T136"> &lt; </text:span><text:span text:style-name="T184">0</text:span><text:span text:style-name="T136">) </text:span><text:span text:style-name="T534">throw</text:span><text:span text:style-name="T136"> </text:span><text:span text:style-name="T135">new</text:span><text:span text:style-name="T136"> <text:tab/><text:tab/><text:tab/><text:tab/><text:tab/><text:tab/><text:tab/></text:span><text:span text:style-name="T137">InvalidArgumentException</text:span><text:span text:style-name="T136">(</text:span><text:span text:style-name="T533">"Preço inválido"</text:span><text:span text:style-name="T13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35">$this</text:span><text:span text:style-name="T136">-&gt;</text:span><text:span text:style-name="T138">dados</text:span><text:span text:style-name="T136">[</text:span><text:span text:style-name="T138">$atributo</text:span><text:span text:style-name="T136">] = </text:span><text:span text:style-name="T138">$valor</text:span><text:span text:style-name="T13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38">$p</text:span><text:span text:style-name="T136"> = </text:span><text:span text:style-name="T135">new</text:span><text:span text:style-name="T136"> </text:span><text:span text:style-name="T137">Produto</text:span><text:span text:style-name="T136">();<text:tab/><text:tab/><text:tab/><text:tab/><text:tab/><text:tab/><text:tab/><text:tab/><text:tab/><text:tab/><text:tab/><text:line-break/></text:span><text:span text:style-name="T518">echo</text:span><text:span text:style-name="T136"> </text:span><text:span text:style-name="T138">$p</text:span><text:span text:style-name="T136">-&gt;</text:span><text:span text:style-name="T138">nome</text:span><text:span text:style-name="T136">;  </text:span><text:span text:style-name="T535">// Notebook<text:tab/><text:tab/><text:tab/><text:tab/><text:tab/><text:tab/><text:tab/><text:tab/><text:tab/><text:tab/><text:line-break/></text:span><text:span text:style-name="T138">$p</text:span><text:span text:style-name="T136">-&gt;</text:span><text:span text:style-name="T138">nome</text:span><text:span text:style-name="T136"> = </text:span><text:span text:style-name="T533">'Smartphone'</text:span><text:span text:style-name="T136">;<text:tab/><text:tab/><text:tab/><text:tab/><text:tab/><text:tab/><text:tab/><text:tab/><text:tab/><text:tab/><text:tab/><text:line-break/></text:span><text:span text:style-name="T518">echo</text:span><text:span text:style-name="T136"> </text:span><text:span text:style-name="T138">$p</text:span><text:span text:style-name="T136">-&gt;</text:span><text:span text:style-name="T138">nome</text:span><text:span text:style-name="T136">; </text:span><text:span text:style-name="T535">// Smartphone<text:tab/><text:tab/><text:tab/><text:tab/><text:tab/><text:tab/><text:tab/><text:tab/><text:tab/><text:tab/><text:line-break/></text:span></text:p>
      <text:p text:style-name="P222"><text:span text:style-name="T530">__call()</text:span><text:span text:style-name="T521">: </text:span><text:span text:style-name="T536">executado ao tentar chamar um método não existente do objeto.</text:span></text:p>
      <text:p text:style-name="P212"><text:span text:style-name="T530">__invoke()</text:span><text:span text:style-name="T521">: </text:span><text:span text:style-name="T536">O</text:span><text:span text:style-name="T521"> objeto </text:span><text:span text:style-name="T536">pode ser</text:span><text:span text:style-name="T521"> chamado como função </text:span><text:span text:style-name="T536">em algum lugar que espera um callable</text:span><text:span text:style-name="T521">.<text:line-break/></text:span><text:tab/><text:span text:style-name="T138">$controller</text:span><text:span text:style-name="T136"> = </text:span><text:span text:style-name="T135">new</text:span><text:span text:style-name="T136"> </text:span><text:span text:style-name="T137">ControllerDeExemplo</text:span><text:span text:style-name="T136">();<text:tab/><text:tab/><text:tab/><text:tab/><text:line-break/></text:span><text:tab/><text:span text:style-name="T138">$controller</text:span><text:span text:style-name="T136">(</text:span><text:span text:style-name="T184">1</text:span><text:span text:style-name="T136">, </text:span><text:span text:style-name="T533">'Teste'</text:span><text:span text:style-name="T136">); </text:span><text:span text:style-name="T535">// Isso executará o método __invoke<text:tab/></text:span></text:p>
      <text:p text:style-name="P223"><text:span text:style-name="T530">__destruct()</text:span><text:span text:style-name="T521">: Executado quando o objeto é destruído (fim da execução).</text:span></text:p>
      <text:p text:style-name="P223"><text:span text:style-name="T530">__</text:span><text:span text:style-name="T537">debugInfo</text:span><text:span text:style-name="T530">()</text:span><text:span text:style-name="T521">: </text:span><text:span text:style-name="T538">vardump do objeto instanciado</text:span></text:p>
      <text:h text:style-name="P194" text:outline-level="1"><text:span text:style-name="Strong_20_Emphasis"><text:span text:style-name="T539">Camadas </text:span></text:span><text:span text:style-name="Strong_20_Emphasis"><text:span text:style-name="T540">Clean Architecture (uncle Bob)</text:span></text:span></text:h>
      <text:h text:style-name="Heading_20_2" text:outline-level="2"><text:span text:style-name="Strong_20_Emphasis"><text:span text:style-name="T10">Controller</text:span></text:span></text:h>
      <text:p text:style-name="P216"><text:span text:style-name="Strong_20_Emphasis"><text:span text:style-name="T541">Controller</text:span></text:span><text:span text:style-name="T542"> </text:span><text:span text:style-name="T543">orquestra o processo, </text:span><text:span text:style-name="T542">é uma parte do código que </text:span><text:span text:style-name="Strong_20_Emphasis"><text:span text:style-name="T542">recebe os dados da interface (HTML)</text:span></text:span><text:span text:style-name="T542">, </text:span><text:span text:style-name="Strong_20_Emphasis"><text:span text:style-name="T542">processa a lógica</text:span></text:span><text:span text:style-name="T542">, </text:span><text:span text:style-name="Strong_20_Emphasis"><text:span text:style-name="T542">chama serviços se necessário</text:span></text:span><text:span text:style-name="T542"> e </text:span><text:span text:style-name="Strong_20_Emphasis"><text:span text:style-name="T542">devolve uma resposta</text:span></text:span><text:span text:style-name="T542"> (pode ser uma página, uma mensagem, um JSON, etc). </text:span><text:span text:style-name="T131">Ele é o </text:span><text:span text:style-name="Strong_20_Emphasis"><text:span text:style-name="T131">intermediário entre o formulário (HTML)</text:span></text:span><text:span text:style-name="T131"> e a </text:span><text:span text:style-name="Strong_20_Emphasis"><text:span text:style-name="T131">lógica PHP de negócio</text:span></text:span><text:span text:style-name="T131">.</text:span></text:p>
      <text:p text:style-name="P224">Deve atender aos <text:span text:style-name="T13">princípios</text:span>:</text:p>
      <text:list text:style-name="L22">
        <text:list-item>
          <text:p text:style-name="P225">Não conhece regra</text:p>
        </text:list-item>
        <text:list-item>
          <text:p text:style-name="P225">Não decide fluxo</text:p>
        </text:list-item>
        <text:list-item>
          <text:p text:style-name="P226">Só orquestra entrada → saída </text:p>
        </text:list-item>
      </text:list>
      <text:p text:style-name="P227"/>
      <text:p text:style-name="P228"><text:span text:style-name="T544">O Controller </text:span><text:span text:style-name="Strong_20_Emphasis"><text:span text:style-name="T544">pode decidir fluxo simples</text:span></text:span><text:span text:style-name="T544">, como:</text:span></text:p>
      <text:list text:style-name="L23">
        <text:list-item>
          <text:p text:style-name="P229">validar input </text:p>
        </text:list-item>
        <text:list-item>
          <text:p text:style-name="P229">escolher qual service chamar </text:p>
        </text:list-item>
        <text:list-item>
          <text:p text:style-name="P229">tratar <text:span text:style-name="T545">respostas</text:span></text:p>
        </text:list-item>
        <text:list-item>
          <text:p text:style-name="P230">tratar erros: lançar exceções, configurar http_response_code, registrar logs, </text:p>
        </text:list-item>
        <text:list-item>
          <text:p text:style-name="P231">devolver resposta</text:p>
        </text:list-item>
      </text:list>
      <text:p text:style-name="P228"><text:span text:style-name="T546">Mas </text:span><text:span text:style-name="T547">e</text:span><text:span text:style-name="T546">le </text:span><text:span text:style-name="Strong_20_Emphasis"><text:span text:style-name="T546">n</text:span></text:span><text:span text:style-name="Strong_20_Emphasis"><text:span text:style-name="T547">ão</text:span></text:span><text:span text:style-name="Strong_20_Emphasis"><text:span text:style-name="T546"> deve conter regra de neg</text:span></text:span><text:span text:style-name="Strong_20_Emphasis"><text:span text:style-name="T547">ócio</text:span></text:span><text:span text:style-name="Strong_20_Emphasis"><text:span text:style-name="T546"> complexa</text:span></text:span></text:p>
      <text:h text:style-name="P232" text:outline-level="2">Princípio-chave: Separação de Domínio x Apresentação</text:h>
      <text:list text:style-name="L24">
        <text:list-item>
          <text:p text:style-name="P233"><text:span text:style-name="Strong_20_Emphasis"><text:span text:style-name="T10">Domínio</text:span></text:span><text:span text:style-name="T10">: suas classes de Parser, DTO, Collection, Validator etc.</text:span></text:p>
        </text:list-item>
        <text:list-item>
          <text:p text:style-name="P233"><text:span text:style-name="Strong_20_Emphasis"><text:span text:style-name="T10">Apresentação</text:span></text:span><text:span text:style-name="T10">: quem consome o controller — view PHP, JSON, template engine, API layer etc.</text:span></text:p>
        </text:list-item>
      </text:list>
      <text:p text:style-name="P214"><text:span text:style-name="T10">O controller deve </text:span><text:span text:style-name="Strong_20_Emphasis"><text:span text:style-name="T10">orquestrar</text:span></text:span><text:span text:style-name="T10"> o fluxo, mas </text:span><text:span text:style-name="Strong_20_Emphasis"><text:span text:style-name="T10">devolver uma resposta genérica</text:span></text:span><text:span text:style-name="T10"> (string HTML, JSON ou um objeto </text:span><text:span text:style-name="Source_20_Text"><text:span text:style-name="T10">ResponseInterface</text:span></text:span><text:span text:style-name="T10">), não um objeto de domínio puro. Ele </text:span><text:span text:style-name="Strong_20_Emphasis"><text:span text:style-name="T10">não</text:span></text:span><text:span text:style-name="T10"> deve expor diretamente objetos de domínio (Collection/DTO) na assinatura do método </text:span></text:p>
      <text:h text:style-name="P215" text:outline-level="2">Parser</text:h>
      <text:p text:style-name="P216"><text:span text:style-name="T131">O </text:span><text:span text:style-name="Strong_20_Emphasis"><text:span text:style-name="T10">parser</text:span></text:span><text:span text:style-name="T131"> tem como papel extrair, interpretar e montar os dados recebidos da </text:span><text:span text:style-name="T548">response (exemplo XML)</text:span></text:p>
      <text:p text:style-name="P234"/>
      <text:h text:style-name="P235" text:outline-level="2">Repository</text:h>
      <text:p text:style-name="P236">repositories servem para isolamento da camada de acesso a dados; </text:p>
      <text:h text:style-name="P215" text:outline-level="2"><text:soft-page-break/><text:span text:style-name="T549">D</text:span><text:span text:style-name="T13">TO</text:span></text:h>
      <text:p text:style-name="P214"><text:span text:style-name="Strong_20_Emphasis"><text:span text:style-name="T10">DTO</text:span></text:span><text:span text:style-name="T131"> - </text:span><text:span text:style-name="Strong_20_Emphasis"><text:span text:style-name="T131">Data Transfer Object</text:span></text:span><text:span text:style-name="T131"> </text:span><text:span text:style-name="T10">(Objeto de Transferência de Dados) </text:span><text:span text:style-name="T131">é uma </text:span><text:span text:style-name="Strong_20_Emphasis"><text:span text:style-name="T131">classe simples que serve apenas para carregar dados de forma estruturada</text:span></text:span><text:span text:style-name="T131"> entre camadas de uma aplicação (ex: controller → view, service → controller).</text:span><text:span text:style-name="T10"> <text:line-break/>E</text:span><text:span text:style-name="T131">le </text:span><text:span text:style-name="Strong_20_Emphasis"><text:span text:style-name="T131">não contém regras de negócio</text:span></text:span><text:span text:style-name="T131"> ou</text:span><text:span text:style-name="T10"> lógica complexa. Seu único</text:span><text:span text:style-name="T131"> objetivo é </text:span><text:span text:style-name="Strong_20_Emphasis"><text:span text:style-name="T131">transportar dados</text:span></text:span><text:span text:style-name="T131">.<text:line-break/></text:span><text:span text:style-name="T550">O</text:span><text:span text:style-name="Strong_20_Emphasis"><text:span text:style-name="T131">bjetos DTO oferecem contrato, segurança, validação e encapsulamento</text:span></text:span><text:span text:style-name="T131">. Mesmo que o resultado final volte a ser um array, </text:span><text:span text:style-name="Strong_20_Emphasis"><text:span text:style-name="T131">não é o mesmo array desestruturado e frágil que veio da resposta da API</text:span></text:span><text:span text:style-name="T131">. Ou seja, </text:span><text:span text:style-name="Strong_20_Emphasis"><text:span text:style-name="T131">você não retorna "array do XML"</text:span></text:span><text:span text:style-name="T131">, mas </text:span><text:span text:style-name="Strong_20_Emphasis"><text:span text:style-name="T131">um array de objetos tipados e validados</text:span></text:span><text:span text:style-name="T131">. </text:span></text:p>
      <text:h text:style-name="P237"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38">Item</text:p>
            </table:table-cell>
            <table:table-cell table:style-name="Tabela3.A1" office:value-type="string">
              <text:p text:style-name="P238">Array direto do XML</text:p>
            </table:table-cell>
            <table:table-cell table:style-name="Tabela3.A1" office:value-type="string">
              <text:p text:style-name="P239"><text:span text:style-name="T10">DTO (</text:span><text:span text:style-name="Source_20_Text"><text:span text:style-name="T10">ConsultarCPFDTO</text:span></text:span><text:span text:style-name="T10">)</text:span></text:p>
            </table:table-cell>
          </table:table-row>
        </table:table-header-rows>
        <table:table-row>
          <table:table-cell table:style-name="Tabela3.A1" office:value-type="string">
            <text:p text:style-name="P240">Tipagem</text:p>
          </table:table-cell>
          <table:table-cell table:style-name="Tabela3.A1" office:value-type="string">
            <text:p text:style-name="P240">❌ Nenhuma segurança</text:p>
          </table:table-cell>
          <table:table-cell table:style-name="Tabela3.A1" office:value-type="string">
            <text:p text:style-name="P240">✅ Campos fortemente tipados</text:p>
          </table:table-cell>
        </table:table-row>
        <table:table-row>
          <table:table-cell table:style-name="Tabela3.A1" office:value-type="string">
            <text:p text:style-name="P240">Validação</text:p>
          </table:table-cell>
          <table:table-cell table:style-name="Tabela3.A1" office:value-type="string">
            <text:p text:style-name="P240">❌ Nula ou manual</text:p>
          </table:table-cell>
          <table:table-cell table:style-name="Tabela3.A1" office:value-type="string">
            <text:p text:style-name="P241"><text:span text:style-name="T10">✅ Centralizada no </text:span><text:span text:style-name="Source_20_Text"><text:span text:style-name="T10">fromArray()</text:span></text:span></text:p>
          </table:table-cell>
        </table:table-row>
        <table:table-row>
          <table:table-cell table:style-name="Tabela3.A1" office:value-type="string">
            <text:p text:style-name="P240">IDE/autocompletar</text:p>
          </table:table-cell>
          <table:table-cell table:style-name="Tabela3.A1" office:value-type="string">
            <text:p text:style-name="P240">❌ Não ajuda</text:p>
          </table:table-cell>
          <table:table-cell table:style-name="Tabela3.A1" office:value-type="string">
            <text:p text:style-name="P240">✅ Mostra propriedades e tipos</text:p>
          </table:table-cell>
        </table:table-row>
        <table:table-row>
          <table:table-cell table:style-name="Tabela3.A1" office:value-type="string">
            <text:p text:style-name="P240">Contrato fixo</text:p>
          </table:table-cell>
          <table:table-cell table:style-name="Tabela3.A1" office:value-type="string">
            <text:p text:style-name="P240">❌ Não garantido</text:p>
          </table:table-cell>
          <table:table-cell table:style-name="Tabela3.A1" office:value-type="string">
            <text:p text:style-name="P240">✅ Garantido</text:p>
          </table:table-cell>
        </table:table-row>
        <table:table-row>
          <table:table-cell table:style-name="Tabela3.A1" office:value-type="string">
            <text:p text:style-name="P240">Evolução segura</text:p>
          </table:table-cell>
          <table:table-cell table:style-name="Tabela3.A1" office:value-type="string">
            <text:p text:style-name="P240">❌ Quebra tudo com mudanças</text:p>
          </table:table-cell>
          <table:table-cell table:style-name="Tabela3.A1" office:value-type="string">
            <text:p text:style-name="P240">✅ DTOs adaptam-se com versões</text:p>
          </table:table-cell>
        </table:table-row>
        <table:table-row>
          <table:table-cell table:style-name="Tabela3.A1" office:value-type="string">
            <text:p text:style-name="P240">Semântica</text:p>
          </table:table-cell>
          <table:table-cell table:style-name="Tabela3.A1" office:value-type="string">
            <text:p text:style-name="P240">❌ Apenas strings associativas</text:p>
          </table:table-cell>
          <table:table-cell table:style-name="Tabela3.A1" office:value-type="string">
            <text:p text:style-name="P240">✅ Objetos com significado claro</text:p>
          </table:table-cell>
        </table:table-row>
      </table:table>
      <text:p text:style-name="P242"/>
      <text:p text:style-name="P216"><text:span text:style-name="Strong_20_Emphasis"><text:span text:style-name="T10"/></text:span></text:p>
      <text:h text:style-name="Heading_20_2" text:outline-level="2"><text:span text:style-name="Strong_20_Emphasis"><text:span text:style-name="T10">Collection</text:span></text:span></text:h>
      <text:p text:style-name="P216"><text:span text:style-name="Strong_20_Emphasis"><text:span text:style-name="T551">Collection</text:span></text:span><text:span text:style-name="Strong_20_Emphasis"><text:span text:style-name="T552"> deve apenas armazenar, organizar e oferecer acesso aos objetos. Ela não deve transformar dados. </text:span></text:span></text:p>
      <text:h text:style-name="Heading_20_2" text:outline-level="2"><text:span text:style-name="Strong_20_Emphasis"><text:span text:style-name="T10">Presenter</text:span></text:span></text:h>
      <text:p text:style-name="P243"><text:span text:style-name="Strong_20_Emphasis"><text:span text:style-name="T551">Presenter</text:span></text:span><text:span text:style-name="Strong_20_Emphasis"><text:span text:style-name="T552"> é um padrão de design usado para tradução de domínio, formatar, organizar e preparar os dados que serão enviados da aplicação para a camada de visualização (HTML, JSON, PDF, etc). </text:span></text:span><text:span text:style-name="Strong_20_Emphasis"><text:span text:style-name="T553">Sua</text:span></text:span><text:span text:style-name="Strong_20_Emphasis"><text:span text:style-name="T552"> função é atuar entre a Collection e o HTML, com foco em </text:span></text:span><text:span text:style-name="Strong_20_Emphasis"><text:span text:style-name="T554">formatação e apresentação</text:span></text:span><text:span text:style-name="Strong_20_Emphasis"><text:span text:style-name="T552">. Objetivo: </text:span></text:span><text:span text:style-name="T131">Evit</text:span><text:span text:style-name="T10">ar que a camada de visualiz</text:span><text:span text:style-name="Strong_20_Emphasis"><text:span text:style-name="T552">ação (</text:span></text:span><text:span text:style-name="Strong_20_Emphasis"><text:span text:style-name="T553">result</text:span></text:span><text:span text:style-name="Strong_20_Emphasis"><text:span text:style-name="T552">.php) precise:</text:span></text:span></text:p>
      <text:list text:style-name="L25">
        <text:list-item>
          <text:p text:style-name="P244"><text:span text:style-name="Strong_20_Emphasis"><text:span text:style-name="T552">Fazer if, foreach, isset para mostrar os dados;</text:span></text:span></text:p>
        </text:list-item>
        <text:list-item>
          <text:p text:style-name="P244"><text:span text:style-name="Strong_20_Emphasis"><text:span text:style-name="T552">Tratar nomes de campos, máscaras ou vazios diretamente;</text:span></text:span></text:p>
        </text:list-item>
        <text:list-item>
          <text:p text:style-name="P244"><text:span text:style-name="Strong_20_Emphasis"><text:span text:style-name="T552">Repetir lógicas que deveriam estar encapsuladas.</text:span></text:span></text:p>
        </text:list-item>
      </text:list>
      <text:p text:style-name="P216"><text:span text:style-name="Strong_20_Emphasis"><text:span text:style-name="T552">Vantagens</text:span></text:span></text:p>
      <text:list text:style-name="L26">
        <text:list-item>
          <text:p text:style-name="P245"><text:span text:style-name="Strong_20_Emphasis"><text:span text:style-name="T552">Mantém o HTML limpo e sem lógica PHP.</text:span></text:span></text:p>
        </text:list-item>
        <text:list-item>
          <text:p text:style-name="P245"><text:span text:style-name="Strong_20_Emphasis"><text:span text:style-name="T552">Facilita manutenção e testes.</text:span></text:span></text:p>
        </text:list-item>
        <text:list-item>
          <text:p text:style-name="P245"><text:span text:style-name="Strong_20_Emphasis"><text:span text:style-name="T552">Centraliza formatações, máscaras e padrões.</text:span></text:span></text:p>
        </text:list-item>
      </text:list>
      <text:p text:style-name="P216"><text:soft-page-break/><text:span text:style-name="Strong_20_Emphasis"><text:span text:style-name="T552">ResultPresenterFactory detecta automaticamente o tipo de Collection (como ConsultarCPFCollection ou ConsultarCNPJCollection) e retorna o Presenter correspondente. </text:span></text:span></text:p>
      <text:h text:style-name="P246" text:outline-level="2"><text:span text:style-name="Strong_20_Emphasis"><text:span text:style-name="T555">View</text:span></text:span></text:h>
      <text:h text:style-name="P246" text:outline-level="2"><text:span text:style-name="Strong_20_Emphasis"><text:span text:style-name="T556">Domain/Entities</text:span></text:span></text:h>
      <text:p text:style-name="P216"><text:span text:style-name="Strong_20_Emphasis"><text:span text:style-name="T552">A pasta Entities é o lugar natural para modelar as regras e estruturas do domínio (objetos com identidade e comportamento). Mantê‑la faz sentido se houver lógica de negócio além de consultas/CRUD.</text:span></text:span></text:p>
      <text:p text:style-name="P216"><text:span text:style-name="Strong_20_Emphasis"><text:span text:style-name="T552">Quando usar Domain/Entities (exemplos)</text:span></text:span></text:p>
      <text:list text:style-name="L27">
        <text:list-item>
          <text:p text:style-name="P247"><text:span text:style-name="Strong_20_Emphasis"><text:span text:style-name="T552">Plano — representa um plano de contratação; campos: id, unidadeId, ano, versao, dataHomologacao, dataPublicacao. Métodos possíveis: isPublicado(), precisaRetificar(Plano $publicado).</text:span></text:span></text:p>
        </text:list-item>
        <text:list-item>
          <text:p text:style-name="P247"><text:span text:style-name="Strong_20_Emphasis"><text:span text:style-name="T552">Demanda — representando itens: id, numeroItem, descricao, quantidade, valorUnitario, dataDesejada. Métodos: valorTotal(), toPncpItem().</text:span></text:span></text:p>
        </text:list-item>
        <text:list-item>
          <text:p text:style-name="P247"><text:span text:style-name="Strong_20_Emphasis"><text:span text:style-name="T552">Unidade (ou Orgao) — codigo, nome, regras de validação de código.</text:span></text:span></text:p>
        </text:list-item>
        <text:list-item>
          <text:p text:style-name="P247"><text:span text:style-name="Strong_20_Emphasis"><text:span text:style-name="T552">PublicacaoHistorico — agrega informações sobre tentativas e erro/sucesso, útil para auditoria e reprocessamento.</text:span></text:span></text:p>
        </text:list-item>
      </text:list>
      <text:p text:style-name="P216"><text:span text:style-name="Strong_20_Emphasis"><text:span text:style-name="T552">Esses objetos encapsulam validações e transformações (por exemplo toPncpPayload() ou normalizeDescricao()), evitando espalhar regras por controllers/repositories.</text:span></text:span></text:p>
      <text:p text:style-name="P216"><text:span text:style-name="Strong_20_Emphasis"><text:span text:style-name="T552">Exemplo mínimo (conceitual)</text:span></text:span></text:p>
      <text:list text:style-name="L28">
        <text:list-item>
          <text:p text:style-name="P248"><text:span text:style-name="Strong_20_Emphasis"><text:span text:style-name="T552">class Plano { private int $id; public function needsRetification(Plano $published): bool { ... } }</text:span></text:span></text:p>
        </text:list-item>
        <text:list-item>
          <text:p text:style-name="P248"><text:span text:style-name="Strong_20_Emphasis"><text:span text:style-name="T552">class Demanda { public function toPncpItem(): array { ... } }</text:span></text:span></text:p>
        </text:list-item>
      </text:list>
      <text:p text:style-name="P216"><text:span text:style-name="Strong_20_Emphasis"><text:span text:style-name="T552">Decidir apagar ou manter</text:span></text:span></text:p>
      <text:list text:style-name="L29">
        <text:list-item>
          <text:p text:style-name="P249"><text:span text:style-name="Strong_20_Emphasis"><text:span text:style-name="T552">Mantenha a pasta quando:</text:span></text:span></text:p>
          <text:list>
            <text:list-item>
              <text:p text:style-name="P249"><text:span text:style-name="Strong_20_Emphasis"><text:span text:style-name="T552">Você tem regras de negócio não triviais (decisão de publicar/retificar, cálculos, validações, transformações).</text:span></text:span></text:p>
            </text:list-item>
            <text:list-item>
              <text:p text:style-name="P249"><text:span text:style-name="Strong_20_Emphasis"><text:span text:style-name="T552">Deseja testes unitários focados em regras do domínio.</text:span></text:span></text:p>
            </text:list-item>
          </text:list>
        </text:list-item>
        <text:list-item>
          <text:p text:style-name="P249"><text:span text:style-name="Strong_20_Emphasis"><text:span text:style-name="T552">Pode apagar (ou arquivar) quando:</text:span></text:span></text:p>
          <text:list>
            <text:list-item>
              <text:p text:style-name="P249"><text:span text:style-name="Strong_20_Emphasis"><text:span text:style-name="T552">Projeto for apenas orquestração de ETL/CRUD e toda lógica está em SQL ou services muito simples.</text:span></text:span></text:p>
            </text:list-item>
            <text:list-item>
              <text:p text:style-name="P249"><text:span text:style-name="Strong_20_Emphasis"><text:span text:style-name="T552">Você prefere começar menor e só introduzir entidades quando a complexidade justificar</text:span></text:span></text:p>
            </text:list-item>
          </text:list>
        </text:list-item>
      </text:list>
      <text:p text:style-name="P216"><text:span text:style-name="Strong_20_Emphasis"><text:span text:style-name="T552"/></text:span></text:p>
      <text:p text:style-name="P216"><text:span text:style-name="Strong_20_Emphasis"><text:span text:style-name="T55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2.7.2$Windows_X86_64 LibreOffice_project/5cbfd1ab6520636bb5f7b99185aa69bd7456825d</meta:generator>
    <dc:date>2026-06-26T18:37:43.460583000</dc:date>
    <meta:editing-duration>P1DT12H32M52S</meta:editing-duration>
    <meta:editing-cycles>102</meta:editing-cycles>
    <meta:document-statistic meta:table-count="1" meta:image-count="28" meta:object-count="0" meta:page-count="33" meta:paragraph-count="410" meta:word-count="5734" meta:character-count="39966" meta:non-whitespace-character-count="32394"/>
  </office:meta>
</office:document-meta>
</file>