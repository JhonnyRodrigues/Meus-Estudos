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  <manifest:file-entry manifest:full-path="Pictures/100000000000012D000000A8935508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5" style:family="table">
      <style:table-properties style:width="17.912cm" fo:margin-left="0cm" table:align="left"/>
    </style:style>
    <style:style style:name="Tabela5.A" style:family="table-column">
      <style:table-column-properties style:column-width="2.858cm"/>
    </style:style>
    <style:style style:name="Tabela5.B" style:family="table-column">
      <style:table-column-properties style:column-width="9.671cm"/>
    </style:style>
    <style:style style:name="Tabela5.C" style:family="table-column">
      <style:table-column-properties style:column-width="5.38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.912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6.8cm"/>
    </style:style>
    <style:style style:name="Tabela6.C" style:family="table-column">
      <style:table-column-properties style:column-width="7.96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3.145cm" table:align="left"/>
    </style:style>
    <style:style style:name="Tabela7.A" style:family="table-column">
      <style:table-column-properties style:column-width="6.638cm"/>
    </style:style>
    <style:style style:name="Tabela7.B" style:family="table-column">
      <style:table-column-properties style:column-width="6.50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4.459cm" table:align="left"/>
    </style:style>
    <style:style style:name="Tabela8.A" style:family="table-column">
      <style:table-column-properties style:column-width="3.2cm"/>
    </style:style>
    <style:style style:name="Tabela8.B" style:family="table-column">
      <style:table-column-properties style:column-width="5.708cm"/>
    </style:style>
    <style:style style:name="Tabela8.C" style:family="table-column">
      <style:table-column-properties style:column-width="5.551cm"/>
    </style:style>
    <style:style style:name="Tabela8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9" style:family="table">
      <style:table-properties style:width="17.912cm" fo:margin-left="0cm" table:align="left"/>
    </style:style>
    <style:style style:name="Tabela9.A" style:family="table-column">
      <style:table-column-properties style:column-width="7.594cm"/>
    </style:style>
    <style:style style:name="Tabela9.B" style:family="table-column">
      <style:table-column-properties style:column-width="5.001cm"/>
    </style:style>
    <style:style style:name="Tabela9.C" style:family="table-column">
      <style:table-column-properties style:column-width="5.318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.903cm" table:align="left"/>
    </style:style>
    <style:style style:name="Tabela10.A" style:family="table-column">
      <style:table-column-properties style:column-width="2.843cm"/>
    </style:style>
    <style:style style:name="Tabela10.B" style:family="table-column">
      <style:table-column-properties style:column-width="6.537cm"/>
    </style:style>
    <style:style style:name="Tabela10.C" style:family="table-column">
      <style:table-column-properties style:column-width="3.847cm"/>
    </style:style>
    <style:style style:name="Tabela10.D" style:family="table-column">
      <style:table-column-properties style:column-width="4.676cm"/>
    </style:style>
    <style:style style:name="Tabela10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officeooo:paragraph-rsid="020c9da5"/>
    </style:style>
    <style:style style:name="P7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2" style:family="paragraph" style:parent-style-name="Standard">
      <style:text-properties fo:language="pt" fo:country="BR" officeooo:paragraph-rsid="00fab35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4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5" style:family="paragraph" style:parent-style-name="Standard">
      <style:text-properties fo:language="pt" fo:country="BR" officeooo:paragraph-rsid="0018a839"/>
    </style:style>
    <style:style style:name="P7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7" style:family="paragraph" style:parent-style-name="Standard" style:list-style-name="L7">
      <style:text-properties fo:language="pt" fo:country="BR" officeooo:paragraph-rsid="001921f1"/>
    </style:style>
    <style:style style:name="P7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9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0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1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3" style:family="paragraph" style:parent-style-name="Standard">
      <style:text-properties fo:language="pt" fo:country="BR" officeooo:paragraph-rsid="016f9642"/>
    </style:style>
    <style:style style:name="P84" style:family="paragraph" style:parent-style-name="Standard">
      <style:text-properties officeooo:paragraph-rsid="016f9642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8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line-height="100%"/>
      <style:text-properties officeooo:paragraph-rsid="0149559a"/>
    </style:style>
    <style:style style:name="P92" style:family="paragraph" style:parent-style-name="Text_20_body" style:list-style-name="L8">
      <style:paragraph-properties fo:line-height="100%"/>
      <style:text-properties officeooo:paragraph-rsid="0149559a"/>
    </style:style>
    <style:style style:name="P93" style:family="paragraph" style:parent-style-name="Standard">
      <style:paragraph-properties fo:line-height="100%"/>
      <style:text-properties officeooo:paragraph-rsid="0155afab"/>
    </style:style>
    <style:style style:name="P94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5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7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8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0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3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text-properties fo:font-size="12pt" fo:language="pt" fo:country="BR" style:font-size-asian="12pt" style:font-size-complex="12pt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language="pt" fo:country="BR" officeooo:paragraph-rsid="00384e83"/>
    </style:style>
    <style:style style:name="P1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3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15" style:family="paragraph" style:parent-style-name="Text_20_body">
      <style:paragraph-properties fo:text-align="start" style:justify-single-word="false"/>
      <style:text-properties officeooo:paragraph-rsid="01a89130"/>
    </style:style>
    <style:style style:name="P116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1" style:family="paragraph" style:parent-style-name="Text_20_body">
      <style:text-properties fo:language="pt" fo:country="BR" officeooo:rsid="00d9fbfd"/>
    </style:style>
    <style:style style:name="P13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4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5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8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9" style:family="paragraph" style:parent-style-name="Text_20_body">
      <style:paragraph-properties fo:line-height="100%"/>
      <style:text-properties officeooo:paragraph-rsid="01500562"/>
    </style:style>
    <style:style style:name="P140" style:family="paragraph" style:parent-style-name="Text_20_body" style:list-style-name="L10">
      <style:paragraph-properties fo:line-height="100%"/>
      <style:text-properties officeooo:paragraph-rsid="01500562"/>
    </style:style>
    <style:style style:name="P141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7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Text_20_body">
      <style:paragraph-properties fo:text-align="center" style:justify-single-word="false"/>
    </style:style>
    <style:style style:name="P155" style:family="paragraph" style:parent-style-name="Text_20_body">
      <style:text-properties officeooo:paragraph-rsid="00eaa009"/>
    </style:style>
    <style:style style:name="P156" style:family="paragraph" style:parent-style-name="Text_20_body">
      <style:paragraph-properties fo:text-align="center" style:justify-single-word="false"/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  <style:text-properties officeooo:paragraph-rsid="012182fb"/>
    </style:style>
    <style:style style:name="P161" style:family="paragraph" style:parent-style-name="Text_20_body">
      <style:paragraph-properties fo:text-align="start" style:justify-single-word="false"/>
      <style:text-properties officeooo:paragraph-rsid="012182fb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4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254a324"/>
    </style:style>
    <style:style style:name="P167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reak-before="page" fo:background-color="transparent"/>
      <style:text-properties officeooo:paragraph-rsid="0254a324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70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71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72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4" style:family="paragraph" style:parent-style-name="Text_20_body">
      <style:paragraph-properties fo:text-align="start" style:justify-single-word="false"/>
      <style:text-properties officeooo:paragraph-rsid="008952b2"/>
    </style:style>
    <style:style style:name="P175" style:family="paragraph" style:parent-style-name="Text_20_body">
      <style:paragraph-properties fo:text-align="start" style:justify-single-word="false"/>
      <style:text-properties officeooo:paragraph-rsid="02003df0"/>
    </style:style>
    <style:style style:name="P176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7" style:family="paragraph" style:parent-style-name="Text_20_body">
      <style:paragraph-properties fo:text-align="start" style:justify-single-word="false"/>
      <style:text-properties officeooo:paragraph-rsid="0089288d"/>
    </style:style>
    <style:style style:name="P178" style:family="paragraph" style:parent-style-name="Text_20_body">
      <style:text-properties officeooo:paragraph-rsid="0089948f"/>
    </style:style>
    <style:style style:name="P179" style:family="paragraph" style:parent-style-name="Text_20_body">
      <style:paragraph-properties fo:line-height="100%"/>
      <style:text-properties officeooo:paragraph-rsid="015a4c44"/>
    </style:style>
    <style:style style:name="P180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81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82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3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4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5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6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7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8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9" style:family="paragraph" style:parent-style-name="Text_20_body" style:list-style-name="L13">
      <style:paragraph-properties fo:line-height="100%"/>
      <style:text-properties officeooo:paragraph-rsid="00db7365"/>
    </style:style>
    <style:style style:name="P190" style:family="paragraph" style:parent-style-name="Text_20_body" style:list-style-name="L13">
      <style:paragraph-properties fo:line-height="100%"/>
      <style:text-properties officeooo:paragraph-rsid="00d59182"/>
    </style:style>
    <style:style style:name="P191" style:family="paragraph" style:parent-style-name="Text_20_body" style:list-style-name="L13">
      <style:paragraph-properties fo:line-height="100%"/>
      <style:text-properties officeooo:paragraph-rsid="00d5d97a"/>
    </style:style>
    <style:style style:name="P192" style:family="paragraph" style:parent-style-name="Text_20_body" style:list-style-name="L13">
      <style:paragraph-properties fo:line-height="100%"/>
      <style:text-properties officeooo:paragraph-rsid="00dc62c3"/>
    </style:style>
    <style:style style:name="P193" style:family="paragraph" style:parent-style-name="Text_20_body" style:list-style-name="L13">
      <style:paragraph-properties fo:line-height="100%"/>
      <style:text-properties officeooo:paragraph-rsid="009e54d6"/>
    </style:style>
    <style:style style:name="P194" style:family="paragraph" style:parent-style-name="Text_20_body" style:list-style-name="L13">
      <style:paragraph-properties fo:line-height="100%"/>
      <style:text-properties officeooo:paragraph-rsid="009fc47f"/>
    </style:style>
    <style:style style:name="P195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6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7" style:family="paragraph" style:parent-style-name="Text_20_body" style:list-style-name="L13">
      <style:paragraph-properties fo:line-height="100%"/>
      <style:text-properties officeooo:paragraph-rsid="00d62ec3"/>
    </style:style>
    <style:style style:name="P198" style:family="paragraph" style:parent-style-name="Text_20_body" style:list-style-name="L13">
      <style:paragraph-properties fo:line-height="100%"/>
      <style:text-properties officeooo:paragraph-rsid="01af2cab"/>
    </style:style>
    <style:style style:name="P199" style:family="paragraph" style:parent-style-name="Text_20_body" style:list-style-name="L13">
      <style:paragraph-properties fo:line-height="100%"/>
      <style:text-properties officeooo:paragraph-rsid="01b0e6d7"/>
    </style:style>
    <style:style style:name="P200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201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202" style:family="paragraph" style:parent-style-name="Text_20_body" style:list-style-name="L13">
      <style:paragraph-properties fo:line-height="100%"/>
      <style:text-properties officeooo:paragraph-rsid="01d1bbde"/>
    </style:style>
    <style:style style:name="P203" style:family="paragraph" style:parent-style-name="Text_20_body" style:list-style-name="L13">
      <style:paragraph-properties fo:line-height="100%"/>
      <style:text-properties officeooo:paragraph-rsid="015aff45"/>
    </style:style>
    <style:style style:name="P204" style:family="paragraph" style:parent-style-name="Text_20_body" style:list-style-name="L13">
      <style:paragraph-properties fo:line-height="100%"/>
      <style:text-properties officeooo:paragraph-rsid="01cd3d8d"/>
    </style:style>
    <style:style style:name="P205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6" style:family="paragraph" style:parent-style-name="Heading_20_1">
      <style:paragraph-properties fo:break-before="page" fo:keep-with-next="always"/>
    </style:style>
    <style:style style:name="P207" style:family="paragraph" style:parent-style-name="Text_20_body">
      <style:paragraph-properties fo:line-height="100%"/>
      <style:text-properties officeooo:paragraph-rsid="01cad84a"/>
    </style:style>
    <style:style style:name="P20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9" style:family="paragraph" style:parent-style-name="Text_20_body" style:list-style-name="L16">
      <style:paragraph-properties fo:line-height="100%"/>
      <style:text-properties officeooo:paragraph-rsid="01cad84a"/>
    </style:style>
    <style:style style:name="P210" style:family="paragraph" style:parent-style-name="Text_20_body" style:list-style-name="L17">
      <style:paragraph-properties fo:line-height="100%"/>
      <style:text-properties officeooo:paragraph-rsid="01cad84a"/>
    </style:style>
    <style:style style:name="P21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1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4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5" style:family="paragraph" style:parent-style-name="Text_20_body" style:list-style-name="L18">
      <style:paragraph-properties fo:line-height="100%"/>
    </style:style>
    <style:style style:name="P216" style:family="paragraph" style:parent-style-name="Text_20_body" style:list-style-name="L19">
      <style:paragraph-properties fo:line-height="100%"/>
    </style:style>
    <style:style style:name="P217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8" style:family="paragraph" style:parent-style-name="Text_20_body">
      <style:paragraph-properties fo:line-height="100%"/>
      <style:text-properties fo:language="pt" fo:country="BR"/>
    </style:style>
    <style:style style:name="P219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20" style:family="paragraph" style:parent-style-name="Text_20_body" style:list-style-name="L20">
      <style:paragraph-properties fo:line-height="100%"/>
      <style:text-properties officeooo:paragraph-rsid="016d01a8"/>
    </style:style>
    <style:style style:name="P221" style:family="paragraph" style:parent-style-name="Text_20_body">
      <style:paragraph-properties fo:margin-top="0cm" fo:margin-bottom="0cm" style:contextual-spacing="false" fo:line-height="100%"/>
      <style:text-properties officeooo:paragraph-rsid="016d01a8"/>
    </style:style>
    <style:style style:name="P222" style:family="paragraph" style:parent-style-name="Text_20_body">
      <style:paragraph-properties fo:line-height="100%"/>
      <style:text-properties officeooo:paragraph-rsid="00d9fbfd"/>
    </style:style>
    <style:style style:name="P223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4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6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7" style:family="paragraph" style:parent-style-name="Standard">
      <style:paragraph-properties fo:line-height="100%"/>
      <style:text-properties fo:language="pt" fo:country="BR" officeooo:paragraph-rsid="01aa837b"/>
    </style:style>
    <style:style style:name="P228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3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31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2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4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5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6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7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8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9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4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5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6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7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8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50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51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4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5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6" style:family="paragraph" style:parent-style-name="Text_20_body">
      <style:paragraph-properties fo:margin-top="0cm" fo:margin-bottom="0cm" style:contextual-spacing="false" fo:break-before="page"/>
    </style:style>
    <style:style style:name="P257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22ea256" fo:background-color="#1f1f1f"/>
    </style:style>
    <style:style style:name="P25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officeooo:paragraph-rsid="022ea256" fo:background-color="#1f1f1f"/>
    </style:style>
    <style:style style:name="P259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260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2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3" style:family="paragraph" style:parent-style-name="Text_20_body">
      <style:text-properties fo:language="pt" fo:country="BR" officeooo:paragraph-rsid="019e976c"/>
    </style:style>
    <style:style style:name="P264" style:family="paragraph" style:parent-style-name="Standard">
      <style:paragraph-properties fo:line-height="100%"/>
      <style:text-properties fo:language="pt" fo:country="BR" officeooo:paragraph-rsid="01869135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6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7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8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70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2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2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73" style:family="paragraph" style:parent-style-name="Heading_20_1">
      <style:paragraph-properties fo:keep-with-next="always"/>
    </style:style>
    <style:style style:name="P2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7" style:family="paragraph" style:parent-style-name="Heading_20_1">
      <style:paragraph-properties fo:line-height="100%"/>
      <style:text-properties officeooo:rsid="022ea256" officeooo:paragraph-rsid="022ea256"/>
    </style:style>
    <style:style style:name="P278" style:family="paragraph" style:parent-style-name="Text_20_body">
      <style:paragraph-properties fo:line-height="100%"/>
      <style:text-properties officeooo:paragraph-rsid="022ea256"/>
    </style:style>
    <style:style style:name="P279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280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281" style:family="paragraph" style:parent-style-name="Text_20_body">
      <style:paragraph-properties style:line-height-at-least="0cm"/>
      <style:text-properties officeooo:paragraph-rsid="02320e26"/>
    </style:style>
    <style:style style:name="P28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22ea256" fo:background-color="#1f1f1f"/>
    </style:style>
    <style:style style:name="P283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fo:background-color="#1f1f1f"/>
    </style:style>
    <style:style style:name="P284" style:family="paragraph" style:parent-style-name="Standard">
      <style:paragraph-properties fo:line-height="100%" fo:text-align="center" style:justify-single-word="false"/>
      <style:text-properties fo:color="#d4d4d4" loext:opacity="100%" style:font-name="Consolas" fo:font-size="10.5pt" fo:font-weight="normal" fo:background-color="#1f1f1f"/>
    </style:style>
    <style:style style:name="P285" style:family="paragraph" style:parent-style-name="Heading_20_1">
      <style:text-properties officeooo:rsid="02308899" officeooo:paragraph-rsid="02308899"/>
    </style:style>
    <style:style style:name="P286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7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2308899" officeooo:paragraph-rsid="02308899" fo:background-color="#1f1f1f"/>
    </style:style>
    <style:style style:name="P288" style:family="paragraph" style:parent-style-name="Text_20_body">
      <style:text-properties officeooo:rsid="02308899" officeooo:paragraph-rsid="02308899"/>
    </style:style>
    <style:style style:name="P289" style:family="paragraph" style:parent-style-name="Text_20_body" style:list-style-name="L26">
      <style:text-properties officeooo:paragraph-rsid="02308899"/>
    </style:style>
    <style:style style:name="P290" style:family="paragraph" style:parent-style-name="Text_20_body" style:list-style-name="L26">
      <style:text-properties officeooo:rsid="02308899" officeooo:paragraph-rsid="02308899"/>
    </style:style>
    <style:style style:name="P291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92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95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6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98" style:family="paragraph" style:parent-style-name="Heading_20_1">
      <style:text-properties fo:language="pt" fo:country="BR" officeooo:rsid="01ad3712" officeooo:paragraph-rsid="01ad3712"/>
    </style:style>
    <style:style style:name="P299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300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01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2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04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05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06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308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0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31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1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3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31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315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316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317" style:family="paragraph" style:parent-style-name="Heading_20_1">
      <style:paragraph-properties fo:break-before="page" fo:keep-with-next="always"/>
      <style:text-properties officeooo:paragraph-rsid="023486ad"/>
    </style:style>
    <style:style style:name="P318" style:family="paragraph" style:parent-style-name="Text_20_body">
      <style:text-properties officeooo:paragraph-rsid="023e89f2"/>
    </style:style>
    <style:style style:name="P319" style:family="paragraph" style:parent-style-name="Text_20_body" style:list-style-name="L30">
      <style:text-properties officeooo:paragraph-rsid="023e89f2"/>
    </style:style>
    <style:style style:name="P320" style:family="paragraph" style:parent-style-name="Text_20_body">
      <style:text-properties officeooo:paragraph-rsid="023486ad"/>
    </style:style>
    <style:style style:name="P321" style:family="paragraph" style:parent-style-name="Text_20_body">
      <style:text-properties officeooo:paragraph-rsid="023fb324"/>
    </style:style>
    <style:style style:name="P322" style:family="paragraph" style:parent-style-name="Text_20_body">
      <style:paragraph-properties fo:break-before="page"/>
      <style:text-properties officeooo:paragraph-rsid="023486ad"/>
    </style:style>
    <style:style style:name="P323" style:family="paragraph" style:parent-style-name="Text_20_body" style:list-style-name="L31">
      <style:text-properties officeooo:paragraph-rsid="02404379"/>
    </style:style>
    <style:style style:name="P324" style:family="paragraph" style:parent-style-name="Text_20_body" style:list-style-name="L31">
      <style:text-properties officeooo:paragraph-rsid="023486ad"/>
    </style:style>
    <style:style style:name="P325" style:family="paragraph" style:parent-style-name="Text_20_body" style:list-style-name="L31">
      <style:text-properties officeooo:paragraph-rsid="0235e6a9"/>
    </style:style>
    <style:style style:name="P326" style:family="paragraph" style:parent-style-name="Text_20_body" style:list-style-name="L31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235e6a9"/>
    </style:style>
    <style:style style:name="P327" style:family="paragraph" style:parent-style-name="Text_20_body" style:list-style-name="L31">
      <style:text-properties officeooo:paragraph-rsid="0235f34c"/>
    </style:style>
    <style:style style:name="P328" style:family="paragraph" style:parent-style-name="Text_20_body" style:list-style-name="L31">
      <style:text-properties officeooo:paragraph-rsid="02390e45"/>
    </style:style>
    <style:style style:name="P329" style:family="paragraph" style:parent-style-name="Text_20_body">
      <style:text-properties officeooo:paragraph-rsid="0235e6a9"/>
    </style:style>
    <style:style style:name="P330" style:family="paragraph" style:parent-style-name="Text_20_body">
      <style:text-properties officeooo:paragraph-rsid="0236907d"/>
    </style:style>
    <style:style style:name="P331" style:family="paragraph" style:parent-style-name="Standard">
      <style:paragraph-properties style:line-height-at-least="0cm"/>
      <style:text-properties officeooo:paragraph-rsid="0236907d"/>
    </style:style>
    <style:style style:name="P332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3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4" style:family="paragraph" style:parent-style-name="Standard">
      <style:paragraph-properties style:line-height-at-least="0cm" fo:text-align="center" style:justify-single-word="false"/>
      <style:text-properties officeooo:paragraph-rsid="0236907d"/>
    </style:style>
    <style:style style:name="P33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6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7" style:family="paragraph" style:parent-style-name="Heading_20_1">
      <style:paragraph-properties fo:break-before="page" fo:keep-with-next="always"/>
      <style:text-properties officeooo:paragraph-rsid="0243f563"/>
    </style:style>
    <style:style style:name="P338" style:family="paragraph" style:parent-style-name="Heading_20_3" style:list-style-name=""/>
    <style:style style:name="P339" style:family="paragraph" style:parent-style-name="Standard">
      <style:paragraph-properties style:line-height-at-least="0cm" fo:text-align="center" style:justify-single-word="false"/>
      <style:text-properties officeooo:paragraph-rsid="0243f563"/>
    </style:style>
    <style:style style:name="P340" style:family="paragraph" style:parent-style-name="Text_20_body">
      <style:paragraph-properties fo:text-align="center" style:justify-single-word="false"/>
      <style:text-properties officeooo:paragraph-rsid="0236907d"/>
    </style:style>
    <style:style style:name="P341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2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43" style:family="paragraph" style:parent-style-name="Standard">
      <style:paragraph-properties fo:text-align="start" style:justify-single-word="false"/>
      <style:text-properties officeooo:paragraph-rsid="01650b87"/>
    </style:style>
    <style:style style:name="P344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45" style:family="paragraph" style:parent-style-name="Standard" style:list-style-name="L33">
      <style:paragraph-properties fo:text-align="start" style:justify-single-word="false"/>
      <style:text-properties officeooo:paragraph-rsid="01650b87"/>
    </style:style>
    <style:style style:name="P346" style:family="paragraph" style:parent-style-name="Standard" style:list-style-name="L33">
      <style:paragraph-properties fo:text-align="start" style:justify-single-word="false"/>
      <style:text-properties fo:language="pt" fo:country="BR" officeooo:paragraph-rsid="01650b87"/>
    </style:style>
    <style:style style:name="P347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4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4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50" style:family="paragraph" style:parent-style-name="Text_20_body" style:list-style-name="L3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1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5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55" style:family="paragraph" style:parent-style-name="Standard" style:list-style-name="L35">
      <style:paragraph-properties fo:line-height="100%" fo:text-align="start" style:justify-single-word="false"/>
      <style:text-properties fo:language="pt" fo:country="BR" officeooo:paragraph-rsid="0166e38c"/>
    </style:style>
    <style:style style:name="P356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58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9" style:family="paragraph" style:parent-style-name="Text_20_body" style:list-style-name="L36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61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62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363" style:family="paragraph" style:parent-style-name="Text_20_body">
      <style:paragraph-properties fo:line-height="100%"/>
      <style:text-properties officeooo:paragraph-rsid="021b8be1"/>
    </style:style>
    <style:style style:name="P364" style:family="paragraph" style:parent-style-name="Text_20_body">
      <style:paragraph-properties style:line-height-at-least="0cm"/>
      <style:text-properties officeooo:paragraph-rsid="021b8be1"/>
    </style:style>
    <style:style style:name="P365" style:family="paragraph" style:parent-style-name="Text_20_body" style:list-style-name="L37">
      <style:paragraph-properties style:line-height-at-least="0cm"/>
      <style:text-properties officeooo:paragraph-rsid="021b8be1"/>
    </style:style>
    <style:style style:name="P366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367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68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69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370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71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72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7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74" style:family="paragraph" style:parent-style-name="Text_20_body">
      <style:paragraph-properties fo:line-height="120%"/>
      <style:text-properties style:font-name="Liberation Serif"/>
    </style:style>
    <style:style style:name="P375" style:family="paragraph" style:parent-style-name="Text_20_body">
      <style:paragraph-properties fo:line-height="120%"/>
    </style:style>
    <style:style style:name="P376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377" style:family="paragraph" style:parent-style-name="Heading_20_1" style:list-style-name="WWNum1">
      <style:paragraph-properties fo:break-before="page"/>
    </style:style>
    <style:style style:name="P378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379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80" style:family="paragraph" style:parent-style-name="Standard">
      <style:paragraph-properties fo:line-height="100%"/>
    </style:style>
    <style:style style:name="P381" style:family="paragraph" style:parent-style-name="Heading_20_2">
      <style:paragraph-properties fo:line-height="100%"/>
    </style:style>
    <style:style style:name="P382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383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3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" fo:font-size="10.5pt" fo:font-weight="normal" officeooo:paragraph-rsid="021619be" fo:background-color="#1f1f1f"/>
    </style:style>
    <style:style style:name="P385" style:family="paragraph" style:parent-style-name="Standard">
      <style:paragraph-properties fo:line-height="100%" fo:text-align="start" style:justify-single-word="false"/>
      <style:text-properties fo:color="#cccccc" loext:opacity="100%" style:font-name="Consolas" fo:font-size="10.5pt" fo:font-weight="normal" fo:background-color="#1f1f1f"/>
    </style:style>
    <style:style style:name="P386" style:family="paragraph" style:parent-style-name="Standard">
      <style:paragraph-properties fo:line-height="100%" fo:text-align="start" style:justify-single-word="false"/>
      <style:text-properties fo:color="#d4d4d4" loext:opacity="100%" style:font-name="Consolas" fo:font-size="10.5pt" fo:font-weight="normal" fo:background-color="#1f1f1f"/>
    </style:style>
    <style:style style:name="P387" style:family="paragraph" style:parent-style-name="Standard">
      <style:paragraph-properties style:line-height-at-least="0.503cm"/>
      <style:text-properties officeooo:rsid="021619be"/>
    </style:style>
    <style:style style:name="P388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89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90" style:family="paragraph" style:parent-style-name="Standard">
      <style:paragraph-properties fo:line-height="100%"/>
      <style:text-properties fo:color="#cccccc" loext:opacity="100%" style:font-name="Consolas" fo:font-size="10.5pt" fo:font-weight="normal" fo:background-color="#1f1f1f"/>
    </style:style>
    <style:style style:name="P391" style:family="paragraph" style:parent-style-name="Standard">
      <style:paragraph-properties fo:margin-left="0cm" fo:margin-right="0cm" fo:line-height="100%" fo:text-indent="0cm" style:auto-text-indent="false"/>
    </style:style>
    <style:style style:name="P392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393" style:family="paragraph" style:parent-style-name="Text_20_body" style:list-style-name="L38">
      <style:paragraph-properties fo:line-height="100%"/>
    </style:style>
    <style:style style:name="P394" style:family="paragraph" style:parent-style-name="Text_20_body">
      <style:paragraph-properties fo:line-height="100%" fo:break-before="page"/>
    </style:style>
    <style:style style:name="P395" style:family="paragraph" style:parent-style-name="Text_20_body">
      <style:paragraph-properties fo:line-height="100%"/>
      <style:text-properties officeooo:paragraph-rsid="022aa829"/>
    </style:style>
    <style:style style:name="P396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397" style:family="paragraph" style:parent-style-name="Heading_20_2">
      <style:paragraph-properties fo:line-height="100%" fo:text-align="start" style:justify-single-word="false"/>
    </style:style>
    <style:style style:name="P398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399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400" style:family="paragraph" style:parent-style-name="Standard">
      <style:paragraph-properties fo:line-height="100%"/>
      <style:text-properties officeooo:paragraph-rsid="0222f644"/>
    </style:style>
    <style:style style:name="P401" style:family="paragraph" style:parent-style-name="Standard">
      <style:paragraph-properties fo:line-height="100%"/>
      <style:text-properties fo:color="#cccccc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2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403" style:family="paragraph" style:parent-style-name="Standard">
      <style:paragraph-properties fo:line-height="100%"/>
      <style:text-properties fo:color="#d4d4d4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4" style:family="paragraph" style:parent-style-name="Standard">
      <style:paragraph-properties fo:line-height="100%"/>
      <style:text-properties fo:color="#d4d4d4" loext:opacity="100%" style:font-name="Consolas" fo:font-size="10.5pt" fo:font-weight="normal" officeooo:paragraph-rsid="0222f644" fo:background-color="#1f1f1f"/>
    </style:style>
    <style:style style:name="P405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406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407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222f644" fo:background-color="#1f1f1f"/>
    </style:style>
    <style:style style:name="P408" style:family="paragraph" style:parent-style-name="Heading_20_2">
      <style:paragraph-properties fo:break-before="page"/>
    </style:style>
    <style:style style:name="P409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410" style:family="paragraph" style:parent-style-name="Text_20_body" style:list-style-name="L39">
      <style:paragraph-properties fo:line-height="100%" fo:text-align="start" style:justify-single-word="false"/>
      <style:text-properties officeooo:paragraph-rsid="0222f644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text-properties fo:font-weight="bold" style:font-weight-asian="bold" style:font-weight-complex="bold"/>
    </style:style>
    <style:style style:name="P413" style:family="paragraph" style:parent-style-name="Heading_20_1">
      <style:paragraph-properties fo:line-height="100%"/>
      <style:text-properties officeooo:paragraph-rsid="01bb64b4"/>
    </style:style>
    <style:style style:name="P414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4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4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41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418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19" style:family="paragraph" style:parent-style-name="Text_20_body" style:list-style-name="L40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20" style:family="paragraph" style:parent-style-name="Text_20_body" style:list-style-name="L41">
      <style:paragraph-properties fo:margin-top="0.101cm" fo:margin-bottom="0.101cm" style:contextual-spacing="false" fo:line-height="100%"/>
      <style:text-properties fo:color="#000000" loext:opacity="100%" officeooo:rsid="01bb64b4" style:font-size-asian="12pt"/>
    </style:style>
    <style:style style:name="P421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839e6"/>
    </style:style>
    <style:style style:name="P422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3" style:family="paragraph" style:parent-style-name="Text_20_body">
      <style:paragraph-properties fo:margin-top="0.101cm" fo:margin-bottom="0.101cm" style:contextual-spacing="false" fo:line-height="100%" fo:text-align="start" style:justify-single-word="false" fo:break-before="pag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4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officeooo:paragraph-rsid="024b150a"/>
    </style:style>
    <style:style style:name="P425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569cd6" loext:opacity="100%" style:font-name="Consolas" fo:font-size="10.5pt" fo:font-weight="normal" officeooo:paragraph-rsid="024b150a" fo:background-color="#1f1f1f"/>
    </style:style>
    <style:style style:name="P42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7" style:family="paragraph" style:parent-style-name="Heading_20_1">
      <style:paragraph-properties fo:line-height="100%" fo:keep-with-next="always"/>
      <style:text-properties officeooo:paragraph-rsid="01d3c92a"/>
    </style:style>
    <style:style style:name="P42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24e9ae9"/>
    </style:style>
    <style:style style:name="P429" style:family="paragraph" style:parent-style-name="Table_20_Contents">
      <style:text-properties fo:font-size="2pt" style:font-size-asian="2pt" style:font-size-complex="2pt"/>
    </style:style>
    <style:style style:name="P430" style:family="paragraph" style:parent-style-name="Heading_20_1">
      <style:paragraph-properties fo:line-height="100%"/>
      <style:text-properties officeooo:paragraph-rsid="01d3c92a"/>
    </style:style>
    <style:style style:name="P431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432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433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434" style:family="paragraph" style:parent-style-name="Text_20_body">
      <style:paragraph-properties fo:line-height="100%"/>
      <style:text-properties fo:language="pt" fo:country="BR" officeooo:paragraph-rsid="01ac95ad"/>
    </style:style>
    <style:style style:name="P435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436" style:family="paragraph" style:parent-style-name="Text_20_body">
      <style:paragraph-properties fo:line-height="100%"/>
      <style:text-properties fo:language="pt" fo:country="BR" officeooo:rsid="000e2760"/>
    </style:style>
    <style:style style:name="P437" style:family="paragraph" style:parent-style-name="Text_20_body" style:list-style-name="L42">
      <style:paragraph-properties fo:line-height="100%"/>
      <style:text-properties fo:language="pt" fo:country="BR" officeooo:rsid="000e2760"/>
    </style:style>
    <style:style style:name="P438" style:family="paragraph" style:parent-style-name="Text_20_body" style:list-style-name="L43">
      <style:paragraph-properties fo:line-height="100%"/>
    </style:style>
    <style:style style:name="P439" style:family="paragraph" style:parent-style-name="Text_20_body" style:list-style-name="L44">
      <style:paragraph-properties fo:line-height="100%"/>
    </style:style>
    <style:style style:name="P440" style:family="paragraph" style:parent-style-name="Text_20_body" style:list-style-name="L44">
      <style:paragraph-properties fo:line-height="100%"/>
      <style:text-properties fo:language="pt" fo:country="BR" officeooo:rsid="000e2760"/>
    </style:style>
    <style:style style:name="P441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442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443" style:family="paragraph" style:parent-style-name="Text_20_body">
      <style:paragraph-properties fo:line-height="100%"/>
      <style:text-properties fo:language="pt" fo:country="BR" officeooo:paragraph-rsid="01c694eb"/>
    </style:style>
    <style:style style:name="P444" style:family="paragraph" style:parent-style-name="Heading_20_1">
      <style:paragraph-properties fo:line-height="100%" fo:keep-with-next="always"/>
      <style:text-properties officeooo:paragraph-rsid="01c694eb"/>
    </style:style>
    <style:style style:name="P445" style:family="paragraph" style:parent-style-name="Text_20_body">
      <style:paragraph-properties fo:line-height="100%"/>
      <style:text-properties officeooo:paragraph-rsid="01dac7db"/>
    </style:style>
    <style:style style:name="P446" style:family="paragraph" style:parent-style-name="Text_20_body">
      <style:paragraph-properties fo:line-height="100%"/>
      <style:text-properties officeooo:rsid="01dac7db" officeooo:paragraph-rsid="01dac7db"/>
    </style:style>
    <style:style style:name="P447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48" style:family="paragraph" style:parent-style-name="Table_20_Heading">
      <style:paragraph-properties fo:line-height="100%"/>
    </style:style>
    <style:style style:name="P449" style:family="paragraph" style:parent-style-name="Table_20_Contents">
      <style:paragraph-properties fo:line-height="100%"/>
    </style:style>
    <style:style style:name="P450" style:family="paragraph" style:parent-style-name="Text_20_body" style:list-style-name="L45">
      <style:paragraph-properties fo:line-height="100%"/>
      <style:text-properties officeooo:paragraph-rsid="01dac7db"/>
    </style:style>
    <style:style style:name="P451" style:family="paragraph" style:parent-style-name="Text_20_body" style:list-style-name="L46">
      <style:paragraph-properties fo:line-height="100%"/>
      <style:text-properties officeooo:paragraph-rsid="01dac7db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family="Monospace" style:font-pitch="fixed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ffff00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1" style:family="text">
      <style:text-properties fo:color="#b5cea8" loext:opacity="100%" fo:font-family="Monospace" style:font-pitch="fixed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2" style:family="text">
      <style:text-properties fo:color="#569cd6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3" style:family="text">
      <style:text-properties fo:font-size="12pt" officeooo:rsid="01601b28" style:font-size-asian="12pt" style:font-size-complex="12pt"/>
    </style:style>
    <style:style style:name="T44" style:family="text">
      <style:text-properties fo:language="pt" fo:country="BR" officeooo:rsid="01601b28"/>
    </style:style>
    <style:style style:name="T45" style:family="text">
      <style:text-properties fo:language="pt" fo:country="BR" officeooo:rsid="0182d8c6"/>
    </style:style>
    <style:style style:name="T46" style:family="text">
      <style:text-properties fo:language="pt" fo:country="BR" officeooo:rsid="01facf2f"/>
    </style:style>
    <style:style style:name="T47" style:family="text">
      <style:text-properties fo:language="pt" fo:country="BR" officeooo:rsid="0161bb22"/>
    </style:style>
    <style:style style:name="T48" style:family="text">
      <style:text-properties style:font-name="Mono" fo:language="pt" fo:country="BR" officeooo:rsid="01601b28"/>
    </style:style>
    <style:style style:name="T49" style:family="text">
      <style:text-properties fo:language="pt" fo:country="BR" officeooo:rsid="018464a4"/>
    </style:style>
    <style:style style:name="T50" style:family="text">
      <style:text-properties fo:color="#d4d4d4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2" style:family="text">
      <style:text-properties fo:color="#b5cea8" loext:opacity="100%" fo:font-family="Monospace" style:font-pitch="fixed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3" style:family="text">
      <style:text-properties fo:color="#569cd6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color="#ffff00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5" style:family="text">
      <style:text-properties fo:language="pt" fo:country="BR" fo:font-weight="bold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1f5892a"/>
    </style:style>
    <style:style style:name="T58" style:family="text">
      <style:text-properties style:text-underline-style="solid" style:text-underline-width="auto" style:text-underline-color="font-color" officeooo:rsid="01f5892a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officeooo:rsid="0163c035"/>
    </style:style>
    <style:style style:name="T61" style:family="text">
      <style:text-properties fo:language="pt" fo:country="BR" style:text-underline-style="solid" style:text-underline-width="auto" style:text-underline-color="font-color" officeooo:rsid="0163c035"/>
    </style:style>
    <style:style style:name="T62" style:family="text">
      <style:text-properties fo:language="pt" fo:country="BR" officeooo:rsid="0163c035"/>
    </style:style>
    <style:style style:name="T63" style:family="text">
      <style:text-properties style:font-name="Mono" officeooo:rsid="0163c035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color="#2a6099" loext:opacity="100%" fo:font-family="'Noto Sans Armenian'" style:font-family-generic="swiss" style:font-pitch="variable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6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7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8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9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1" style:family="text">
      <style:text-properties officeooo:rsid="00159500"/>
    </style:style>
    <style:style style:name="T72" style:family="text">
      <style:text-properties officeooo:rsid="006b166c"/>
    </style:style>
    <style:style style:name="T73" style:family="text">
      <style:text-properties fo:font-variant="normal" fo:text-transform="none" fo:letter-spacing="normal" fo:font-style="normal" fo:font-weight="normal" officeooo:rsid="000724ae"/>
    </style:style>
    <style:style style:name="T74" style:family="text">
      <style:text-properties fo:font-variant="normal" fo:text-transform="none" fo:letter-spacing="normal" fo:font-style="normal" fo:font-weight="normal" officeooo:rsid="00ca1cd9"/>
    </style:style>
    <style:style style:name="T75" style:family="text">
      <style:text-properties fo:font-variant="normal" fo:text-transform="none" fo:letter-spacing="normal" fo:font-style="normal" fo:font-weight="normal" officeooo:rsid="00e6e2ec"/>
    </style:style>
    <style:style style:name="T7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7" style:family="text">
      <style:text-properties fo:font-variant="normal" fo:text-transform="none" fo:letter-spacing="normal" fo:font-style="normal" fo:font-weight="normal" officeooo:rsid="001b3091"/>
    </style:style>
    <style:style style:name="T78" style:family="text">
      <style:text-properties officeooo:rsid="000724ae"/>
    </style:style>
    <style:style style:name="T79" style:family="text">
      <style:text-properties style:text-underline-style="solid" style:text-underline-width="auto" style:text-underline-color="font-color" officeooo:rsid="000724ae"/>
    </style:style>
    <style:style style:name="T80" style:family="text">
      <style:text-properties style:text-underline-style="none" officeooo:rsid="0008da07"/>
    </style:style>
    <style:style style:name="T81" style:family="text">
      <style:text-properties style:text-underline-style="solid" style:text-underline-width="auto" style:text-underline-color="font-color" officeooo:rsid="0008da07"/>
    </style:style>
    <style:style style:name="T82" style:family="text">
      <style:text-properties style:text-underline-style="solid" style:text-underline-width="auto" style:text-underline-color="font-color" officeooo:rsid="00133de2"/>
    </style:style>
    <style:style style:name="T83" style:family="text">
      <style:text-properties officeooo:rsid="0008da07"/>
    </style:style>
    <style:style style:name="T84" style:family="text">
      <style:text-properties officeooo:rsid="00ca1cd9"/>
    </style:style>
    <style:style style:name="T85" style:family="text">
      <style:text-properties style:font-name="Liberation Serif" officeooo:rsid="00fe66b7"/>
    </style:style>
    <style:style style:name="T86" style:family="text">
      <style:text-properties style:font-name="Liberation Serif" officeooo:rsid="0008da07"/>
    </style:style>
    <style:style style:name="T87" style:family="text">
      <style:text-properties style:font-name="Liberation Serif" officeooo:rsid="00ca1cd9"/>
    </style:style>
    <style:style style:name="T88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90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1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3" style:family="text">
      <style:text-properties officeooo:rsid="01e78197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100" style:family="text">
      <style:text-properties fo:font-variant="normal" fo:text-transform="none" fo:letter-spacing="normal" fo:font-style="normal" style:text-underline-style="none" fo:font-weight="normal"/>
    </style:style>
    <style:style style:name="T101" style:family="text">
      <style:text-properties fo:font-variant="normal" fo:text-transform="none" fo:letter-spacing="normal" fo:font-style="normal" style:text-underline-style="none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5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6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7" style:family="text">
      <style:text-properties style:font-name="Liberation Serif" fo:font-size="12pt" fo:language="pt" fo:country="BR" officeooo:rsid="00104087" style:font-size-asian="12pt" style:font-size-complex="12pt"/>
    </style:style>
    <style:style style:name="T108" style:family="text">
      <style:text-properties style:font-name="Liberation Serif" fo:font-size="12pt" fo:language="pt" fo:country="BR" officeooo:rsid="01f80346" style:font-size-asian="12pt" style:font-size-complex="12pt"/>
    </style:style>
    <style:style style:name="T109" style:family="text">
      <style:text-properties style:font-name="Liberation Serif" fo:font-size="12pt" fo:language="pt" fo:country="BR" officeooo:rsid="00106bd1" style:font-size-asian="12pt" style:font-size-complex="12pt"/>
    </style:style>
    <style:style style:name="T110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2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3" style:family="text">
      <style:text-properties style:font-name="Liberation Serif" fo:font-size="12pt" fo:language="pt" fo:country="BR" officeooo:rsid="0011dd77" style:font-size-asian="12pt" style:font-size-complex="12pt"/>
    </style:style>
    <style:style style:name="T114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5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6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7" style:family="text">
      <style:text-properties fo:font-size="12pt" fo:language="pt" fo:country="BR" officeooo:rsid="00104087" style:font-size-asian="12pt" style:font-size-complex="12pt"/>
    </style:style>
    <style:style style:name="T118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color="#ce181e" loext:opacity="100%" fo:font-family="Monospace" style:font-pitch="fixed" style:text-underline-style="solid" style:text-underline-width="auto" style:text-underline-color="font-color" fo:font-weight="bold" style:font-weight-asian="bold" style:font-weight-complex="bold"/>
    </style:style>
    <style:style style:name="T12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4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7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8" style:family="text">
      <style:text-properties fo:font-weight="normal" officeooo:rsid="006a2549" style:font-weight-asian="normal" style:font-weight-complex="normal"/>
    </style:style>
    <style:style style:name="T129" style:family="text">
      <style:text-properties fo:font-weight="normal" officeooo:rsid="010d7bb1" style:font-weight-asian="normal" style:font-weight-complex="normal"/>
    </style:style>
    <style:style style:name="T130" style:family="text">
      <style:text-properties fo:font-weight="bold" officeooo:rsid="00106bd1" style:font-weight-asian="bold" style:font-weight-complex="bold"/>
    </style:style>
    <style:style style:name="T131" style:family="text">
      <style:text-properties fo:font-weight="bold" officeooo:rsid="010d7bb1" style:font-weight-asian="bold" style:font-weight-complex="bold"/>
    </style:style>
    <style:style style:name="T132" style:family="text">
      <style:text-properties fo:background-color="transparent" loext:char-shading-value="0"/>
    </style:style>
    <style:style style:name="T133" style:family="text">
      <style:text-properties officeooo:rsid="010d7bb1" fo:background-color="transparent" loext:char-shading-value="0"/>
    </style:style>
    <style:style style:name="T134" style:family="text">
      <style:text-properties officeooo:rsid="00106bd1" fo:background-color="transparent" loext:char-shading-value="0"/>
    </style:style>
    <style:style style:name="T135" style:family="text">
      <style:text-properties officeooo:rsid="010d7bb1"/>
    </style:style>
    <style:style style:name="T136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40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2" style:family="text">
      <style:text-properties officeooo:rsid="00136b99" fo:background-color="transparent" loext:char-shading-value="0"/>
    </style:style>
    <style:style style:name="T143" style:family="text">
      <style:text-properties fo:font-family="Monospace" style:font-pitch="fixed" fo:font-weight="bold" officeooo:rsid="00136b99" fo:background-color="transparent" loext:char-shading-value="0" style:font-weight-asian="bold" style:font-weight-complex="bold"/>
    </style:style>
    <style:style style:name="T144" style:family="text">
      <style:text-properties fo:font-family="Monospace" style:font-pitch="fixed" fo:font-weight="bold" officeooo:rsid="00136b99" style:font-weight-asian="bold" style:font-weight-complex="bold"/>
    </style:style>
    <style:style style:name="T145" style:family="text">
      <style:text-properties officeooo:rsid="00136b99"/>
    </style:style>
    <style:style style:name="T146" style:family="text">
      <style:text-properties style:font-name="Liberation Serif" officeooo:rsid="00136b99"/>
    </style:style>
    <style:style style:name="T147" style:family="text">
      <style:text-properties style:font-name="Liberation Serif" officeooo:rsid="010ac7df"/>
    </style:style>
    <style:style style:name="T148" style:family="text">
      <style:text-properties style:font-name="Liberation Serif" officeooo:rsid="00cbd505"/>
    </style:style>
    <style:style style:name="T1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fo:font-family="Monospace" style:font-pitch="fixed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8" style:family="text">
      <style:text-properties fo:font-size="12pt" style:font-size-asian="12pt" style:font-size-complex="12pt"/>
    </style:style>
    <style:style style:name="T159" style:family="text">
      <style:text-properties officeooo:rsid="01a090d6"/>
    </style:style>
    <style:style style:name="T160" style:family="text">
      <style:text-properties officeooo:rsid="001fa622"/>
    </style:style>
    <style:style style:name="T161" style:family="text">
      <style:text-properties fo:font-weight="bold" officeooo:rsid="001fa622" style:font-weight-asian="bold" style:font-weight-complex="bold"/>
    </style:style>
    <style:style style:name="T162" style:family="text">
      <style:text-properties fo:color="#ce181e" loext:opacity="100%" fo:font-weight="bold" officeooo:rsid="001fa622" style:font-weight-asian="bold" style:font-weight-complex="bold"/>
    </style:style>
    <style:style style:name="T163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4" style:family="text">
      <style:text-properties fo:color="#000000" loext:opacity="100%" style:font-name="Liberation Serif" fo:font-weight="normal" style:font-weight-asian="normal" style:font-weight-complex="normal"/>
    </style:style>
    <style:style style:name="T165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6" style:family="text">
      <style:text-properties fo:color="#ce181e" loext:opacity="100%" fo:font-family="Monospace" style:font-pitch="fixed" fo:font-weight="bold" officeooo:rsid="00159500" style:font-weight-asian="bold" style:font-weight-complex="bold"/>
    </style:style>
    <style:style style:name="T167" style:family="text">
      <style:text-properties fo:color="#ce181e" loext:opacity="100%" fo:font-weight="bold" officeooo:rsid="00159500" style:font-weight-asian="bold" style:font-weight-complex="bold"/>
    </style:style>
    <style:style style:name="T168" style:family="text">
      <style:text-properties fo:color="#000000" loext:opacity="100%" fo:font-weight="normal" officeooo:rsid="00159500" style:font-weight-asian="normal" style:font-weight-complex="normal"/>
    </style:style>
    <style:style style:name="T169" style:family="text">
      <style:text-properties fo:color="#ce181e" loext:opacity="100%" fo:font-family="Monospace" style:font-pitch="fixed" fo:font-weight="bold" officeooo:rsid="01193e9f" style:font-weight-asian="bold" style:font-weight-complex="bold"/>
    </style:style>
    <style:style style:name="T170" style:family="text">
      <style:text-properties fo:font-family="Monospace" style:font-pitch="fixed" officeooo:rsid="00159500"/>
    </style:style>
    <style:style style:name="T171" style:family="text">
      <style:text-properties officeooo:rsid="003cf95e"/>
    </style:style>
    <style:style style:name="T172" style:family="text">
      <style:text-properties style:text-underline-style="solid" style:text-underline-width="auto" style:text-underline-color="font-color" officeooo:rsid="003cf95e"/>
    </style:style>
    <style:style style:name="T173" style:family="text">
      <style:text-properties officeooo:rsid="0016b291"/>
    </style:style>
    <style:style style:name="T174" style:family="text">
      <style:text-properties style:font-name="Mono" officeooo:rsid="0016b291"/>
    </style:style>
    <style:style style:name="T175" style:family="text">
      <style:text-properties officeooo:rsid="00edc052"/>
    </style:style>
    <style:style style:name="T176" style:family="text">
      <style:text-properties fo:font-family="Monospace" style:font-pitch="fixed"/>
    </style:style>
    <style:style style:name="T177" style:family="text">
      <style:text-properties officeooo:rsid="00fe66b7"/>
    </style:style>
    <style:style style:name="T178" style:family="text">
      <style:text-properties officeooo:rsid="001cadfd"/>
    </style:style>
    <style:style style:name="T179" style:family="text">
      <style:text-properties fo:color="#ce181e" loext:opacity="100%" fo:font-weight="bold" style:font-weight-asian="bold" style:font-weight-complex="bold"/>
    </style:style>
    <style:style style:name="T180" style:family="text">
      <style:text-properties officeooo:rsid="00f65e2e"/>
    </style:style>
    <style:style style:name="T181" style:family="text">
      <style:text-properties officeooo:rsid="011a59e4"/>
    </style:style>
    <style:style style:name="T182" style:family="text">
      <style:text-properties style:font-name="Mono"/>
    </style:style>
    <style:style style:name="T183" style:family="text">
      <style:text-properties officeooo:rsid="012d4736"/>
    </style:style>
    <style:style style:name="T184" style:family="text">
      <style:text-properties style:font-name="Liberation Sans" fo:font-size="12pt" fo:language="pt" fo:country="BR" officeooo:rsid="00fab35d" style:font-size-asian="12pt" style:font-size-complex="12pt"/>
    </style:style>
    <style:style style:name="T185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6" style:family="text">
      <style:text-properties fo:color="#ffff00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8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9" style:family="text">
      <style:text-properties style:font-name="Liberation Serif" fo:font-size="12pt" fo:language="pt" fo:country="BR" officeooo:rsid="00f7dc00" style:font-size-asian="12pt" style:font-size-complex="12pt"/>
    </style:style>
    <style:style style:name="T190" style:family="text">
      <style:text-properties style:font-name="Liberation Serif" fo:font-size="12pt" fo:language="pt" fo:country="BR" officeooo:rsid="01104b4a" style:font-size-asian="12pt" style:font-size-complex="12pt"/>
    </style:style>
    <style:style style:name="T191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2" style:family="text">
      <style:text-properties officeooo:rsid="00f7dc00"/>
    </style:style>
    <style:style style:name="T193" style:family="text">
      <style:text-properties style:text-underline-style="none" fo:font-weight="bold" officeooo:rsid="00f7dc00" style:font-weight-asian="bold" style:font-weight-complex="bold"/>
    </style:style>
    <style:style style:name="T194" style:family="text">
      <style:text-properties style:text-underline-style="none" fo:font-weight="bold" style:font-weight-asian="bold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202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2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20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206" style:family="text">
      <style:text-properties fo:font-weight="bold" officeooo:rsid="00fab35d" style:font-weight-asian="bold" style:font-weight-complex="bold"/>
    </style:style>
    <style:style style:name="T207" style:family="text">
      <style:text-properties officeooo:rsid="00400bc2"/>
    </style:style>
    <style:style style:name="T208" style:family="text">
      <style:text-properties fo:color="#ce181e" loext:opacity="100%" fo:font-weight="normal" style:font-weight-asian="normal" style:font-weight-complex="normal"/>
    </style:style>
    <style:style style:name="T209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10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11" style:family="text">
      <style:text-properties fo:color="#ffffff" loext:opacity="100%" fo:font-family="Monospace" style:font-pitch="fixed" fo:font-weight="normal" fo:background-color="#000000" loext:char-shading-value="0" style:font-weight-asian="normal" style:font-weight-complex="normal"/>
    </style:style>
    <style:style style:name="T212" style:family="text">
      <style:text-properties fo:color="#ffff00" loext:opacity="100%" fo:font-family="Monospace" style:font-pitch="fixed" fo:font-weight="normal" fo:background-color="#000000" loext:char-shading-value="0" style:font-weight-asian="normal" style:font-weight-complex="normal"/>
    </style:style>
    <style:style style:name="T213" style:family="text">
      <style:text-properties style:text-underline-style="solid" style:text-underline-width="auto" style:text-underline-color="font-color" officeooo:rsid="0018a839"/>
    </style:style>
    <style:style style:name="T214" style:family="text">
      <style:text-properties fo:color="#ce181e" loext:opacity="100%" fo:font-family="Monospace" style:font-pitch="fixed" fo:font-weight="bold" style:font-weight-asian="bold" style:font-weight-complex="bold"/>
    </style:style>
    <style:style style:name="T215" style:family="text">
      <style:text-properties fo:font-size="12pt" style:text-underline-style="none" officeooo:rsid="0018a839" style:font-size-asian="12pt" style:font-size-complex="12pt"/>
    </style:style>
    <style:style style:name="T216" style:family="text">
      <style:text-properties fo:font-size="12pt" style:text-underline-style="none" officeooo:rsid="00cbfeb6" style:font-size-asian="12pt" style:font-size-complex="12pt"/>
    </style:style>
    <style:style style:name="T217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8" style:family="text">
      <style:text-properties fo:font-size="12pt" style:text-underline-style="none" officeooo:rsid="016f9642" style:font-size-asian="12pt" style:font-size-complex="12pt"/>
    </style:style>
    <style:style style:name="T219" style:family="text">
      <style:text-properties fo:font-size="12pt" style:text-underline-style="none" officeooo:rsid="001921f1" style:font-size-asian="12pt" style:font-size-complex="12pt"/>
    </style:style>
    <style:style style:name="T220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21" style:family="text">
      <style:text-properties fo:font-size="12pt" style:text-underline-style="none" officeooo:rsid="011a59e4" style:font-size-asian="12pt" style:font-size-complex="12pt"/>
    </style:style>
    <style:style style:name="T222" style:family="text">
      <style:text-properties officeooo:rsid="016f9642"/>
    </style:style>
    <style:style style:name="T223" style:family="text">
      <style:text-properties fo:color="#2a6099" loext:opacity="100%" style:font-name="Mono" fo:font-weight="bold" style:font-weight-asian="bold" style:font-weight-complex="bold"/>
    </style:style>
    <style:style style:name="T224" style:family="text">
      <style:text-properties fo:color="#000000" loext:opacity="100%" style:font-name="Liberation Serif" style:text-underline-style="none" officeooo:rsid="00de5115"/>
    </style:style>
    <style:style style:name="T225" style:family="text">
      <style:text-properties fo:color="#000000" loext:opacity="100%" style:font-name="Liberation Serif" style:text-underline-style="none" officeooo:rsid="01a1617f"/>
    </style:style>
    <style:style style:name="T226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7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2" style:family="text">
      <style:text-properties fo:language="pt" fo:country="BR" officeooo:rsid="0173e915"/>
    </style:style>
    <style:style style:name="T233" style:family="text">
      <style:text-properties fo:language="pt" fo:country="BR" officeooo:rsid="0173e46d"/>
    </style:style>
    <style:style style:name="T234" style:family="text">
      <style:text-properties style:font-name="Mono" fo:font-size="10pt" fo:language="pt" fo:country="BR" officeooo:rsid="0173e46d" style:font-size-asian="10pt" style:font-size-complex="10pt"/>
    </style:style>
    <style:style style:name="T235" style:family="text">
      <style:text-properties fo:font-size="12pt" fo:language="pt" fo:country="BR" style:text-underline-style="none" officeooo:rsid="000e2760" style:font-size-asian="12pt" style:font-size-complex="12pt"/>
    </style:style>
    <style:style style:name="T236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41" style:family="text">
      <style:text-properties fo:color="#569cd6" loext:opacity="100%"/>
    </style:style>
    <style:style style:name="T242" style:family="text">
      <style:text-properties fo:color="#d4d4d4" loext:opacity="100%"/>
    </style:style>
    <style:style style:name="T243" style:family="text">
      <style:text-properties fo:color="#dcdcaa" loext:opacity="100%"/>
    </style:style>
    <style:style style:name="T244" style:family="text">
      <style:text-properties fo:color="#9cdcfe" loext:opacity="100%"/>
    </style:style>
    <style:style style:name="T245" style:family="text">
      <style:text-properties fo:color="#6a9955" loext:opacity="100%"/>
    </style:style>
    <style:style style:name="T246" style:family="text">
      <style:text-properties fo:color="#4ec9b0" loext:opacity="100%"/>
    </style:style>
    <style:style style:name="T247" style:family="text">
      <style:text-properties fo:color="#ffff00" loext:opacity="100%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9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50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51" style:family="text">
      <style:text-properties fo:font-variant="normal" fo:text-transform="none" fo:color="#ce181e" loext:opacity="100%" fo:font-family="Monospace" style:font-pitch="fixed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53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4" style:family="text">
      <style:text-properties fo:font-variant="normal" fo:text-transform="none" fo:color="#dcdcaa" loext:opacity="100%" fo:font-family="Monospace" style:font-pitch="fixed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d4d4d4" loext:opacity="100%" fo:font-family="Monospace" style:font-pitch="fixed" fo:letter-spacing="normal" fo:font-style="normal" fo:font-weight="normal" fo:background-color="#111111" loext:char-shading-value="0"/>
    </style:style>
    <style:style style:name="T256" style:family="text">
      <style:text-properties fo:font-variant="normal" fo:text-transform="none" fo:color="#ce9178" loext:opacity="100%" fo:font-family="Monospace" style:font-pitch="fixed" fo:letter-spacing="normal" fo:font-style="normal" fo:font-weight="normal" fo:background-color="#111111" loext:char-shading-value="0"/>
    </style:style>
    <style:style style:name="T257" style:family="text">
      <style:text-properties fo:font-variant="normal" fo:text-transform="none" fo:color="#ffff00" loext:opacity="100%" fo:font-family="Monospace" style:font-pitch="fixed" fo:letter-spacing="normal" fo:font-style="normal" fo:font-weight="bold" fo:background-color="#111111" loext:char-shading-value="0" style:font-weight-asian="bold" style:font-weight-complex="bold"/>
    </style:style>
    <style:style style:name="T258" style:family="text">
      <style:text-properties fo:font-variant="normal" fo:text-transform="none" fo:color="#9cdcfe" loext:opacity="100%" fo:font-family="Monospace" style:font-pitch="fixed" fo:letter-spacing="normal" fo:font-style="normal" fo:font-weight="normal" fo:background-color="#111111" loext:char-shading-value="0"/>
    </style:style>
    <style:style style:name="T259" style:family="text">
      <style:text-properties fo:font-variant="normal" fo:text-transform="none" fo:color="#9cdcfe" loext:opacity="100%" fo:font-family="Monospace" style:font-pitch="fixed" fo:letter-spacing="normal" fo:font-style="normal" fo:font-weight="normal" officeooo:rsid="002045df" fo:background-color="#111111" loext:char-shading-value="0"/>
    </style:style>
    <style:style style:name="T260" style:family="text">
      <style:text-properties fo:color="#2a6099" loext:opacity="100%" fo:font-weight="bold" style:font-weight-asian="bold" style:font-weight-complex="bold"/>
    </style:style>
    <style:style style:name="T261" style:family="text">
      <style:text-properties officeooo:rsid="00f91742"/>
    </style:style>
    <style:style style:name="T262" style:family="text">
      <style:text-properties fo:font-weight="bold" officeooo:rsid="00f91742" style:font-weight-asian="bold" style:font-weight-complex="bold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7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7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73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5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6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7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8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9" style:family="text">
      <style:text-properties officeooo:rsid="00ff48d5"/>
    </style:style>
    <style:style style:name="T28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8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4" style:family="text">
      <style:text-properties officeooo:rsid="006287df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7" style:family="text">
      <style:text-properties fo:font-size="12pt" officeooo:rsid="006b166c" style:font-size-asian="12pt" style:font-size-complex="12pt"/>
    </style:style>
    <style:style style:name="T288" style:family="text">
      <style:text-properties fo:font-size="12pt" officeooo:rsid="01a36cca" style:font-size-asian="12pt" style:font-size-complex="12pt"/>
    </style:style>
    <style:style style:name="T289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90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2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3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4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5" style:family="text">
      <style:text-properties style:font-name="Liberation Serif" fo:font-size="12pt" officeooo:rsid="003155d3" style:font-size-asian="12pt" style:font-size-complex="12pt"/>
    </style:style>
    <style:style style:name="T296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300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301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302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303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4" style:family="text">
      <style:text-properties officeooo:rsid="00e1c371" style:font-size-asian="12pt" style:font-size-complex="12pt"/>
    </style:style>
    <style:style style:name="T305" style:family="text">
      <style:text-properties fo:color="#9cdcfe" loext:opacity="100%" style:font-name="Consolas" fo:font-size="10.5pt" fo:font-weight="normal" fo:background-color="#1f1f1f" loext:char-shading-value="0"/>
    </style:style>
    <style:style style:name="T306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7" style:family="text">
      <style:text-properties fo:color="#d4d4d4" loext:opacity="100%" style:font-name="Consolas" fo:font-size="10.5pt" fo:font-weight="normal" fo:background-color="#1f1f1f" loext:char-shading-value="0"/>
    </style:style>
    <style:style style:name="T308" style:family="text">
      <style:text-properties fo:color="#b5cea8" loext:opacity="100%" style:font-name="Consolas" fo:font-size="10.5pt" fo:font-weight="normal" fo:background-color="#1f1f1f" loext:char-shading-value="0"/>
    </style:style>
    <style:style style:name="T309" style:family="text">
      <style:text-properties fo:color="#6a9955" loext:opacity="100%" style:font-name="Consolas" fo:font-size="10.5pt" fo:font-weight="normal" fo:background-color="#1f1f1f" loext:char-shading-value="0"/>
    </style:style>
    <style:style style:name="T310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11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5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7" style:family="text">
      <style:text-properties fo:color="#2a6099" loext:opacity="100%" fo:font-family="'Noto Sans Armenian'" style:font-family-generic="swiss" style:font-pitch="variable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8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3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32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3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4" style:family="text">
      <style:text-properties fo:font-variant="normal" fo:text-transform="none" fo:color="#000000" loext:opacity="100%" fo:font-family="sans-serif" style:font-family-generic="swiss" fo:font-size="12pt" fo:letter-spacing="normal" fo:font-style="normal" style:text-underline-style="none" fo:font-weight="normal" officeooo:rsid="00363250" style:font-size-asian="12pt" style:font-size-complex="12pt"/>
    </style:style>
    <style:style style:name="T3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6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9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40" style:family="text">
      <style:text-properties fo:color="#000000" loext:opacity="100%" fo:font-family="Monospace" style:font-pitch="fixed" fo:font-size="12pt" style:text-underline-style="none" officeooo:rsid="0039b365" style:font-size-asian="12pt" style:font-size-complex="12pt"/>
    </style:style>
    <style:style style:name="T341" style:family="text">
      <style:text-properties style:font-name="Liberation Serif" fo:font-size="12pt" style:text-underline-style="none" officeooo:rsid="003b703f" style:font-size-asian="12pt" style:font-size-complex="12pt"/>
    </style:style>
    <style:style style:name="T342" style:family="text">
      <style:text-properties style:font-name="Liberation Serif" style:text-underline-style="none" officeooo:rsid="003b703f"/>
    </style:style>
    <style:style style:name="T343" style:family="text">
      <style:text-properties style:font-name="Liberation Serif" style:text-underline-style="none"/>
    </style:style>
    <style:style style:name="T344" style:family="text">
      <style:text-properties style:font-name="Liberation Serif" style:text-underline-style="none" officeooo:rsid="006287df"/>
    </style:style>
    <style:style style:name="T345" style:family="text">
      <style:text-properties style:font-name="Liberation Serif" style:text-underline-style="none" officeooo:rsid="01542718"/>
    </style:style>
    <style:style style:name="T346" style:family="text">
      <style:text-properties style:text-underline-style="none" officeooo:rsid="010023cf" style:font-size-asian="12pt" style:font-size-complex="12pt"/>
    </style:style>
    <style:style style:name="T347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8" style:family="text">
      <style:text-properties style:text-underline-style="none" officeooo:rsid="0138563c" style:font-size-asian="12pt" style:font-size-complex="12pt"/>
    </style:style>
    <style:style style:name="T349" style:family="text">
      <style:text-properties style:text-underline-style="none" officeooo:rsid="0139c808" style:font-size-asian="12pt" style:font-size-complex="12pt"/>
    </style:style>
    <style:style style:name="T350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351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352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353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354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355" style:family="text">
      <style:text-properties fo:font-size="12pt" fo:language="pt" fo:country="BR" style:text-underline-style="none" officeooo:rsid="010023cf" style:font-size-asian="12pt" style:font-size-complex="12pt"/>
    </style:style>
    <style:style style:name="T356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357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8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9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0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1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362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363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364" style:family="text">
      <style:text-properties officeooo:rsid="00d9bf05"/>
    </style:style>
    <style:style style:name="T365" style:family="text">
      <style:text-properties style:font-name="Liberation Serif" style:text-underline-style="none" officeooo:rsid="006129d5"/>
    </style:style>
    <style:style style:name="T366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67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68" style:family="text">
      <style:text-properties style:font-name="Liberation Serif" style:text-underline-style="none" officeooo:rsid="004693bd"/>
    </style:style>
    <style:style style:name="T369" style:family="text">
      <style:text-properties style:font-name="Liberation Serif" style:text-underline-style="none" officeooo:rsid="0103600f"/>
    </style:style>
    <style:style style:name="T370" style:family="text">
      <style:text-properties style:font-name="Liberation Serif" style:text-underline-style="none" officeooo:rsid="004536ce"/>
    </style:style>
    <style:style style:name="T371" style:family="text">
      <style:text-properties fo:color="#ff4000" loext:opacity="100%" fo:font-family="Monospace" style:font-pitch="fixed" style:text-underline-style="none" fo:font-weight="bold" officeooo:rsid="004536ce" style:font-weight-asian="bold" style:font-weight-complex="bold"/>
    </style:style>
    <style:style style:name="T372" style:family="text">
      <style:text-properties fo:color="#ff4000" loext:opacity="100%" fo:font-family="Monospace" style:font-pitch="fixed" style:text-underline-style="none" fo:font-weight="bold" officeooo:rsid="00cf09d7" style:font-weight-asian="bold" style:font-weight-complex="bold"/>
    </style:style>
    <style:style style:name="T373" style:family="text">
      <style:text-properties style:font-name="Liberation Serif" style:text-underline-style="none" officeooo:rsid="00480c72"/>
    </style:style>
    <style:style style:name="T374" style:family="text">
      <style:text-properties fo:font-family="Monospace" style:font-pitch="fixed" style:text-underline-style="none" officeooo:rsid="00480c72"/>
    </style:style>
    <style:style style:name="T375" style:family="text">
      <style:text-properties fo:color="#ff4000" loext:opacity="100%" fo:font-family="Monospace" style:font-pitch="fixed" style:text-underline-style="none" fo:font-weight="bold" officeooo:rsid="00480c72" style:font-weight-asian="bold" style:font-weight-complex="bold"/>
    </style:style>
    <style:style style:name="T376" style:family="text">
      <style:text-properties fo:color="#ff4000" loext:opacity="100%" fo:font-family="Monospace" style:font-pitch="fixed" style:text-underline-style="none" fo:font-weight="bold" style:font-weight-asian="bold" style:font-weight-complex="bold"/>
    </style:style>
    <style:style style:name="T377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78" style:family="text">
      <style:text-properties style:font-name="Liberation Serif" style:text-underline-style="none" officeooo:rsid="00cf09d7"/>
    </style:style>
    <style:style style:name="T379" style:family="text">
      <style:text-properties style:font-name="Liberation Serif" style:text-underline-style="none" officeooo:rsid="00f01bf8"/>
    </style:style>
    <style:style style:name="T380" style:family="text">
      <style:text-properties fo:color="#800080" loext:opacity="100%" fo:font-family="Monospace" style:font-pitch="fixed" style:text-underline-style="none" fo:font-weight="bold" style:font-weight-asian="bold" style:font-weight-complex="bold"/>
    </style:style>
    <style:style style:name="T381" style:family="text">
      <style:text-properties style:font-name="Liberation Serif" style:text-underline-style="none" officeooo:rsid="004af6fd"/>
    </style:style>
    <style:style style:name="T382" style:family="text">
      <style:text-properties fo:font-family="Monospace" style:font-pitch="fixed" style:text-underline-style="none" fo:font-weight="bold" style:font-weight-asian="bold" style:font-weight-complex="bold"/>
    </style:style>
    <style:style style:name="T38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84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85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86" style:family="text">
      <style:text-properties fo:color="#ff4000" loext:opacity="100%" fo:font-family="Monospace" style:font-pitch="fixed" style:text-underline-style="none" fo:font-weight="bold" officeooo:rsid="004693bd" style:font-weight-asian="bold" style:font-weight-complex="bold"/>
    </style:style>
    <style:style style:name="T38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88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8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9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9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92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93" style:family="text">
      <style:text-properties style:font-name="Liberation Serif" officeooo:rsid="00549112"/>
    </style:style>
    <style:style style:name="T394" style:family="text">
      <style:text-properties fo:color="#2a6099" loext:opacity="100%" style:font-name="Mono" fo:font-weight="bold" officeooo:rsid="00549112" style:font-weight-asian="bold" style:font-weight-complex="bold"/>
    </style:style>
    <style:style style:name="T395" style:family="text">
      <style:text-properties style:font-name="Liberation Serif" fo:font-weight="normal" officeooo:rsid="00549112" style:font-weight-asian="normal" style:font-weight-complex="normal"/>
    </style:style>
    <style:style style:name="T396" style:family="text">
      <style:text-properties style:font-name="Liberation Serif" fo:font-weight="bold" officeooo:rsid="00549112" style:font-weight-asian="bold" style:font-weight-complex="bold"/>
    </style:style>
    <style:style style:name="T39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98" style:family="text">
      <style:text-properties style:text-underline-style="none" officeooo:rsid="00e1c371"/>
    </style:style>
    <style:style style:name="T399" style:family="text">
      <style:text-properties style:font-name="Mono" style:text-underline-style="none" fo:font-weight="bold" officeooo:rsid="00e1c371" style:font-weight-asian="bold" style:font-weight-complex="bold"/>
    </style:style>
    <style:style style:name="T400" style:family="text">
      <style:text-properties style:text-underline-style="solid" style:text-underline-width="auto" style:text-underline-color="font-color" officeooo:rsid="00e1c371"/>
    </style:style>
    <style:style style:name="T401" style:family="text">
      <style:text-properties fo:color="#c586c0" loext:opacity="100%" style:font-name="Consolas" fo:font-weight="normal" fo:background-color="#1e1e1e" loext:char-shading-value="0"/>
    </style:style>
    <style:style style:name="T402" style:family="text">
      <style:text-properties fo:color="#d4d4d4" loext:opacity="100%" style:font-name="Consolas" fo:font-weight="normal" fo:background-color="#1e1e1e" loext:char-shading-value="0"/>
    </style:style>
    <style:style style:name="T403" style:family="text">
      <style:text-properties fo:color="#9cdcfe" loext:opacity="100%" style:font-name="Consolas" fo:font-weight="normal" fo:background-color="#1e1e1e" loext:char-shading-value="0"/>
    </style:style>
    <style:style style:name="T404" style:family="text">
      <style:text-properties fo:color="#dcdcaa" loext:opacity="100%" style:font-name="Consolas" fo:font-weight="normal" fo:background-color="#1e1e1e" loext:char-shading-value="0"/>
    </style:style>
    <style:style style:name="T405" style:family="text">
      <style:text-properties fo:color="#ce9178" loext:opacity="100%" style:font-name="Consolas" fo:font-weight="normal" fo:background-color="#1e1e1e" loext:char-shading-value="0"/>
    </style:style>
    <style:style style:name="T406" style:family="text">
      <style:text-properties officeooo:rsid="00d9fbfd"/>
    </style:style>
    <style:style style:name="T407" style:family="text">
      <style:text-properties style:font-name="Liberation Serif" fo:font-weight="normal" officeooo:rsid="00cf09d7" style:font-weight-asian="normal" style:font-weight-complex="normal"/>
    </style:style>
    <style:style style:name="T408" style:family="text">
      <style:text-properties style:font-name="Liberation Serif" fo:font-weight="bold" officeooo:rsid="00cf09d7" style:font-weight-asian="bold" style:font-weight-complex="bold"/>
    </style:style>
    <style:style style:name="T409" style:family="text">
      <style:text-properties fo:font-weight="bold" officeooo:rsid="005f13ae" style:font-weight-asian="bold" style:font-weight-complex="bold"/>
    </style:style>
    <style:style style:name="T410" style:family="text">
      <style:text-properties fo:font-weight="bold" officeooo:rsid="00cf09d7" style:font-weight-asian="bold" style:font-weight-complex="bold"/>
    </style:style>
    <style:style style:name="T411" style:family="text">
      <style:text-properties officeooo:rsid="00f01bf8"/>
    </style:style>
    <style:style style:name="T412" style:family="text">
      <style:text-properties style:font-name="Liberation Serif" fo:language="pt" fo:country="BR" officeooo:rsid="000e2760"/>
    </style:style>
    <style:style style:name="T413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14" style:family="text">
      <style:text-properties style:font-name="Mono" fo:language="pt" fo:country="BR" officeooo:rsid="000e2760"/>
    </style:style>
    <style:style style:name="T415" style:family="text">
      <style:text-properties style:font-name="Liberation Serif" fo:language="pt" fo:country="BR" officeooo:rsid="01500562"/>
    </style:style>
    <style:style style:name="T416" style:family="text">
      <style:text-properties style:font-name="Liberation Serif" officeooo:rsid="000e2760"/>
    </style:style>
    <style:style style:name="T417" style:family="text">
      <style:text-properties fo:color="#9cdcfe" loext:opacity="100%" style:font-name="Liberation Serif"/>
    </style:style>
    <style:style style:name="T418" style:family="text">
      <style:text-properties fo:color="#d4d4d4" loext:opacity="100%" style:font-name="Liberation Serif"/>
    </style:style>
    <style:style style:name="T419" style:family="text">
      <style:text-properties fo:color="#ce9178" loext:opacity="100%" style:font-name="Liberation Serif"/>
    </style:style>
    <style:style style:name="T420" style:family="text">
      <style:text-properties fo:color="#c586c0" loext:opacity="100%"/>
    </style:style>
    <style:style style:name="T421" style:family="text">
      <style:text-properties fo:color="#ce9178" loext:opacity="100%"/>
    </style:style>
    <style:style style:name="T422" style:family="text">
      <style:text-properties fo:color="#dcdcaa" loext:opacity="100%" style:font-name="Consolas" fo:font-size="10.5pt" fo:font-weight="normal" fo:background-color="#1f1f1f" loext:char-shading-value="0"/>
    </style:style>
    <style:style style:name="T423" style:family="text">
      <style:text-properties fo:color="#b5cea8" loext:opacity="100%"/>
    </style:style>
    <style:style style:name="T424" style:family="text">
      <style:text-properties officeooo:rsid="0071e7d1"/>
    </style:style>
    <style:style style:name="T425" style:family="text">
      <style:text-properties style:text-underline-style="solid" style:text-underline-width="auto" style:text-underline-color="font-color" officeooo:rsid="0071e7d1"/>
    </style:style>
    <style:style style:name="T426" style:family="text">
      <style:text-properties style:font-name="Mono" style:text-underline-style="solid" style:text-underline-width="auto" style:text-underline-color="font-color" officeooo:rsid="0071e7d1"/>
    </style:style>
    <style:style style:name="T427" style:family="text">
      <style:text-properties officeooo:rsid="006f8c00"/>
    </style:style>
    <style:style style:name="T428" style:family="text">
      <style:text-properties fo:font-family="Monospace" style:font-pitch="fixed" style:text-underline-style="solid" style:text-underline-width="auto" style:text-underline-color="font-color" officeooo:rsid="006f8c00"/>
    </style:style>
    <style:style style:name="T429" style:family="text">
      <style:text-properties officeooo:rsid="00cfc560"/>
    </style:style>
    <style:style style:name="T430" style:family="text">
      <style:text-properties fo:color="#2a6099" loext:opacity="100%" fo:font-family="Monospace" style:font-pitch="fixed" style:text-underline-style="none" fo:font-weight="bold" style:font-weight-asian="bold" style:font-weight-complex="bold"/>
    </style:style>
    <style:style style:name="T4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32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36" style:family="text">
      <style:text-properties style:font-name="Liberation Sans" fo:language="pt" fo:country="BR"/>
    </style:style>
    <style:style style:name="T437" style:family="text">
      <style:text-properties style:font-name="Liberation Serif" fo:font-size="12pt" fo:language="pt" fo:country="BR" officeooo:rsid="0071e7d1" style:font-size-asian="12pt" style:font-size-complex="12pt"/>
    </style:style>
    <style:style style:name="T438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39" style:family="text">
      <style:text-properties style:font-name="Liberation Serif" fo:font-size="12pt" fo:language="pt" fo:country="BR" officeooo:rsid="012067e0" style:font-size-asian="12pt" style:font-size-complex="12pt"/>
    </style:style>
    <style:style style:name="T440" style:family="text">
      <style:text-properties style:font-name="Liberation Serif" fo:font-size="12pt" fo:language="pt" fo:country="BR" officeooo:rsid="0073e376" style:font-size-asian="12pt" style:font-size-complex="12pt"/>
    </style:style>
    <style:style style:name="T441" style:family="text">
      <style:text-properties style:font-name="Liberation Serif" fo:font-size="12pt" fo:language="pt" fo:country="BR" officeooo:rsid="00cfc560" style:font-size-asian="12pt" style:font-size-complex="12pt"/>
    </style:style>
    <style:style style:name="T442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43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44" style:family="text">
      <style:text-properties style:font-name="Liberation Serif" fo:font-size="12pt" fo:language="pt" fo:country="BR" officeooo:rsid="0080d31d" style:font-size-asian="12pt" style:font-size-complex="12pt"/>
    </style:style>
    <style:style style:name="T445" style:family="text">
      <style:text-properties style:font-name="Liberation Serif" fo:font-size="12pt" fo:language="pt" fo:country="BR" officeooo:rsid="00f01bf8" style:font-size-asian="12pt" style:font-size-complex="12pt"/>
    </style:style>
    <style:style style:name="T446" style:family="text">
      <style:text-properties style:font-name="Liberation Serif" fo:font-size="12pt" fo:language="pt" fo:country="BR" officeooo:rsid="00f1ce12" style:font-size-asian="12pt" style:font-size-complex="12pt"/>
    </style:style>
    <style:style style:name="T447" style:family="text">
      <style:text-properties style:font-name="Liberation Serif" fo:font-size="12pt" fo:language="pt" fo:country="BR" officeooo:rsid="0076f36b" style:font-size-asian="12pt" style:font-size-complex="12pt"/>
    </style:style>
    <style:style style:name="T448" style:family="text">
      <style:text-properties style:font-name="Liberation Serif" fo:language="pt" fo:country="BR"/>
    </style:style>
    <style:style style:name="T449" style:family="text">
      <style:text-properties style:font-name="Liberation Serif" fo:language="pt" fo:country="BR" officeooo:rsid="0131d471"/>
    </style:style>
    <style:style style:name="T450" style:family="text">
      <style:text-properties style:font-name="Liberation Serif" fo:font-size="12pt" fo:language="pt" fo:country="BR" officeooo:rsid="00d09739" style:font-size-asian="12pt" style:font-size-complex="12pt"/>
    </style:style>
    <style:style style:name="T451" style:family="text">
      <style:text-properties style:font-name="Liberation Serif" fo:font-size="12pt" fo:language="pt" fo:country="BR" officeooo:rsid="007c259c" style:font-size-asian="12pt" style:font-size-complex="12pt"/>
    </style:style>
    <style:style style:name="T452" style:family="text">
      <style:text-properties style:font-name="Liberation Serif" fo:font-size="12pt" fo:language="pt" fo:country="BR" officeooo:rsid="007a7d78" style:font-size-asian="12pt" style:font-size-complex="12pt"/>
    </style:style>
    <style:style style:name="T453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4" style:family="text">
      <style:text-properties style:font-name="Liberation Serif" fo:font-size="12pt" fo:language="pt" fo:country="BR" officeooo:rsid="007efd7c" style:font-size-asian="12pt" style:font-size-complex="12pt"/>
    </style:style>
    <style:style style:name="T455" style:family="text">
      <style:text-properties style:font-name="Liberation Serif" fo:font-size="12pt" fo:language="pt" fo:country="BR" officeooo:rsid="007f3615" style:font-size-asian="12pt" style:font-size-complex="12pt"/>
    </style:style>
    <style:style style:name="T456" style:family="text">
      <style:text-properties fo:color="#ce181e" loext:opacity="100%" fo:font-family="Monospace" style:font-pitch="fixed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7" style:family="text">
      <style:text-properties style:font-name="Liberation Sans" fo:font-size="12pt" fo:language="pt" fo:country="BR" officeooo:rsid="007a7d78" style:font-size-asian="12pt" style:font-size-complex="12pt"/>
    </style:style>
    <style:style style:name="T458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59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61" style:family="text">
      <style:text-properties style:font-name="Liberation Sans" fo:font-size="12pt" fo:language="pt" fo:country="BR" officeooo:rsid="007c259c" style:font-size-asian="12pt" style:font-size-complex="12pt"/>
    </style:style>
    <style:style style:name="T462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63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64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5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6" style:family="text">
      <style:text-properties style:font-name="Liberation Serif" fo:font-size="12pt" fo:language="pt" fo:country="BR" officeooo:rsid="008235c7" style:font-size-asian="12pt" style:font-size-complex="12pt"/>
    </style:style>
    <style:style style:name="T467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68" style:family="text">
      <style:text-properties style:font-name="Liberation Serif" fo:font-size="12pt" fo:language="pt" fo:country="BR" officeooo:rsid="0083f736" style:font-size-asian="12pt" style:font-size-complex="12pt"/>
    </style:style>
    <style:style style:name="T469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70" style:family="text">
      <style:text-properties style:font-name="Liberation Serif" fo:font-size="12pt" fo:language="pt" fo:country="BR" officeooo:rsid="00f26c74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72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73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4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5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76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77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78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79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80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81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82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83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8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85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86" style:family="text">
      <style:text-properties fo:color="#ce9178" loext:opacity="100%" style:font-name="Consolas" fo:font-size="10.5pt" fo:font-weight="normal" fo:background-color="#1f1f1f" loext:char-shading-value="0"/>
    </style:style>
    <style:style style:name="T487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88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89" style:family="text">
      <style:text-properties style:font-name="Liberation Serif" fo:language="pt" fo:country="BR" fo:font-weight="bold" style:font-weight-asian="bold" style:font-weight-complex="bold"/>
    </style:style>
    <style:style style:name="T490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91" style:family="text">
      <style:text-properties fo:color="#2a6099" loext:opacity="100%" fo:font-family="Monospace" style:font-pitch="fixed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92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94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9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96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9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501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2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3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04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50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06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7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508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0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1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2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3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1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15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6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7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18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19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0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1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2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3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4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5" style:family="text">
      <style:text-properties fo:color="#ff0000" loext:opacity="100%" fo:font-family="Monospace" style:font-pitch="fixed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6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27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8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9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0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1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32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33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4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5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6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7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8" style:family="text">
      <style:text-properties style:font-name="Liberation Serif" fo:font-size="12pt" fo:language="pt" fo:country="BR" officeooo:rsid="0089948f" style:font-size-asian="12pt" style:font-size-complex="12pt"/>
    </style:style>
    <style:style style:name="T539" style:family="text">
      <style:text-properties style:font-name="Liberation Serif" fo:font-size="12pt" fo:language="pt" fo:country="BR" officeooo:rsid="00db7365" style:font-size-asian="12pt" style:font-size-complex="12pt"/>
    </style:style>
    <style:style style:name="T540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41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2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3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4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5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7" style:family="text">
      <style:text-properties style:font-name="Liberation Serif" fo:font-size="12pt" fo:language="pt" fo:country="BR" style:font-size-asian="12pt" style:font-size-complex="12pt"/>
    </style:style>
    <style:style style:name="T548" style:family="text">
      <style:text-properties style:font-name="Liberation Serif" fo:font-size="12pt" fo:language="pt" fo:country="BR" officeooo:rsid="00d59182" style:font-size-asian="12pt" style:font-size-complex="12pt"/>
    </style:style>
    <style:style style:name="T549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50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1" style:family="text">
      <style:text-properties style:font-name="Liberation Serif" fo:font-size="12pt" fo:language="pt" fo:country="BR" officeooo:rsid="008cce33" style:font-size-asian="12pt" style:font-size-complex="12pt"/>
    </style:style>
    <style:style style:name="T552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53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4" style:family="text">
      <style:text-properties style:font-name="Liberation Serif" fo:font-size="12pt" fo:language="pt" fo:country="BR" officeooo:rsid="00d3304c" style:font-size-asian="12pt" style:font-size-complex="12pt"/>
    </style:style>
    <style:style style:name="T555" style:family="text">
      <style:text-properties style:font-name="Liberation Serif" fo:font-size="12pt" fo:language="pt" fo:country="BR" officeooo:rsid="00eb15cb" style:font-size-asian="12pt" style:font-size-complex="12pt"/>
    </style:style>
    <style:style style:name="T5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58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59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0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61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62" style:family="text">
      <style:text-properties style:font-name="Liberation Serif" fo:font-size="12pt" fo:language="pt" fo:country="BR" officeooo:rsid="0090c001" style:font-size-asian="12pt" style:font-size-complex="12pt"/>
    </style:style>
    <style:style style:name="T563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4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5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6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67" style:family="text">
      <style:text-properties style:font-name="Liberation Serif" fo:font-size="12pt" fo:language="pt" fo:country="BR" officeooo:rsid="00931c50" style:font-size-asian="12pt" style:font-size-complex="12pt"/>
    </style:style>
    <style:style style:name="T568" style:family="text">
      <style:text-properties style:font-name="Liberation Serif" fo:font-size="12pt" fo:language="pt" fo:country="BR" officeooo:rsid="01b1ca30" style:font-size-asian="12pt" style:font-size-complex="12pt"/>
    </style:style>
    <style:style style:name="T569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70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71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72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73" style:family="text">
      <style:text-properties style:font-name="Liberation Serif" fo:font-size="12pt" fo:language="pt" fo:country="BR" officeooo:rsid="01c71579" style:font-size-asian="12pt" style:font-size-complex="12pt"/>
    </style:style>
    <style:style style:name="T574" style:family="text">
      <style:text-properties style:font-name="Liberation Serif" fo:font-size="12pt" fo:language="pt" fo:country="BR" officeooo:rsid="01c903e1" style:font-size-asian="12pt" style:font-size-complex="12pt"/>
    </style:style>
    <style:style style:name="T575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76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7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8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9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80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1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82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83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84" style:family="text">
      <style:text-properties style:font-name="Liberation Serif" fo:font-size="12pt" fo:language="pt" fo:country="BR" officeooo:rsid="009781f8" style:font-size-asian="12pt" style:font-size-complex="12pt"/>
    </style:style>
    <style:style style:name="T585" style:family="text">
      <style:text-properties style:font-name="Liberation Serif" fo:font-size="12pt" fo:language="pt" fo:country="BR" officeooo:rsid="00db8495" style:font-size-asian="12pt" style:font-size-complex="12pt"/>
    </style:style>
    <style:style style:name="T586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7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8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90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1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2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9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94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5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6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7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98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9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600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60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2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605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608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60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10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1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2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3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4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1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16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17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18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9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20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21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2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3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4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5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27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31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2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3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4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6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7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8" style:family="text">
      <style:text-properties style:font-name="Liberation Serif" fo:font-size="12pt" fo:language="pt" fo:country="BR" officeooo:rsid="009e54d6" style:font-size-asian="12pt" style:font-size-complex="12pt"/>
    </style:style>
    <style:style style:name="T639" style:family="text">
      <style:text-properties style:font-name="Liberation Serif" fo:font-size="12pt" fo:language="pt" fo:country="BR" officeooo:rsid="009fc47f" style:font-size-asian="12pt" style:font-size-complex="12pt"/>
    </style:style>
    <style:style style:name="T640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41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42" style:family="text">
      <style:text-properties style:font-name="Liberation Serif" fo:font-size="12pt" officeooo:rsid="009fc47f" style:font-size-asian="12pt" style:font-size-complex="12pt"/>
    </style:style>
    <style:style style:name="T643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44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45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46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47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48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49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50" style:family="text">
      <style:text-properties fo:color="#dcdcaa" loext:opacity="100%" style:font-name="Mono" fo:font-weight="normal" fo:background-color="#1e1e1e" loext:char-shading-value="0"/>
    </style:style>
    <style:style style:name="T651" style:family="text">
      <style:text-properties fo:color="#d4d4d4" loext:opacity="100%" style:font-name="Mono" fo:font-weight="normal" fo:background-color="#1e1e1e" loext:char-shading-value="0"/>
    </style:style>
    <style:style style:name="T652" style:family="text">
      <style:text-properties fo:color="#ce9178" loext:opacity="100%" style:font-name="Mono" fo:font-weight="normal" fo:background-color="#1e1e1e" loext:char-shading-value="0"/>
    </style:style>
    <style:style style:name="T653" style:family="text">
      <style:text-properties fo:color="#9cdcfe" loext:opacity="100%" style:font-name="Mono" fo:font-weight="normal" fo:background-color="#1e1e1e" loext:char-shading-value="0"/>
    </style:style>
    <style:style style:name="T654" style:family="text">
      <style:text-properties fo:color="#d4d4d4" loext:opacity="100%" style:font-name="Liberation Serif" fo:font-weight="normal" fo:background-color="#1e1e1e" loext:char-shading-value="0"/>
    </style:style>
    <style:style style:name="T655" style:family="text">
      <style:text-properties style:font-name="Liberation Serif" fo:font-size="12pt" fo:language="pt" fo:country="BR" officeooo:rsid="00a12c32" style:font-size-asian="12pt" style:font-size-complex="12pt"/>
    </style:style>
    <style:style style:name="T656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5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58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59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60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61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62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63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64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65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6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70" style:family="text">
      <style:text-properties style:font-name="Liberation Serif" officeooo:rsid="00a12c32"/>
    </style:style>
    <style:style style:name="T671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72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73" style:family="text">
      <style:text-properties style:font-name="Liberation Serif" officeooo:rsid="00a55c3f"/>
    </style:style>
    <style:style style:name="T674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75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76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7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8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9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80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81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2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3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4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5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6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7" style:family="text">
      <style:text-properties style:font-name="Liberation Serif" fo:font-size="12pt" fo:language="pt" fo:country="BR" officeooo:rsid="00aa2d9d" style:font-size-asian="12pt" style:font-size-complex="12pt"/>
    </style:style>
    <style:style style:name="T688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89" style:family="text">
      <style:text-properties style:font-name="Liberation Serif" fo:font-size="12pt" fo:language="pt" fo:country="BR" officeooo:rsid="00ac08f6" style:font-size-asian="12pt" style:font-size-complex="12pt"/>
    </style:style>
    <style:style style:name="T690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1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2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3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4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5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6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97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98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9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0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2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4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5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2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4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15" style:family="text">
      <style:text-properties style:font-name="Mono" fo:font-weight="bold" style:font-weight-asian="bold" style:font-weight-complex="bold"/>
    </style:style>
    <style:style style:name="T716" style:family="text">
      <style:text-properties officeooo:rsid="000e2760"/>
    </style:style>
    <style:style style:name="T717" style:family="text">
      <style:text-properties officeooo:rsid="01cffdb6"/>
    </style:style>
    <style:style style:name="T718" style:family="text">
      <style:text-properties style:font-name="Mono" fo:language="pt" fo:country="BR" fo:font-weight="bold" style:font-weight-asian="bold" style:font-weight-complex="bold"/>
    </style:style>
    <style:style style:name="T719" style:family="text">
      <style:text-properties fo:language="pt" fo:country="BR" officeooo:rsid="01d1bbde"/>
    </style:style>
    <style:style style:name="T720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21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22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23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24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25" style:family="text">
      <style:text-properties style:font-name="Liberation Sans" fo:language="pt" fo:country="BR" officeooo:rsid="000e2760" style:font-name-asian="Microsoft YaHei" style:font-name-complex="Mangal1"/>
    </style:style>
    <style:style style:name="T726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27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8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9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30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1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2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3" style:family="text">
      <style:text-properties fo:color="#9cdcfe" loext:opacity="100%" style:font-name="Consolas" fo:font-size="10.5pt" fo:font-weight="normal"/>
    </style:style>
    <style:style style:name="T734" style:family="text">
      <style:text-properties fo:color="#d4d4d4" loext:opacity="100%" style:font-name="Consolas" fo:font-size="10.5pt" fo:font-weight="normal"/>
    </style:style>
    <style:style style:name="T735" style:family="text">
      <style:text-properties fo:color="#569cd6" loext:opacity="100%" style:font-name="Consolas" fo:font-size="10.5pt" fo:font-weight="normal"/>
    </style:style>
    <style:style style:name="T736" style:family="text">
      <style:text-properties fo:color="#808080" loext:opacity="100%" style:font-name="Consolas" fo:font-size="10.5pt" fo:font-weight="normal"/>
    </style:style>
    <style:style style:name="T737" style:family="text">
      <style:text-properties fo:color="#808080" loext:opacity="100%"/>
    </style:style>
    <style:style style:name="T738" style:family="text">
      <style:text-properties officeooo:rsid="01887e73"/>
    </style:style>
    <style:style style:name="T739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40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41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42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43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44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45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4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47" style:family="text">
      <style:text-properties style:font-name="Liberation Serif" fo:font-size="12pt" fo:language="pt" fo:country="BR" style:text-underline-style="none" fo:font-weight="normal" officeooo:rsid="0252008a" style:font-size-asian="12pt" style:font-weight-asian="normal" style:font-size-complex="12pt" style:font-weight-complex="normal"/>
    </style:style>
    <style:style style:name="T748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9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50" style:family="text">
      <style:text-properties style:font-name="Liberation Serif" fo:font-size="12pt" fo:language="pt" fo:country="BR" officeooo:rsid="00bdec46" style:font-size-asian="12pt" style:font-size-complex="12pt"/>
    </style:style>
    <style:style style:name="T751" style:family="text">
      <style:text-properties fo:color="#2a6099" loext:opacity="100%" fo:font-family="Monospace" style:font-pitch="fixed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52" style:family="text">
      <style:text-properties fo:color="#2a6099" loext:opacity="100%" fo:font-family="Monospace" style:font-pitch="fixed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53" style:family="text">
      <style:text-properties officeooo:rsid="00f288ab"/>
    </style:style>
    <style:style style:name="T754" style:family="text">
      <style:text-properties fo:font-style="italic" officeooo:rsid="00f288ab" style:font-style-asian="italic" style:font-style-complex="italic"/>
    </style:style>
    <style:style style:name="T755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56" style:family="text">
      <style:text-properties fo:color="#ce181e" loext:opacity="100%" fo:font-family="Monospace" style:font-pitch="fixed" fo:font-weight="bold" officeooo:rsid="00b725b2" style:font-weight-asian="bold" style:font-weight-complex="bold"/>
    </style:style>
    <style:style style:name="T757" style:family="text">
      <style:text-properties officeooo:rsid="00b725b2"/>
    </style:style>
    <style:style style:name="T758" style:family="text">
      <style:text-properties fo:color="#c586c0" loext:opacity="100%" style:font-name="Mono" fo:font-weight="normal" officeooo:rsid="00b725b2" fo:background-color="#1e1e1e" loext:char-shading-value="0"/>
    </style:style>
    <style:style style:name="T759" style:family="text">
      <style:text-properties fo:color="#d4d4d4" loext:opacity="100%" style:font-name="Mono" fo:font-weight="normal" officeooo:rsid="00b725b2" fo:background-color="#1e1e1e" loext:char-shading-value="0"/>
    </style:style>
    <style:style style:name="T760" style:family="text">
      <style:text-properties fo:color="#9cdcfe" loext:opacity="100%" style:font-name="Mono" fo:font-weight="normal" officeooo:rsid="00b725b2" fo:background-color="#1e1e1e" loext:char-shading-value="0"/>
    </style:style>
    <style:style style:name="T761" style:family="text">
      <style:text-properties fo:color="#6a9955" loext:opacity="100%" style:font-name="Mono" fo:font-weight="normal" officeooo:rsid="00b725b2" fo:background-color="#1e1e1e" loext:char-shading-value="0"/>
    </style:style>
    <style:style style:name="T762" style:family="text">
      <style:text-properties fo:color="#ffff00" loext:opacity="100%" style:font-name="Mono" fo:font-weight="normal" officeooo:rsid="00b725b2" fo:background-color="#1e1e1e" loext:char-shading-value="0"/>
    </style:style>
    <style:style style:name="T763" style:family="text">
      <style:text-properties fo:font-size="12pt" officeooo:rsid="00b2d328" style:font-size-asian="12pt" style:font-size-complex="12pt"/>
    </style:style>
    <style:style style:name="T764" style:family="text">
      <style:text-properties officeooo:rsid="00b2d328"/>
    </style:style>
    <style:style style:name="T765" style:family="text">
      <style:text-properties style:font-name="Mono" officeooo:rsid="00b2d328"/>
    </style:style>
    <style:style style:name="T766" style:family="text">
      <style:text-properties officeooo:rsid="01aa837b"/>
    </style:style>
    <style:style style:name="T767" style:family="text">
      <style:text-properties officeooo:rsid="00bd5516"/>
    </style:style>
    <style:style style:name="T768" style:family="text">
      <style:text-properties officeooo:rsid="01860800"/>
    </style:style>
    <style:style style:name="T769" style:family="text">
      <style:text-properties style:font-name="Liberation Serif" fo:font-weight="normal" style:font-weight-asian="normal" style:font-weight-complex="normal"/>
    </style:style>
    <style:style style:name="T770" style:family="text">
      <style:text-properties style:font-name="Liberation Serif" fo:font-weight="normal" officeooo:rsid="01887e73" style:font-weight-asian="normal" style:font-weight-complex="normal"/>
    </style:style>
    <style:style style:name="T771" style:family="text">
      <style:text-properties style:font-name="Liberation Serif" fo:font-weight="bold" style:font-weight-asian="bold" style:font-weight-complex="bold"/>
    </style:style>
    <style:style style:name="T772" style:family="text">
      <style:text-properties fo:color="#9cdcfe" loext:opacity="100%" style:font-name="Mono" fo:font-weight="normal" officeooo:rsid="018767ee" fo:background-color="#1e1e1e" loext:char-shading-value="0"/>
    </style:style>
    <style:style style:name="T773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74" style:family="text">
      <style:text-properties style:text-underline-style="solid" style:text-underline-width="auto" style:text-underline-color="font-color" officeooo:rsid="00fcd43c"/>
    </style:style>
    <style:style style:name="T775" style:family="text">
      <style:text-properties officeooo:rsid="00fcd43c"/>
    </style:style>
    <style:style style:name="T776" style:family="text">
      <style:text-properties fo:color="#dcdcaa" loext:opacity="100%" style:font-name="Mono" fo:font-weight="normal" officeooo:rsid="00fcd43c" fo:background-color="#1e1e1e" loext:char-shading-value="0"/>
    </style:style>
    <style:style style:name="T777" style:family="text">
      <style:text-properties fo:color="#d4d4d4" loext:opacity="100%" style:font-name="Mono" fo:font-weight="normal" officeooo:rsid="00fcd43c" fo:background-color="#1e1e1e" loext:char-shading-value="0"/>
    </style:style>
    <style:style style:name="T778" style:family="text">
      <style:text-properties fo:color="#9cdcfe" loext:opacity="100%" style:font-name="Mono" fo:font-weight="normal" officeooo:rsid="00fcd43c" fo:background-color="#1e1e1e" loext:char-shading-value="0"/>
    </style:style>
    <style:style style:name="T779" style:family="text">
      <style:text-properties style:font-name="Mono" officeooo:rsid="00fcd43c"/>
    </style:style>
    <style:style style:name="T780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81" style:family="text">
      <style:text-properties officeooo:rsid="00fd7e4c"/>
    </style:style>
    <style:style style:name="T782" style:family="text">
      <style:text-properties fo:color="#dcdcaa" loext:opacity="100%" style:font-name="Mono" fo:font-weight="normal" officeooo:rsid="00bd5516" fo:background-color="#1e1e1e" loext:char-shading-value="0"/>
    </style:style>
    <style:style style:name="T783" style:family="text">
      <style:text-properties fo:color="#d4d4d4" loext:opacity="100%" style:font-name="Mono" fo:font-weight="normal" officeooo:rsid="00bd5516" fo:background-color="#1e1e1e" loext:char-shading-value="0"/>
    </style:style>
    <style:style style:name="T784" style:family="text">
      <style:text-properties fo:color="#9cdcfe" loext:opacity="100%" style:font-name="Mono" fo:font-weight="normal" officeooo:rsid="00bd5516" fo:background-color="#1e1e1e" loext:char-shading-value="0"/>
    </style:style>
    <style:style style:name="T785" style:family="text">
      <style:text-properties style:text-underline-style="none" officeooo:rsid="00fb1536"/>
    </style:style>
    <style:style style:name="T786" style:family="text">
      <style:text-properties style:text-underline-style="solid" style:text-underline-width="auto" style:text-underline-color="font-color" officeooo:rsid="00fb1536"/>
    </style:style>
    <style:style style:name="T787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88" style:family="text">
      <style:text-properties fo:color="#dcdcaa" loext:opacity="100%" fo:font-weight="normal" fo:background-color="#1e1e1e" loext:char-shading-value="0"/>
    </style:style>
    <style:style style:name="T789" style:family="text">
      <style:text-properties fo:color="#dcdcaa" loext:opacity="100%" fo:font-weight="normal" officeooo:rsid="00fcd43c" fo:background-color="#1e1e1e" loext:char-shading-value="0"/>
    </style:style>
    <style:style style:name="T790" style:family="text">
      <style:text-properties style:text-underline-style="none" officeooo:rsid="00fd7e4c"/>
    </style:style>
    <style:style style:name="T791" style:family="text">
      <style:text-properties style:text-underline-style="solid" style:text-underline-width="auto" style:text-underline-color="font-color" officeooo:rsid="00fd7e4c"/>
    </style:style>
    <style:style style:name="T792" style:family="text">
      <style:text-properties fo:color="#dcdcaa" loext:opacity="100%" style:font-name="Mono" fo:font-weight="normal" officeooo:rsid="00fd7e4c" fo:background-color="#1e1e1e" loext:char-shading-value="0"/>
    </style:style>
    <style:style style:name="T793" style:family="text">
      <style:text-properties style:font-name="Liberation Serif" officeooo:rsid="00bd5516"/>
    </style:style>
    <style:style style:name="T794" style:family="text">
      <style:text-properties style:font-name="Liberation Serif" style:text-underline-style="none" officeooo:rsid="00fd7e4c"/>
    </style:style>
    <style:style style:name="T795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96" style:family="text">
      <style:text-properties style:font-name="Liberation Serif" style:text-underline-style="none" officeooo:rsid="00bd5516"/>
    </style:style>
    <style:style style:name="T797" style:family="text">
      <style:text-properties style:font-name="Liberation Serif" officeooo:rsid="00fd7e4c"/>
    </style:style>
    <style:style style:name="T798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9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4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5" style:family="text">
      <style:text-properties style:font-name="Liberation Serif" fo:font-size="12pt" style:text-underline-style="none" officeooo:rsid="00fd7e4c" style:font-size-asian="12pt" style:font-size-complex="12pt"/>
    </style:style>
    <style:style style:name="T806" style:family="text">
      <style:text-properties style:font-name="Liberation Serif" fo:font-size="12pt" style:text-underline-style="none" officeooo:rsid="0184f0b7" style:font-size-asian="12pt" style:font-size-complex="12pt"/>
    </style:style>
    <style:style style:name="T807" style:family="text">
      <style:text-properties style:font-name="Liberation Serif" fo:font-size="12pt" style:text-underline-style="none" officeooo:rsid="018767ee" style:font-size-asian="12pt" style:font-size-complex="12pt"/>
    </style:style>
    <style:style style:name="T808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80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10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811" style:family="text">
      <style:text-properties style:text-underline-style="none"/>
    </style:style>
    <style:style style:name="T812" style:family="text">
      <style:text-properties style:text-underline-style="solid" style:text-underline-width="auto" style:text-underline-color="font-color" officeooo:rsid="00d681ad"/>
    </style:style>
    <style:style style:name="T81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14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18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19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20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21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22" style:family="text">
      <style:text-properties fo:color="#dcdcaa" loext:opacity="100%" style:font-name="Consolas" fo:font-weight="normal"/>
    </style:style>
    <style:style style:name="T823" style:family="text">
      <style:text-properties style:font-name="Consolas" fo:font-weight="normal"/>
    </style:style>
    <style:style style:name="T824" style:family="text">
      <style:text-properties fo:color="#9cdcfe" loext:opacity="100%" style:font-name="Consolas" fo:font-weight="normal"/>
    </style:style>
    <style:style style:name="T825" style:family="text">
      <style:text-properties fo:color="#b5cea8" loext:opacity="100%" style:font-name="Consolas" fo:font-weight="normal"/>
    </style:style>
    <style:style style:name="T826" style:family="text">
      <style:text-properties fo:color="#6a9955" loext:opacity="100%" style:font-name="Consolas" fo:font-weight="normal"/>
    </style:style>
    <style:style style:name="T827" style:family="text">
      <style:text-properties fo:font-weight="bold" officeooo:rsid="018be7f0" style:font-weight-asian="bold" style:font-weight-complex="bold"/>
    </style:style>
    <style:style style:name="T828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29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37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1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2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43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44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45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46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48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51" style:family="text">
      <style:text-properties officeooo:rsid="022ea256"/>
    </style:style>
    <style:style style:name="T852" style:family="text">
      <style:text-properties fo:language="pt" fo:country="BR" officeooo:rsid="000e2760"/>
    </style:style>
    <style:style style:name="T853" style:family="text">
      <style:text-properties fo:language="pt" fo:country="BR" officeooo:rsid="022ea256"/>
    </style:style>
    <style:style style:name="T854" style:family="text">
      <style:text-properties fo:language="pt" fo:country="BR" fo:font-weight="bold" officeooo:rsid="000e2760" style:font-weight-asian="bold" style:font-weight-complex="bold"/>
    </style:style>
    <style:style style:name="T855" style:family="text">
      <style:text-properties fo:font-weight="normal"/>
    </style:style>
    <style:style style:name="T856" style:family="text">
      <style:text-properties fo:language="pt" fo:country="BR" officeooo:rsid="01869135"/>
    </style:style>
    <style:style style:name="T857" style:family="text">
      <style:text-properties fo:language="pt" fo:country="BR" officeooo:rsid="016d7e7f"/>
    </style:style>
    <style:style style:name="T858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59" style:family="text">
      <style:text-properties officeooo:rsid="01869135"/>
    </style:style>
    <style:style style:name="T860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61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62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63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64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65" style:family="text">
      <style:text-properties style:font-name="Liberation Sans" officeooo:rsid="01869135" style:font-name-asian="Microsoft YaHei" style:font-name-complex="Mangal1"/>
    </style:style>
    <style:style style:name="T866" style:family="text">
      <style:text-properties style:font-name="Liberation Sans" officeooo:rsid="0208fbb4" style:font-name-asian="Microsoft YaHei" style:font-name-complex="Mangal1"/>
    </style:style>
    <style:style style:name="T867" style:family="text">
      <style:text-properties fo:language="pt" fo:country="BR" fo:font-weight="bold" officeooo:rsid="016d7e7f" style:font-weight-asian="bold" style:font-weight-complex="bold"/>
    </style:style>
    <style:style style:name="T868" style:family="text">
      <style:text-properties fo:language="pt" fo:country="BR" officeooo:rsid="0208fbb4"/>
    </style:style>
    <style:style style:name="T869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70" style:family="text">
      <style:text-properties fo:language="pt" fo:country="BR" style:text-underline-style="solid" style:text-underline-width="auto" style:text-underline-color="font-color"/>
    </style:style>
    <style:style style:name="T871" style:family="text">
      <style:text-properties officeooo:rsid="019276e1"/>
    </style:style>
    <style:style style:name="T872" style:family="text">
      <style:text-properties fo:font-weight="bold" officeooo:rsid="000e2760" style:font-weight-asian="bold" style:font-weight-complex="bold"/>
    </style:style>
    <style:style style:name="T873" style:family="text">
      <style:text-properties officeooo:rsid="016d7e7f"/>
    </style:style>
    <style:style style:name="T874" style:family="text">
      <style:text-properties fo:font-weight="bold" officeooo:rsid="019276e1" style:font-weight-asian="bold" style:font-weight-complex="bold"/>
    </style:style>
    <style:style style:name="T875" style:family="text">
      <style:text-properties officeooo:rsid="020a2d2d"/>
    </style:style>
    <style:style style:name="T876" style:family="text">
      <style:text-properties officeooo:rsid="02320e26"/>
    </style:style>
    <style:style style:name="T877" style:family="text">
      <style:text-properties officeooo:rsid="02308899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0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2" style:family="text">
      <style:text-properties officeooo:rsid="01abba9b"/>
    </style:style>
    <style:style style:name="T88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8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8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8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88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90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6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90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3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4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5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908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1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21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2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3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4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5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6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31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2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4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5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6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7" style:family="text">
      <style:text-properties fo:color="#dcdcaa" loext:opacity="100%" style:font-name="Consolas" fo:font-size="10.5pt" fo:font-weight="normal"/>
    </style:style>
    <style:style style:name="T938" style:family="text">
      <style:text-properties fo:color="#4ec9b0" loext:opacity="100%" style:font-name="Consolas" fo:font-size="10.5pt" fo:font-weight="normal"/>
    </style:style>
    <style:style style:name="T939" style:family="text">
      <style:text-properties fo:color="#f10d0c" loext:opacity="100%" style:font-name="Liberation Serif" fo:language="pt" fo:country="BR" officeooo:rsid="023bb870" style:font-name-asian="Microsoft YaHei" style:font-name-complex="Mangal1"/>
    </style:style>
    <style:style style:name="T940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941" style:family="text">
      <style:text-properties fo:color="#2a6099" loext:opacity="100%" style:font-name="Liberation Serif" fo:language="pt" fo:country="BR" fo:font-style="normal" fo:font-weight="bold" officeooo:rsid="02386107" style:font-name-asian="Microsoft YaHei" style:font-style-asian="normal" style:font-weight-asian="bold" style:font-name-complex="Mangal1" style:font-style-complex="normal" style:font-weight-complex="bold"/>
    </style:style>
    <style:style style:name="T942" style:family="text">
      <style:text-properties fo:color="#2a6099" loext:opacity="100%" style:font-name="Liberation Serif" fo:language="pt" fo:country="BR" fo:font-style="normal" fo:font-weight="bold" officeooo:rsid="023486ad" style:font-name-asian="Microsoft YaHei" style:font-style-asian="normal" style:font-weight-asian="bold" style:font-name-complex="Mangal1" style:font-style-complex="normal" style:font-weight-complex="bold"/>
    </style:style>
    <style:style style:name="T943" style:family="text">
      <style:text-properties fo:color="#000000" loext:opacity="100%" style:font-name="Liberation Serif" fo:language="pt" fo:country="BR" fo:font-weight="normal" officeooo:rsid="023486ad" style:font-name-asian="Microsoft YaHei" style:font-weight-asian="normal" style:font-name-complex="Mangal1" style:font-weight-complex="normal"/>
    </style:style>
    <style:style style:name="T944" style:family="text">
      <style:text-properties fo:color="#000000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5" style:family="text">
      <style:text-properties fo:color="#000000" loext:opacity="100%" officeooo:rsid="023486ad" style:font-name-asian="Microsoft YaHei"/>
    </style:style>
    <style:style style:name="T946" style:family="text">
      <style:text-properties fo:color="#2a6099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7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948" style:family="text">
      <style:text-properties fo:color="#000000" loext:opacity="100%" style:font-name="Liberation Serif" fo:language="pt" fo:country="BR" officeooo:rsid="023e89f2" style:font-name-asian="Microsoft YaHei" style:font-name-complex="Mangal1"/>
    </style:style>
    <style:style style:name="T949" style:family="text">
      <style:text-properties fo:color="#000000" loext:opacity="100%" style:font-name="Liberation Serif" fo:language="pt" fo:country="BR" officeooo:rsid="023fb324" style:font-name-asian="Microsoft YaHei" style:font-name-complex="Mangal1"/>
    </style:style>
    <style:style style:name="T950" style:family="text">
      <style:text-properties fo:color="#000000" loext:opacity="100%" fo:language="pt" fo:country="BR" officeooo:rsid="023fb324"/>
    </style:style>
    <style:style style:name="T951" style:family="text">
      <style:text-properties fo:color="#000000" loext:opacity="100%" style:font-name="Liberation Serif" fo:language="pt" fo:country="BR" officeooo:rsid="023bb870" style:font-name-asian="Microsoft YaHei" style:font-name-complex="Mangal1"/>
    </style:style>
    <style:style style:name="T952" style:family="text">
      <style:text-properties fo:color="#000000" loext:opacity="100%" style:font-name="Liberation Serif" fo:language="pt" fo:country="BR" officeooo:rsid="0235f34c" style:font-name-asian="Microsoft YaHei" style:font-name-complex="Mangal1"/>
    </style:style>
    <style:style style:name="T953" style:family="text">
      <style:text-properties fo:color="#000000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54" style:family="text">
      <style:text-properties fo:color="#000000" loext:opacity="100%" style:font-name="Liberation Serif" fo:language="pt" fo:country="BR" officeooo:rsid="023d8741" style:font-name-asian="Microsoft YaHei" style:font-name-complex="Mangal1"/>
    </style:style>
    <style:style style:name="T955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6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7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8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9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960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1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bold" officeooo:rsid="023486ad" style:font-name-asian="Microsoft YaHei" style:font-weight-asian="bold" style:font-name-complex="Mangal1" style:font-weight-complex="bold"/>
    </style:style>
    <style:style style:name="T962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d8741" style:font-name-asian="Microsoft YaHei" style:font-name-complex="Mangal1"/>
    </style:style>
    <style:style style:name="T963" style:family="text">
      <style:text-properties fo:font-variant="normal" fo:text-transform="none" fo:color="#000000" loext:opacity="100%" style:font-name="Liberation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4" style:family="text">
      <style:text-properties fo:color="#000000" loext:opacity="100%" style:font-name="Liberation Serif" fo:language="pt" fo:country="BR" fo:font-weight="bold" officeooo:rsid="0235e6a9" style:font-name-asian="Microsoft YaHei" style:font-weight-asian="bold" style:font-name-complex="Mangal1" style:font-weight-complex="bold"/>
    </style:style>
    <style:style style:name="T965" style:family="text">
      <style:text-properties fo:color="#000000" loext:opacity="100%" style:font-name="Liberation Serif" fo:language="pt" fo:country="BR" officeooo:rsid="0236de49" style:font-name-asian="Microsoft YaHei" style:font-name-complex="Mangal1"/>
    </style:style>
    <style:style style:name="T966" style:family="text">
      <style:text-properties fo:color="#000000" loext:opacity="100%" style:font-name="Liberation Serif" fo:language="pt" fo:country="BR" fo:font-weight="normal" officeooo:rsid="0235f34c" style:font-name-asian="Microsoft YaHei" style:font-weight-asian="normal" style:font-name-complex="Mangal1" style:font-weight-complex="normal"/>
    </style:style>
    <style:style style:name="T967" style:family="text">
      <style:text-properties fo:color="#000000" loext:opacity="100%" style:font-name="Liberation Serif" fo:language="pt" fo:country="BR" fo:font-weight="normal" officeooo:rsid="02390e45" style:font-name-asian="Microsoft YaHei" style:font-weight-asian="normal" style:font-name-complex="Mangal1" style:font-weight-complex="normal"/>
    </style:style>
    <style:style style:name="T968" style:family="text">
      <style:text-properties fo:color="#000000" loext:opacity="100%" style:font-name="Liberation Serif" fo:language="pt" fo:country="BR" officeooo:rsid="02386107" style:font-name-asian="Microsoft YaHei" style:font-name-complex="Mangal1"/>
    </style:style>
    <style:style style:name="T969" style:family="text">
      <style:text-properties fo:color="#000000" loext:opacity="100%" style:font-name="Liberation Serif" fo:language="pt" fo:country="BR" fo:font-weight="normal" officeooo:rsid="0236de49" style:font-name-asian="Microsoft YaHei" style:font-weight-asian="normal" style:font-name-complex="Mangal1" style:font-weight-complex="normal"/>
    </style:style>
    <style:style style:name="T970" style:family="text">
      <style:text-properties fo:color="#000000" loext:opacity="100%" style:font-name="Liberation Serif" fo:language="pt" fo:country="BR" fo:font-weight="bold" officeooo:rsid="02386107" style:font-name-asian="Microsoft YaHei" style:font-weight-asian="bold" style:font-name-complex="Mangal1" style:font-weight-complex="bold"/>
    </style:style>
    <style:style style:name="T971" style:family="text">
      <style:text-properties fo:color="#000000" loext:opacity="100%" style:font-name="Liberation Serif" fo:language="pt" fo:country="BR" fo:font-weight="normal" officeooo:rsid="02386107" style:font-name-asian="Microsoft YaHei" style:font-weight-asian="normal" style:font-name-complex="Mangal1" style:font-weight-complex="normal"/>
    </style:style>
    <style:style style:name="T972" style:family="text">
      <style:text-properties fo:color="#000000" loext:opacity="100%" style:font-name="Liberation Serif" fo:language="pt" fo:country="BR" officeooo:rsid="0236abeb" style:font-name-asian="Microsoft YaHei" style:font-name-complex="Mangal1"/>
    </style:style>
    <style:style style:name="T973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6abeb" style:font-name-asian="Microsoft YaHei" style:font-name-complex="Mangal1"/>
    </style:style>
    <style:style style:name="T974" style:family="text">
      <style:text-properties fo:color="#6a9955" loext:opacity="100%" style:font-name="Consolas" fo:font-size="10.5pt" fo:language="pt" fo:country="BR" fo:font-weight="normal" officeooo:rsid="0236abeb" fo:background-color="#1f1f1f" loext:char-shading-value="0" style:font-name-asian="Microsoft YaHei" style:font-name-complex="Mangal1"/>
    </style:style>
    <style:style style:name="T975" style:family="text">
      <style:text-properties fo:color="#9cdcfe" loext:opacity="100%" style:font-name="Consolas" fo:font-size="10.5pt" fo:font-weight="normal" officeooo:rsid="0236abeb" fo:background-color="#1f1f1f" loext:char-shading-value="0"/>
    </style:style>
    <style:style style:name="T976" style:family="text">
      <style:text-properties fo:color="#000000" loext:opacity="100%" style:font-name="Liberation Serif" fo:language="pt" fo:country="BR" fo:font-weight="bold" officeooo:rsid="0236abeb" style:font-name-asian="Microsoft YaHei" style:font-weight-asian="bold" style:font-name-complex="Mangal1" style:font-weight-complex="bold"/>
    </style:style>
    <style:style style:name="T977" style:family="text">
      <style:text-properties fo:color="#000000" loext:opacity="100%" style:font-name="Liberation Serif" fo:language="pt" fo:country="BR" fo:font-weight="bold" officeooo:rsid="023fb324" style:font-name-asian="Microsoft YaHei" style:font-weight-asian="bold" style:font-name-complex="Mangal1" style:font-weight-complex="bold"/>
    </style:style>
    <style:style style:name="T978" style:family="text">
      <style:text-properties fo:color="#2a6099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79" style:family="text">
      <style:text-properties fo:color="#000000" loext:opacity="100%" style:font-name="Liberation Serif" fo:language="pt" fo:country="BR" officeooo:rsid="02416aa2" style:font-name-asian="Microsoft YaHei" style:font-name-complex="Mangal1"/>
    </style:style>
    <style:style style:name="T980" style:family="text">
      <style:text-properties fo:color="#000000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81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2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3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4" style:family="text">
      <style:text-properties fo:color="#000000" loext:opacity="100%" style:font-name="Liberation Serif" fo:language="pt" fo:country="BR" officeooo:rsid="0242291d" style:font-name-asian="Microsoft YaHei" style:font-name-complex="Mangal1"/>
    </style:style>
    <style:style style:name="T985" style:family="text">
      <style:text-properties fo:color="#9cdcfe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6" style:family="text">
      <style:text-properties fo:color="#d4d4d4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7" style:family="text">
      <style:text-properties fo:color="#569cd6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8" style:family="text">
      <style:text-properties fo:color="#4ec9b0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9" style:family="text">
      <style:text-properties fo:color="#ce9178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90" style:family="text">
      <style:text-properties fo:color="#f10d0c" loext:opacity="100%" style:font-name="Liberation Serif" fo:language="pt" fo:country="BR" officeooo:rsid="0243f563" style:font-name-asian="Microsoft YaHei" style:font-name-complex="Mangal1"/>
    </style:style>
    <style:style style:name="T991" style:family="text">
      <style:text-properties fo:color="#000000" loext:opacity="100%" style:font-name="Liberation Serif" fo:language="pt" fo:country="BR" officeooo:rsid="0243f563" style:font-name-asian="Microsoft YaHei" style:font-name-complex="Mangal1"/>
    </style:style>
    <style:style style:name="T992" style:family="text">
      <style:text-properties fo:color="#2a6099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93" style:family="text">
      <style:text-properties fo:color="#000000" loext:opacity="100%" style:font-name="Liberation Serif" fo:language="pt" fo:country="BR" fo:font-weight="normal" officeooo:rsid="0243f563" style:font-name-asian="Microsoft YaHei" style:font-weight-asian="normal" style:font-name-complex="Mangal1" style:font-weight-complex="normal"/>
    </style:style>
    <style:style style:name="T994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5f34c" style:font-name-asian="Microsoft YaHei" style:font-name-complex="Mangal1"/>
    </style:style>
    <style:style style:name="T995" style:family="text">
      <style:text-properties fo:color="#000000" loext:opacity="100%" fo:language="pt" fo:country="BR" fo:font-weight="normal" officeooo:rsid="0235f34c" style:font-weight-asian="normal" style:font-weight-complex="normal"/>
    </style:style>
    <style:style style:name="T996" style:family="text">
      <style:text-properties fo:color="#000000" loext:opacity="100%" fo:font-weight="normal" officeooo:rsid="0235f34c" style:font-name-asian="Microsoft YaHei" style:font-weight-asian="normal" style:font-weight-complex="normal"/>
    </style:style>
    <style:style style:name="T997" style:family="text">
      <style:text-properties fo:font-family="Liberation" fo:font-weight="normal" style:font-weight-asian="normal" style:font-weight-complex="normal"/>
    </style:style>
    <style:style style:name="T998" style:family="text">
      <style:text-properties fo:color="#569cd6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9" style:family="text">
      <style:text-properties fo:color="#d4d4d4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1000" style:family="text">
      <style:text-properties fo:color="#dcdcaa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1001" style:family="text">
      <style:text-properties fo:color="#569cd6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2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3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4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100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10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100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009" style:family="text">
      <style:text-properties fo:language="pt" fo:country="BR" fo:font-weight="normal" officeooo:rsid="000e2760" style:font-weight-asian="normal" style:font-weight-complex="normal"/>
    </style:style>
    <style:style style:name="T1010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1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2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3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4" style:family="text">
      <style:text-properties officeooo:rsid="01ac95ad"/>
    </style:style>
    <style:style style:name="T1015" style:family="text">
      <style:text-properties officeooo:rsid="01b9df00"/>
    </style:style>
    <style:style style:name="T1016" style:family="text">
      <style:text-properties officeooo:rsid="0169e819"/>
    </style:style>
    <style:style style:name="T1017" style:family="text">
      <style:text-properties officeooo:rsid="016b05d5"/>
    </style:style>
    <style:style style:name="T1018" style:family="text">
      <style:text-properties style:font-name="Mono" officeooo:rsid="016b05d5"/>
    </style:style>
    <style:style style:name="T1019" style:family="text">
      <style:text-properties style:font-name="Mono" officeooo:rsid="0169e819"/>
    </style:style>
    <style:style style:name="T1020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1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2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023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24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5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6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7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8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9" style:family="text">
      <style:text-properties fo:color="#569cd6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0" style:family="text">
      <style:text-properties fo:color="#d4d4d4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1" style:family="text">
      <style:text-properties fo:color="#4ec9b0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2" style:family="text">
      <style:text-properties fo:color="#c586c0" loext:opacity="100%" style:font-name="Consolas" fo:font-size="10.5pt" fo:font-weight="normal" fo:background-color="#1f1f1f" loext:char-shading-value="0"/>
    </style:style>
    <style:style style:name="T1033" style:family="text">
      <style:text-properties fo:color="#569cd6" loext:opacity="100%" style:font-name="Consolas" fo:font-size="10.5pt" fo:font-weight="normal" fo:background-color="#1f1f1f" loext:char-shading-value="0"/>
    </style:style>
    <style:style style:name="T1034" style:family="text">
      <style:text-properties fo:color="#4ec9b0" loext:opacity="100%" style:font-name="Consolas" fo:font-size="10.5pt" fo:font-weight="normal" fo:background-color="#1f1f1f" loext:char-shading-value="0"/>
    </style:style>
    <style:style style:name="T1035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036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37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38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39" style:family="text">
      <style:text-properties style:font-name="Liberation Serif" fo:font-size="12pt" fo:font-weight="normal" style:font-size-asian="12pt" style:font-weight-asian="normal" style:font-size-complex="12pt"/>
    </style:style>
    <style:style style:name="T1040" style:family="text">
      <style:text-properties fo:color="#2a6099" loext:opacity="100%" fo:font-family="Mono" style:font-family-generic="roman" style:font-pitch="variable" fo:font-size="12pt" style:font-size-asian="12pt" style:font-size-complex="12pt"/>
    </style:style>
    <style:style style:name="T104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42" style:family="text">
      <style:text-properties fo:font-size="12pt" fo:font-weight="normal" style:font-size-asian="12pt" style:font-weight-asian="normal" style:font-size-complex="12pt" style:font-weight-complex="normal"/>
    </style:style>
    <style:style style:name="T1043" style:family="text">
      <style:text-properties style:font-name="Liberation Serif" fo:font-size="12pt" style:font-size-asian="12pt" style:font-size-complex="12pt"/>
    </style:style>
    <style:style style:name="T1044" style:family="text">
      <style:text-properties fo:color="#dcdcaa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5" style:family="text">
      <style:text-properties fo:color="#d4d4d4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6" style:family="text">
      <style:text-properties fo:color="#ce917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7" style:family="text">
      <style:text-properties fo:color="#b5cea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8" style:family="text">
      <style:text-properties fo:color="#2a6099" loext:opacity="100%" fo:font-weight="bold" style:font-family-asian="Mono" style:font-family-generic-asian="system" style:font-pitch-asian="variable" style:font-weight-asian="bold" style:font-weight-complex="bold"/>
    </style:style>
    <style:style style:name="T1049" style:family="text">
      <style:text-properties style:font-family-asian="Mono" style:font-family-generic-asian="system" style:font-pitch-asian="variable"/>
    </style:style>
    <style:style style:name="T10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10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10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1053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1054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055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056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1057" style:family="text">
      <style:text-properties fo:font-variant="normal" fo:text-transform="none" fo:color="#2a6099" loext:opacity="100%" fo:font-family="Monospace" style:font-family-generic="roman" style:font-pitch="variable" fo:font-size="12pt" fo:letter-spacing="normal" fo:language="pt" fo:country="BR" fo:font-style="normal" style:font-size-asian="12pt" style:font-style-asian="normal" style:font-size-complex="12pt"/>
    </style:style>
    <style:style style:name="T1058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1059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1060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6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62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3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4" style:family="text">
      <style:text-properties fo:color="#c586c0" loext:opacity="100%" officeooo:rsid="021619be"/>
    </style:style>
    <style:style style:name="T1065" style:family="text">
      <style:text-properties fo:color="#d4d4d4" loext:opacity="100%" officeooo:rsid="021619be"/>
    </style:style>
    <style:style style:name="T1066" style:family="text">
      <style:text-properties fo:color="#9cdcfe" loext:opacity="100%" fo:font-family="Consolas" style:font-family-generic="roman" style:font-pitch="variable" fo:font-size="12pt" style:font-size-asian="12pt" style:font-weight-asian="normal" style:font-size-complex="12pt"/>
    </style:style>
    <style:style style:name="T1067" style:family="text">
      <style:text-properties fo:color="#d4d4d4" loext:opacity="100%" fo:font-family="Consolas" style:font-family-generic="roman" style:font-pitch="variable" fo:font-size="12pt" style:font-size-asian="12pt" style:font-weight-asian="normal" style:font-size-complex="12pt"/>
    </style:style>
    <style:style style:name="T1068" style:family="text">
      <style:text-properties fo:color="#dcdcaa" loext:opacity="100%" fo:font-family="Consolas" style:font-family-generic="roman" style:font-pitch="variable" fo:font-size="12pt" style:font-size-asian="12pt" style:font-weight-asian="normal" style:font-size-complex="12pt"/>
    </style:style>
    <style:style style:name="T1069" style:family="text">
      <style:text-properties fo:color="#6a9955" loext:opacity="100%" fo:font-family="Consolas" style:font-family-generic="roman" style:font-pitch="variable" fo:font-size="12pt" style:font-size-asian="12pt" style:font-weight-asian="normal" style:font-size-complex="12pt"/>
    </style:style>
    <style:style style:name="T1070" style:family="text">
      <style:text-properties officeooo:rsid="021619be"/>
    </style:style>
    <style:style style:name="T1071" style:family="text">
      <style:text-properties officeooo:rsid="02171aee"/>
    </style:style>
    <style:style style:name="T1072" style:family="text">
      <style:text-properties fo:language="pt" fo:country="BR" officeooo:rsid="021a04a9"/>
    </style:style>
    <style:style style:name="T1073" style:family="text">
      <style:text-properties fo:language="pt" fo:country="BR" officeooo:rsid="02277992"/>
    </style:style>
    <style:style style:name="T1074" style:family="text">
      <style:text-properties style:font-name="Liberation Serif" fo:font-size="12pt" officeooo:rsid="022aa829" style:font-size-asian="12pt" style:font-size-complex="12pt"/>
    </style:style>
    <style:style style:name="T1075" style:family="text">
      <style:text-properties style:font-name="Liberation Serif" fo:font-size="12pt" fo:language="pt" fo:country="BR" officeooo:rsid="000e2760" style:font-size-asian="12pt" style:font-size-complex="12pt"/>
    </style:style>
    <style:style style:name="T1076" style:family="text">
      <style:text-properties style:font-name="Liberation Serif" fo:font-size="12pt" fo:language="pt" fo:country="BR" officeooo:rsid="022aa829" style:font-size-asian="12pt" style:font-size-complex="12pt"/>
    </style:style>
    <style:style style:name="T1077" style:family="text">
      <style:text-properties style:font-name="Mono" fo:font-size="12pt" fo:language="pt" fo:country="BR" officeooo:rsid="000e2760" style:font-size-asian="12pt" style:font-size-complex="12pt"/>
    </style:style>
    <style:style style:name="T1078" style:family="text">
      <style:text-properties fo:color="#ce9178" loext:opacity="100%" style:font-name="Consolas" fo:font-size="10.5pt" fo:font-weight="normal"/>
    </style:style>
    <style:style style:name="T1079" style:family="text">
      <style:text-properties fo:color="#c586c0" loext:opacity="100%" style:font-name="Consolas" fo:font-size="10.5pt" fo:font-weight="normal"/>
    </style:style>
    <style:style style:name="T1080" style:family="text">
      <style:text-properties fo:font-size="12pt" fo:font-style="normal" officeooo:rsid="021619be" style:font-size-asian="12pt" style:font-style-asian="normal" style:font-size-complex="12pt"/>
    </style:style>
    <style:style style:name="T1081" style:family="text">
      <style:text-properties fo:font-size="12pt" fo:font-style="normal" style:font-size-asian="12pt" style:font-style-asian="normal" style:font-size-complex="12pt"/>
    </style:style>
    <style:style style:name="T1082" style:family="text">
      <style:text-properties fo:font-variant="normal" fo:text-transform="none" fo:color="#767e85" loext:opacity="100%" fo:font-family="'Source Serif Pro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1083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1084" style:family="text">
      <style:text-properties fo:font-size="12pt" fo:font-style="normal" officeooo:rsid="0218fc64" style:font-size-asian="12pt" style:font-style-asian="normal" style:font-size-complex="12pt"/>
    </style:style>
    <style:style style:name="T1085" style:family="text">
      <style:text-properties fo:font-variant="normal" fo:text-transform="none" fo:color="#c586c0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6" style:family="text">
      <style:text-properties fo:font-variant="normal" fo:text-transform="none" fo:color="#d4d4d4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7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1088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1089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1090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1091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092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093" style:family="text">
      <style:text-properties fo:color="#569cd6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4" style:family="text">
      <style:text-properties fo:color="#d4d4d4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5" style:family="text">
      <style:text-properties fo:color="#4ec9b0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6" style:family="text">
      <style:text-properties fo:color="#4ec9b0" loext:opacity="100%" officeooo:rsid="0222f644"/>
    </style:style>
    <style:style style:name="T1097" style:family="text">
      <style:text-properties fo:color="#ce9178" loext:opacity="100%" style:font-name="Consolas" fo:font-size="10.5pt" fo:font-weight="normal" officeooo:rsid="0222f644"/>
    </style:style>
    <style:style style:name="T1098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1099" style:family="text">
      <style:text-properties fo:font-style="normal" officeooo:rsid="0222f644" style:font-style-asian="normal" style:font-style-complex="normal"/>
    </style:style>
    <style:style style:name="T1100" style:family="text">
      <style:text-properties fo:color="#569cd6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1" style:family="text">
      <style:text-properties fo:color="#d4d4d4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2" style:family="text">
      <style:text-properties fo:color="#4ec9b0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3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1104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1105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1106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1107" style:family="text">
      <style:text-properties fo:color="#2a6099" loext:opacity="100%"/>
    </style:style>
    <style:style style:name="T1108" style:family="text">
      <style:text-properties fo:font-size="10pt" style:font-size-asian="10pt" style:font-size-complex="10pt"/>
    </style:style>
    <style:style style:name="T1109" style:family="text">
      <style:text-properties officeooo:rsid="02251256"/>
    </style:style>
    <style:style style:name="T1110" style:family="text">
      <style:text-properties officeooo:rsid="01bb64b4"/>
    </style:style>
    <style:style style:name="T11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11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5d8dee" fo:background-color="transparent" loext:char-shading-value="0" style:font-size-asian="12pt" style:font-weight-asian="normal" style:font-size-complex="12pt" style:font-weight-complex="normal"/>
    </style:style>
    <style:style style:name="T1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68bfb" fo:background-color="transparent" loext:char-shading-value="0" style:font-size-asian="12pt" style:font-weight-asian="normal" style:font-size-complex="12pt" style:font-weight-complex="normal"/>
    </style:style>
    <style:style style:name="T11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11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1120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21" style:family="text">
      <style:text-properties style:font-name="Liberation Sans" fo:language="pt" fo:country="BR" officeooo:rsid="02473f87" style:font-name-asian="Microsoft YaHei" style:font-name-complex="Mangal1"/>
    </style:style>
    <style:style style:name="T1122" style:family="text">
      <style:text-properties style:font-name="Liberation Sans" fo:language="pt" fo:country="BR" officeooo:rsid="01bb64b4" style:font-name-asian="Microsoft YaHei" style:font-name-complex="Mangal1"/>
    </style:style>
    <style:style style:name="T11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bb64b4" fo:background-color="transparent" loext:char-shading-value="0" style:font-size-asian="12pt" style:font-size-complex="12pt"/>
    </style:style>
    <style:style style:name="T11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5" style:family="text">
      <style:text-properties fo:font-variant="normal" fo:text-transform="none" fo:color="#000000" loext:opacity="100%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4839e6" fo:background-color="transparent" loext:char-shading-value="0" style:font-size-asian="12pt" style:font-weight-asian="bold" style:font-size-complex="12pt" style:font-weight-complex="bold"/>
    </style:style>
    <style:style style:name="T1127" style:family="text">
      <style:text-properties fo:color="#000000" loext:opacity="100%" fo:font-weight="bold" officeooo:rsid="024839e6" style:font-size-asian="12pt" style:font-weight-asian="bold" style:font-weight-complex="bold"/>
    </style:style>
    <style:style style:name="T1128" style:family="text">
      <style:text-properties fo:color="#000000" loext:opacity="100%" fo:font-weight="normal" officeooo:rsid="024839e6" style:font-size-asian="12pt" style:font-weight-asian="normal" style:font-weight-complex="normal"/>
    </style:style>
    <style:style style:name="T1129" style:family="text">
      <style:text-properties officeooo:rsid="024e40a7"/>
    </style:style>
    <style:style style:name="T1130" style:family="text">
      <style:text-properties fo:color="#ffffff" loext:opacity="100%" style:font-name="Consolas" fo:font-size="10.5pt" fo:font-weight="normal" fo:background-color="#1f1f1f" loext:char-shading-value="0"/>
    </style:style>
    <style:style style:name="T1131" style:family="text">
      <style:text-properties fo:color="#ffff6d" loext:opacity="100%" style:font-name="Consolas" fo:font-size="10.5pt" fo:font-weight="normal" fo:background-color="#1f1f1f" loext:char-shading-value="0"/>
    </style:style>
    <style:style style:name="T1132" style:family="text">
      <style:text-properties fo:color="#ff8000" loext:opacity="100%" style:font-name="Consolas" fo:font-size="10.5pt" fo:font-weight="normal" fo:background-color="#1f1f1f" loext:char-shading-value="0"/>
    </style:style>
    <style:style style:name="T1133" style:family="text">
      <style:text-properties officeooo:rsid="024bd2c6"/>
    </style:style>
    <style:style style:name="T1134" style:family="text">
      <style:text-properties officeooo:rsid="024dd288"/>
    </style:style>
    <style:style style:name="T1135" style:family="text">
      <style:text-properties style:font-name="Liberation Sans" fo:language="pt" fo:country="BR" officeooo:rsid="024e9ae9" style:font-name-asian="Microsoft YaHei" style:font-name-complex="Mangal1"/>
    </style:style>
    <style:style style:name="T11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e9ae9" fo:background-color="transparent" loext:char-shading-value="0" style:font-size-asian="12pt" style:font-weight-asian="normal" style:font-size-complex="12pt" style:font-weight-complex="normal"/>
    </style:style>
    <style:style style:name="T11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1138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1139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11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11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11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1143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144" style:family="text">
      <style:text-properties style:font-name="Liberation Sans" fo:language="pt" fo:country="BR" officeooo:rsid="01c694eb" style:font-name-asian="Microsoft YaHei" style:font-name-complex="Mangal1"/>
    </style:style>
    <style:style style:name="T1145" style:family="text">
      <style:text-properties officeooo:rsid="020f03f3"/>
    </style:style>
    <style:style style:name="T1146" style:family="text">
      <style:text-properties fo:language="pt" fo:country="BR" officeooo:rsid="01dac7db"/>
    </style:style>
    <style:style style:name="T1147" style:family="text">
      <style:text-properties style:font-name="Liberation Sans" fo:language="pt" fo:country="BR" fo:font-weight="normal" officeooo:rsid="025639c5" style:font-name-asian="Microsoft YaHei" style:font-weight-asian="normal" style:font-name-complex="Mangal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</text:span><text:span text:style-name="T39">-S</text:span><text:span text:style-name="T38"> localhost:</text:span><text:span text:style-name="T40">800</text:span><text:span text:style-name="T41">0</text:span><text:span text:style-name="T38"> -t </text:span><text:span text:style-name="T42">public</text:span><text:span text:style-name="T22"><text:tab/><text:line-break/></text:span><text:span text:style-name="T43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4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5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4"> </text:span><text:span text:style-name="T46">significa “target directory”. </text:span><text:span text:style-name="T44">Define </text:span><text:span text:style-name="T47">qual será </text:span><text:span text:style-name="T44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4"> Indica que os arquivos servidos pelo servidor estarão </text:span><text:span text:style-name="T47">somente </text:span><text:span text:style-name="T44">no diretório </text:span><text:span text:style-name="Source_20_Text"><text:span text:style-name="T48">public</text:span></text:span><text:span text:style-name="T44">.<text:line-break/></text:span><text:span text:style-name="T49">Nota: Por padrão, o servidor buscará pelo arquivo nomeado como “index”; se quiser inicializar por outro arquivo, adicione como próximo parâmetro o seu nome. Exemplo:<text:line-break/></text:span><text:span text:style-name="T50">php -S localhost:</text:span><text:span text:style-name="T51">800</text:span><text:span text:style-name="T52">0</text:span><text:span text:style-name="T50"> -t </text:span><text:span text:style-name="T53">public </text:span><text:span text:style-name="T54">form.html</text:span></text:p>
        </text:list-item>
      </text:list>
      <text:p text:style-name="P27"/>
      <text:p text:style-name="P28"><text:span text:style-name="T55">Document Root</text:span><text:span text:style-name="T5"> </text:span>é o<text:span text:style-name="T56"> </text:span><text:span text:style-name="Strong_20_Emphasis"><text:span text:style-name="T56">diretório no servidor web onde os arquivos públicos de um site são servidos aos navegadores</text:span></text:span><text:span text:style-name="T56">. É o pon</text:span>to de entrada visível da aplicação. <text:span text:style-name="T57">Esse diretório serve para:</text:span></text:p>
      <text:list text:style-name="L4">
        <text:list-item>
          <text:p text:style-name="P29"><text:span text:style-name="T58">P</text:span><text:span text:style-name="T59">roteger a lógica de back-end</text:span>: <text:span text:style-name="T60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1">Ajuda na organização:</text:span><text:span text:style-name="T62"> s</text:span><text:span text:style-name="T5">epara arquivos públicos (ex.: imagens, HTML, CSS, JavaScript) </text:span><text:span text:style-name="T47">d</text:span><text:span text:style-name="T5">e arquivos internos do projeto (</text:span>como controllers, services, configs, <text:span text:style-name="T57">bancos de dados, </text:span>etc <text:span text:style-name="T5">).</text:span></text:p>
        </text:list-item>
        <text:list-item>
          <text:p text:style-name="P29"><text:span text:style-name="T60">Na instalação padrão XAMPP, essa pasta é a </text:span><text:span text:style-name="T63">htdocs</text:span></text:p>
        </text:list-item>
      </text:list>
      <text:p text:style-name="P31"/>
      <text:p text:style-name="P32"/>
      <text:p text:style-name="P32"/>
      <text:p text:style-name="P32">Os <text:span text:style-name="T64">comentários</text:span> serão ignorados durante a interpretação do script e seguem o padrão:</text:p>
      <text:p text:style-name="P33"><text:span text:style-name="T65">//</text:span><text:span text:style-name="T66">este é um comentário inline </text:span><text:span text:style-name="T67">estilo C</text:span><text:span text:style-name="T68"> </text:span></text:p>
      <text:p text:style-name="P34">ou</text:p>
      <text:p text:style-name="P33"><text:span text:style-name="T65">#</text:span><text:span text:style-name="T66">este é um comentário inline </text:span><text:span text:style-name="T67">estilo shell</text:span></text:p>
      <text:p text:style-name="P32">ou</text:p>
      <text:p text:style-name="P35"><text:span text:style-name="T65">/* </text:span><text:span text:style-name="T69">este é um comentário em</text:span></text:p>
      <text:p text:style-name="P35"><text:span text:style-name="T70"><text:s/>mais linhas </text:span><text:span text:style-name="T65">*/</text:span></text:p>
      <text:h text:style-name="P36" text:outline-level="1"><text:span text:style-name="T71">A</text:span>ula 03 – <text:span text:style-name="T1">Guardando arquivos no localhost</text:span></text:h>
      <text:p text:style-name="P37"/>
      <text:p text:style-name="P38"><text:span text:style-name="T72">A linguagem PHP </text:span><text:span text:style-name="T73">é especialmente adequada para o </text:span><text:span text:style-name="T74">D</text:span><text:span text:style-name="T73">esenvolvimento </text:span><text:span text:style-name="T74">W</text:span><text:span text:style-name="T73">eb </text:span><text:span text:style-name="T75">pois</text:span><text:span text:style-name="T73"> pode ser embutida/</text:span><text:span text:style-name="T75">misturada</text:span><text:span text:style-name="T73"> dentro d</text:span><text:span text:style-name="T75">a linguagem</text:span><text:span text:style-name="T73"> HTML, </text:span><text:span text:style-name="T75">transformando qualquer site estático em uma página </text:span><text:span text:style-name="T76">dinâmica</text:span><text:span text:style-name="T75">, </text:span><text:span text:style-name="T77">permitindo</text:span><text:span text:style-name="T78"> até mesmo acessar banco de dados. Por ser uma linguagem back-end, toda parte do código PHP será processado/executado </text:span><text:span text:style-name="T79">no servidor</text:span><text:span text:style-name="T78"> para depois</text:span><text:span text:style-name="T80"> </text:span><text:span text:style-name="T81">enviar </text:span><text:span text:style-name="T82">somente</text:span><text:span text:style-name="T81"> HTML</text:span><text:span text:style-name="T83"> personalizado ao cliente. </text:span></text:p>
      <text:p text:style-name="P39"/>
      <text:p text:style-name="P40"><text:span text:style-name="T84">Outr</text:span>os exemplos de <text:span text:style-name="T59">tecnologias Server-Side</text:span> são:</text:p>
      <text:list text:style-name="L5">
        <text:list-item>
          <text:p text:style-name="P41"><text:span text:style-name="T85">Servlet/</text:span><text:span text:style-name="T86">JSP </text:span><text:span text:style-name="T87">(Java)</text:span></text:p>
        </text:list-item>
        <text:list-item>
          <text:p text:style-name="P41"><text:span text:style-name="T88">ASP.</text:span><text:span text:style-name="T89">NET</text:span><text:span text:style-name="T88"> (incorporada </text:span><text:span text:style-name="T89">à plataforma</text:span><text:span text:style-name="T88"> .NET </text:span><text:span text:style-name="T90">da Microsoft</text:span><text:span text:style-name="T88">)</text:span></text:p>
        </text:list-item>
      </text:list>
      <text:p text:style-name="P42"/>
      <text:p text:style-name="P42"><text:span text:style-name="T91">O </text:span><text:span text:style-name="Strong_20_Emphasis"><text:span text:style-name="T92">Apache HTTP Server</text:span></text:span><text:span text:style-name="T91"> (ou apenas </text:span><text:span text:style-name="Strong_20_Emphasis"><text:span text:style-name="T91">Apache</text:span></text:span><text:span text:style-name="T91">) é um </text:span><text:span text:style-name="Strong_20_Emphasis"><text:span text:style-name="T91">servidor web</text:span></text:span><text:span text:style-name="T91"> — ou seja, um software responsável por </text:span><text:span text:style-name="Strong_20_Emphasis"><text:span text:style-name="T91">receber requisições HTTP de navegadores (como Chrome, Firefox)</text:span></text:span><text:span text:style-name="T91"> e </text:span><text:span text:style-name="Strong_20_Emphasis"><text:span text:style-name="T91">responder com páginas da web</text:span></text:span><text:span text:style-name="T91"> (HTML, CSS, JavaScript, imagens, etc). </text:span>É um dos servidores web mais usados no mundo, especialmente em conjunto com o PHP. <text:span text:style-name="T93">Essa</text:span><text:span text:style-name="T94"> ferramenta </text:span><text:span text:style-name="T95">faz a</text:span><text:span text:style-name="T94"> </text:span><text:span text:style-name="T96">comunicação</text:span><text:span text:style-name="T94"> entre o servidor e o cliente, </text:span><text:span text:style-name="T95">servindo </text:span><text:span text:style-name="Strong_20_Emphasis"><text:span text:style-name="T97">como ponte</text:span></text:span><text:span text:style-name="T98"> entre o navegador e o PHP,</text:span><text:span text:style-name="T96"> </text:span><text:span text:style-name="T99">o</text:span><text:span text:style-name="T100"> Apache </text:span><text:span text:style-name="Strong_20_Emphasis"><text:span text:style-name="T101">serve</text:span></text:span><text:span text:style-name="T100"> </text:span><text:span text:style-name="T99">s</text:span><text:span text:style-name="T94">endo o </text:span><text:span text:style-name="T102">Servidor Web</text:span><text:span text:style-name="T94"> mais popular da internet, ele </text:span><text:span text:style-name="T103">interpreta</text:span><text:span text:style-name="T96"> arquivos</text:span><text:span text:style-name="T94"> de diferentes linguagens (como PHP, Java, Python)</text:span><text:span text:style-name="T96">, </text:span><text:span text:style-name="T104">processando/</text:span><text:span text:style-name="T96">transformando</text:span><text:span text:style-name="T94"> esses </text:span><text:span text:style-name="T96">arquivos</text:span><text:span text:style-name="T94"> </text:span><text:span text:style-name="T102">estáticos</text:span><text:span text:style-name="T94"> </text:span><text:span text:style-name="T96">em HTML </text:span><text:span text:style-name="T94">e </text:span><text:span text:style-name="T96">entregando-os ao Browser </text:span><text:span text:style-name="T94">do cliente.</text:span></text:p>
      <text:p text:style-name="P43"><text:span text:style-name="Source_20_Text"><text:span text:style-name="T105">i</text:span></text:span><text:span text:style-name="Source_20_Text"><text:span text:style-name="T106">ndex.php</text:span></text:span><text:span text:style-name="T107"> é, </text:span><text:span text:style-name="T108">p</text:span><text:span text:style-name="T109">or padrão, </text:span><text:span text:style-name="T107">sempre o arquivo raiz, </text:span><text:span text:style-name="T109">ou seja, o </text:span><text:span text:style-name="T110">arquivo da página principal</text:span><text:span text:style-name="T109"> de um site e o </text:span><text:span text:style-name="T111">primeiro a ser executado</text:span><text:span text:style-name="T109"> pelo servidor, </text:span><text:span text:style-name="T107">sendo </text:span><text:span text:style-name="T112">facultativo declará-lo</text:span><text:span text:style-name="T107"> na URL. </text:span><text:span text:style-name="T113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6">.htaccess</text:span></text:span><text:span text:style-name="T107"> </text:span>(abreviação de <text:span text:style-name="Emphasis">hypertext</text:span><text:span text:style-name="Emphasis"><text:span text:style-name="T56"> access</text:span></text:span><text:span text:style-name="T56">) </text:span><text:span text:style-name="T114">é um </text:span><text:span text:style-name="Strong_20_Emphasis"><text:span text:style-name="T115">arquivo de configuração</text:span></text:span><text:span text:style-name="Strong_20_Emphasis"><text:span text:style-name="T114"> usado em servidores Apache</text:span></text:span><text:span text:style-name="T114"> para definir </text:span><text:span text:style-name="Strong_20_Emphasis"><text:span text:style-name="T114">regras e configurações específicas por diretório</text:span></text:span><text:span text:style-name="T114">, sem precisar alterar a configuração principal do Apache (</text:span><text:span text:style-name="Source_20_Text"><text:span text:style-name="T116">htt</text:span></text:span><text:span text:style-name="Source_20_Text"><text:span text:style-name="T117">pd.conf</text:span></text:span><text:span text:style-name="T107">). <text:line-break/>Ele só funciona se o Apache estiver configurado para permitir o uso de </text:span><text:span text:style-name="Source_20_Text"><text:span text:style-name="T117">.htaccess</text:span></text:span><text:span text:style-name="T107"> com </text:span><text:span text:style-name="Source_20_Text"><text:span text:style-name="T117">AllowOverride </text:span></text:span><text:span text:style-name="Source_20_Text"><text:span text:style-name="T118">All</text:span></text:span><text:span text:style-name="T107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/>
      <text:p text:style-name="P44"/>
      <text:p text:style-name="P46"/>
      <text:p text:style-name="P47">O <text:span text:style-name="T56">endereço de um servidor</text:span> local é <text:span text:style-name="T119">127.0.0.1</text:span><text:span text:style-name="T64"> </text:span>ou, em sua forma DNS: <text:span text:style-name="T120">localhost</text:span></text:p>
      <text:p text:style-name="P48"><text:span text:style-name="T121">A </text:span><text:span text:style-name="T122">porta 80</text:span><text:span text:style-name="T121"> </text:span><text:span text:style-name="T123">é a porta padrão dos Servidores Web </text:span><text:span text:style-name="T121">para compartilhar documentos </text:span><text:span text:style-name="T123">(como as páginas Web) </text:span><text:span text:style-name="T121">através do protocolo HTTP.</text:span></text:p>
      <text:p text:style-name="P48"><text:span text:style-name="T124">P</text:span><text:span text:style-name="T122">orta </text:span><text:span text:style-name="T121">é uma </text:span><text:span text:style-name="T125">conexão virtual</text:span><text:span text:style-name="T121">/lógica de dados que pode ser usada por programas para </text:span><text:span text:style-name="T125">trocar dados diretamente</text:span><text:span text:style-name="T121">, </text:span><text:span text:style-name="T126">em vez de</text:span><text:span text:style-name="T121"> passar por um arquivo ou outro local de armazenamento temporário. As mais comuns são as portas do tipo TCP e UDP.</text:span></text:p>
      <text:p text:style-name="P49"/>
      <text:p text:style-name="P50"><text:span text:style-name="T127">&lt;?php...?&gt;</text:span><text:span text:style-name="T128"> </text:span><text:span text:style-name="T129">é a</text:span><text:span text:style-name="T130"> </text:span><text:span text:style-name="T131">tag padrão </text:span><text:span text:style-name="T129">para inserir código PHP dentro do código HTML</text:span><text:span text:style-name="T132"> </text:span><text:span text:style-name="T133">e </text:span><text:span text:style-name="T134">t</text:span>udo <text:span text:style-name="T135">o</text:span> que estiver dentr<text:span text:style-name="T132">o d</text:span><text:span text:style-name="T133">ela </text:span><text:span text:style-name="T132">é considerado código PHP.</text:span></text:p>
      <text:p text:style-name="P50"><text:span text:style-name="T127">&lt;?...?&gt;</text:span><text:span text:style-name="T136"> </text:span><text:span text:style-name="T137">short open tag, é uma forma abreviada, para poder usá-la é preciso habilitá-la no nas configurações </text:span><text:span text:style-name="T138">php.ini</text:span><text:span text:style-name="T137"> do servidor</text:span></text:p>
      <text:p text:style-name="P50"><text:span text:style-name="T139">&lt;?=$variável?&gt;</text:span><text:span text:style-name="T140"> </text:span><text:span text:style-name="T137">utilizada para fazer uma </text:span><text:span text:style-name="T141">impressão rápida de uma variável</text:span><text:span text:style-name="T137"> ou expressão quando estiver debuggando, equivalente ao comando </text:span><text:span text:style-name="T138">echo</text:span></text:p>
      <text:p text:style-name="P50"><text:span text:style-name="T142">É importante que a extensão do arquivo seja </text:span><text:span text:style-name="T143">.php</text:span><text:span text:style-name="T142"> pois, se for </text:span><text:span text:style-name="T143">.</text:span><text:span text:style-name="T144">html</text:span><text:span text:style-name="T145">, o código PHP não será reconhecido e processado pelo servidor e, consequentemente</text:span><text:span text:style-name="T146">, não será interpretado </text:span><text:span text:style-name="T147">pelo</text:span><text:span text:style-name="T146"> </text:span><text:span text:style-name="T148">navegador</text:span><text:span text:style-name="T146">.</text:span></text:p>
      <text:p text:style-name="P51"><text:span text:style-name="T149">Um arquivo </text:span><text:span text:style-name="T150">HTML</text:span><text:span text:style-name="T149"> com extensão </text:span><text:span text:style-name="Source_20_Text"><text:span text:style-name="T151">.php</text:span></text:span><text:span text:style-name="T149"> vai se comportar </text:span><text:span text:style-name="Strong_20_Emphasis"><text:span text:style-name="T152">exatamente como HTML</text:span></text:span><text:span text:style-name="T149">. O interpretador PHP só entra em cena para o que estiver entre </text:span><text:span text:style-name="T153">as tags </text:span><text:span text:style-name="Source_20_Text"><text:span text:style-name="T154">&lt;?php… </text:span></text:span><text:span text:style-name="Source_20_Text"><text:span text:style-name="T155">e </text:span></text:span><text:span text:style-name="Source_20_Text"><text:span text:style-name="T154">?&gt;</text:span></text:span><text:span text:style-name="T149">. Nes</text:span><text:span text:style-name="T156">s</text:span><text:span text:style-name="T149">e contexto, o ideal é usar </text:span><text:span text:style-name="T153">todos os arquivos com </text:span><text:span text:style-name="T157">extensão</text:span><text:span text:style-name="T149"> </text:span><text:span text:style-name="Source_20_Text"><text:span text:style-name="T151">.php</text:span></text:span><text:span text:style-name="T149">.</text:span></text:p>
      <text:p text:style-name="P52"><text:a xlink:type="simple" xlink:href="https://www.php.net/manual/pt_BR/" text:style-name="Internet_20_link" text:visited-style-name="Visited_20_Internet_20_Link"><text:span text:style-name="T158">Link para a Documentação do PHP</text:span></text:a></text:p>
      <text:p text:style-name="P52"/>
      <text:p text:style-name="P52"/>
      <text:p text:style-name="P53"><text:span text:style-name="T159">Nota: </text:span><text:span text:style-name="T160">Para acessar um nível acima na árvore de </text:span><text:span text:style-name="T161">diretórios Linux</text:span><text:span text:style-name="T160">/servidor use </text:span><text:span text:style-name="T162">../</text:span></text:p>
      <text:h text:style-name="P36" text:outline-level="1">Aula 04 – <text:span text:style-name="T1">Declarando variáveis</text:span></text:h>
      <text:p text:style-name="P54"/>
      <text:p text:style-name="P55"><text:span text:style-name="T163">A</text:span><text:span text:style-name="T164"> declaração de variáveis no PHP</text:span><text:span text:style-name="T165"> </text:span><text:span text:style-name="T163">n</text:span><text:span text:style-name="T164">ão é obrigatóri</text:span><text:span text:style-name="T163">a</text:span><text:span text:style-name="T164">, entretanto, é uma boa prática declará-las</text:span></text:p>
      <text:p text:style-name="P56"/>
      <text:p text:style-name="P57"><text:span text:style-name="T165">-</text:span><text:span text:style-name="T166">echo, print</text:span><text:span text:style-name="T167"> </text:span><text:span text:style-name="T168">e</text:span><text:span text:style-name="T167"> </text:span><text:span text:style-name="T166">printf</text:span><text:span text:style-name="T169">()</text:span><text:span text:style-name="T170"> </text:span><text:span text:style-name="T171">são comandos que servem para </text:span><text:span text:style-name="T172">gerar saída</text:span><text:span text:style-name="T59"> na tela</text:span><text:span text:style-name="T173"> (tanto na função </text:span><text:span text:style-name="T174">echo</text:span><text:span text:style-name="T173"> quanto na função </text:span><text:span text:style-name="T174">print</text:span><text:span text:style-name="T173"> são opcionais os parênteses). </text:span></text:p>
      <text:p text:style-name="P58">-Tags HTML podem ser inseridas dentro das aspas <text:span text:style-name="T135">duplas </text:span>como a <text:span text:style-name="T175">tag</text:span> <text:span text:style-name="T176">&lt;br&gt;</text:span> para pular linha.</text:p>
      <text:p text:style-name="P59">-Não é possível colocar <text:span text:style-name="T59">aspas duplas</text:span> dentro de aspas duplas. <text:span text:style-name="T177">(use aspas simples)</text:span></text:p>
      <text:p text:style-name="P60">-Toda variável <text:span text:style-name="T178">deve </text:span>começa<text:span text:style-name="T178">r</text:span> com o cifrão (<text:span text:style-name="T179">$</text:span>), <text:span text:style-name="T180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1">S</text:span>ensitive:</text:p>
      <text:list text:style-name="L6">
        <text:list-item>
          <text:p text:style-name="P63"><text:span text:style-name="T64">$</text:span>variáveis</text:p>
        </text:list-item>
        <text:list-item>
          <text:p text:style-name="P63">CONSTANTES (se declaradas com a palavra-chave <text:span text:style-name="T182">const</text:span>)</text:p>
        </text:list-item>
      </text:list>
      <text:p text:style-name="P62">Não são Case-Sensitive <text:span text:style-name="T183">(ou seja, posso escrevê-las em maiúsculo)</text:span>:</text:p>
      <text:list text:continue-numbering="true" text:style-name="L6">
        <text:list-item>
          <text:p text:style-name="P63">palavras-<text:span text:style-name="T181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4">Para criar constantes, use a função </text:span></text:span><text:span text:style-name="Source_20_Text"><text:span text:style-name="T185">define()</text:span></text:span><text:span text:style-name="Source_20_Text"><text:span text:style-name="T184">. Exemplo:<text:line-break/></text:span></text:span><text:span text:style-name="Source_20_Text"><text:span text:style-name="T186">define(</text:span></text:span><text:span text:style-name="Source_20_Text"><text:span text:style-name="T187">“CONSTANTE”),27</text:span></text:span><text:span text:style-name="Source_20_Text"><text:span text:style-name="T186">)</text:span></text:span><text:span text:style-name="Source_20_Text"><text:span text:style-name="T187">;</text:span></text:span><text:span text:style-name="Source_20_Text"><text:span text:style-name="T188"><text:line-break/></text:span></text:span><text:span text:style-name="Source_20_Text"><text:span text:style-name="T189">Outra maneira de declarar constante</text:span></text:span><text:span text:style-name="Source_20_Text"><text:span text:style-name="T190">s</text:span></text:span><text:span text:style-name="Source_20_Text"><text:span text:style-name="T189"> é com a palavra-chave </text:span></text:span><text:span text:style-name="Source_20_Text"><text:span text:style-name="T191">const</text:span></text:span></text:p>
      <text:p text:style-name="P66"/>
      <text:p text:style-name="P67"><text:span text:style-name="T192">Porque </text:span><text:span text:style-name="T193">não declarar </text:span><text:span text:style-name="T194">variáveis com acentos ou símbolos</text:span>?</text:p>
      <text:p text:style-name="P68"><text:span text:style-name="T192">A acentuação é permitida porém não é uma boa prática. </text:span>Todos os computadores interpretam o encoding <text:span text:style-name="T192">(codificação)</text:span> ASCII igual mas, quando se trata de ASCII <text:span text:style-name="T192">estendidos</text:span>, pode ser gerado um problema porque nem todo computador os interpreta igualmente. Não é garantia que em outros idiomas, além do inglês, a interpretação seja igual.<text:tab/><text:tab/><text:span text:style-name="T181">($variável → $vari?vel)</text:span></text:p>
      <text:p text:style-name="P68"/>
      <text:p text:style-name="P69"><text:span text:style-name="T195">N</text:span><text:span text:style-name="T196">ão existe a </text:span><text:span text:style-name="T197">obrigação</text:span><text:span text:style-name="T196"> de declarar </text:span><text:span text:style-name="T198">tipagem das </text:span><text:span text:style-name="T196">variáveis</text:span><text:span text:style-name="T199">. Os tipos serão atribuídos automaticamente de acordo com o valor que a variável receber, ou seja, </text:span><text:span text:style-name="T200">a linguagem inicializa a variável e</text:span><text:span text:style-name="T199"> modifica </text:span><text:span text:style-name="T200">seu tipo</text:span><text:span text:style-name="T199"> de acordo com a atribuição. </text:span><text:span text:style-name="T201">Esse processo é conhecido como coerção ou </text:span><text:span text:style-name="Emphasis"><text:span text:style-name="T201">type juggling </text:span></text:span><text:span text:style-name="T201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202">declare(strict_types=1)</text:span></text:span><text:span text:style-name="Source_20_Text"><text:span text:style-name="T201"> força o PHP a seguir os type hints </text:span></text:span><text:span text:style-name="Source_20_Text"><text:span text:style-name="T203">(tipagem </text:span></text:span><text:span text:style-name="Source_20_Text"><text:span text:style-name="T204">forte</text:span></text:span><text:span text:style-name="Source_20_Text"><text:span text:style-name="T203">) </text:span></text:span><text:span text:style-name="Source_20_Text"><text:span text:style-name="T201">de forma mais rígida, sem conversões implícitas de tipos </text:span></text:span><text:span text:style-name="Source_20_Text"><text:span text:style-name="T203">(type juggling), lançando</text:span></text:span><text:span text:style-name="Source_20_Text"><text:span text:style-name="T201"> um erro do tipo </text:span></text:span><text:span text:style-name="Source_20_Text"><text:span text:style-name="T205">TypeError</text:span></text:span><text:span text:style-name="Source_20_Text"><text:span text:style-name="T201"> quando </text:span></text:span><text:span text:style-name="Source_20_Text"><text:span text:style-name="T203">for passado </text:span></text:span><text:span text:style-name="Source_20_Text"><text:span text:style-name="T201">um tipo diferente do esperado.</text:span></text:span></text:p>
      <text:p text:style-name="P69"><text:span text:style-name="Source_20_Text"/></text:p>
      <text:p text:style-name="P70">O <text:span text:style-name="T206">operador</text:span><text:span text:style-name="T64"> de atribuição</text:span> é <text:span text:style-name="T207">um</text:span> sinal de <text:span text:style-name="T208">igual</text:span> (<text:span text:style-name="T179">=</text:span>)</text:p>
      <text:p text:style-name="P71">Exemplo de atribuição de variáveis simultaneamente: $a = $b = $c = 10;</text:p>
      <text:p text:style-name="P72"><text:span text:style-name="T209">Esse operador tem low priority sobre os operadores lógicos </text:span><text:span text:style-name="T210">AND</text:span><text:span text:style-name="T209"> e </text:span><text:span text:style-name="T210">OR</text:span><text:span text:style-name="T209">, porém os operadores </text:span><text:span text:style-name="T65">&amp;&amp;</text:span><text:span text:style-name="T209"> e </text:span><text:span text:style-name="T65">||</text:span><text:span text:style-name="T209"> têm higher priority sobre todos. Exemplo:</text:span></text:p>
      <text:p text:style-name="P73"><text:span text:style-name="T211">$c = $a </text:span><text:span text:style-name="T212">and</text:span><text:span text:style-name="T211"> $b</text:span><text:tab/>→ <text:s text:c="4"/>A precedência dessa operação é <text:span text:style-name="T211">$c = $a</text:span></text:p>
      <text:p text:style-name="P71"/>
      <text:p text:style-name="P54"><text:soft-page-break/><text:span text:style-name="T213">É</text:span><text:span text:style-name="T59"> necessário</text:span> o ponto-e-vírgula (<text:span text:style-name="T214">;</text:span>) para indicar o fim do comando</text:p>
      <text:p text:style-name="P74"/>
      <text:p text:style-name="P75"><text:span text:style-name="T215">Não é necessário aquele </text:span><text:span text:style-name="T65">f</text:span><text:span text:style-name="T215"> acompanhando números decimais (</text:span><text:span text:style-name="T65">float</text:span><text:span text:style-name="T215">) </text:span><text:span text:style-name="T216">como no Java</text:span></text:p>
      <text:p text:style-name="P76"/>
      <text:p text:style-name="P75"><text:span text:style-name="T215">O PHP aceita </text:span><text:span text:style-name="T217">typecast</text:span><text:span text:style-name="T215"> </text:span><text:span text:style-name="T218">para</text:span><text:span text:style-name="T215"> </text:span><text:span text:style-name="T219">forçar a conversão de</text:span><text:span text:style-name="T215"> uma variável </text:span><text:span text:style-name="T219">para </text:span><text:span text:style-name="T218">outro</text:span><text:span text:style-name="T215"> determinado tipo:</text:span></text:p>
      <text:list text:style-name="L7">
        <text:list-item>
          <text:p text:style-name="P77"><text:span text:style-name="T219">Inteiro: </text:span><text:span text:style-name="T220">int</text:span><text:span text:style-name="T219"> </text:span><text:span text:style-name="T221">ou </text:span><text:span text:style-name="T220">integer</text:span></text:p>
        </text:list-item>
        <text:list-item>
          <text:p text:style-name="P78">Real <text:span text:style-name="T222">(ponto flutuante)</text:span>: <text:span text:style-name="T223">real</text:span>, <text:span text:style-name="T223">float</text:span>, <text:span text:style-name="T223">double</text:span></text:p>
        </text:list-item>
        <text:list-item>
          <text:p text:style-name="P78">Caractere<text:span text:style-name="T222">s</text:span>: <text:span text:style-name="T223">string</text:span></text:p>
        </text:list-item>
        <text:list-item>
          <text:p text:style-name="P79"><text:span text:style-name="T218">Booleano (l</text:span><text:span text:style-name="T219">ógico</text:span><text:span text:style-name="T218">)</text:span><text:span text:style-name="T219">: </text:span><text:span text:style-name="T220">boolean</text:span><text:span text:style-name="T224"> </text:span><text:span text:style-name="T225">V</text:span><text:span text:style-name="T224">alores </text:span><text:span text:style-name="T225">booleanos </text:span><text:span text:style-name="T224">são convertidos conforme as seguintes regras:</text:span></text:p>
          <text:list>
            <text:list-item>
              <text:p text:style-name="P80"><text:span text:style-name="Strong_20_Emphasis"><text:span text:style-name="T226">Falsos</text:span></text:span><text:span text:style-name="T5">: </text:span><text:span text:style-name="Source_20_Text"><text:span text:style-name="T227">0</text:span></text:span><text:span text:style-name="T5">, </text:span><text:span text:style-name="Source_20_Text"><text:span text:style-name="T227">0.0</text:span></text:span><text:span text:style-name="T5">, </text:span><text:span text:style-name="T228">string vazia </text:span><text:span text:style-name="T227">“”</text:span><text:span text:style-name="T228"> ou </text:span><text:span text:style-name="T227">“0”</text:span><text:span text:style-name="Source_20_Text"><text:span text:style-name="T5">‘’</text:span></text:span><text:span text:style-name="T5">, </text:span><text:span text:style-name="T228">vetor vazio </text:span><text:span text:style-name="T227">[]</text:span><text:span text:style-name="T5">, </text:span><text:span text:style-name="T228">objetos vazios (</text:span><text:span text:style-name="Source_20_Text"><text:span text:style-name="T227">new stdClass()</text:span></text:span><text:span text:style-name="T228"> sem propriedades)</text:span><text:span text:style-name="T5"> e </text:span><text:span text:style-name="T229">valor</text:span><text:span text:style-name="T230"> </text:span><text:span text:style-name="T231">null</text:span><text:span text:style-name="T5">.</text:span></text:p>
            </text:list-item>
            <text:list-item>
              <text:p text:style-name="P81"><text:span text:style-name="Strong_20_Emphasis"><text:span text:style-name="T226">Verdadeiros</text:span></text:span><text:span text:style-name="T5">: Qualquer outro valor. </text:span><text:span text:style-name="T232">P</text:span><text:span text:style-name="T233">ermit</text:span><text:span text:style-name="T232">indo</text:span><text:span text:style-name="T233"> inferir, </text:span><text:span text:style-name="T232">por exemplo: </text:span><text:span text:style-name="T234">if (299)</text:span><text:span text:style-name="T233"> retorna </text:span><text:span text:style-name="T234">true</text:span></text:p>
            </text:list-item>
          </text:list>
        </text:list-item>
      </text:list>
      <text:p text:style-name="P82"/>
      <text:p text:style-name="P82">No PHP só é possível fazer cast de tipos para tipos escalares. Portanto fazer o cast de um objeto para uma classe diferente é ilegal, mas fazer um cast de objeto para um tipo escalar é completamente válido. </text:p>
      <text:p text:style-name="P83"/>
      <text:p text:style-name="P84"><text:span text:style-name="Strong_20_Emphasis"><text:span text:style-name="T235">typ</text:span></text:span><text:span text:style-name="Strong_20_Emphasis"><text:span text:style-name="T236">e hints</text:span></text:span><text:span text:style-name="T199"> (ou “sugestões de tipo”) são declarações que especificam o tipo esperado de um argumento, retorno de uma função ou propriedade de classe. </text:span><text:span text:style-name="T237">Na prática, só existe</text:span><text:span text:style-name="T238">m</text:span><text:span text:style-name="T237"> para </text:span><text:span text:style-name="T239">facilitar a leitura</text:span><text:span text:style-name="T237">. </text:span><text:span text:style-name="T240">Exemplos:</text:span></text:p>
      <text:p text:style-name="P85"><text:span text:style-name="T241">function</text:span><text:span text:style-name="T242"> </text:span><text:span text:style-name="T243">addNumbers</text:span><text:span text:style-name="T242">(</text:span><text:span text:style-name="T241">int</text:span><text:span text:style-name="T242"> </text:span><text:span text:style-name="T244">$a</text:span><text:span text:style-name="T242">, </text:span><text:span text:style-name="T241">int</text:span><text:span text:style-name="T242"> </text:span><text:span text:style-name="T244">$b</text:span><text:span text:style-name="T242">): </text:span><text:span text:style-name="T241">int</text:span><text:span text:style-name="T242"> {} </text:span><text:span text:style-name="T245">//type hint tanto nos parâmetros, quanto no retorno da função</text:span></text:p>
      <text:p text:style-name="P85"><text:span text:style-name="T241">function</text:span><text:span text:style-name="T242"> </text:span><text:span text:style-name="T243">processUser</text:span><text:span text:style-name="T242">(</text:span><text:span text:style-name="T246">User</text:span><text:span text:style-name="T242"> </text:span><text:span text:style-name="T244">$user</text:span><text:span text:style-name="T242">) {} </text:span><text:span text:style-name="T245">//objeto                            </text:span></text:p>
      <text:p text:style-name="P85"><text:span text:style-name="T241">function</text:span><text:span text:style-name="T242"> </text:span><text:span text:style-name="T243">setAge</text:span><text:span text:style-name="T242">(?</text:span><text:span text:style-name="T241">int</text:span><text:span text:style-name="T242"> </text:span><text:span text:style-name="T244">$age</text:span><text:span text:style-name="T242">) {} </text:span><text:span text:style-name="T245">// </text:span><text:span text:style-name="T247">null safety</text:span><text:span text:style-name="T245">: O </text:span><text:span text:style-name="T247">operador ?</text:span><text:span text:style-name="T245"> permite que o tipo seja nulo ou do tipo especificado.                                            </text:span></text:p>
      <text:p text:style-name="P85"><text:span text:style-name="T241">function</text:span><text:span text:style-name="T242"> </text:span><text:span text:style-name="T243">calculate</text:span><text:span text:style-name="T242">(</text:span><text:span text:style-name="T241">int</text:span><text:span text:style-name="T242">|</text:span><text:span text:style-name="T241">float</text:span><text:span text:style-name="T242"> </text:span><text:span text:style-name="T244">$value</text:span><text:span text:style-name="T242">): </text:span><text:span text:style-name="T241">int</text:span><text:span text:style-name="T242">|</text:span><text:span text:style-name="T241">float</text:span><text:span text:style-name="T242"> {} </text:span><text:span text:style-name="T245">// múltiplos tipos para um argumento ou retorno.                                                 </text:span></text:p>
      <text:p text:style-name="P85"><text:span text:style-name="T241">function</text:span><text:span text:style-name="T242"> </text:span><text:span text:style-name="T243">process</text:span><text:span text:style-name="T242">(</text:span><text:span text:style-name="T246">LoggerInterface</text:span><text:span text:style-name="T242">&amp;</text:span><text:span text:style-name="T246">Cacheable</text:span><text:span text:style-name="T242"> </text:span><text:span text:style-name="T244">$item</text:span><text:span text:style-name="T242">) {} </text:span><text:span text:style-name="T245">//Permite exigir que o valor implemente múltiplas interfaces.</text:span></text:p>
      <text:p text:style-name="P86"/>
      <text:p text:style-name="P83"><text:span text:style-name="T248">A </text:span><text:span text:style-name="T249">concatenação</text:span><text:span text:style-name="T248"> em PHP é realizada pelo operador </text:span><text:span text:style-name="T250">ponto</text:span><text:span text:style-name="T248"> (</text:span><text:span text:style-name="T251">.</text:span><text:span text:style-name="T248">)</text:span><text:span text:style-name="T252"> </text:span><text:span text:style-name="T253">Exemplo:</text:span></text:p>
      <text:p text:style-name="P87"><text:span text:style-name="T254">echo</text:span><text:span text:style-name="T255"> </text:span><text:span text:style-name="T256">"&lt;br&gt;Concatenando: " </text:span><text:span text:style-name="T257">. </text:span><text:span text:style-name="T258">$no</text:span><text:span text:style-name="T259">me </text:span><text:span text:style-name="T257">. </text:span><text:span text:style-name="T256">" tem " </text:span><text:span text:style-name="T257">. </text:span><text:span text:style-name="T258">$idade </text:span><text:span text:style-name="T257">. </text:span><text:span text:style-name="T256">" anos"</text:span><text:span text:style-name="T255">;</text:span></text:p>
      <text:p text:style-name="P67">Diferente do Javascript onde a concatenação tem preferência sobre a adição numérica; no PHP, o <text:span text:style-name="T260">operador (+)</text:span> serve apenas para somar valores porque o operador de concatenação é o ponto (.) <text:span text:style-name="T261">Exemplo:</text:span><text:span text:style-name="T262"> [javascript: ‘1’+1=11]<text:tab/>[php: ‘1’+1=2]</text:span></text:p>
      <text:p text:style-name="P67"/>
      <text:p text:style-name="P88"><text:span text:style-name="T263">A </text:span><text:span text:style-name="T264">interpolação de strings</text:span><text:span text:style-name="T265"> </text:span><text:span text:style-name="T266">é</text:span><text:span text:style-name="T267"> </text:span><text:span text:style-name="T268">u</text:span><text:span text:style-name="T269">ma alternativa à concatenação</text:span><text:span text:style-name="T267"> </text:span><text:span text:style-name="T270">(</text:span><text:span text:style-name="T263">só funciona se a variável estiver em uma string de</text:span><text:span text:style-name="T271"> </text:span><text:span text:style-name="T270">aspas duplas), </text:span><text:span text:style-name="T272">desse modo não será preciso utilizar o operador ponto(.)</text:span><text:span text:style-name="T270">: </text:span><text:span text:style-name="T273">echo</text:span><text:span text:style-name="T274"> </text:span><text:span text:style-name="T275">"</text:span><text:span text:style-name="T276">Usando</text:span><text:span text:style-name="T275"> </text:span><text:span text:style-name="T277">interpolação</text:span><text:span text:style-name="T275">: </text:span><text:span text:style-name="T278">$nome</text:span><text:span text:style-name="T275"> tem </text:span><text:span text:style-name="T278">$idade</text:span><text:span text:style-name="T275"> anos!"</text:span></text:p>
      <text:p text:style-name="P89"><text:s/><text:span text:style-name="T279">Note que não foi preciso as chaves{}, como no Javascript.</text:span></text:p>
      <text:p text:style-name="P90"/>
      <text:p text:style-name="P91"><text:span text:style-name="T228">Em PHP, </text:span><text:span text:style-name="Strong_20_Emphasis"><text:span text:style-name="Source_20_Text"><text:span text:style-name="T280">$argv</text:span></text:span></text:span><text:span text:style-name="T228"> é uma variável superglobal que armazena os argumentos passados para um script PHP executado na </text:span><text:span text:style-name="Strong_20_Emphasis"><text:span text:style-name="T281">linha de comando</text:span></text:span><text:span text:style-name="T228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2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2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3"><text:span text:style-name="T282">Já o </text:span><text:span text:style-name="Source_20_Text"><text:span text:style-name="T283">$argc </text:span></text:span><text:span text:style-name="T282">contém o número de parâmetros passados na linha de comando</text:span></text:p>
      <text:h text:style-name="P36" text:outline-level="1">Aula 05 – <text:span text:style-name="T284">Funções Matemáticas</text:span></text:h>
      <text:p text:style-name="P14"/>
      <text:p text:style-name="P94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5"><text:span text:style-name="T272">Em PHP, dividindo dois números </text:span><text:span text:style-name="T285">do tipo inteiro</text:span><text:span text:style-name="T272">, o retorno pode ser </text:span><text:span text:style-name="T285">do tipo</text:span><text:span text:style-name="T272"> </text:span><text:span text:style-name="T286">float</text:span><text:span text:style-name="T272">.</text:span></text:p>
      <text:p text:style-name="P96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7"><text:span text:style-name="T287">Funç</text:span><text:span text:style-name="T288">ões para </text:span><text:span text:style-name="T289">operação com números</text:span><text:span text:style-name="T288">:</text:span></text:p>
      <text:list text:style-name="L9">
        <text:list-item>
          <text:p text:style-name="P98"><text:span text:style-name="T290">number_format</text:span><text:span text:style-name="T291">(</text:span><text:span text:style-name="T292">$v1</text:span><text:span text:style-name="T291">, </text:span><text:span text:style-name="T293">2</text:span><text:span text:style-name="T291">, </text:span><text:span text:style-name="T294">''</text:span><text:span text:style-name="T291">, </text:span><text:span text:style-name="T294">''</text:span><text:span text:style-name="T291">, </text:span><text:span text:style-name="T294">'.'</text:span><text:span text:style-name="T291">)</text:span><text:span text:style-name="T295">: </text:span><text:span text:style-name="T296">1º parâmetro é o valor, 2º</text:span><text:span text:style-name="T297"> parâmetro é a</text:span><text:span text:style-name="T296"> </text:span><text:span text:style-name="T298">quantidade de casa</text:span><text:span text:style-name="T299">s</text:span><text:span text:style-name="T298"> decimais</text:span><text:span text:style-name="T296">, </text:span><text:span text:style-name="T297">3º parâmetro é o </text:span><text:span text:style-name="T298">separador decimal</text:span><text:span text:style-name="T296">, </text:span><text:span text:style-name="T297">4º parâmetro é o </text:span><text:span text:style-name="T298">separador de milha</text:span><text:span text:style-name="T300">r</text:span><text:span text:style-name="T301">.</text:span></text:p>
        </text:list-item>
        <text:list-item>
          <text:p text:style-name="P98"><text:span text:style-name="T290">ceil()</text:span><text:span text:style-name="T302">: arredondamento para cima</text:span></text:p>
        </text:list-item>
        <text:list-item>
          <text:p text:style-name="P98"><text:span text:style-name="T290">floor()</text:span><text:span text:style-name="T302">: arredondamento para baixo</text:span></text:p>
        </text:list-item>
      </text:list>
      <text:h text:style-name="P1" text:outline-level="1" text:is-list-header="true"/>
      <text:h text:style-name="P36" text:outline-level="1">Aula 06 – <text:span text:style-name="T284">Operadores</text:span></text:h>
      <text:p text:style-name="P14"/>
      <text:p text:style-name="P99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0"><text:span text:style-name="T303">Observações quanto às operações com Módulos:</text:span><text:span text:style-name="T304"><text:line-break/></text:span><text:span text:style-name="T305">$</text:span><text:span text:style-name="T306">a</text:span><text:span text:style-name="T307"> = </text:span><text:span text:style-name="T308">1</text:span><text:span text:style-name="T307"> % </text:span><text:span text:style-name="T308">2</text:span><text:span text:style-name="T307">; </text:span><text:span text:style-name="T309">//retorna '1'<text:line-break/></text:span><text:span text:style-name="T305">$</text:span><text:span text:style-name="T306">a</text:span><text:span text:style-name="T307"> = </text:span><text:span text:style-name="T308">0</text:span><text:span text:style-name="T307"> % </text:span><text:span text:style-name="T308">3</text:span><text:span text:style-name="T307">; </text:span><text:span text:style-name="T309">//retorna '0' </text:span></text:p>
      <text:p text:style-name="P101"/>
      <text:p text:style-name="P102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3"><text:span text:style-name="T302">Atenção!<text:line-break/>O PÓS incremento/decremento utiliza a variável primeiro para </text:span><text:span text:style-name="T310">depois</text:span><text:span text:style-name="T302"> decrementar, </text:span><text:span text:style-name="T311">ou seja, <text:line-break/></text:span><text:span text:style-name="T290">++a</text:span><text:span text:style-name="T312"> </text:span><text:span text:style-name="T313">é</text:span><text:span text:style-name="T312"> executado </text:span><text:span text:style-name="T314">imediatamente</text:span><text:span text:style-name="T312"><text:line-break/></text:span><text:span text:style-name="T315">a+</text:span><text:span text:style-name="T290">+</text:span><text:span text:style-name="T312"> </text:span><text:span text:style-name="T313">é</text:span><text:span text:style-name="T312"> executado na </text:span><text:span text:style-name="T314">próxima linha</text:span></text:p>
      <text:p text:style-name="P101"/>
      <text:p text:style-name="P104"/>
      <text:p text:style-name="P105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<text:span text:style-name="T316">Colocar um caractere </text:span><text:span text:style-name="Source_20_Text"><text:span text:style-name="T317">&amp;</text:span></text:span><text:span text:style-name="T316"> </text:span><text:span text:style-name="T318">antes</text:span><text:span text:style-name="T316"> de uma variável </text:span><text:span text:style-name="T319">cria um ponteiro</text:span><text:span text:style-name="T316">. El</text:span><text:span text:style-name="T320">e</text:span><text:span text:style-name="T316"> não será uma variável de fato </text:span><text:span text:style-name="T321">mas guardará o </text:span><text:span text:style-name="T322">endereço</text:span><text:span text:style-name="T321"> dela, ou seja,</text:span><text:span text:style-name="T316"> será uma referência à variável original. Com isso, cria-se uma relação entre as variáveis. </text:span><text:span text:style-name="T323">Se alterar uma, também altera a outra.</text:span></text:p>
      <text:p text:style-name="P108"><text:span text:style-name="T324">No exemplo acima, ao utilizar o operador </text:span><text:span text:style-name="T325">&amp;</text:span><text:span text:style-name="T324">, </text:span><text:span text:style-name="T326">a</text:span><text:span text:style-name="T324"> variável </text:span><text:span text:style-name="T327">`</text:span><text:span text:style-name="T328">a</text:span><text:span text:style-name="T327">`</text:span><text:span text:style-name="T329"> </text:span><text:span text:style-name="T324">fará referência à variável </text:span><text:span text:style-name="T327">`</text:span><text:span text:style-name="T330">b</text:span><text:span text:style-name="T331">`</text:span><text:span text:style-name="T324">. Assim, se a variável </text:span><text:span text:style-name="T327">`</text:span><text:span text:style-name="T330">a</text:span><text:span text:style-name="T331">`</text:span><text:span text:style-name="T324"> valer </text:span><text:span text:style-name="T326">8</text:span><text:span text:style-name="T324">, então </text:span><text:span text:style-name="T327">`</text:span><text:span text:style-name="T330">b</text:span><text:span text:style-name="T331">`</text:span><text:span text:style-name="T324"> valerá </text:span><text:span text:style-name="T326">8 + 5 = 13</text:span><text:span text:style-name="T324">, mudando o valor da variável </text:span><text:span text:style-name="T327">`</text:span><text:span text:style-name="T330">a</text:span><text:span text:style-name="T331">`</text:span><text:span text:style-name="T324"> também para </text:span><text:span text:style-name="T326">13 </text:span><text:span text:style-name="T324">e</text:span><text:span text:style-name="T332"> </text:span><text:span text:style-name="T333">ficando </text:span><text:span text:style-name="T334">ambas</text:span><text:span text:style-name="T333"> com o mesmo valor</text:span></text:p>
      <text:p text:style-name="P109"/>
      <text:p text:style-name="P10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324">Colocar um </text:span><text:span text:style-name="T335">segundo </text:span><text:span text:style-name="T325">$</text:span><text:span text:style-name="T324"> na frente de uma variável</text:span><text:span text:style-name="T336"> </text:span><text:span text:style-name="T324">cria uma </text:span><text:span text:style-name="T335">variável din</text:span><text:span text:style-name="T337">â</text:span><text:span text:style-name="T335">mica</text:span><text:span text:style-name="T324">, dependen</text:span><text:span text:style-name="T338">te</text:span><text:span text:style-name="T324"> do conteúdo da variável original.</text:span><text:span text:style-name="T336"> Basicamente, o cifrão duplo instrui a criação de uma variável dentro da memória do servidor considerando o conteúdo da variável</text:span><text:span text:style-name="T339"> </text:span><text:span text:style-name="T340">$site</text:span><text:span text:style-name="T339">. </text:span><text:span text:style-name="T336">Logo, a recém-criada variável</text:span><text:span text:style-name="T339"> </text:span><text:span text:style-name="T340">$cursoemvideo</text:span><text:span text:style-name="T339"> recebe o valor </text:span><text:span text:style-name="T340">“cursoPHP”.</text:span><text:span text:style-name="T336"> Sendo assi</text:span><text:span text:style-name="T341">m, teremos 2 variáveis.</text:span></text:p>
      <text:h text:style-name="P36" text:outline-level="1"><text:span text:style-name="T342">A</text:span><text:span text:style-name="T343">ula 07 – </text:span><text:span text:style-name="T344">Operador</text:span><text:span text:style-name="T345">es</text:span><text:span text:style-name="T344"> Relaciona</text:span><text:span text:style-name="T345">is</text:span><text:span text:style-name="T344">, Ternário</text:span><text:span text:style-name="T345">s</text:span><text:span text:style-name="T344"> </text:span><text:span text:style-name="T345">e</text:span><text:span text:style-name="T344"> Lógico</text:span><text:span text:style-name="T345">s</text:span></text:h>
      <text:p text:style-name="P112"><draw:frame draw:style-name="fr2" draw:name="Figura9" text:anchor-type="as-char" svg:width="7.945cm" svg:height="6.713cm" draw:z-index="6"><draw:image xlink:href="Pictures/10000000000001C40000017EB7FF140B.jpg" xlink:type="simple" xlink:show="embed" xlink:actuate="onLoad" draw:mime-type="image/jpeg"/></draw:frame></text:p>
      <text:p text:style-name="P113"/>
      <text:p text:style-name="P114"><text:span text:style-name="T346"><draw:frame draw:style-name="fr5" draw:name="Figura10" text:anchor-type="as-char" svg:width="8.054cm" svg:height="5.094cm" draw:z-index="7"><draw:image xlink:href="Pictures/10000000000002300000010ABAEBC088.jpg" xlink:type="simple" xlink:show="embed" xlink:actuate="onLoad" draw:mime-type="image/jpeg"/></draw:frame></text:span><text:span text:style-name="T346"><text:line-break/>Cuidado! O operador ternário </text:span><text:span text:style-name="T347">apenas retorna valor ou expressão</text:span><text:span text:style-name="T346">, ele NÃO executa declarações, </text:span><text:span text:style-name="T348">funções, </text:span><text:span text:style-name="T346">comandos </text:span><text:span text:style-name="T348">que não </text:span><text:span text:style-name="T349">retornam valor</text:span><text:span text:style-name="T346">. Exemplo de código que </text:span><text:span text:style-name="T347">NÃO</text:span><text:span text:style-name="T346"> compila:<text:line-break/></text:span><text:span text:style-name="T350">(a==b) ? </text:span><text:span text:style-name="T351">echo</text:span><text:span text:style-name="T350"> </text:span><text:span text:style-name="T352">'sim'</text:span><text:span text:style-name="T350">: </text:span><text:span text:style-name="T351">echo</text:span><text:span text:style-name="T350"> </text:span><text:span text:style-name="T352">'não'</text:span><text:span text:style-name="T350"> </text:span><text:span text:style-name="T353">//não compila porque echo não retorna valor</text:span></text:p>
      <text:p text:style-name="P115"><text:span text:style-name="T354">Operador Elvis (</text:span><text:span text:style-name="Source_20_Text"><text:span text:style-name="T355">?:</text:span></text:span><text:span text:style-name="T354">): </text:span><text:span text:style-name="T346">é uma </text:span><text:span text:style-name="Strong_20_Emphasis"><text:span text:style-name="T346">forma reduzida do operador ternário tradicional</text:span></text:span><text:span text:style-name="T346">. </text:span><text:span text:style-name="T354">, tornando o código mais curto e legível. </text:span><text:span text:style-name="T356">Veja a comparação entre Ternário tradicional x Ternário com operador Elvis:<text:line-break/></text:span><text:span text:style-name="T357">$variable</text:span><text:span text:style-name="T358"> = </text:span><text:span text:style-name="T357">$foo</text:span><text:span text:style-name="T358"> ? </text:span><text:span text:style-name="T357">$foo</text:span><text:span text:style-name="T358"> : </text:span><text:span text:style-name="T359">'bar'</text:span><text:span text:style-name="T358">; </text:span><text:span text:style-name="T360">é o mesmo que </text:span><text:span text:style-name="T361">$variable</text:span><text:span text:style-name="T362"> = </text:span><text:span text:style-name="T361">$foo</text:span><text:span text:style-name="T362"> ?: </text:span><text:span text:style-name="T363">'bar'</text:span><text:span text:style-name="T362">;</text:span></text:p>
      <text:p text:style-name="P115"/>
      <text:p text:style-name="P116"><draw:frame draw:style-name="fr2" draw:name="Figura11" text:anchor-type="as-char" svg:width="11.959cm" svg:height="4.512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64">Formulários</text:span></text:h>
      <text:p text:style-name="P106"/>
      <text:p text:style-name="P117"><text:span text:style-name="T365">É possível interligar formulários HTML com scripts PHP através da cláusula </text:span><text:span text:style-name="T366">$_GET</text:span><text:span text:style-name="T367">[“”]</text:span><text:span text:style-name="T368"> <text:line-break/></text:span><text:span text:style-name="T369">(</text:span><text:span text:style-name="T368">Lembr</text:span><text:span text:style-name="T365">ando </text:span><text:span text:style-name="T368">que é </text:span><text:span text:style-name="T365">escrito</text:span><text:span text:style-name="T368"> todo em letras maiúsculas</text:span><text:span text:style-name="T369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70">O parâmetro </text:span><text:span text:style-name="T371">m</text:span><text:span text:style-name="T372">e</text:span><text:span text:style-name="T371">tod=”get”</text:span><text:span text:style-name="T370"> envia os dados pela URL (mais rápido) </text:span><text:span text:style-name="T373">e utiliza o comando</text:span><text:span text:style-name="T374"> </text:span><text:span text:style-name="T375">$_GET[“”]</text:span></text:p>
      <text:p text:style-name="P120"><text:span text:style-name="T373">Já </text:span><text:span text:style-name="T343">o </text:span><text:span text:style-name="T368">parâmetro</text:span><text:span text:style-name="T343"> </text:span><text:span text:style-name="T376">metod=”post”</text:span><text:span text:style-name="T343"> envia por pacotes (mais seguro) </text:span><text:span text:style-name="T373">e utiliza o comando</text:span><text:span text:style-name="T374"> </text:span><text:span text:style-name="T375">$_POST[“”]</text:span></text:p>
      <text:p text:style-name="P121"><text:span text:style-name="T343">O parâmetro </text:span><text:span text:style-name="T376">action=”dados.php</text:span><text:span text:style-name="T377">”</text:span><text:span text:style-name="T343"> indica para </text:span><text:span text:style-name="T378">qual arquivo</text:span><text:span text:style-name="T343"> os dados devem ser enviados </text:span><text:span text:style-name="T379">para agir.</text:span></text:p>
      <text:p text:style-name="P122"><text:span text:style-name="T343">A tag </text:span><text:span text:style-name="T380">&lt;form&gt;</text:span><text:span text:style-name="T343"> cria formulários</text:span></text:p>
      <text:p text:style-name="P121"><text:span text:style-name="T343">A tag </text:span><text:span text:style-name="T380">&lt;input&gt;</text:span><text:span text:style-name="T343"> serve para criar uma série de controles, como caixa de textos, </text:span><text:span text:style-name="T368">botões,</text:span><text:span text:style-name="T343"> etc</text:span></text:p>
      <text:p text:style-name="P123"><text:span text:style-name="T381">O o</text:span><text:span text:style-name="T343">bjeto </text:span><text:span text:style-name="T382">input</text:span><text:span text:style-name="T383"> </text:span><text:span text:style-name="T384">d</text:span><text:span text:style-name="T385">e tipo </text:span><text:span text:style-name="T376">submit</text:span><text:span text:style-name="T343"> </text:span><text:span text:style-name="T368">envia </text:span><text:span text:style-name="T378">os </text:span><text:span text:style-name="T368">dados </text:span><text:span text:style-name="T378">do </text:span><text:span text:style-name="T379">formulário</text:span><text:span text:style-name="T378"> </text:span><text:span text:style-name="T368">para o </text:span><text:span text:style-name="T378">arquivo </text:span><text:span text:style-name="T368">estipulado n</text:span><text:span text:style-name="T378">o parâmetro </text:span><text:span text:style-name="T386">action</text:span><text:span text:style-name="T368"> </text:span><text:span text:style-name="T378">d</text:span><text:span text:style-name="T368">a primeira linha.</text:span></text:p>
      <text:p text:style-name="P124"><text:span text:style-name="T387">A </text:span><text:span text:style-name="T388">integração</text:span><text:span text:style-name="T387"> </text:span><text:span text:style-name="T389">entre</text:span><text:span text:style-name="T387"> qualquer controle de formulário </text:span><text:span text:style-name="T389">HTML e seu script PHP</text:span><text:span text:style-name="T387"> pode ser feita através do </text:span><text:span text:style-name="T390">parâmetro</text:span><text:span text:style-name="T391"> </text:span><text:span text:style-name="T392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84">Condicional Composta</text:span></text:h>
      <text:p text:style-name="P127"><text:span text:style-name="T393">O PHP permite a condicional </text:span><text:span text:style-name="T394">elseif</text:span><text:span text:style-name="T395">,</text:span><text:span text:style-name="T396"> </text:span><text:span text:style-name="T397">o que reduz a quantidade de blocos</text:span></text:p>
      <text:p text:style-name="P128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28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9"/>
      <text:p text:style-name="P130"><text:span text:style-name="T398">Se por acaso as chaves</text:span><text:span text:style-name="T399">{}</text:span><text:span text:style-name="T398"> forem </text:span><text:span text:style-name="T400">esquecidas</text:span><text:span text:style-name="T398">, mesmo assim os comandos executarão, porém de maneira </text:span><text:span text:style-name="T400">independente</text:span><text:span text:style-name="T398">. Exemplo:<text:tab/></text:span><text:span text:style-name="T401">if</text:span><text:span text:style-name="T402"> (</text:span><text:span text:style-name="T403">$x</text:span><text:span text:style-name="T402"> == </text:span><text:span text:style-name="T403">$y</text:span><text:span text:style-name="T402">)   </text:span><text:span text:style-name="T404">echo</text:span><text:span text:style-name="T402"> </text:span><text:span text:style-name="T405">"&lt;hr&gt;comando1"</text:span><text:span text:style-name="T402">;</text:span></text:p>
      <text:h text:style-name="P36" text:outline-level="1">Aula 10 – <text:span text:style-name="T406">Condicional Switch</text:span></text:h>
      <text:p text:style-name="P131"/>
      <text:p text:style-name="P132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3"><text:span text:style-name="T407">Não esqueça do comando </text:span><text:span text:style-name="T408">break</text:span></text:p>
      <text:p text:style-name="P134">Exemplo de Condicional Switch com múltiplos <text:span text:style-name="T59">valores:</text:span></text:p>
      <text:p text:style-name="P135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6"/>
      <text:p text:style-name="P137"><text:span text:style-name="T409">ATENÇ</text:span><text:span text:style-name="T410">Ã</text:span><text:span text:style-name="T409">O: </text:span><text:span text:style-name="T64">Limpe o cache</text:span>! Seu código não carrega? Editou e não aparece? Limpe <text:span text:style-name="T411">a</text:span> cache do navegador!</text:p>
      <text:h text:style-name="P138" text:outline-level="1">Match Expression</text:h>
      <text:p text:style-name="P14"/>
      <text:p text:style-name="P139"><text:span text:style-name="T412">Introduzida na versão</text:span><text:span text:style-name="T413"> </text:span><text:span text:style-name="Strong_20_Emphasis"><text:span text:style-name="T413">PHP 8.0</text:span></text:span><text:span text:style-name="T412">, é uma construção mais legível para realizar comparações de valores, com funcionamento semelhante ao </text:span><text:span text:style-name="Source_20_Text"><text:span text:style-name="T414">switch</text:span></text:span><text:span text:style-name="Source_20_Text"><text:span text:style-name="T412"> porém menos propenso a erros e mais seguro. Dentre suas características:</text:span></text:span></text:p>
      <text:list text:style-name="L10">
        <text:list-item>
          <text:p text:style-name="P140"><text:span text:style-name="Source_20_Text"><text:span text:style-name="T415">S</text:span></text:span><text:span text:style-name="Source_20_Text"><text:span text:style-name="T412">empre retorna um valor, enquanto o </text:span></text:span><text:span text:style-name="Source_20_Text"><text:span text:style-name="T414">switch</text:span></text:span><text:span text:style-name="Source_20_Text"><text:span text:style-name="T412"> não retorna nada diretamente. </text:span></text:span></text:p>
        </text:list-item>
        <text:list-item>
          <text:p text:style-name="P140"><text:span text:style-name="Source_20_Text"><text:span text:style-name="T415">U</text:span></text:span><text:span text:style-name="Source_20_Text"><text:span text:style-name="T412">sa </text:span></text:span><text:span text:style-name="Source_20_Text"><text:span text:style-name="Strong_20_Emphasis"><text:span text:style-name="T412">comparação estrita</text:span></text:span></text:span><text:span text:style-name="Source_20_Text"><text:span text:style-name="T412"> </text:span></text:span><text:span text:style-name="Source_20_Text"><text:span text:style-name="T415">(===, ou seja, </text:span></text:span><text:span text:style-name="Source_20_Text"><text:span text:style-name="T412">tipo e valor devem ser iguais) enquanto que o</text:span></text:span><text:span text:style-name="T412"> </text:span><text:span text:style-name="Source_20_Text"><text:span text:style-name="T414">switch</text:span></text:span><text:span text:style-name="T412"> usa comparação frouxa (não verifica tipos). </text:span></text:p>
        </text:list-item>
        <text:list-item>
          <text:p text:style-name="P140"><text:span text:style-name="T412">Sem "fallthrough": No </text:span><text:span text:style-name="Source_20_Text"><text:span text:style-name="T414">match</text:span></text:span><text:span text:style-name="T412">, cada caso é avaliado isoladamente (não ocorre "queda" para o próximo). Já no </text:span><text:span text:style-name="Source_20_Text"><text:span text:style-name="T414">switch</text:span></text:span><text:span text:style-name="T412">, sem </text:span><text:span text:style-name="Source_20_Text"><text:span text:style-name="T412">break</text:span></text:span><text:span text:style-name="T412">, o código continua executando os próximos casos. </text:span></text:p>
        </text:list-item>
      </text:list>
      <text:p text:style-name="P141"><text:span text:style-name="T416">E</text:span><text:span text:style-name="T9">xemplos:</text:span></text:p>
      <text:p text:style-name="P142"><text:span text:style-name="T417">$cor</text:span><text:span text:style-name="T418"> = </text:span><text:span text:style-name="T419">'azul'</text:span><text:span text:style-name="T418">;<text:tab/><text:tab/><text:tab/><text:tab/><text:tab/><text:tab/><text:tab/></text:span></text:p>
      <text:p text:style-name="P143"><text:span text:style-name="T244">$resultado</text:span><text:span text:style-name="T242"> = </text:span><text:span text:style-name="T420">match</text:span><text:span text:style-name="T242"> (</text:span><text:span text:style-name="T244">$cor</text:span><text:span text:style-name="T242">) {<text:tab/><text:tab/><text:tab/><text:tab/></text:span></text:p>
      <text:p text:style-name="P143"><text:span text:style-name="T421"><text:s text:c="2"/>'vermelho'</text:span><text:span text:style-name="T242"> </text:span><text:span text:style-name="T241">=&gt;</text:span><text:span text:style-name="T242"> </text:span><text:span text:style-name="T421">'Cor escolhida foi vermelho'</text:span><text:span text:style-name="T242">,<text:tab/></text:span></text:p>
      <text:p text:style-name="P143"><text:span text:style-name="T421"><text:s text:c="2"/>'azul'</text:span><text:span text:style-name="T242"> </text:span><text:span text:style-name="T241">=&gt;</text:span><text:span text:style-name="T242"> </text:span><text:span text:style-name="T421">'Cor escolhida foi azul'</text:span><text:span text:style-name="T242">,<text:tab/><text:tab/></text:span></text:p>
      <text:p text:style-name="P143"><text:span text:style-name="T421"><text:s text:c="2"/>'verde'</text:span><text:span text:style-name="T242"> </text:span><text:span text:style-name="T241">=&gt;</text:span><text:span text:style-name="T242"> </text:span><text:span text:style-name="T421">'Cor escolhida foi verde'</text:span><text:span text:style-name="T242">,<text:tab/><text:tab/></text:span></text:p>
      <text:p text:style-name="P143"><text:span text:style-name="T420"><text:s text:c="2"/>default</text:span><text:span text:style-name="T242"> </text:span><text:span text:style-name="T241">=&gt;</text:span><text:span text:style-name="T242"> </text:span><text:span text:style-name="T421">'Cor desconhecida'<text:tab/><text:tab/><text:tab/></text:span></text:p>
      <text:p text:style-name="P144">};<text:tab/><text:tab/><text:tab/><text:tab/><text:tab/><text:tab/><text:tab/><text:tab/></text:p>
      <text:p text:style-name="P145"><text:span text:style-name="T422">echo</text:span><text:span text:style-name="T307"> </text:span><text:span text:style-name="T305">$resultado</text:span><text:span text:style-name="T307">; </text:span><text:span text:style-name="T309">// Saída: Cor escolhida foi azul</text:span></text:p>
      <text:p text:style-name="P145"><text:tab/><text:tab/></text:p>
      <text:p text:style-name="P143"><text:span text:style-name="T244">$idade</text:span><text:span text:style-name="T242"> = </text:span><text:span text:style-name="T423">25</text:span><text:span text:style-name="T242">;<text:tab/><text:tab/><text:tab/><text:tab/><text:tab/><text:tab/><text:tab/></text:span></text:p>
      <text:p text:style-name="P143"><text:span text:style-name="T244">$faixaEtaria</text:span><text:span text:style-name="T242"> = </text:span><text:span text:style-name="T420">match</text:span><text:span text:style-name="T242"> (</text:span><text:span text:style-name="T241">true</text:span><text:span text:style-name="T242">) {<text:tab/><text:tab/><text:tab/><text:tab/></text:span></text:p>
      <text:p text:style-name="P143"><text:span text:style-name="T244"><text:s text:c="2"/>$idade</text:span><text:span text:style-name="T242"> &lt; </text:span><text:span text:style-name="T423">13</text:span><text:span text:style-name="T242"> </text:span><text:span text:style-name="T241">=&gt;</text:span><text:span text:style-name="T242"> </text:span><text:span text:style-name="T421">'Criança'</text:span><text:span text:style-name="T242">,<text:tab/><text:tab/><text:tab/><text:tab/></text:span></text:p>
      <text:p text:style-name="P143"><text:span text:style-name="T244"><text:s text:c="2"/>$idade</text:span><text:span text:style-name="T242"> &gt;= </text:span><text:span text:style-name="T423">13</text:span><text:span text:style-name="T242"> &amp;&amp; </text:span><text:span text:style-name="T244">$idade</text:span><text:span text:style-name="T242"> &lt;= </text:span><text:span text:style-name="T423">19</text:span><text:span text:style-name="T242"> </text:span><text:span text:style-name="T241">=&gt;</text:span><text:span text:style-name="T242"> </text:span><text:span text:style-name="T421">'Adolescente'</text:span><text:span text:style-name="T242">,<text:tab/></text:span></text:p>
      <text:p text:style-name="P143"><text:span text:style-name="T244"><text:s text:c="2"/>$idade</text:span><text:span text:style-name="T242"> &gt;= </text:span><text:span text:style-name="T423">20</text:span><text:span text:style-name="T242"> &amp;&amp; </text:span><text:span text:style-name="T244">$idade</text:span><text:span text:style-name="T242"> &lt;= </text:span><text:span text:style-name="T423">64</text:span><text:span text:style-name="T242"> </text:span><text:span text:style-name="T241">=&gt;</text:span><text:span text:style-name="T242"> </text:span><text:span text:style-name="T421">'Adulto'</text:span><text:span text:style-name="T242">,<text:tab/><text:tab/></text:span></text:p>
      <text:p text:style-name="P143"><text:span text:style-name="T244"><text:s text:c="2"/>$idade</text:span><text:span text:style-name="T242"> &gt;= </text:span><text:span text:style-name="T423">65</text:span><text:span text:style-name="T242"> </text:span><text:span text:style-name="T241">=&gt;</text:span><text:span text:style-name="T242"> </text:span><text:span text:style-name="T421">'Idoso'</text:span><text:span text:style-name="T242">,<text:tab/><text:tab/><text:tab/><text:tab/></text:span></text:p>
      <text:p text:style-name="P144">};<text:tab/><text:tab/><text:tab/><text:tab/><text:tab/><text:tab/><text:tab/><text:tab/></text:p>
      <text:p text:style-name="P143"><text:span text:style-name="T243">echo</text:span><text:span text:style-name="T242"> </text:span><text:span text:style-name="T244">$faixaEtaria</text:span><text:span text:style-name="T242">; </text:span><text:span text:style-name="T245">// Saída: Adulto<text:tab/><text:tab/><text:tab/></text:span></text:p>
      <text:p text:style-name="P141"/>
      <text:h text:style-name="P36" text:outline-level="1">Aula 11- Iteração While</text:h>
      <text:p text:style-name="P106"/>
      <text:p text:style-name="P146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6">No<text:span text:style-name="T424">te que é preciso </text:span><text:span text:style-name="T425">atribuir valor à variável $</text:span><text:span text:style-name="T426">c</text:span><text:span text:style-name="T424"> antes de construir o loop.</text:span></text:p>
      <text:p text:style-name="P147"/>
      <text:p text:style-name="P147"/>
      <text:p text:style-name="P148">Para <text:span text:style-name="T64">criar código HTML</text:span> <text:span text:style-name="T194">dinamicamente</text:span>, dentro <text:span text:style-name="T427">de uma extensão </text:span><text:span text:style-name="T428">.php</text:span>, <text:span text:style-name="T429">utilize</text:span> o comando <text:span text:style-name="T430">echo</text:span></text:p>
      <text:p text:style-name="P149"/>
      <text:p text:style-name="P149"/>
      <text:p text:style-name="P150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1"/>
      <text:p text:style-name="P152"><text:span text:style-name="T431">Dentro dos laços de repetição, o comando </text:span><text:span text:style-name="Source_20_Text"><text:span text:style-name="T432">break</text:span></text:span><text:span text:style-name="T431"> quebra o fluxo d</text:span><text:span text:style-name="T433">a</text:span><text:span text:style-name="T431"> iteração e manda a execução para fora da estrutura. </text:span><text:span text:style-name="T433">Já o coman</text:span><text:span text:style-name="T431">do</text:span><text:span text:style-name="T434"> </text:span><text:span text:style-name="Source_20_Text"><text:span text:style-name="T432">continue</text:span></text:span><text:span text:style-name="Source_20_Text"><text:span text:style-name="T434">, volta para o início da iteração mesmo sem </text:span></text:span><text:span text:style-name="Source_20_Text"><text:span text:style-name="T435">ter chegado</text:span></text:span><text:span text:style-name="Source_20_Text"><text:span text:style-name="T434"> lá embaixo da estrutura.</text:span></text:span></text:p>
      <text:h text:style-name="P153" text:outline-level="1"><text:span text:style-name="Source_20_Text"><text:span text:style-name="T436">Aula 12 – Repetição Do-While</text:span></text:span></text:h>
      <text:p text:style-name="Text_20_body"><text:span text:style-name="Source_20_Text"/></text:p>
      <text:p text:style-name="P154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436">Aula 13 – Iteração For</text:span></text:span></text:h>
      <text:p text:style-name="P155"><text:span text:style-name="Source_20_Text"/></text:p>
      <text:p text:style-name="P156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7"><text:span text:style-name="Source_20_Text"><text:span text:style-name="T437">Na iteração </text:span></text:span><text:span text:style-name="Source_20_Text"><text:span text:style-name="T438">for</text:span></text:span><text:span text:style-name="Source_20_Text"><text:span text:style-name="T437">, a variável já é declarada dentro da estrutura, </text:span></text:span><text:span text:style-name="Source_20_Text"><text:span text:style-name="T439">a</text:span></text:span><text:span text:style-name="Source_20_Text"><text:span text:style-name="T440"> semântica do segundo parâmetro equivale </text:span></text:span><text:span text:style-name="Source_20_Text"><text:span text:style-name="T439">a </text:span></text:span><text:span text:style-name="Source_20_Text"><text:span text:style-name="T440">“enquanto” </text:span></text:span><text:span text:style-name="Source_20_Text"><text:span text:style-name="T439">e o</text:span></text:span><text:span text:style-name="Source_20_Text"><text:span text:style-name="T441">s parâmetros são separados por ponto-e-vírgula.</text:span></text:span></text:p>
      <text:h text:style-name="P153" text:outline-level="1"><text:span text:style-name="Source_20_Text"><text:span text:style-name="T436">Aula 14 – Rotinas</text:span></text:span></text:h>
      <text:p text:style-name="P158"><text:span text:style-name="Source_20_Text"/></text:p>
      <text:p text:style-name="P159"><text:span text:style-name="Source_20_Text"><text:span text:style-name="T442">Rotinas</text:span></text:span><text:span text:style-name="Source_20_Text"><text:span text:style-name="T440"> são </text:span></text:span><text:span text:style-name="Source_20_Text"><text:span text:style-name="T443">funções</text:span></text:span><text:span text:style-name="Source_20_Text"><text:span text:style-name="T440"> </text:span></text:span><text:span text:style-name="Source_20_Text"><text:span text:style-name="T444">ou</text:span></text:span><text:span text:style-name="Source_20_Text"><text:span text:style-name="T440"> </text:span></text:span><text:span text:style-name="Source_20_Text"><text:span text:style-name="T443">procedimentos</text:span></text:span><text:span text:style-name="Source_20_Text"><text:span text:style-name="T440">, </text:span></text:span><text:span text:style-name="Source_20_Text"><text:span text:style-name="T444">porém o PHP considera ambas operações como funções, distinguindo-se apenas </text:span></text:span><text:span text:style-name="Source_20_Text"><text:span text:style-name="T441">quanto a</text:span></text:span><text:span text:style-name="Source_20_Text"><text:span text:style-name="T444">o seu </text:span></text:span><text:span text:style-name="Source_20_Text"><text:span text:style-name="T445">valor de retorno, </text:span></text:span><text:span text:style-name="Source_20_Text"><text:span text:style-name="T446">se é vazio</text:span></text:span><text:span text:style-name="Source_20_Text"><text:span text:style-name="T447"> </text:span></text:span><text:span text:style-name="Source_20_Text"><text:span text:style-name="T444">ou</text:span></text:span><text:span text:style-name="Source_20_Text"><text:span text:style-name="T447"> não.</text:span></text:span></text:p>
      <text:p text:style-name="P154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60"><text:span text:style-name="Source_20_Text"/></text:p>
      <text:p text:style-name="P161"><text:span text:style-name="Source_20_Text"><text:span text:style-name="T448">Nas funções, não é preciso declarar antes as variáveis locais (internas na estrutura). </text:span></text:span><text:span text:style-name="Source_20_Text"><text:span text:style-name="T449">Já n</text:span></text:span><text:span text:style-name="Source_20_Text"><text:span text:style-name="T450">as f</text:span></text:span><text:span text:style-name="Source_20_Text"><text:span text:style-name="T451">unções para criar </text:span></text:span><text:span text:style-name="Source_20_Text"><text:span text:style-name="T452">Rotinas com Múltiplos Parâmetros em PHP, </text:span></text:span><text:span text:style-name="Source_20_Text"><text:span text:style-name="T451">ou seja,</text:span></text:span><text:span text:style-name="Source_20_Text"><text:span text:style-name="T452"> </text:span></text:span><text:span text:style-name="Source_20_Text"><text:span text:style-name="T453">Parâmetros Variáveis</text:span></text:span><text:span text:style-name="Source_20_Text"><text:span text:style-name="T452"> </text:span></text:span><text:span text:style-name="Source_20_Text"><text:span text:style-name="T454">não é preciso especificar os parâmetros pois </text:span></text:span><text:span text:style-name="Source_20_Text"><text:span text:style-name="T450">existem</text:span></text:span><text:span text:style-name="Source_20_Text"><text:span text:style-name="T454"> funç</text:span></text:span><text:span text:style-name="Source_20_Text"><text:span text:style-name="T450">ões</text:span></text:span><text:span text:style-name="Source_20_Text"><text:span text:style-name="T454"> interna</text:span></text:span><text:span text:style-name="Source_20_Text"><text:span text:style-name="T450">s</text:span></text:span><text:span text:style-name="Source_20_Text"><text:span text:style-name="T454"> para pegá-los </text:span></text:span><text:span text:style-name="Source_20_Text"><text:span text:style-name="T455">automaticamente</text:span></text:span><text:span text:style-name="Source_20_Text"><text:span text:style-name="T454">:</text:span></text:span></text:p>
      <text:list text:style-name="L11">
        <text:list-item>
          <text:p text:style-name="P162"><text:span text:style-name="Source_20_Text"><text:span text:style-name="T456">func_get_args()</text:span></text:span><text:span text:style-name="Source_20_Text"><text:span text:style-name="T457">: </text:span></text:span><text:span text:style-name="Source_20_Text"><text:span text:style-name="T458">pega todos os argumentos</text:span></text:span><text:span text:style-name="Source_20_Text"><text:span text:style-name="T457"> e coloca dentro de um </text:span></text:span><text:span text:style-name="Source_20_Text"><text:span text:style-name="T459">vetor</text:span></text:span><text:span text:style-name="Source_20_Text"><text:span text:style-name="T460">.</text:span></text:span></text:p>
        </text:list-item>
        <text:list-item>
          <text:p text:style-name="P163"><text:span text:style-name="Source_20_Text"><text:span text:style-name="T456">func_num_args()</text:span></text:span><text:span text:style-name="Source_20_Text"><text:span text:style-name="T461">: </text:span></text:span><text:span text:style-name="Source_20_Text"><text:span text:style-name="T462">retorna</text:span></text:span><text:span text:style-name="Source_20_Text"><text:span text:style-name="T463"> </text:span></text:span><text:span text:style-name="Source_20_Text"><text:span text:style-name="T462">a quantidade</text:span></text:span><text:span text:style-name="Source_20_Text"><text:span text:style-name="T461"> de argumentos passados.</text:span></text:span></text:p>
        </text:list-item>
      </text:list>
      <text:p text:style-name="P164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/></text:p>
      <text:h text:style-name="P153" text:outline-level="1"><text:span text:style-name="Source_20_Text"><text:span text:style-name="T464">Passagem de parâmetros: por </text:span></text:span><text:span text:style-name="Source_20_Text"><text:span text:style-name="T465">valor</text:span></text:span><text:span text:style-name="Source_20_Text"><text:span text:style-name="T464"> ou por </text:span></text:span><text:span text:style-name="Source_20_Text"><text:span text:style-name="T465">referência</text:span></text:span><text:span text:style-name="Source_20_Text"><text:span text:style-name="T464">?</text:span></text:span></text:h>
      <text:h text:style-name="P165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66"><text:line-break/>Na </text:span></text:span><text:span text:style-name="Source_20_Text"><text:span text:style-name="T467">passagem por valor</text:span></text:span><text:span text:style-name="Source_20_Text"><text:span text:style-name="T466">, o valor da variável </text:span></text:span><text:span text:style-name="Source_20_Text"><text:span text:style-name="T468">externa </text:span></text:span><text:span text:style-name="Source_20_Text"><text:span text:style-name="T466">é </text:span></text:span><text:span text:style-name="Source_20_Text"><text:span text:style-name="T469">copiado</text:span></text:span><text:span text:style-name="Source_20_Text"><text:span text:style-name="T470"> para</text:span></text:span><text:span text:style-name="Source_20_Text"><text:span text:style-name="T466"> o parâmetro da função e, qualquer mudança nesse parâmetro, </text:span></text:span><text:span text:style-name="Source_20_Text"><text:span text:style-name="T471">não altera o valor da variável. </text:span></text:span><text:span text:style-name="Source_20_Text"><text:span text:style-name="T472">Já na </text:span></text:span><text:span text:style-name="Source_20_Text"><text:span text:style-name="T473">passagem por referência</text:span></text:span><text:span text:style-name="Source_20_Text"><text:span text:style-name="T472">, é adicionado um </text:span></text:span><text:span text:style-name="Source_20_Text"><text:span text:style-name="T474">&amp;</text:span></text:span><text:span text:style-name="Source_20_Text"><text:span text:style-name="T472"> (“ê comercial”) </text:span></text:span><text:span text:style-name="Source_20_Text"><text:span text:style-name="T475">na frente</text:span></text:span><text:span text:style-name="Source_20_Text"><text:span text:style-name="T472"> do parâmetro. Desse modo, o que vai para esse parâmetro não é um valor, mas sim </text:span></text:span><text:span text:style-name="Source_20_Text"><text:span text:style-name="T475">o </text:span></text:span><text:span text:style-name="Source_20_Text"><text:span text:style-name="T476">endereço</text:span></text:span><text:span text:style-name="Source_20_Text"><text:span text:style-name="T475"> </text:span></text:span><text:span text:style-name="Source_20_Text"><text:span text:style-name="T477">de</text:span></text:span><text:span text:style-name="Source_20_Text"><text:span text:style-name="T475"> memória </text:span></text:span><text:span text:style-name="Source_20_Text"><text:span text:style-name="T477">(</text:span></text:span><text:span text:style-name="Source_20_Text"><text:span text:style-name="T475">ponteiro</text:span></text:span><text:span text:style-name="Source_20_Text"><text:span text:style-name="T477">)</text:span></text:span><text:span text:style-name="Source_20_Text"><text:span text:style-name="T475"> </text:span></text:span><text:span text:style-name="Source_20_Text"><text:span text:style-name="T477">da</text:span></text:span><text:span text:style-name="Source_20_Text"><text:span text:style-name="T472"> variável</text:span></text:span><text:span text:style-name="Source_20_Text"><text:span text:style-name="T475"> </text:span></text:span><text:span text:style-name="Source_20_Text"><text:span text:style-name="T472">que foi passada e, assim, qualquer alteração feita n</text:span></text:span><text:span text:style-name="Source_20_Text"><text:span text:style-name="T478">esse</text:span></text:span><text:span text:style-name="Source_20_Text"><text:span text:style-name="T472"> parâmetro também </text:span></text:span><text:span text:style-name="Source_20_Text"><text:span text:style-name="T479">altera o valor da variável</text:span></text:span><text:span text:style-name="Source_20_Text"><text:span text:style-name="T472"> </text:span></text:span><text:span text:style-name="Source_20_Text"><text:span text:style-name="T478">externa</text:span></text:span><text:span text:style-name="Source_20_Text"><text:span text:style-name="T472">.</text:span></text:span></text:h>
      <text:h text:style-name="P165" text:outline-level="1"><text:span text:style-name="Source_20_Text"/></text:h>
      <text:h text:style-name="P166" text:outline-level="1"><text:span text:style-name="Source_20_Text"><text:span text:style-name="T472">A partir do </text:span></text:span><text:span text:style-name="Source_20_Text"><text:span text:style-name="Strong_20_Emphasis"><text:span text:style-name="T480">PHP 8.0</text:span></text:span></text:span><text:span text:style-name="Source_20_Text"><text:span text:style-name="T472">, é possível usar </text:span></text:span></text:h>
      <text:h text:style-name="P167" text:outline-level="1"><text:span text:style-name="Source_20_Text"><text:span text:style-name="Strong_20_Emphasis"><text:span text:style-name="T481">parâmetros nomeados</text:span></text:span></text:span><text:span text:style-name="Source_20_Text"><text:span text:style-name="T472"> ao chamar funções, </text:span></text:span><text:span text:style-name="Source_20_Text"><text:span text:style-name="T482">permitindo especificar</text:span></text:span><text:span text:style-name="Source_20_Text"><text:span text:style-name="T472"> os argumentos de uma função usando os nomes dos parâmetros, em vez de apenas suas posições. </text:span></text:span><text:span text:style-name="Source_20_Text"><text:span text:style-name="T482">Sendo assim, ordem dos argumentos não importa, desde que sejam passados os nomes corretos. </text:span></text:span><text:span text:style-name="Source_20_Text"><text:span text:style-name="T483">A</text:span></text:span><text:span text:style-name="Source_20_Text"><text:span text:style-name="T482">rgumentos nomeados devem vir </text:span></text:span><text:span text:style-name="Source_20_Text"><text:span text:style-name="Strong_20_Emphasis"><text:span text:style-name="T484">depois</text:span></text:span></text:span><text:span text:style-name="Source_20_Text"><text:span text:style-name="T482"> dos posicionais. </text:span></text:span></text:h>
      <text:p text:style-name="P168"><text:span text:style-name="T241">function</text:span><text:span text:style-name="T242"> </text:span><text:span text:style-name="T243">criarUsuario</text:span><text:span text:style-name="T242">(</text:span><text:span text:style-name="T241">string</text:span><text:span text:style-name="T242"> </text:span><text:span text:style-name="T244">$nome</text:span><text:span text:style-name="T242">, </text:span><text:span text:style-name="T241">int</text:span><text:span text:style-name="T242"> </text:span><text:span text:style-name="T244">$idade</text:span><text:span text:style-name="T242">, </text:span><text:span text:style-name="T241">string</text:span><text:span text:style-name="T242"> </text:span><text:span text:style-name="T244">$email</text:span><text:span text:style-name="T242"> = </text:span><text:span text:style-name="T421">"sem@email.com"</text:span><text:span text:style-name="T242">) {<text:tab/></text:span></text:p>
      <text:p text:style-name="P168"><text:span text:style-name="T420">return</text:span><text:span text:style-name="T242"> </text:span><text:span text:style-name="T421">"Nome: </text:span><text:span text:style-name="T244">$nome</text:span><text:span text:style-name="T421">, Idade: </text:span><text:span text:style-name="T244">$idade</text:span><text:span text:style-name="T421">, Email: </text:span><text:span text:style-name="T244">$email</text:span><text:span text:style-name="T421">"</text:span><text:span text:style-name="T242">;<text:tab/><text:tab/><text:tab/><text:tab/><text:tab/><text:tab/></text:span></text:p>
      <text:p text:style-name="P169">}<text:tab/><text:tab/><text:tab/><text:tab/><text:tab/><text:tab/><text:tab/><text:tab/><text:tab/><text:tab/><text:tab/><text:tab/><text:tab/><text:tab/></text:p>
      <text:p text:style-name="P169"><text:tab/><text:tab/><text:tab/><text:tab/><text:tab/><text:tab/><text:tab/><text:tab/><text:tab/><text:tab/><text:tab/><text:tab/><text:tab/><text:tab/></text:p>
      <text:p text:style-name="P170">// Usando parâmetros nomeados (ordem não importa)<text:tab/><text:tab/><text:tab/><text:tab/><text:tab/><text:tab/><text:tab/></text:p>
      <text:p text:style-name="P171"><text:span text:style-name="T422">echo</text:span><text:span text:style-name="T307"> </text:span><text:span text:style-name="T422">criarUsuario</text:span><text:span text:style-name="T307">(</text:span><text:span text:style-name="T485">idade</text:span><text:span text:style-name="T307">: </text:span><text:span text:style-name="T308">30</text:span><text:span text:style-name="T307">, </text:span><text:span text:style-name="T485">nome</text:span><text:span text:style-name="T307">: </text:span><text:span text:style-name="T486">"João"</text:span><text:span text:style-name="T307">, </text:span><text:span text:style-name="T485">email</text:span><text:span text:style-name="T307">: </text:span><text:span text:style-name="T486">"joao</text:span><text:span text:style-name="T487">@</text:span><text:span text:style-name="T486">email.com"</text:span><text:span text:style-name="T307">);<text:tab/><text:tab/><text:tab/></text:span></text:p>
      <text:p text:style-name="P169"><text:tab/><text:tab/><text:tab/><text:tab/><text:tab/><text:tab/><text:tab/><text:tab/><text:tab/><text:tab/><text:tab/><text:tab/><text:tab/><text:tab/></text:p>
      <text:p text:style-name="P170">// Saída: Nome: João, Idade: 30, Email: joao@email.com<text:tab/><text:tab/><text:tab/><text:tab/><text:tab/><text:tab/></text:p>
      <text:h text:style-name="P172" text:outline-level="1"/>
      <text:h text:style-name="P153" text:outline-level="1"><text:span text:style-name="Source_20_Text"><text:span text:style-name="T436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><text:span text:style-name="T488"><text:line-break/></text:span></text:span><text:span text:style-name="Source_20_Text"><text:span text:style-name="T448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89">bibliotecas</text:span></text:span><text:span text:style-name="Source_20_Text"><text:span text:style-name="T448">). A grande vantagem é que qualquer alteração dentro dessa função vai afetar também o funcionamento de todos os scripts que a utilizarem.</text:span></text:span></text:p>
      <text:p text:style-name="P174"><text:span text:style-name="Source_20_Text"><text:span text:style-name="T448">Para isso, usamos o comando</text:span></text:span><text:span text:style-name="Source_20_Text"><text:span text:style-name="T490"> </text:span></text:span><text:span text:style-name="Source_20_Text"><text:span text:style-name="T491">include</text:span></text:span><text:span text:style-name="Source_20_Text"><text:span text:style-name="T488">, que </text:span></text:span><text:span text:style-name="Source_20_Text"><text:span text:style-name="T492">permite incluir outros arquivos. </text:span></text:span><text:span text:style-name="Source_20_Text"><text:span text:style-name="T493">C</text:span></text:span><text:span text:style-name="Source_20_Text"><text:span text:style-name="T494">aso o arquivo não esteja disponível, </text:span></text:span><text:span text:style-name="Source_20_Text"><text:span text:style-name="T495">continua o programa</text:span></text:span><text:span text:style-name="Source_20_Text"><text:span text:style-name="T493">, </text:span></text:span><text:span text:style-name="Source_20_Text"><text:span text:style-name="T494">acusa</text:span></text:span><text:span text:style-name="Source_20_Text"><text:span text:style-name="T493">ndo</text:span></text:span><text:span text:style-name="Source_20_Text"><text:span text:style-name="T494"> apenas um [Warning]</text:span></text:span><text:span text:style-name="Source_20_Text"><text:span text:style-name="T496">.</text:span></text:span></text:p>
      <text:p text:style-name="P174"><text:span text:style-name="Source_20_Text"><text:span text:style-name="T492">Existe também o comando </text:span></text:span><text:span text:style-name="Source_20_Text"><text:span text:style-name="T491">require</text:span></text:span><text:span text:style-name="Source_20_Text"><text:span text:style-name="T492"> que tem funcionalidade semelhante porém </text:span></text:span><text:span text:style-name="Source_20_Text"><text:span text:style-name="T497">torna o arquivo obrigatório</text:span></text:span><text:span text:style-name="Source_20_Text"><text:span text:style-name="T498">, ou seja</text:span></text:span><text:span text:style-name="Source_20_Text"><text:span text:style-name="T492">, caso o arquivo requerido não seja encontrado ou esteja corrompido, </text:span></text:span><text:span text:style-name="Source_20_Text"><text:span text:style-name="T499">interrompe</text:span></text:span><text:span text:style-name="Source_20_Text"><text:span text:style-name="T495"> o programa</text:span></text:span><text:span text:style-name="Source_20_Text"><text:span text:style-name="T498"> exatamente nessa linha e </text:span></text:span><text:span text:style-name="Source_20_Text"><text:span text:style-name="T494">apresenta um</text:span></text:span><text:span text:style-name="Source_20_Text"><text:span text:style-name="T498"> [ERRO FATAL], não </text:span></text:span><text:span text:style-name="Source_20_Text"><text:span text:style-name="T500">apresentando</text:span></text:span><text:span text:style-name="Source_20_Text"><text:span text:style-name="T498"> nenhum resultado.</text:span></text:span></text:p>
      <text:p text:style-name="P175"><text:span text:style-name="Source_20_Text"><text:span text:style-name="T501">Existem também as variações </text:span></text:span><text:span text:style-name="Source_20_Text"><text:span text:style-name="T491">include_once</text:span></text:span><text:span text:style-name="Source_20_Text"><text:span text:style-name="T502"> e </text:span></text:span><text:span text:style-name="Source_20_Text"><text:span text:style-name="T491">require_once</text:span></text:span><text:span text:style-name="Source_20_Text"><text:span text:style-name="T501"> que previnem que o mesmo arquivo seja carregado de novo, </text:span></text:span><text:span text:style-name="Source_20_Text"><text:span text:style-name="T493">e sim</text:span></text:span><text:span text:style-name="Source_20_Text"><text:span text:style-name="T501"> apenas uma vez.</text:span></text:span></text:p>
      <text:list text:style-name="L12">
        <text:list-item>
          <text:p text:style-name="P176"><text:span text:style-name="Source_20_Text"><text:span text:style-name="T501">Use </text:span></text:span><text:span text:style-name="Source_20_Text"><text:span text:style-name="T491">include</text:span></text:span><text:span text:style-name="Source_20_Text"><text:span text:style-name="T501"> quando: </text:span></text:span>Vo<text:span text:style-name="T56">cê está </text:span><text:span text:style-name="Strong_20_Emphasis"><text:span text:style-name="T56">carregando uma view</text:span></text:span><text:span text:style-name="T56"> (HTML/PHP) que pode ser renderizada várias vezes sem problema. (apenas imprime conteúdo). </text:span></text:p>
        </text:list-item>
        <text:list-item>
          <text:p text:style-name="P176"><text:span text:style-name="T56">Use </text:span><text:span text:style-name="Source_20_Text"><text:span text:style-name="T491">include_once</text:span></text:span><text:span text:style-name="T56"> quando: O arquivo define </text:span><text:span text:style-name="Strong_20_Emphasis"><text:span text:style-name="T56">funções, classes ou constantes</text:span></text:span><text:span text:style-name="T56"> (e uma segunda inclusão causaria erro de redefinição). Você está incluindo </text:span><text:span text:style-name="Strong_20_Emphasis"><text:span text:style-name="T56">helpers, config, bootstrap, autoload</text:span></text:span><text:span text:style-name="T56"> </text:span></text:p>
        </text:list-item>
      </text:list>
      <text:p text:style-name="P177"><text:span text:style-name="Strong_20_Emphasis"><text:span text:style-name="Source_20_Text"><text:span text:style-name="T503">__DIR__</text:span></text:span></text:span><text:span text:style-name="Source_20_Text"><text:span text:style-name="T501"> é uma </text:span></text:span><text:span text:style-name="Source_20_Text"><text:span text:style-name="Strong_20_Emphasis"><text:span text:style-name="T504">constante mágica</text:span></text:span></text:span><text:span text:style-name="Source_20_Text"><text:span text:style-name="T501"> que retorna o caminho </text:span></text:span><text:span text:style-name="Source_20_Text"><text:span text:style-name="T505">absoluto</text:span></text:span><text:span text:style-name="Source_20_Text"><text:span text:style-name="T501"> do diretório onde o script atual está localizado. Caminhos relativos podem falhar em diferentes contextos de execução (ex.: CLI vs. servidor web). </text:span></text:span><text:span text:style-name="Source_20_Text"><text:span text:style-name="T506">__DIR__</text:span></text:span><text:span text:style-name="Source_20_Text"><text:span text:style-name="T501"> resolve o problema fornecendo o caminho absoluto </text:span></text:span><text:span text:style-name="Source_20_Text"><text:span text:style-name="T507">do arquivo</text:span></text:span><text:span text:style-name="Source_20_Text"><text:span text:style-name="T501">. </text:span></text:span><text:span text:style-name="Source_20_Text"><text:span text:style-name="T507">Facilita a organização de arquivos em diferentes subdiretórios sem depender de configurações externas. Exemplo:<text:line-break/></text:span></text:span><text:span text:style-name="Source_20_Text"><text:span text:style-name="T508">require</text:span></text:span><text:span text:style-name="Source_20_Text"><text:span text:style-name="T509"> </text:span></text:span><text:span text:style-name="Source_20_Text"><text:span text:style-name="T510">__DIR__</text:span></text:span><text:span text:style-name="Source_20_Text"><text:span text:style-name="T509"> . </text:span></text:span><text:span text:style-name="Source_20_Text"><text:span text:style-name="T511">"/funcoes.php"</text:span></text:span><text:span text:style-name="Source_20_Text"><text:span text:style-name="T509">;</text:span></text:span></text:p>
      <text:h text:style-name="P153" text:outline-level="1"><text:span text:style-name="Source_20_Text"><text:span text:style-name="T436">Aula 16 e 17 – Funções para Strings</text:span></text:span></text:h>
      <text:p text:style-name="P178"><text:span text:style-name="Source_20_Text"><text:span text:style-name="T512">No PHP, t</text:span></text:span><text:span text:style-name="Source_20_Text"><text:span text:style-name="T492">udo que está entre aspas </text:span></text:span><text:span text:style-name="Source_20_Text"><text:span text:style-name="T512">é</text:span></text:span><text:span text:style-name="Source_20_Text"><text:span text:style-name="T492"> considera</text:span></text:span><text:span text:style-name="Source_20_Text"><text:span text:style-name="T512">do</text:span></text:span><text:span text:style-name="Source_20_Text"><text:span text:style-name="T492"> como tipo string, </text:span></text:span><text:span text:style-name="Source_20_Text"><text:span text:style-name="T512">porém a </text:span></text:span><text:span text:style-name="Source_20_Text"><text:span text:style-name="T513">aspa simples</text:span></text:span><text:span text:style-name="Source_20_Text"><text:span text:style-name="T512"> não é interpretativa, é apenas uma string e tudo será tratado como </text:span></text:span><text:span text:style-name="Source_20_Text"><text:span text:style-name="T514">texto</text:span></text:span><text:span text:style-name="Source_20_Text"><text:span text:style-name="T512">. Já a </text:span></text:span><text:span text:style-name="Source_20_Text"><text:span text:style-name="T513">aspa dupla</text:span></text:span><text:span text:style-name="Source_20_Text"><text:span text:style-name="T512"> é </text:span></text:span><text:span text:style-name="Source_20_Text"><text:span text:style-name="T514">processada</text:span></text:span><text:span text:style-name="Source_20_Text"><text:span text:style-name="T512">, reconhecendo variáveis no conteúdo ou caracteres de escape como </text:span></text:span><text:span text:style-name="Source_20_Text"><text:span text:style-name="T515">\n \t \r</text:span></text:span><text:span text:style-name="Source_20_Text"><text:span text:style-name="T516"> </text:span></text:span><text:span text:style-name="Source_20_Text"><text:span text:style-name="T512">que serão </text:span></text:span><text:span text:style-name="Source_20_Text"><text:span text:style-name="T517">consideradas</text:span></text:span><text:span text:style-name="Source_20_Text"><text:span text:style-name="T512"> na hora de executar a string.</text:span></text:span></text:p>
      <text:p text:style-name="P178"><text:span text:style-name="Source_20_Text"><text:span text:style-name="T512">Um caractere de uma string pode ser acessado como se fosse um índice de um array. </text:span></text:span><text:span text:style-name="Source_20_Text"><text:span text:style-name="T518">Exemplo: </text:span></text:span><text:span text:style-name="Source_20_Text"><text:span text:style-name="T519">$string</text:span></text:span><text:span text:style-name="Source_20_Text"><text:span text:style-name="T520">[</text:span></text:span><text:span text:style-name="Source_20_Text"><text:span text:style-name="T521">1</text:span></text:span><text:span text:style-name="Source_20_Text"><text:span text:style-name="T520">]</text:span></text:span></text:p>
      <text:p text:style-name="P178"><text:span text:style-name="Source_20_Text"><text:span text:style-name="T512">O </text:span></text:span><text:span text:style-name="Source_20_Text"><text:span text:style-name="T492">valor </text:span></text:span><text:span text:style-name="Source_20_Text"><text:span text:style-name="T522">verdadeiro</text:span></text:span><text:span text:style-name="Source_20_Text"><text:span text:style-name="T492"> é impresso como ‘</text:span></text:span><text:span text:style-name="Source_20_Text"><text:span text:style-name="T523">1</text:span></text:span><text:span text:style-name="Source_20_Text"><text:span text:style-name="T492">’ e o valor </text:span></text:span><text:span text:style-name="Source_20_Text"><text:span text:style-name="T524">falso</text:span></text:span><text:span text:style-name="Source_20_Text"><text:span text:style-name="T492"> é impresso como vazio </text:span></text:span><text:span text:style-name="Source_20_Text"><text:span text:style-name="T525">““</text:span></text:span><text:span text:style-name="Source_20_Text"><text:span text:style-name="T526">.<text:line-break/></text:span></text:span><text:span text:style-name="Source_20_Text"><text:span text:style-name="T512">Logo, </text:span></text:span><text:span text:style-name="Source_20_Text"><text:span text:style-name="T527"> </text:span></text:span><text:span text:style-name="Source_20_Text"><text:span text:style-name="T528">$c</text:span></text:span><text:span text:style-name="Source_20_Text"><text:span text:style-name="T529"> = (</text:span></text:span><text:span text:style-name="Source_20_Text"><text:span text:style-name="T528">10</text:span></text:span><text:span text:style-name="Source_20_Text"><text:span text:style-name="T529"> &gt; </text:span></text:span><text:span text:style-name="Source_20_Text"><text:span text:style-name="T528">5</text:span></text:span><text:span text:style-name="Source_20_Text"><text:span text:style-name="T529">) ? </text:span></text:span><text:span text:style-name="Source_20_Text"><text:span text:style-name="T530">true</text:span></text:span><text:span text:style-name="Source_20_Text"><text:span text:style-name="T529"> : </text:span></text:span><text:span text:style-name="Source_20_Text"><text:span text:style-name="T530">false</text:span></text:span><text:span text:style-name="Source_20_Text"><text:span text:style-name="T529">;</text:span></text:span><text:span text:style-name="Source_20_Text"><text:span text:style-name="T531"> </text:span></text:span><text:span text:style-name="Source_20_Text"><text:span text:style-name="T532">retorna o valor ‘1’</text:span></text:span></text:p>
      <text:p text:style-name="P179"><text:span text:style-name="Source_20_Text"><text:span text:style-name="T512">Usar </text:span></text:span><text:span text:style-name="Source_20_Text"><text:span text:style-name="T513">funções multibyte </text:span></text:span><text:span text:style-name="Source_20_Text"><text:span text:style-name="T512">(mb_*) proporciona</text:span></text:span><text:span text:style-name="Source_20_Text"><text:span text:style-name="T518">m</text:span></text:span><text:span text:style-name="Source_20_Text"><text:span text:style-name="T512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33">mb_strtolower()</text:span></text:span><text:span text:style-name="Source_20_Text"><text:span text:style-name="T534"> </text:span></text:span><text:span text:style-name="Source_20_Text"><text:span text:style-name="T512">em vez de </text:span></text:span><text:span text:style-name="Source_20_Text"><text:span text:style-name="T533">strtolower()</text:span></text:span></text:p>
      <text:p text:style-name="P179"><text:span text:style-name="Source_20_Text"/></text:p>
      <text:list xml:id="list4072494178" text:style-name="L13">
        <text:list-item>
          <text:p text:style-name="P180"><text:span text:style-name="Source_20_Text"><text:span text:style-name="T535">print</text:span></text:span><text:span text:style-name="Source_20_Text"><text:span text:style-name="T536">f</text:span></text:span><text:span text:style-name="Source_20_Text"><text:span text:style-name="T537">()</text:span></text:span><text:span text:style-name="Source_20_Text"><text:span text:style-name="T538">: </text:span></text:span><text:span text:style-name="Source_20_Text"><text:span text:style-name="T539">permite exibir uma string com itens </text:span></text:span><text:span text:style-name="Source_20_Text"><text:span text:style-name="T540">formatados</text:span></text:span><text:span text:style-name="Source_20_Text"><text:span text:style-name="T538">. Exemplo:</text:span></text:span><text:span text:style-name="Source_20_Text"><text:span text:style-name="T541">printf</text:span></text:span><text:span text:style-name="Source_20_Text"><text:span text:style-name="T542">(</text:span></text:span><text:span text:style-name="Source_20_Text"><text:span text:style-name="T543">"O </text:span></text:span><text:span text:style-name="Source_20_Text"><text:span text:style-name="T544">%</text:span></text:span><text:span text:style-name="Source_20_Text"><text:span text:style-name="T543">s está custando R$ </text:span></text:span><text:span text:style-name="Source_20_Text"><text:span text:style-name="T544">%</text:span></text:span><text:span text:style-name="Source_20_Text"><text:span text:style-name="T543">.2</text:span></text:span><text:span text:style-name="Source_20_Text"><text:span text:style-name="T544">f</text:span></text:span><text:span text:style-name="Source_20_Text"><text:span text:style-name="T543">"</text:span></text:span><text:span text:style-name="Source_20_Text"><text:span text:style-name="T542">, </text:span></text:span><text:span text:style-name="Source_20_Text"><text:span text:style-name="T545">$produto</text:span></text:span><text:span text:style-name="Source_20_Text"><text:span text:style-name="T542">, </text:span></text:span><text:span text:style-name="Source_20_Text"><text:span text:style-name="T545">$preco</text:span></text:span><text:span text:style-name="Source_20_Text"><text:span text:style-name="T542">);</text:span></text:span><text:span text:style-name="Source_20_Text"><text:span text:style-name="T546"><text:line-break/><text:line-break/></text:span></text:span><text:span text:style-name="Source_20_Text"><text:span text:style-name="T547">O símbolo </text:span></text:span><text:span text:style-name="Source_20_Text"><text:span text:style-name="T548">de </text:span></text:span><text:span text:style-name="Source_20_Text"><text:span text:style-name="T547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81"><text:span text:style-name="Source_20_Text"><text:span text:style-name="T549">%</text:span></text:span><text:span text:style-name="Source_20_Text"><text:span text:style-name="T550">d</text:span></text:span><text:span text:style-name="Source_20_Text"><text:span text:style-name="T551">: valor </text:span></text:span><text:span text:style-name="Source_20_Text"><text:span text:style-name="T552">inteiro</text:span></text:span><text:span text:style-name="Source_20_Text"><text:span text:style-name="T551"> (positivo ou negativo)</text:span></text:span></text:p>
            </text:list-item>
            <text:list-item>
              <text:p text:style-name="P181"><text:span text:style-name="Source_20_Text"><text:span text:style-name="T553">%</text:span></text:span><text:span text:style-name="Source_20_Text"><text:span text:style-name="T550">f</text:span></text:span><text:span text:style-name="Source_20_Text"><text:span text:style-name="T551">: valor real, </text:span></text:span><text:span text:style-name="Source_20_Text"><text:span text:style-name="T554">float</text:span></text:span></text:p>
            </text:list-item>
            <text:list-item>
              <text:p text:style-name="P182"><text:span text:style-name="Source_20_Text"><text:span text:style-name="T553">%</text:span></text:span><text:span text:style-name="Source_20_Text"><text:span text:style-name="T550">s</text:span></text:span><text:span text:style-name="Source_20_Text"><text:span text:style-name="T551">: string</text:span></text:span></text:p>
            </text:list-item>
            <text:list-item>
              <text:p text:style-name="P182"><text:span text:style-name="Source_20_Text"><text:span text:style-name="T553">%</text:span></text:span><text:span text:style-name="Source_20_Text"><text:span text:style-name="T550">c</text:span></text:span><text:span text:style-name="Source_20_Text"><text:span text:style-name="T555">: caractere</text:span></text:span></text:p>
            </text:list-item>
            <text:list-item>
              <text:p text:style-name="P181"><text:span text:style-name="Source_20_Text"><text:span text:style-name="T553">%</text:span></text:span><text:span text:style-name="Source_20_Text"><text:span text:style-name="T550">i</text:span></text:span><text:span text:style-name="Source_20_Text"><text:span text:style-name="T551">: permite a notação hexadecimal ou octal na função fscanf()</text:span></text:span><text:span text:style-name="Source_20_Text"><text:span text:style-name="T547"><text:line-break/></text:span></text:span></text:p>
            </text:list-item>
          </text:list>
        </text:list-item>
      </text:list>
      <text:list xml:id="list93111966465081" text:continue-list="list4072494178" text:style-name="L13">
        <text:list-item>
          <text:p text:style-name="P183"><text:span text:style-name="Source_20_Text"><text:span text:style-name="T535">print_r()</text:span></text:span><text:span text:style-name="Source_20_Text"><text:span text:style-name="T551">: </text:span></text:span><text:span text:style-name="Source_20_Text"><text:span text:style-name="T556">Exibe </text:span></text:span><text:span text:style-name="Source_20_Text"><text:span text:style-name="T557">coleções</text:span></text:span><text:span text:style-name="Source_20_Text"><text:span text:style-name="T556">, objetos e variáveis compostas (vetores e matrizes) de maneira organizada.</text:span></text:span><text:span text:style-name="Source_20_Text"><text:span text:style-name="T558"> </text:span></text:span><text:span text:style-name="Source_20_Text"><text:span text:style-name="T551">Exemplo:<text:line-break/></text:span></text:span><text:span text:style-name="Source_20_Text"><text:span text:style-name="T541">print_r</text:span></text:span><text:span text:style-name="Source_20_Text"><text:span text:style-name="T542">(</text:span></text:span><text:span text:style-name="Source_20_Text"><text:span text:style-name="T545">$vetor</text:span></text:span><text:span text:style-name="Source_20_Text"><text:span text:style-name="T542">); </text:span></text:span><text:span text:style-name="Source_20_Text"><text:span text:style-name="T559">//imprime "Array ( [0] =&gt; 4 [1] =&gt; 8 [2] =&gt; 9 )"</text:span></text:span><text:span text:style-name="Source_20_Text"><text:span text:style-name="T560"><text:line-break/></text:span></text:span><text:span text:style-name="Source_20_Text"><text:span text:style-name="T547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4"><text:span text:style-name="Source_20_Text"><text:span text:style-name="T541">var_dump</text:span></text:span><text:span text:style-name="Source_20_Text"><text:span text:style-name="T542">(</text:span></text:span><text:span text:style-name="Source_20_Text"><text:span text:style-name="T545">$vetor</text:span></text:span><text:span text:style-name="Source_20_Text"><text:span text:style-name="T542">)</text:span></text:span></text:p>
            </text:list-item>
            <text:list-item>
              <text:p text:style-name="P184"><text:span text:style-name="Source_20_Text"><text:span text:style-name="T541">var_export</text:span></text:span><text:span text:style-name="Source_20_Text"><text:span text:style-name="T542">(</text:span></text:span><text:span text:style-name="Source_20_Text"><text:span text:style-name="T545">$vetor</text:span></text:span><text:span text:style-name="Source_20_Text"><text:span text:style-name="T542">)</text:span></text:span><text:span text:style-name="Source_20_Text"><text:span text:style-name="T546"><text:line-break/></text:span></text:span></text:p>
            </text:list-item>
          </text:list>
        </text:list-item>
      </text:list>
      <text:list text:continue-list="list93111966465081" text:style-name="L13">
        <text:list-item>
          <text:p text:style-name="P185"><text:span text:style-name="Source_20_Text"><text:span text:style-name="T561">wordwrap()</text:span></text:span><text:span text:style-name="Source_20_Text"><text:span text:style-name="T562">: cria quebras de linha para textos muito longos </text:span></text:span><text:span text:style-name="Source_20_Text"><text:span text:style-name="T539">e em um </text:span></text:span><text:span text:style-name="Source_20_Text"><text:span text:style-name="T540">tamanho especificado</text:span></text:span><text:span text:style-name="Source_20_Text"><text:span text:style-name="T562">. <text:line-break/>Exemplo:</text:span></text:span><text:span text:style-name="Source_20_Text"><text:span text:style-name="T545">$result</text:span></text:span><text:span text:style-name="Source_20_Text"><text:span text:style-name="T542"> = </text:span></text:span><text:span text:style-name="Source_20_Text"><text:span text:style-name="T541">wordwrap</text:span></text:span><text:span text:style-name="Source_20_Text"><text:span text:style-name="T542">(</text:span></text:span><text:span text:style-name="Source_20_Text"><text:span text:style-name="T545">$txt</text:span></text:span><text:span text:style-name="Source_20_Text"><text:span text:style-name="T542">, </text:span></text:span><text:span text:style-name="Source_20_Text"><text:span text:style-name="T563">9</text:span></text:span><text:span text:style-name="Source_20_Text"><text:span text:style-name="T542">, </text:span></text:span><text:span text:style-name="Source_20_Text"><text:span text:style-name="T543">"&lt;br&gt;</text:span></text:span><text:span text:style-name="Source_20_Text"><text:span text:style-name="T564">\n</text:span></text:span><text:span text:style-name="Source_20_Text"><text:span text:style-name="T543">"</text:span></text:span><text:span text:style-name="Source_20_Text"><text:span text:style-name="T542">, </text:span></text:span><text:span text:style-name="Source_20_Text"><text:span text:style-name="T565">true</text:span></text:span><text:span text:style-name="Source_20_Text"><text:span text:style-name="T542">);</text:span></text:span><text:span text:style-name="Source_20_Text"><text:span text:style-name="T546"><text:line-break/></text:span></text:span></text:p>
        </text:list-item>
        <text:list-item>
          <text:p text:style-name="P186"><text:span text:style-name="Source_20_Text"><text:span text:style-name="T566">strlen()</text:span></text:span><text:span text:style-name="Source_20_Text"><text:span text:style-name="T567">: string lenght - </text:span></text:span><text:span text:style-name="Source_20_Text"><text:span text:style-name="T539">retorna</text:span></text:span><text:span text:style-name="Source_20_Text"><text:span text:style-name="T567"> </text:span></text:span><text:span text:style-name="Source_20_Text"><text:span text:style-name="T568">o </text:span></text:span><text:span text:style-name="Source_20_Text"><text:span text:style-name="T569">tamanho</text:span></text:span><text:span text:style-name="Source_20_Text"><text:span text:style-name="T568"> de uma string </text:span></text:span><text:span text:style-name="Source_20_Text"><text:span text:style-name="T570">em</text:span></text:span><text:span text:style-name="Source_20_Text"><text:span text:style-name="T568"> </text:span></text:span><text:span text:style-name="Source_20_Text"><text:span text:style-name="T570">bytes</text:span></text:span><text:span text:style-name="Source_20_Text"><text:span text:style-name="T571"> </text:span></text:span><text:span text:style-name="Source_20_Text"><text:span text:style-name="T572">e não a quantidade de caracteres </text:span></text:span><text:span text:style-name="Source_20_Text"><text:span text:style-name="T571">(cuidado! caracteres especiais ocupam mais de 1 byte)</text:span></text:span><text:span text:style-name="Source_20_Text"><text:span text:style-name="T567">. Exemplo:</text:span></text:span><text:span text:style-name="Source_20_Text"><text:span text:style-name="T545">$tamanho</text:span></text:span><text:span text:style-name="Source_20_Text"><text:span text:style-name="T542"> = </text:span></text:span><text:span text:style-name="Source_20_Text"><text:span text:style-name="T541">strlen</text:span></text:span><text:span text:style-name="Source_20_Text"><text:span text:style-name="T542">(</text:span></text:span><text:span text:style-name="Source_20_Text"><text:span text:style-name="T545">$txt</text:span></text:span><text:span text:style-name="Source_20_Text"><text:span text:style-name="T542">);</text:span></text:span><text:span text:style-name="Source_20_Text"><text:span text:style-name="T546"><text:line-break/></text:span></text:span></text:p>
        </text:list-item>
        <text:list-item>
          <text:p text:style-name="P187"><text:soft-page-break/><text:span text:style-name="Source_20_Text"><text:span text:style-name="T566">trim()</text:span></text:span><text:span text:style-name="Source_20_Text"><text:span text:style-name="T567">: </text:span></text:span><text:span text:style-name="Source_20_Text"><text:span text:style-name="T573">Por padrão, </text:span></text:span><text:span text:style-name="Source_20_Text"><text:span text:style-name="T574">r</text:span></text:span><text:span text:style-name="Source_20_Text"><text:span text:style-name="T573">etira espaços (ou outros caracteres) do início e do final de uma string, porém, se f</text:span></text:span><text:span text:style-name="Source_20_Text"><text:span text:style-name="T575">or passado um segundo parâmetro, elimina da string principal o que foi repassado na substring. </text:span></text:span><text:span text:style-name="Source_20_Text"><text:span text:style-name="T567">Exemplo:<text:line-break/></text:span></text:span><text:span text:style-name="Source_20_Text"><text:span text:style-name="T545">$nome_sem_espacos</text:span></text:span><text:span text:style-name="Source_20_Text"><text:span text:style-name="T542"> = </text:span></text:span><text:span text:style-name="Source_20_Text"><text:span text:style-name="T541">trim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;<text:line-break/></text:span></text:span><text:span text:style-name="Source_20_Text"><text:span text:style-name="T576">$csvSemVirgula</text:span></text:span><text:span text:style-name="Source_20_Text"><text:span text:style-name="T577"> = </text:span></text:span><text:span text:style-name="Source_20_Text"><text:span text:style-name="T578">trim</text:span></text:span><text:span text:style-name="Source_20_Text"><text:span text:style-name="T577">(</text:span></text:span><text:span text:style-name="Source_20_Text"><text:span text:style-name="T576">$arquivoCsv</text:span></text:span><text:span text:style-name="Source_20_Text"><text:span text:style-name="T577">, </text:span></text:span><text:span text:style-name="Source_20_Text"><text:span text:style-name="T579">','</text:span></text:span><text:span text:style-name="Source_20_Text"><text:span text:style-name="T577">);</text:span></text:span><text:span text:style-name="Source_20_Text"><text:span text:style-name="T546"><text:line-break/></text:span></text:span></text:p>
        </text:list-item>
        <text:list-item>
          <text:p text:style-name="P188"><text:span text:style-name="Source_20_Text"><text:span text:style-name="T580">ltrim()</text:span></text:span><text:span text:style-name="Source_20_Text"><text:span text:style-name="T547">: </text:span></text:span><text:span text:style-name="Source_20_Text"><text:span text:style-name="T539">Elimina</text:span></text:span><text:span text:style-name="Source_20_Text"><text:span text:style-name="T547"> espaços</text:span></text:span><text:span text:style-name="Source_20_Text"><text:span text:style-name="T581"> em branco</text:span></text:span><text:span text:style-name="Source_20_Text"><text:span text:style-name="T547"> no início, à esquerda.<text:line-break/></text:span></text:span><text:span text:style-name="Source_20_Text"><text:span text:style-name="T545">$sem_espacos_inicio</text:span></text:span><text:span text:style-name="Source_20_Text"><text:span text:style-name="T542"> = </text:span></text:span><text:span text:style-name="Source_20_Text"><text:span text:style-name="T541">ltrim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;</text:span></text:span><text:span text:style-name="Source_20_Text"><text:span text:style-name="T547"><text:line-break/></text:span></text:span></text:p>
        </text:list-item>
        <text:list-item>
          <text:p text:style-name="P189"><text:span text:style-name="Source_20_Text"><text:span text:style-name="T582">r</text:span></text:span><text:span text:style-name="Source_20_Text"><text:span text:style-name="T580">trim()</text:span></text:span><text:span text:style-name="Source_20_Text"><text:span text:style-name="T547">: </text:span></text:span><text:span text:style-name="Source_20_Text"><text:span text:style-name="T539">Elimina</text:span></text:span><text:span text:style-name="Source_20_Text"><text:span text:style-name="T547"> espaços</text:span></text:span><text:span text:style-name="Source_20_Text"><text:span text:style-name="T581"> em branco</text:span></text:span><text:span text:style-name="Source_20_Text"><text:span text:style-name="T547"> no fi</text:span></text:span><text:span text:style-name="Source_20_Text"><text:span text:style-name="T539">nal,</text:span></text:span><text:span text:style-name="Source_20_Text"><text:span text:style-name="T547"> à direita.<text:line-break/></text:span></text:span><text:span text:style-name="Source_20_Text"><text:span text:style-name="T545">$sem_espacos_fim</text:span></text:span><text:span text:style-name="Source_20_Text"><text:span text:style-name="T542"> = </text:span></text:span><text:span text:style-name="Source_20_Text"><text:span text:style-name="T541">rtrim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;</text:span></text:span><text:span text:style-name="Source_20_Text"><text:span text:style-name="T546"><text:line-break/></text:span></text:span></text:p>
        </text:list-item>
        <text:list-item>
          <text:p text:style-name="P190"><text:span text:style-name="Source_20_Text"><text:span text:style-name="T583">str_word_count()</text:span></text:span><text:span text:style-name="Source_20_Text"><text:span text:style-name="T584">: </text:span></text:span><text:span text:style-name="Source_20_Text"><text:span text:style-name="T585">dependendo do parâmetro, retorna a quantidade de palavras ou cria um vetor com a string</text:span></text:span><text:span text:style-name="Source_20_Text"><text:span text:style-name="T584">. Exemplo:<text:line-break/></text:span></text:span><text:span text:style-name="Source_20_Text"><text:span text:style-name="T586">$frase</text:span></text:span><text:span text:style-name="Source_20_Text"><text:span text:style-name="T587"> = </text:span></text:span><text:span text:style-name="Source_20_Text"><text:span text:style-name="T588">"Eu vou estudar PHP"</text:span></text:span><text:span text:style-name="Source_20_Text"><text:span text:style-name="T587">; </text:span></text:span><text:span text:style-name="Source_20_Text"><text:span text:style-name="T545">$contador</text:span></text:span><text:span text:style-name="Source_20_Text"><text:span text:style-name="T542"> = </text:span></text:span><text:span text:style-name="Source_20_Text"><text:span text:style-name="T541">str_word_count</text:span></text:span><text:span text:style-name="Source_20_Text"><text:span text:style-name="T542">(</text:span></text:span><text:span text:style-name="Source_20_Text"><text:span text:style-name="T545">$frase</text:span></text:span><text:span text:style-name="Source_20_Text"><text:span text:style-name="T542">, </text:span></text:span><text:span text:style-name="Source_20_Text"><text:span text:style-name="T563">2</text:span></text:span><text:span text:style-name="Source_20_Text"><text:span text:style-name="T542">);</text:span></text:span><text:span text:style-name="Source_20_Text"><text:span text:style-name="T546"><text:line-break/></text:span></text:span><text:span text:style-name="Source_20_Text"><text:span text:style-name="T589">Array ( [0] =&gt; Eu [3] =&gt; vou [7] =&gt; estudar [15] =&gt; PHP )</text:span></text:span><text:span text:style-name="Source_20_Text"><text:span text:style-name="T546"><text:line-break/></text:span></text:span></text:p>
        </text:list-item>
        <text:list-item>
          <text:p text:style-name="P190"><text:span text:style-name="Source_20_Text"><text:span text:style-name="T590">str_split(</text:span></text:span><text:span text:style-name="Source_20_Text"><text:span text:style-name="T591">)</text:span></text:span><text:span text:style-name="Source_20_Text"><text:span text:style-name="T592">: coloca cada letra </text:span></text:span><text:span text:style-name="Source_20_Text"><text:span text:style-name="T593">de uma string em uma posição do</text:span></text:span><text:span text:style-name="Source_20_Text"><text:span text:style-name="T592"> vetor. Exemplo:</text:span></text:span><text:span text:style-name="Source_20_Text"><text:span text:style-name="T594">$nome</text:span></text:span><text:span text:style-name="Source_20_Text"><text:span text:style-name="T595"> = </text:span></text:span><text:span text:style-name="Source_20_Text"><text:span text:style-name="T596">"Jonatas"</text:span></text:span><text:span text:style-name="Source_20_Text"><text:span text:style-name="T595">;</text:span></text:span><text:span text:style-name="Source_20_Text"><text:span text:style-name="T597"><text:tab/></text:span></text:span><text:span text:style-name="Source_20_Text"><text:span text:style-name="T594">$vetor</text:span></text:span><text:span text:style-name="Source_20_Text"><text:span text:style-name="T595"> = </text:span></text:span><text:span text:style-name="Source_20_Text"><text:span text:style-name="T598">str_split</text:span></text:span><text:span text:style-name="Source_20_Text"><text:span text:style-name="T595">(</text:span></text:span><text:span text:style-name="Source_20_Text"><text:span text:style-name="T594">$nome</text:span></text:span><text:span text:style-name="Source_20_Text"><text:span text:style-name="T595">);</text:span></text:span><text:span text:style-name="Source_20_Text"><text:span text:style-name="T599"><text:line-break/></text:span></text:span><text:span text:style-name="Source_20_Text"><text:span text:style-name="T600">Array ( [0] =&gt; J [1] =&gt; o [2] =&gt; n [3] =&gt; a [4] =&gt; t [5] =&gt; a [6] =&gt; s )</text:span></text:span></text:p>
        </text:list-item>
        <text:list-item>
          <text:p text:style-name="P190"><text:span text:style-name="Source_20_Text"><text:span text:style-name="T590">explode()</text:span></text:span><text:span text:style-name="Source_20_Text"><text:span text:style-name="T601">: </text:span></text:span><text:span text:style-name="Source_20_Text"><text:span text:style-name="T602">Captura</text:span></text:span><text:span text:style-name="Source_20_Text"><text:span text:style-name="T601"> cada palavra </text:span></text:span><text:span text:style-name="Source_20_Text"><text:span text:style-name="T602">(ou substrings)</text:span></text:span><text:span text:style-name="Source_20_Text"><text:span text:style-name="T601"> e </text:span></text:span><text:span text:style-name="Source_20_Text"><text:span text:style-name="T602">coloca</text:span></text:span><text:span text:style-name="Source_20_Text"><text:span text:style-name="T601"> num índice de </text:span></text:span><text:span text:style-name="Source_20_Text"><text:span text:style-name="T603">vetor</text:span></text:span><text:span text:style-name="Source_20_Text"><text:span text:style-name="T601">. É uma versão mais nova da str_word_count, ela procura pelos caracteres </text:span></text:span><text:span text:style-name="Source_20_Text"><text:span text:style-name="T604">especificados no parâmetro</text:span></text:span><text:span text:style-name="Source_20_Text"><text:span text:style-name="T601"> </text:span></text:span><text:span text:style-name="Source_20_Text"><text:span text:style-name="T604">(</text:span></text:span><text:span text:style-name="Source_20_Text"><text:span text:style-name="T605">como </text:span></text:span><text:span text:style-name="Source_20_Text"><text:span text:style-name="T606">exemplo, um</text:span></text:span><text:span text:style-name="Source_20_Text"><text:span text:style-name="T605"> </text:span></text:span><text:span text:style-name="Source_20_Text"><text:span text:style-name="T604">espaço em branco </text:span></text:span><text:span text:style-name="Source_20_Text"><text:span text:style-name="T606">ou ponto-e-vírgula</text:span></text:span><text:span text:style-name="Source_20_Text"><text:span text:style-name="T604">)</text:span></text:span><text:span text:style-name="Source_20_Text"><text:span text:style-name="T601">, </text:span></text:span><text:span text:style-name="Source_20_Text"><text:span text:style-name="T607">quebra</text:span></text:span><text:span text:style-name="Source_20_Text"><text:span text:style-name="T601"> a string e </text:span></text:span><text:span text:style-name="Source_20_Text"><text:span text:style-name="T607">coloca os itens</text:span></text:span><text:span text:style-name="Source_20_Text"><text:span text:style-name="T601"> </text:span></text:span><text:span text:style-name="Source_20_Text"><text:span text:style-name="T607">em</text:span></text:span><text:span text:style-name="Source_20_Text"><text:span text:style-name="T601"> um vetor. </text:span></text:span><text:span text:style-name="Source_20_Text"><text:span text:style-name="T608">Muito utilizado em operações de arquivos .csv</text:span></text:span><text:span text:style-name="Source_20_Text"><text:span text:style-name="T601"><text:line-break/>Exemplo:</text:span></text:span><text:span text:style-name="Source_20_Text"><text:span text:style-name="T586">$site</text:span></text:span><text:span text:style-name="Source_20_Text"><text:span text:style-name="T587"> = </text:span></text:span><text:span text:style-name="Source_20_Text"><text:span text:style-name="T588">"Curso em Video"</text:span></text:span><text:span text:style-name="Source_20_Text"><text:span text:style-name="T587">;</text:span></text:span><text:span text:style-name="Source_20_Text"><text:span text:style-name="T609"><text:tab/></text:span></text:span><text:span text:style-name="Source_20_Text"><text:span text:style-name="T610">$vetor</text:span></text:span><text:span text:style-name="Source_20_Text"><text:span text:style-name="T611"> = </text:span></text:span><text:span text:style-name="Source_20_Text"><text:span text:style-name="T612">explode</text:span></text:span><text:span text:style-name="Source_20_Text"><text:span text:style-name="T611">(</text:span></text:span><text:span text:style-name="Source_20_Text"><text:span text:style-name="T613">" "</text:span></text:span><text:span text:style-name="Source_20_Text"><text:span text:style-name="T611">,</text:span></text:span><text:span text:style-name="Source_20_Text"><text:span text:style-name="T610">$site</text:span></text:span><text:span text:style-name="Source_20_Text"><text:span text:style-name="T611">);</text:span></text:span><text:span text:style-name="Source_20_Text"><text:span text:style-name="T614"><text:line-break/></text:span></text:span><text:span text:style-name="Source_20_Text"><text:span text:style-name="T615">Array ( [0] =&gt; Curso [1] =&gt; em [2] =&gt; Video )</text:span></text:span><text:span text:style-name="Source_20_Text"><text:span text:style-name="T616"><text:line-break/></text:span></text:span></text:p>
        </text:list-item>
        <text:list-item>
          <text:p text:style-name="P191"><text:span text:style-name="Source_20_Text"><text:span text:style-name="T590">implode()</text:span></text:span><text:span text:style-name="Source_20_Text"><text:span text:style-name="T591"> </text:span></text:span><text:span text:style-name="Source_20_Text"><text:span text:style-name="T617">ou</text:span></text:span><text:span text:style-name="Source_20_Text"><text:span text:style-name="T618"> </text:span></text:span><text:span text:style-name="Source_20_Text"><text:span text:style-name="T619">join()</text:span></text:span><text:span text:style-name="Source_20_Text"><text:span text:style-name="T601">: </text:span></text:span><text:span text:style-name="Source_20_Text"><text:span text:style-name="T604">Transforma um vetor inteiro em uma </text:span></text:span><text:span text:style-name="Source_20_Text"><text:span text:style-name="T601">string. Exemplo:</text:span></text:span><text:span text:style-name="Source_20_Text"><text:span text:style-name="T620"><text:line-break/></text:span></text:span><text:span text:style-name="Source_20_Text"><text:span text:style-name="T621">$vet</text:span></text:span><text:span text:style-name="Source_20_Text"><text:span text:style-name="T622">[</text:span></text:span><text:span text:style-name="Source_20_Text"><text:span text:style-name="T623">0</text:span></text:span><text:span text:style-name="Source_20_Text"><text:span text:style-name="T622">] = </text:span></text:span><text:span text:style-name="Source_20_Text"><text:span text:style-name="T624">"curso"</text:span></text:span><text:span text:style-name="Source_20_Text"><text:span text:style-name="T622">;<text:line-break/></text:span></text:span><text:span text:style-name="T545">$vet</text:span><text:span text:style-name="T542">[</text:span><text:span text:style-name="T563">1</text:span><text:span text:style-name="T542">] = </text:span><text:span text:style-name="T543">"em"</text:span><text:span text:style-name="T542">;<text:line-break/></text:span><text:span text:style-name="T545">$vet</text:span><text:span text:style-name="T542">[</text:span><text:span text:style-name="T563">2</text:span><text:span text:style-name="T542">] = </text:span><text:span text:style-name="T543">"video"</text:span><text:span text:style-name="T542">;<text:line-break/></text:span><text:span text:style-name="T545">$texto</text:span><text:span text:style-name="T542"> = </text:span><text:span text:style-name="T541">implode</text:span><text:span text:style-name="T542">(</text:span><text:span text:style-name="T543">"_"</text:span><text:span text:style-name="T542">, </text:span><text:span text:style-name="T545">$vet</text:span><text:span text:style-name="T542">);</text:span><text:span text:style-name="T546"><text:line-break/></text:span><text:span text:style-name="T589">curso_em_video</text:span><text:span text:style-name="T625"> </text:span><text:span text:style-name="T546"><text:line-break/></text:span></text:p>
        </text:list-item>
        <text:list-item>
          <text:p text:style-name="P192"><text:span text:style-name="Source_20_Text"><text:span text:style-name="T590">chr()</text:span></text:span><text:span text:style-name="Source_20_Text"><text:span text:style-name="T601">: </text:span></text:span><text:span text:style-name="Source_20_Text"><text:span text:style-name="T626">Retorna um caractere de acordo com seu código ASCII passado como parâmetro.</text:span></text:span><text:span text:style-name="Source_20_Text"><text:span text:style-name="T601"> Exemplo:</text:span></text:span><text:span text:style-name="T545">$letra</text:span><text:span text:style-name="T542"> = </text:span><text:span text:style-name="T541">chr</text:span><text:span text:style-name="T542">(</text:span><text:span text:style-name="T563">67</text:span><text:span text:style-name="T542">);</text:span><text:span text:style-name="T546"><text:line-break/></text:span></text:p>
        </text:list-item>
        <text:list-item>
          <text:p text:style-name="P192"><text:span text:style-name="Source_20_Text"><text:span text:style-name="T590">ord()</text:span></text:span><text:span text:style-name="Source_20_Text"><text:span text:style-name="T591">:</text:span></text:span><text:span text:style-name="Source_20_Text"><text:span text:style-name="T627"> </text:span></text:span><text:span text:style-name="Source_20_Text"><text:span text:style-name="T628">Retorna o código ASCII de um caractere passado como parâmetro. </text:span></text:span><text:span text:style-name="Source_20_Text"><text:span text:style-name="T626">Exemp</text:span></text:span><text:span text:style-name="Source_20_Text"><text:span text:style-name="T601">lo:</text:span></text:span><text:span text:style-name="T545">$cod</text:span><text:span text:style-name="T542"> = </text:span><text:span text:style-name="T541">ord</text:span><text:span text:style-name="T542">(</text:span><text:span text:style-name="T545">$letra</text:span><text:span text:style-name="T542">);</text:span><text:span text:style-name="T546"><text:line-break/></text:span></text:p>
        </text:list-item>
        <text:list-item>
          <text:p text:style-name="P192"><text:span text:style-name="Source_20_Text"><text:span text:style-name="T590">mb_convert_case()</text:span></text:span><text:span text:style-name="Source_20_Text"><text:span text:style-name="T628">: usada para converter o formato de caixa (maiúsculas/minúsculas) de uma string, levando em conta caracteres </text:span></text:span><text:span text:style-name="Source_20_Text"><text:span text:style-name="T629">multibyte</text:span></text:span><text:span text:style-name="Source_20_Text"><text:span text:style-name="T628"> (como acentos e caracteres de outros alfabetos). </text:span></text:span><text:span text:style-name="Source_20_Text"><text:span text:style-name="T630">Permite 3 modos de conversão: MB_CASE_UPPER, MB_CASE_LOWER, </text:span></text:span><text:soft-page-break/><text:span text:style-name="Source_20_Text"><text:span text:style-name="T630">MB_CASE_TITLE<text:line-break/></text:span></text:span><text:span text:style-name="Source_20_Text"><text:span text:style-name="T631">mb_convert_case</text:span></text:span><text:span text:style-name="Source_20_Text"><text:span text:style-name="T632">(</text:span></text:span><text:span text:style-name="Source_20_Text"><text:span text:style-name="T633">string</text:span></text:span><text:span text:style-name="Source_20_Text"><text:span text:style-name="T632"> </text:span></text:span><text:span text:style-name="Source_20_Text"><text:span text:style-name="T634">$string</text:span></text:span><text:span text:style-name="Source_20_Text"><text:span text:style-name="T632">, </text:span></text:span><text:span text:style-name="Source_20_Text"><text:span text:style-name="T633">int</text:span></text:span><text:span text:style-name="Source_20_Text"><text:span text:style-name="T632"> </text:span></text:span><text:span text:style-name="Source_20_Text"><text:span text:style-name="T634">$mode</text:span></text:span><text:span text:style-name="Source_20_Text"><text:span text:style-name="T632">, ?</text:span></text:span><text:span text:style-name="Source_20_Text"><text:span text:style-name="T635">string</text:span></text:span><text:span text:style-name="Source_20_Text"><text:span text:style-name="T636"> </text:span></text:span><text:span text:style-name="Source_20_Text"><text:span text:style-name="T637">$encoding</text:span></text:span><text:span text:style-name="Source_20_Text"><text:span text:style-name="T636"> = </text:span></text:span><text:span text:style-name="Source_20_Text"><text:span text:style-name="T635">null</text:span></text:span><text:span text:style-name="Source_20_Text"><text:span text:style-name="T636">): </text:span></text:span><text:span text:style-name="Source_20_Text"><text:span text:style-name="T635">string</text:span></text:span></text:p>
        </text:list-item>
        <text:list-item>
          <text:p text:style-name="P193"><text:span text:style-name="Source_20_Text"><text:span text:style-name="T590">strtolower()</text:span></text:span><text:span text:style-name="Source_20_Text"><text:span text:style-name="T601">: converte todas as letras para minúsculo. Exemplo:</text:span></text:span><text:span text:style-name="Source_20_Text"><text:span text:style-name="T638"><text:line-break/></text:span></text:span><text:span text:style-name="Source_20_Text"><text:span text:style-name="T541">print</text:span></text:span><text:span text:style-name="Source_20_Text"><text:span text:style-name="T542">(</text:span></text:span><text:span text:style-name="Source_20_Text"><text:span text:style-name="T543">"Seu nome em minúsculo é "</text:span></text:span><text:span text:style-name="Source_20_Text"><text:span text:style-name="T542"> . </text:span></text:span><text:span text:style-name="Source_20_Text"><text:span text:style-name="T541">strtolower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);</text:span></text:span><text:span text:style-name="Source_20_Text"><text:span text:style-name="T546"><text:line-break/></text:span></text:span></text:p>
        </text:list-item>
        <text:list-item>
          <text:p text:style-name="P194"><text:span text:style-name="Source_20_Text"><text:span text:style-name="T590">strtoupper()</text:span></text:span><text:span text:style-name="Source_20_Text"><text:span text:style-name="T601">: converte para maiúsculo. Exemplo:</text:span></text:span><text:span text:style-name="T639"><text:line-break/></text:span><text:span text:style-name="T541">print</text:span><text:span text:style-name="T542">(</text:span><text:span text:style-name="T543">"Seu nome em MAIÚSCULO é "</text:span><text:span text:style-name="T542"> . </text:span><text:span text:style-name="T541">strtoupper</text:span><text:span text:style-name="T542">(</text:span><text:span text:style-name="T545">$nome</text:span><text:span text:style-name="T542">));</text:span><text:span text:style-name="T639"><text:line-break/></text:span></text:p>
        </text:list-item>
        <text:list-item>
          <text:p text:style-name="P195"><text:span text:style-name="Source_20_Text"><text:span text:style-name="T640">ucfirst()</text:span></text:span><text:span text:style-name="Source_20_Text"><text:span text:style-name="T641">: converte e primeira letra para maiúsculo (uppercase). Exemplo:</text:span></text:span><text:span text:style-name="T642"><text:line-break/></text:span><text:span text:style-name="T643">print</text:span><text:span text:style-name="T644">(</text:span><text:span text:style-name="T645">"Seu nome, com uppercase, é "</text:span><text:span text:style-name="T644">.</text:span><text:span text:style-name="T643">ucfirst</text:span><text:span text:style-name="T644">(</text:span><text:span text:style-name="T643">strtolower</text:span><text:span text:style-name="T644">(</text:span><text:span text:style-name="T646">$nome</text:span><text:span text:style-name="T644">)));</text:span><text:span text:style-name="T642"><text:line-break/></text:span></text:p>
        </text:list-item>
        <text:list-item>
          <text:p text:style-name="P196"><text:span text:style-name="Source_20_Text"><text:span text:style-name="T647">ucwords()</text:span></text:span><text:span text:style-name="Source_20_Text"><text:span text:style-name="T648">: converte a primeira letra de </text:span></text:span><text:span text:style-name="Source_20_Text"><text:span text:style-name="T649">cada palavra</text:span></text:span><text:span text:style-name="Source_20_Text"><text:span text:style-name="T648"> para maiúsculo. Exemplo:</text:span></text:span><text:span text:style-name="T650">print</text:span><text:span text:style-name="T651">(</text:span><text:span text:style-name="T652">"&lt;br&gt;função ucwords(): "</text:span><text:span text:style-name="T651">.</text:span><text:span text:style-name="T650">ucwords</text:span><text:span text:style-name="T651">(</text:span><text:span text:style-name="T650">strtolower</text:span><text:span text:style-name="T651">(</text:span><text:span text:style-name="T653">$nome</text:span><text:span text:style-name="T651">)));</text:span><text:span text:style-name="T654"><text:line-break/></text:span></text:p>
        </text:list-item>
        <text:list-item>
          <text:p text:style-name="P197"><text:span text:style-name="Source_20_Text"><text:span text:style-name="T590">strrev()</text:span></text:span><text:span text:style-name="Source_20_Text"><text:span text:style-name="T601">: reverte a ordem dos caracteres. Exemplo:</text:span></text:span><text:span text:style-name="T655"><text:line-break/></text:span><text:span text:style-name="T541">print</text:span><text:span text:style-name="T542">(</text:span><text:span text:style-name="T541">strrev</text:span><text:span text:style-name="T542">(</text:span><text:span text:style-name="T541">strtoupper</text:span><text:span text:style-name="T542">(</text:span><text:span text:style-name="T545">$nome</text:span><text:span text:style-name="T542">)));</text:span><text:span text:style-name="T589">SEUGIRDOR SATANOJ</text:span><text:span text:style-name="T546"><text:line-break/></text:span></text:p>
        </text:list-item>
        <text:list-item>
          <text:p text:style-name="P198"><text:span text:style-name="Source_20_Text"><text:span text:style-name="T656">str_contains()</text:span></text:span><text:span text:style-name="Source_20_Text"><text:span text:style-name="T601">: verifica se uma string </text:span></text:span><text:span text:style-name="Source_20_Text"><text:span text:style-name="T603">contém</text:span></text:span><text:span text:style-name="Source_20_Text"><text:span text:style-name="T601"> </text:span></text:span><text:span text:style-name="Source_20_Text"><text:span text:style-name="T657">outra string</text:span></text:span><text:span text:style-name="Source_20_Text"><text:span text:style-name="T601"> e retorna </text:span></text:span><text:span text:style-name="Source_20_Text"><text:span text:style-name="T609">true</text:span></text:span><text:span text:style-name="Source_20_Text"><text:span text:style-name="T601"> ou </text:span></text:span><text:span text:style-name="Source_20_Text"><text:span text:style-name="T609">false</text:span></text:span><text:span text:style-name="Source_20_Text"><text:span text:style-name="T601">.</text:span></text:span></text:p>
        </text:list-item>
        <text:list-item>
          <text:p text:style-name="P199"><text:span text:style-name="Source_20_Text"><text:span text:style-name="T658">str_</text:span></text:span><text:span text:style-name="Source_20_Text"><text:span text:style-name="T659">starts_with</text:span></text:span><text:span text:style-name="Source_20_Text"><text:span text:style-name="T658">()</text:span></text:span><text:span text:style-name="Source_20_Text"><text:span text:style-name="T660">: verifica se uma string </text:span></text:span><text:span text:style-name="Source_20_Text"><text:span text:style-name="T661">começa</text:span></text:span><text:span text:style-name="Source_20_Text"><text:span text:style-name="T662"> com</text:span></text:span><text:span text:style-name="Source_20_Text"><text:span text:style-name="T663"> </text:span></text:span><text:span text:style-name="Source_20_Text"><text:span text:style-name="T662">determinada </text:span></text:span><text:span text:style-name="Source_20_Text"><text:span text:style-name="T663">string</text:span></text:span><text:span text:style-name="Source_20_Text"><text:span text:style-name="T660"> e retorna </text:span></text:span><text:span text:style-name="Source_20_Text"><text:span text:style-name="T664">true</text:span></text:span><text:span text:style-name="Source_20_Text"><text:span text:style-name="T660"> ou </text:span></text:span><text:span text:style-name="Source_20_Text"><text:span text:style-name="T664">false</text:span></text:span><text:span text:style-name="Source_20_Text"><text:span text:style-name="T660">.</text:span></text:span></text:p>
        </text:list-item>
        <text:list-item>
          <text:p text:style-name="P199"><text:span text:style-name="Source_20_Text"><text:span text:style-name="T656">str_</text:span></text:span><text:span text:style-name="Source_20_Text"><text:span text:style-name="T665">ends_with</text:span></text:span><text:span text:style-name="Source_20_Text"><text:span text:style-name="T656">()</text:span></text:span><text:span text:style-name="Source_20_Text"><text:span text:style-name="T592">: verifica se uma string </text:span></text:span><text:span text:style-name="Source_20_Text"><text:span text:style-name="T666">termina</text:span></text:span><text:span text:style-name="Source_20_Text"><text:span text:style-name="T667"> com</text:span></text:span><text:span text:style-name="Source_20_Text"><text:span text:style-name="T668"> </text:span></text:span><text:span text:style-name="Source_20_Text"><text:span text:style-name="T667">determinada </text:span></text:span><text:span text:style-name="Source_20_Text"><text:span text:style-name="T668">string</text:span></text:span><text:span text:style-name="Source_20_Text"><text:span text:style-name="T592"> e retorna </text:span></text:span><text:span text:style-name="Source_20_Text"><text:span text:style-name="T669">true</text:span></text:span><text:span text:style-name="Source_20_Text"><text:span text:style-name="T592"> ou </text:span></text:span><text:span text:style-name="Source_20_Text"><text:span text:style-name="T669">false</text:span></text:span><text:span text:style-name="Source_20_Text"><text:span text:style-name="T592">.</text:span></text:span></text:p>
        </text:list-item>
        <text:list-item>
          <text:p text:style-name="P200"><text:span text:style-name="Source_20_Text"><text:span text:style-name="T647">strpos()</text:span></text:span><text:span text:style-name="Source_20_Text"><text:span text:style-name="T648">: retorna a posição da palavra na string. Exemplo:</text:span></text:span><text:span text:style-name="T670"><text:line-break/></text:span><text:span text:style-name="T653">$frase</text:span><text:span text:style-name="T651"> = </text:span><text:span text:style-name="T652">"Estou aprendendo PHP"</text:span><text:span text:style-name="T651">;<text:tab/></text:span><text:span text:style-name="T653">$pos</text:span><text:span text:style-name="T651"> = </text:span><text:span text:style-name="T650">strpos</text:span><text:span text:style-name="T651">(</text:span><text:span text:style-name="T653">$frase</text:span><text:span text:style-name="T651">, </text:span><text:span text:style-name="T652">"PHP"</text:span><text:span text:style-name="T651">);</text:span><text:span text:style-name="T654"><text:line-break/></text:span></text:p>
        </text:list-item>
        <text:list-item>
          <text:p text:style-name="P201"><text:span text:style-name="Source_20_Text"><text:span text:style-name="T647">stripos()</text:span></text:span><text:span text:style-name="Source_20_Text"><text:span text:style-name="T648">: string-</text:span></text:span><text:span text:style-name="Source_20_Text"><text:span text:style-name="T671">ignore</text:span></text:span><text:span text:style-name="Source_20_Text"><text:span text:style-name="T648">-position, ou seja, retorna a posição da palavra/caractere na string </text:span></text:span><text:span text:style-name="Source_20_Text"><text:span text:style-name="T649">ignorando</text:span></text:span><text:span text:style-name="Source_20_Text"><text:span text:style-name="T648"> se é maiúsculo ou não. Exemplo:</text:span></text:span><text:span text:style-name="T653">$pos</text:span><text:span text:style-name="T651"> = </text:span><text:span text:style-name="T650">stripos</text:span><text:span text:style-name="T651">(</text:span><text:span text:style-name="T653">$frase</text:span><text:span text:style-name="T651">, </text:span><text:span text:style-name="T652">"php"</text:span><text:span text:style-name="T651">);</text:span><text:span text:style-name="T654"><text:line-break/></text:span></text:p>
        </text:list-item>
        <text:list-item>
          <text:p text:style-name="P201"><text:span text:style-name="Source_20_Text"><text:span text:style-name="T647">substr_count()</text:span></text:span><text:span text:style-name="Source_20_Text"><text:span text:style-name="T648">: retorna a quantidade de vezes que </text:span></text:span><text:span text:style-name="Source_20_Text"><text:span text:style-name="T672">um</text:span></text:span><text:span text:style-name="Source_20_Text"><text:span text:style-name="T648">a palavra apareceu na string. Exemplo:</text:span></text:span><text:span text:style-name="T673"><text:line-break/></text:span><text:span text:style-name="T653">$cont</text:span><text:span text:style-name="T651"> = </text:span><text:span text:style-name="T650">substr_count</text:span><text:span text:style-name="T651">(</text:span><text:span text:style-name="T653">$frase</text:span><text:span text:style-name="T651">, </text:span><text:span text:style-name="T652">"PHP"</text:span><text:span text:style-name="T651">);</text:span><text:span text:style-name="T654"><text:line-break/></text:span></text:p>
        </text:list-item>
        <text:list-item>
          <text:p text:style-name="P199"><text:span text:style-name="Source_20_Text"><text:span text:style-name="T590">substr()</text:span></text:span><text:span text:style-name="Source_20_Text"><text:span text:style-name="T592">: </text:span></text:span><text:span text:style-name="Strong_20_Emphasis"><text:span text:style-name="T674">retorna</text:span></text:span><text:span text:style-name="Source_20_Text"><text:span text:style-name="T592"> um pedaço de uma string com base na posição inicial e no comprimento especificado. O 1º </text:span></text:span><text:span text:style-name="Source_20_Text"><text:span text:style-name="T668">parâmetro </text:span></text:span><text:span text:style-name="Source_20_Text"><text:span text:style-name="T592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75"><text:line-break/></text:span></text:span><text:span text:style-name="Source_20_Text"><text:span text:style-name="T676">$sub</text:span></text:span><text:span text:style-name="Source_20_Text"><text:span text:style-name="T677"> = </text:span></text:span><text:span text:style-name="Source_20_Text"><text:span text:style-name="T678">substr</text:span></text:span><text:span text:style-name="Source_20_Text"><text:span text:style-name="T677">(</text:span></text:span><text:span text:style-name="Source_20_Text"><text:span text:style-name="T676">$site</text:span></text:span><text:span text:style-name="Source_20_Text"><text:span text:style-name="T677">, </text:span></text:span><text:span text:style-name="Source_20_Text"><text:span text:style-name="T679">0</text:span></text:span><text:span text:style-name="Source_20_Text"><text:span text:style-name="T677">, </text:span></text:span><text:span text:style-name="Source_20_Text"><text:span text:style-name="T679">5</text:span></text:span><text:span text:style-name="Source_20_Text"><text:span text:style-name="T677">);</text:span></text:span></text:p>
        </text:list-item>
        <text:list-item>
          <text:p text:style-name="P199"><text:span text:style-name="Source_20_Text"><text:span text:style-name="T590">strstr()</text:span></text:span><text:span text:style-name="Source_20_Text"><text:span text:style-name="T668">: procura a primeira ocorrência de uma substring dentro de outra string. </text:span></text:span><text:span text:style-name="Source_20_Text"><text:span text:style-name="T680">Exemplo:<text:line-break/></text:span></text:span><text:span text:style-name="Source_20_Text"><text:span text:style-name="T681">$usuario</text:span></text:span><text:span text:style-name="Source_20_Text"><text:span text:style-name="T682"> = </text:span></text:span><text:span text:style-name="Source_20_Text"><text:span text:style-name="T683">strstr</text:span></text:span><text:span text:style-name="Source_20_Text"><text:span text:style-name="T682">(</text:span></text:span><text:span text:style-name="Source_20_Text"><text:span text:style-name="T684">"usuario@example.com"</text:span></text:span><text:span text:style-name="Source_20_Text"><text:span text:style-name="T682">, </text:span></text:span><text:span text:style-name="Source_20_Text"><text:span text:style-name="T684">"@"</text:span></text:span><text:span text:style-name="Source_20_Text"><text:span text:style-name="T682">, </text:span></text:span><text:span text:style-name="Source_20_Text"><text:span text:style-name="T685">true</text:span></text:span><text:span text:style-name="Source_20_Text"><text:span text:style-name="T682">); </text:span></text:span><text:span text:style-name="Source_20_Text"><text:span text:style-name="T686">// Saída: usuario</text:span></text:span></text:p>
        </text:list-item>
        <text:list-item>
          <text:p text:style-name="P202"><text:soft-page-break/><text:span text:style-name="Source_20_Text"><text:span text:style-name="T590">str_pad()</text:span></text:span><text:span text:style-name="Source_20_Text"><text:span text:style-name="T601">: faz a string caber em determinado espaço (útil para alinhamentos). Exemplo:</text:span></text:span><text:span text:style-name="T687"><text:line-break/></text:span><text:span text:style-name="T545">$novo</text:span><text:span text:style-name="T542"> = </text:span><text:span text:style-name="T541">str_pad</text:span><text:span text:style-name="T542">(</text:span><text:span text:style-name="T545">$nome</text:span><text:span text:style-name="T542">, </text:span><text:span text:style-name="T563">25</text:span><text:span text:style-name="T542">, </text:span><text:span text:style-name="T543">"."</text:span><text:span text:style-name="T542">, STR_PAD_BOTH);</text:span><text:span text:style-name="T546"><text:line-break/></text:span><text:span text:style-name="Source_20_Text"><text:span text:style-name="T601">Seus 4 parâmetros indicam, respectivamente: variável, tamanho, caractere separador, orientação da posição (Left, Both, Center)</text:span></text:span></text:p>
        </text:list-item>
        <text:list-item>
          <text:p text:style-name="P202"><text:span text:style-name="Source_20_Text"><text:span text:style-name="T665">str_repeat()</text:span></text:span><text:span text:style-name="Source_20_Text"><text:span text:style-name="T601">: repete os caracteres estipulados </text:span></text:span><text:span text:style-name="Source_20_Text"><text:span text:style-name="T688">nos</text:span></text:span><text:span text:style-name="Source_20_Text"><text:span text:style-name="T601"> parâmetros. Exemplo:</text:span></text:span><text:span text:style-name="T689"><text:line-break/></text:span><text:span text:style-name="T541">print</text:span><text:span text:style-name="T542">(</text:span><text:span text:style-name="T541">str_repeat</text:span><text:span text:style-name="T542">(</text:span><text:span text:style-name="T543">"-"</text:span><text:span text:style-name="T542">, </text:span><text:span text:style-name="T563">30</text:span><text:span text:style-name="T542">)); </text:span><text:span text:style-name="T559">//gera 30 sinais de menos</text:span></text:p>
        </text:list-item>
        <text:list-item>
          <text:p text:style-name="P203"><text:span text:style-name="Source_20_Text"><text:span text:style-name="T690">strtotime():</text:span></text:span><text:span text:style-name="Source_20_Text"><text:span text:style-name="T691"> converte a data para um Timestamp Unix. Útil para calcular intervalos entre datas. Exemplo:<text:line-break/></text:span></text:span><text:span text:style-name="Source_20_Text"><text:span text:style-name="T692">$entrada</text:span></text:span><text:span text:style-name="Source_20_Text"><text:span text:style-name="T693"> = </text:span></text:span><text:span text:style-name="Source_20_Text"><text:span text:style-name="T694">strtotime</text:span></text:span><text:span text:style-name="Source_20_Text"><text:span text:style-name="T693">(</text:span></text:span><text:span text:style-name="Source_20_Text"><text:span text:style-name="T695">'2024-08-01 23:30'</text:span></text:span><text:span text:style-name="Source_20_Text"><text:span text:style-name="T693">);<text:line-break/></text:span></text:span><text:span text:style-name="T576">$saida</text:span><text:span text:style-name="T577">   = </text:span><text:span text:style-name="T578">strtotime</text:span><text:span text:style-name="T577">(</text:span><text:span text:style-name="T579">'2024-08-02 11:15'</text:span><text:span text:style-name="T577">);<text:line-break/></text:span><text:span text:style-name="T576">$diferenca</text:span><text:span text:style-name="T577"> = </text:span><text:span text:style-name="T576">$saida</text:span><text:span text:style-name="T577"> - </text:span><text:span text:style-name="T576">$entrada</text:span><text:span text:style-name="T577">;<text:line-break/></text:span><text:span text:style-name="T578">printf</text:span><text:span text:style-name="T577">(</text:span><text:span text:style-name="T579">'%d:%d'</text:span><text:span text:style-name="T577">, </text:span><text:span text:style-name="T576">$diferenca</text:span><text:span text:style-name="T577"> / </text:span><text:span text:style-name="T696">3600</text:span><text:span text:style-name="T577">, </text:span><text:span text:style-name="T576">$diferenca</text:span><text:span text:style-name="T577"> / </text:span><text:span text:style-name="T696">60</text:span><text:span text:style-name="T577"> % </text:span><text:span text:style-name="T696">60</text:span><text:span text:style-name="T577">);</text:span></text:p>
        </text:list-item>
        <text:list-item>
          <text:p text:style-name="P203"><text:span text:style-name="Source_20_Text"><text:span text:style-name="T665">json_encode()</text:span></text:span><text:span text:style-name="Source_20_Text"><text:span text:style-name="T691"> converte uma estrutura de dados (arrays ou objetos) em uma string JSON.</text:span></text:span></text:p>
        </text:list-item>
        <text:list-item>
          <text:p text:style-name="P203"><text:span text:style-name="Source_20_Text"><text:span text:style-name="T690">json_decode() </text:span></text:span><text:span text:style-name="Source_20_Text"><text:span text:style-name="T691">converte uma string JSON para uma estrutura de dados (array ou objeto).<text:line-break/>O 2º parâmetro é opcional, </text:span></text:span><text:span text:style-name="Source_20_Text"><text:span text:style-name="T697">s</text:span></text:span><text:span text:style-name="Source_20_Text"><text:span text:style-name="T691">e </text:span></text:span><text:span text:style-name="Source_20_Text"><text:span text:style-name="T698">true</text:span></text:span><text:span text:style-name="Source_20_Text"><text:span text:style-name="T691">, retorna </text:span></text:span><text:span text:style-name="Source_20_Text"><text:span text:style-name="T699">arrays associativos</text:span></text:span><text:span text:style-name="Source_20_Text"><text:span text:style-name="T691">; se </text:span></text:span><text:span text:style-name="Source_20_Text"><text:span text:style-name="T698">false</text:span></text:span><text:span text:style-name="Source_20_Text"><text:span text:style-name="T691"> (padrão), retorna objetos. </text:span></text:span></text:p>
        </text:list-item>
        <text:list-item>
          <text:p text:style-name="P203"><text:span text:style-name="Source_20_Text"><text:span text:style-name="T690">addslashes() </text:span></text:span><text:span text:style-name="Source_20_Text"><text:span text:style-name="T691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4"><text:span text:style-name="Source_20_Text"><text:span text:style-name="T700">h</text:span></text:span><text:span text:style-name="Source_20_Text"><text:span text:style-name="T690">tmlentities ()</text:span></text:span><text:span text:style-name="Source_20_Text"><text:span text:style-name="T701"> converte todos os caracteres que têm representação em HTML, incluindo </text:span></text:span><text:span text:style-name="Source_20_Text"><text:span text:style-name="T702">acentos</text:span></text:span><text:span text:style-name="Source_20_Text"><text:span text:style-name="T701"> e símbolos.<text:line-break/></text:span></text:span><text:span text:style-name="Source_20_Text"><text:span text:style-name="T703">h</text:span></text:span><text:span text:style-name="Source_20_Text"><text:span text:style-name="T704">tml</text:span></text:span><text:span text:style-name="Source_20_Text"><text:span text:style-name="T703">specialchars</text:span></text:span><text:span text:style-name="Source_20_Text"><text:span text:style-name="T704"> ()</text:span></text:span><text:span text:style-name="Source_20_Text"><text:span text:style-name="T701"> converte apenas caracteres essenciais (</text:span></text:span><text:span text:style-name="Source_20_Text"><text:span text:style-name="T705">&lt;</text:span></text:span><text:span text:style-name="Source_20_Text"><text:span text:style-name="T701">, </text:span></text:span><text:span text:style-name="Source_20_Text"><text:span text:style-name="T705">&gt;</text:span></text:span><text:span text:style-name="Source_20_Text"><text:span text:style-name="T701">, </text:span></text:span><text:span text:style-name="Source_20_Text"><text:span text:style-name="T705">"</text:span></text:span><text:span text:style-name="Source_20_Text"><text:span text:style-name="T701">, </text:span></text:span><text:span text:style-name="Source_20_Text"><text:span text:style-name="T705">'</text:span></text:span><text:span text:style-name="Source_20_Text"><text:span text:style-name="T701">, </text:span></text:span><text:span text:style-name="Source_20_Text"><text:span text:style-name="T705">&amp;</text:span></text:span><text:span text:style-name="Source_20_Text"><text:span text:style-name="T701"> ), ou seja, aqueles que podem quebrar o HTML</text:span></text:span></text:p>
        </text:list-item>
        <text:list-item>
          <text:p text:style-name="P204"><text:span text:style-name="Source_20_Text"><text:span text:style-name="T703">str_replace()</text:span></text:span><text:span text:style-name="Source_20_Text"><text:span text:style-name="T706">: substitui uma string por outra. Exemplo:</text:span></text:span><text:span text:style-name="Source_20_Text"><text:span text:style-name="T707"><text:line-break/></text:span></text:span><text:span text:style-name="Source_20_Text"><text:span text:style-name="T708">$frase</text:span></text:span><text:span text:style-name="Source_20_Text"><text:span text:style-name="T709"> = </text:span></text:span><text:span text:style-name="Source_20_Text"><text:span text:style-name="T710">"Gosto de estudar Matemática!"</text:span></text:span><text:span text:style-name="Source_20_Text"><text:span text:style-name="T709">;<text:line-break/></text:span></text:span><text:span text:style-name="Source_20_Text"><text:span text:style-name="T708">$novafrase</text:span></text:span><text:span text:style-name="Source_20_Text"><text:span text:style-name="T709"> = </text:span></text:span><text:span text:style-name="Source_20_Text"><text:span text:style-name="T711">str_replace</text:span></text:span><text:span text:style-name="Source_20_Text"><text:span text:style-name="T709">(</text:span></text:span><text:span text:style-name="Source_20_Text"><text:span text:style-name="T710">"Matemática"</text:span></text:span><text:span text:style-name="Source_20_Text"><text:span text:style-name="T709">, </text:span></text:span><text:span text:style-name="Source_20_Text"><text:span text:style-name="T710">"PHP"</text:span></text:span><text:span text:style-name="Source_20_Text"><text:span text:style-name="T709">, </text:span></text:span><text:span text:style-name="Source_20_Text"><text:span text:style-name="T708">$frase</text:span></text:span><text:span text:style-name="Source_20_Text"><text:span text:style-name="T709">);<text:line-break/></text:span></text:span><text:span text:style-name="Source_20_Text"><text:span text:style-name="T712">//imprime "Gosto de estudar PHP"</text:span></text:span><text:span text:style-name="Source_20_Text"><text:span text:style-name="T713"><text:line-break/></text:span></text:span><text:span text:style-name="Source_20_Text"><text:span text:style-name="T706">A função </text:span></text:span><text:span text:style-name="Source_20_Text"><text:span text:style-name="T714">str_ireplace()</text:span></text:span><text:span text:style-name="Source_20_Text"><text:span text:style-name="T706"> ignora caixa alta (maiúsculas).</text:span></text:span></text:p>
        </text:list-item>
        <text:list-item>
          <text:p text:style-name="P205"><text:span text:style-name="T715">preg_match()</text:span>Encontra apenas a primeira correspondência de um padr<text:span text:style-name="T716">ão. Os delimitadores são obrigatórios para regex em funções preg_*(). </text:span><text:span text:style-name="T717">Entre os permitidos: / (mais comum), #, ~, %, !, {}, @</text:span></text:p>
        </text:list-item>
        <text:list-item>
          <text:p text:style-name="P205"><text:span text:style-name="T715">preg_match_all()</text:span>Encontra todas as correspondências de um padrão na string.</text:p>
        </text:list-item>
        <text:list-item>
          <text:p text:style-name="P204"><text:span text:style-name="T718">preg_replace()</text:span><text:span text:style-name="T5">Substitui partes da string com base em um padrão regex. </text:span><text:span text:style-name="T719">Exemplo:<text:line-break/></text:span><text:span text:style-name="T720">$data</text:span><text:span text:style-name="T721"> = </text:span><text:span text:style-name="T722">"2022-06-08"</text:span><text:span text:style-name="T721">;<text:line-break/></text:span><text:span text:style-name="T720">$dataFormatada</text:span><text:span text:style-name="T721"> = </text:span><text:span text:style-name="T723">preg_replace</text:span><text:span text:style-name="T721">(</text:span><text:span text:style-name="T724">'/</text:span><text:span text:style-name="T721">^</text:span><text:span text:style-name="T724">([0-9]{4})-([0-9]{2})-([0-9]{2})/'</text:span><text:span text:style-name="T721">, </text:span><text:span text:style-name="T722">'\3/\2/\1'</text:span><text:span text:style-name="T721">, </text:span><text:span text:style-name="T720">$data</text:span><text:span text:style-name="T721">);</text:span></text:p>
        </text:list-item>
        <text:list-item>
          <text:p text:style-name="P205"><text:span text:style-name="T715">preg_replace_callback()</text:span>Substitui com base em uma função de callback.</text:p>
        </text:list-item>
        <text:list-item>
          <text:p text:style-name="P205"><text:span text:style-name="T715">preg_split()</text:span>Divide uma string usando uma regex como delimitador.</text:p>
        </text:list-item>
        <text:list-item>
          <text:p text:style-name="P205"><text:span text:style-name="T715">preg_grep()</text:span>Filtra um array, retornando apenas os elementos que correspondem à regex.</text:p>
        </text:list-item>
        <text:list-item>
          <text:p text:style-name="P205"><text:span text:style-name="T715">preg_last_error()</text:span>Retorna o último erro de regex, útil para debugging.</text:p>
        </text:list-item>
      </text:list>
      <text:h text:style-name="P206" text:outline-level="1"><text:span text:style-name="Source_20_Text"><text:span text:style-name="T725">HEREDOC e NOWDOC</text:span></text:span></text:h>
      <text:p text:style-name="P207"><text:span text:style-name="Source_20_Text"><text:span text:style-name="T726">S</text:span></text:span><text:span text:style-name="Source_20_Text"><text:span text:style-name="T501">ão sintaxes especiais para definir strings de múltiplas linhas no PHP, tornando o código mais legível e evitando a necessidade de concatenar várias strings ou usar quebras de linha \n </text:span></text:span></text:p>
      <text:p text:style-name="P208"><text:span text:style-name="Source_20_Text"><text:span text:style-name="T727">HEREDOC</text:span></text:span><text:span text:style-name="Source_20_Text"><text:span text:style-name="T501"> </text:span></text:span><text:span text:style-name="Source_20_Text"><text:span text:style-name="T726">p</text:span></text:span><text:span text:style-name="Source_20_Text"><text:span text:style-name="T501">ermite interpolação de variáveis e expressões dentro da string, assim como aspas </text:span></text:span><text:span text:style-name="Source_20_Text"><text:span text:style-name="T728">duplas</text:span></text:span><text:span text:style-name="Source_20_Text"><text:span text:style-name="T501"> </text:span></text:span><text:span text:style-name="Source_20_Text"><text:span text:style-name="T729">""</text:span></text:span><text:span text:style-name="Source_20_Text"><text:span text:style-name="T501"> </text:span></text:span></text:p>
      <text:p text:style-name="P207"><text:span text:style-name="Source_20_Text"><text:span text:style-name="T501">Regras do HEREDOC:</text:span></text:span></text:p>
      <text:list text:style-name="L16">
        <text:list-item>
          <text:p text:style-name="P209"><text:span text:style-name="Source_20_Text"><text:span text:style-name="T501">O identificador de início (&lt;&lt;&lt;</text:span></text:span><text:span text:style-name="Source_20_Text"><text:span text:style-name="T726">IDENTIFICADOR</text:span></text:span><text:span text:style-name="Source_20_Text"><text:span text:style-name="T501">) pode ter qualquer nome válido, mas não pode começar com números ou ter espaços.</text:span></text:span></text:p>
        </text:list-item>
        <text:list-item>
          <text:p text:style-name="P209"><text:span text:style-name="Source_20_Text"><text:span text:style-name="T501">A string pode conter variáveis e escape sequences (\n, \t, etc.).</text:span></text:span></text:p>
        </text:list-item>
        <text:list-item>
          <text:p text:style-name="P209"><text:span text:style-name="Source_20_Text"><text:span text:style-name="T501">Atenção! antes da versão PHP 7.3, o identificador de fim (</text:span></text:span><text:span text:style-name="Source_20_Text"><text:span text:style-name="T726">IDENTIFICADOR</text:span></text:span><text:span text:style-name="Source_20_Text"><text:span text:style-name="T501">;) </text:span></text:span><text:span text:style-name="Source_20_Text"><text:span text:style-name="T726">precisa</text:span></text:span><text:span text:style-name="Source_20_Text"><text:span text:style-name="T501"> estar sozinho na linha, sem espaços/tabs antes ou depois. </text:span></text:span></text:p>
        </text:list-item>
      </text:list>
      <text:p text:style-name="P207"><text:span text:style-name="Source_20_Text"><text:span text:style-name="T501">Quando usar HEREDOC? Textos longos formatados, como:</text:span></text:span></text:p>
      <text:list text:style-name="L17">
        <text:list-item>
          <text:p text:style-name="P210"><text:span text:style-name="Source_20_Text"><text:span text:style-name="T501">HTML com variáveis</text:span></text:span></text:p>
        </text:list-item>
        <text:list-item>
          <text:p text:style-name="P210"><text:span text:style-name="Source_20_Text"><text:span text:style-name="T501">Documentação gerada dinamicamente</text:span></text:span></text:p>
        </text:list-item>
        <text:list-item>
          <text:p text:style-name="P210"><text:span text:style-name="Source_20_Text"><text:span text:style-name="T501">Queries SQL em PHP</text:span></text:span></text:p>
        </text:list-item>
        <text:list-item>
          <text:p text:style-name="P210"><text:span text:style-name="Source_20_Text"><text:span text:style-name="T501">Strings multilinhas em geral</text:span></text:span></text:p>
        </text:list-item>
      </text:list>
      <text:p text:style-name="P207"><text:span text:style-name="Source_20_Text"><text:span text:style-name="T726">Exemplo:</text:span></text:span></text:p>
      <text:p text:style-name="P211"><text:span text:style-name="Source_20_Text"><text:span text:style-name="T730">$usuario</text:span></text:span><text:span text:style-name="Source_20_Text"><text:span text:style-name="T731"> = </text:span></text:span><text:span text:style-name="Source_20_Text"><text:span text:style-name="T732">"Magnífico Jhonny"</text:span></text:span><text:span text:style-name="Source_20_Text"><text:span text:style-name="T731">;<text:tab/><text:tab/><text:tab/></text:span></text:span></text:p>
      <text:p text:style-name="P212"><text:span text:style-name="T733">$html</text:span><text:span text:style-name="T734"> = </text:span><text:span text:style-name="T735">&lt;&lt;&lt;</text:span><text:span text:style-name="T734">HTML<text:tab/><text:tab/><text:tab/><text:tab/><text:tab/><text:line-break/></text:span><text:span text:style-name="T736">&lt;</text:span><text:span text:style-name="T735">div</text:span><text:span text:style-name="T736">&gt;<text:tab/><text:tab/><text:tab/><text:tab/><text:tab/><text:tab/><text:tab/><text:line-break/></text:span><text:span text:style-name="T734"> <text:s text:c="3"/></text:span><text:span text:style-name="T736">&lt;</text:span><text:span text:style-name="T735">h1</text:span><text:span text:style-name="T736">&gt;</text:span><text:span text:style-name="T734">Bem-vindo, </text:span><text:span text:style-name="T733">$usuario</text:span><text:span text:style-name="T734">!</text:span><text:span text:style-name="T736">&lt;/</text:span><text:span text:style-name="T735">h1</text:span><text:span text:style-name="T736">&gt;<text:tab/><text:tab/><text:line-break/></text:span><text:span text:style-name="T734"> <text:s text:c="3"/></text:span><text:span text:style-name="T736">&lt;</text:span><text:span text:style-name="T735">p</text:span><text:span text:style-name="T736">&gt;</text:span><text:span text:style-name="T734">Estamos felizes em tê-lo aqui.</text:span><text:span text:style-name="T736">&lt;/</text:span><text:span text:style-name="T735">p</text:span><text:span text:style-name="T736">&gt;<text:tab/></text:span></text:p>
      <text:p text:style-name="P143"><text:span text:style-name="T737">&lt;/</text:span><text:span text:style-name="T241">div</text:span><text:span text:style-name="T737">&gt;<text:tab/><text:tab/><text:tab/><text:tab/><text:tab/><text:tab/><text:tab/></text:span></text:p>
      <text:p text:style-name="P213">HTML;<text:tab/><text:tab/><text:tab/><text:tab/><text:tab/><text:tab/><text:tab/></text:p>
      <text:p text:style-name="P214"><text:span text:style-name="T422">echo</text:span><text:span text:style-name="T307"> </text:span><text:span text:style-name="T305">$html</text:span><text:span text:style-name="T307">;<text:tab/><text:tab/><text:tab/><text:tab/><text:tab/><text:tab/></text:span></text:p>
      <text:p text:style-name="P207"><text:span text:style-name="Source_20_Text"/></text:p>
      <text:p text:style-name="P207"><text:span text:style-name="Source_20_Text"><text:span text:style-name="T727">NOWDOC</text:span></text:span><text:span text:style-name="Source_20_Text"><text:span text:style-name="T501"> </text:span></text:span><text:span text:style-name="Source_20_Text"><text:span text:style-name="T726">é</text:span></text:span><text:span text:style-name="Source_20_Text"><text:span text:style-name="T501"> como HEREDOC, mas sem interpolação de variáveis. Funciona como strings com aspas </text:span></text:span><text:span text:style-name="Source_20_Text"><text:span text:style-name="T728">simples</text:span></text:span><text:span text:style-name="Source_20_Text"><text:span text:style-name="T501"> </text:span></text:span><text:span text:style-name="Source_20_Text"><text:span text:style-name="T729">''</text:span></text:span></text:p>
      <text:p text:style-name="P158"><text:span text:style-name="Source_20_Text"><text:span text:style-name="T501">Regras do NOWDOC:</text:span></text:span></text:p>
      <text:list text:style-name="L18">
        <text:list-item>
          <text:p text:style-name="P215"><text:span text:style-name="Source_20_Text"><text:span text:style-name="T501">O identificador de início deve estar entre aspas simples ('IDENTIFICADOR'). </text:span></text:span></text:p>
        </text:list-item>
        <text:list-item>
          <text:p text:style-name="P215"><text:span text:style-name="Source_20_Text"><text:span text:style-name="T501">Não há interpolação de variáveis ou escape sequences.</text:span></text:span></text:p>
        </text:list-item>
      </text:list>
      <text:p text:style-name="P158"><text:span text:style-name="Source_20_Text"><text:span text:style-name="T501">Quando usar NOWDOC? Textos fixos, como:</text:span></text:span></text:p>
      <text:list text:style-name="L19">
        <text:list-item>
          <text:p text:style-name="P216"><text:span text:style-name="Source_20_Text"><text:span text:style-name="T501">Códigos-fonte dentro de strings (ex: armazenar um trecho de código em uma variável) </text:span></text:span></text:p>
        </text:list-item>
        <text:list-item>
          <text:p text:style-name="P216"><text:span text:style-name="Source_20_Text"><text:span text:style-name="T501">Documentação interna sem necessidade de processamento</text:span></text:span></text:p>
        </text:list-item>
      </text:list>
      <text:p text:style-name="P158"><text:span text:style-name="Source_20_Text"/></text:p>
      <text:h text:style-name="P36" text:outline-level="1">Aula 18 e 19 – Vetores e Matrizes <text:span text:style-name="T738">(arrays)</text:span></text:h>
      <text:p text:style-name="P217"/>
      <text:p text:style-name="P218"><text:span text:style-name="Source_20_Text"><text:span text:style-name="T739">O </text:span></text:span><text:span text:style-name="Source_20_Text"><text:span text:style-name="T740">índice</text:span></text:span><text:span text:style-name="Source_20_Text"><text:span text:style-name="T739"> de variáveis composta começa em </text:span></text:span><text:span text:style-name="Source_20_Text"><text:span text:style-name="T741">zero</text:span></text:span><text:span text:style-name="Source_20_Text"><text:span text:style-name="T739"> (0).</text:span></text:span></text:p>
      <text:p text:style-name="P219"><text:span text:style-name="Source_20_Text"><text:span text:style-name="T739">No PHP:</text:span></text:span></text:p>
      <text:list text:style-name="L20">
        <text:list-item>
          <text:p text:style-name="P220"><text:span text:style-name="Source_20_Text"><text:span text:style-name="T501">não </text:span></text:span><text:span text:style-name="Source_20_Text"><text:span text:style-name="T742">é obrigatório a </text:span></text:span><text:span text:style-name="Source_20_Text"><text:span text:style-name="T501">declaração do tipo da variável, sejam elas simples ou compostas </text:span></text:span><text:span text:style-name="Source_20_Text"><text:span text:style-name="T743">(vetores)</text:span></text:span><text:span text:style-name="Source_20_Text"><text:span text:style-name="T501"> </text:span></text:span><text:span text:style-name="Source_20_Text"><text:span text:style-name="T500">pois a linguagem é din</text:span></text:span><text:span text:style-name="Source_20_Text"><text:span text:style-name="T742">a</text:span></text:span><text:span text:style-name="Source_20_Text"><text:span text:style-name="T500">mica</text:span></text:span><text:span text:style-name="Source_20_Text"><text:span text:style-name="T744">mente tipada</text:span></text:span><text:span text:style-name="Source_20_Text"><text:span text:style-name="T500">.</text:span></text:span></text:p>
        </text:list-item>
        <text:list-item>
          <text:p text:style-name="P220"><text:span text:style-name="Source_20_Text"><text:span text:style-name="T501">os </text:span></text:span><text:span text:style-name="Source_20_Text"><text:span text:style-name="T505">vetores são dinâmicos</text:span></text:span><text:span text:style-name="Source_20_Text"><text:span text:style-name="T501">, ou seja, alocam apenas o espaço de memória necessário para abrigar os dados pois um novo índice é criado a cada nova variável, portanto </text:span></text:span><text:span text:style-name="Source_20_Text"><text:span text:style-name="T505">não há necessidade de declarar o tamanho do vetor</text:span></text:span><text:span text:style-name="Source_20_Text"><text:span text:style-name="T501">, </text:span></text:span><text:span text:style-name="Source_20_Text"><text:span text:style-name="T745">diferente do Java</text:span></text:span><text:span text:style-name="Source_20_Text"><text:span text:style-name="T501">.</text:span></text:span></text:p>
        </text:list-item>
        <text:list-item>
          <text:p text:style-name="P220"><text:span text:style-name="Source_20_Text"><text:span text:style-name="T501">as variáveis compostas são </text:span></text:span><text:span text:style-name="Source_20_Text"><text:span text:style-name="T746">heterogêneas</text:span></text:span><text:span text:style-name="Source_20_Text"><text:span text:style-name="T501">, isto é, um mesmo vetor aceita tipos diferentes de variáveis.</text:span></text:span></text:p>
        </text:list-item>
        <text:list-item>
          <text:p text:style-name="P220"><text:span text:style-name="Source_20_Text"><text:span text:style-name="T747">É</text:span></text:span><text:span text:style-name="Source_20_Text"><text:span text:style-name="T501"> uma </text:span></text:span><text:span text:style-name="Source_20_Text"><text:span text:style-name="T728">estrutura híbrida</text:span></text:span><text:span text:style-name="Source_20_Text"><text:span text:style-name="T501">: ele se comporta como lista </text:span></text:span><text:span text:style-name="Source_20_Text"><text:span text:style-name="Strong_20_Emphasis"><text:span text:style-name="T504">e</text:span></text:span></text:span><text:span text:style-name="Source_20_Text"><text:span text:style-name="T501"> como mapa. O tipo </text:span></text:span><text:span text:style-name="Source_20_Text"><text:span text:style-name="T729">array</text:span></text:span><text:span text:style-name="Source_20_Text"><text:span text:style-name="T501"> é um tipo composto extremamente flexível e pode ser considerado um </text:span></text:span><text:span text:style-name="Source_20_Text"><text:span text:style-name="T729">HashMap</text:span></text:span><text:span text:style-name="Source_20_Text"><text:span text:style-name="T501"> e também é um tipo </text:span></text:span><text:span text:style-name="Source_20_Text"><text:span text:style-name="T729">iterable</text:span></text:span></text:p>
        </text:list-item>
      </text:list>
      <text:p text:style-name="P221"><text:span text:style-name="Source_20_Text"><text:span text:style-name="T501"/></text:span></text:p>
      <text:p text:style-name="P222"><text:span text:style-name="Source_20_Text"><text:span text:style-name="T501">$</text:span></text:span><text:span text:style-name="Source_20_Text"><text:span text:style-name="T729">vetor[] = 7;</text:span></text:span><text:span text:style-name="Source_20_Text"><text:span text:style-name="T501"><text:tab/>cria uma nova posição, </text:span></text:span><text:span text:style-name="Source_20_Text"><text:span text:style-name="T505">no final do vetor</text:span></text:span><text:span text:style-name="Source_20_Text"><text:span text:style-name="T501">, com o valor 7.<text:line-break/>A função </text:span></text:span><text:span text:style-name="T748">count</text:span><text:span text:style-name="T749">()</text:span><text:span text:style-name="T750"> </text:span><text:span text:style-name="Source_20_Text"><text:span text:style-name="T501">calcula a quantidade de elementos.<text:line-break/></text:span></text:span><text:span text:style-name="T547">Criando vetores:</text:span><text:span text:style-name="Source_20_Text"><text:span text:style-name="T501"> utilize a palavra reservada </text:span></text:span><text:span text:style-name="Source_20_Text"><text:span text:style-name="T751">array</text:span></text:span><text:span text:style-name="Source_20_Text"><text:span text:style-name="T752">()</text:span></text:span></text:p>
      <text:p text:style-name="P223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3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4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5"/>
      <text:p text:style-name="P223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53">Não confundir com </text:span><text:span text:style-name="T754">função flecha</text:span><text:span text:style-name="T753"> do Javascript</text:span></text:p>
      <text:p text:style-name="P226"><text:span text:style-name="T755">Iteração</text:span><text:span text:style-name="T214"> foreach()</text:span><text:span text:style-name="T756">{}</text:span>: <text:span text:style-name="T757">percorre todos os elementos do vetor. Exemplo:</text:span></text:p>
      <text:p text:style-name="P227"><text:span text:style-name="T758">foreach</text:span><text:span text:style-name="T759"> (</text:span><text:span text:style-name="T760">$c</text:span><text:span text:style-name="T759"> as </text:span><text:span text:style-name="T760">$valor</text:span><text:span text:style-name="T759">) { </text:span><text:span text:style-name="T761">//"Para cada elemento do vetor </text:span><text:span text:style-name="T762">$c</text:span><text:span text:style-name="T761"><text:tab/><text:line-break/>tratado como </text:span><text:span text:style-name="T762">$valor</text:span><text:span text:style-name="T761">, faça:"</text:span></text:p>
      <text:p text:style-name="P228"><text:span text:style-name="T761"><text:line-break/></text:span><text:span text:style-name="T763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9">Explicando o foreach:<text:span text:style-name="T764">“Para cada elemento do vetor </text:span><text:span text:style-name="T765">`$cad`</text:span><text:span text:style-name="T764">, nomeado como </text:span><text:span text:style-name="T765">`$campo`</text:span><text:span text:style-name="T764">, associado ao conteúdo </text:span><text:span text:style-name="T765">`$valor`</text:span><text:span text:style-name="T764">, </text:span><text:span text:style-name="T766">faça</text:span><text:span text:style-name="T764">…”</text:span></text:p>
      <text:p text:style-name="P230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67">Tecnicamente, não existem matrizes dentro do PHP, mas dá para contornar isso, trabalhando com vetores dentro de vetores. </text:span><text:span text:style-name="T768">(arrays multidimensionais)</text:span></text:p>
      <text:p text:style-name="P231"><text:span text:style-name="T769">Funç</text:span><text:span text:style-name="T770">ões</text:span><text:span text:style-name="T769"> para </text:span><text:span text:style-name="T771">ordenação de valores:</text:span></text:p>
      <text:p text:style-name="P232"><text:span text:style-name="T650">sort</text:span><text:span text:style-name="T651">(</text:span><text:span text:style-name="T653">$</text:span><text:span text:style-name="T772">arr</text:span><text:span text:style-name="T773">Dados</text:span><text:span text:style-name="T651">);</text:span> <text:span text:style-name="T767">ordena crescente o vetor e, consequentemente, </text:span><text:span text:style-name="T774">troca</text:span><text:span text:style-name="T775"> os índices dos valores.</text:span></text:p>
      <text:p text:style-name="P232"><text:span text:style-name="T776">rsort</text:span><text:span text:style-name="T777">(</text:span><text:span text:style-name="T778">$</text:span><text:span text:style-name="T772">arr</text:span><text:span text:style-name="T773">Dados</text:span><text:span text:style-name="T777">);</text:span><text:span text:style-name="T779"> </text:span><text:span text:style-name="T775">ordena decrescente o vetor, ou seja, de forma </text:span><text:span text:style-name="T780">r</text:span><text:span text:style-name="T781">eversa.</text:span></text:p>
      <text:p text:style-name="P232"><text:span text:style-name="T776">a</text:span><text:span text:style-name="T782">sort</text:span><text:span text:style-name="T783">(</text:span><text:span text:style-name="T784">$</text:span><text:span text:style-name="T772">arr</text:span><text:span text:style-name="T773">Dados</text:span><text:span text:style-name="T783">);</text:span><text:span text:style-name="T767"> ordena de forma crescente e</text:span><text:span text:style-name="T785"> </text:span><text:span text:style-name="T786">mantém a </text:span><text:span text:style-name="T787">a</text:span><text:span text:style-name="T786">ssociação</text:span><text:span text:style-name="T785"> de chave:valor</text:span><text:span text:style-name="T767">.</text:span></text:p>
      <text:p text:style-name="P232"><text:span text:style-name="T776">a</text:span><text:span text:style-name="T650">rsort</text:span><text:span text:style-name="T651">(</text:span><text:span text:style-name="T653">$</text:span><text:span text:style-name="T772">arr</text:span><text:span text:style-name="T773">Dados</text:span><text:span text:style-name="T651">);</text:span> <text:span text:style-name="T767">ordena de forma </text:span><text:span text:style-name="T788">r</text:span><text:span text:style-name="T767">eversa e </text:span><text:span text:style-name="T789">a</text:span><text:span text:style-name="T775">ssociativa(decrescente).</text:span></text:p>
      <text:p text:style-name="P233"><text:span text:style-name="T776">k</text:span><text:span text:style-name="T782">sort</text:span><text:span text:style-name="T783">(</text:span><text:span text:style-name="T784">$</text:span><text:span text:style-name="T772">arr</text:span><text:span text:style-name="T773">Dados</text:span><text:span text:style-name="T783">);</text:span><text:span text:style-name="T767"> ordena de forma crescente </text:span><text:span text:style-name="T790">pelo índice/chaves/</text:span><text:span text:style-name="T787">k</text:span><text:span text:style-name="T791">eys</text:span><text:span text:style-name="T767">.</text:span></text:p>
      <text:p text:style-name="P234"><text:span text:style-name="T776">k</text:span><text:span text:style-name="T792">r</text:span><text:span text:style-name="T782">sort</text:span><text:span text:style-name="T783">(</text:span><text:span text:style-name="T784">$</text:span><text:span text:style-name="T772">arr</text:span><text:span text:style-name="T773">Dados</text:span><text:span text:style-name="T783">);</text:span><text:span text:style-name="T793"> ordena </text:span><text:span text:style-name="T794">de maneira </text:span><text:span text:style-name="T795">r</text:span><text:span text:style-name="T794">eversa</text:span><text:span text:style-name="T796"> </text:span><text:span text:style-name="T794">e </text:span><text:span text:style-name="T797">através das </text:span><text:span text:style-name="T798">k</text:span><text:span text:style-name="T794">eys.</text:span></text:p>
      <text:p text:style-name="P235"><text:span text:style-name="T799">u</text:span><text:span text:style-name="T800">sort</text:span><text:span text:style-name="T801">(</text:span><text:span text:style-name="T802">$</text:span><text:span text:style-name="T803">arrDados</text:span><text:span text:style-name="T802">, ‘</text:span><text:span text:style-name="T804">callback’</text:span><text:span text:style-name="T801">);</text:span><text:span text:style-name="T805"> </text:span><text:span text:style-name="T806">o</text:span><text:span text:style-name="T805">rdena pelos valores utilizando </text:span><text:span text:style-name="T807">callback</text:span><text:span text:style-name="T805"> de comparação definida pelo </text:span><text:span text:style-name="T808">u</text:span><text:span text:style-name="T805">suário.</text:span></text:p>
      <text:p text:style-name="P235"><text:span text:style-name="T799">u</text:span><text:span text:style-name="T809">k</text:span><text:span text:style-name="T800">sort</text:span><text:span text:style-name="T801">(</text:span><text:span text:style-name="T802">$</text:span><text:span text:style-name="T803">arrDados</text:span><text:span text:style-name="T802">, ‘</text:span><text:span text:style-name="T804">callback’</text:span><text:span text:style-name="T801">);</text:span><text:span text:style-name="T805"> Ordena </text:span><text:span text:style-name="T807">os í</text:span><text:span text:style-name="T805">ndices, </text:span><text:span text:style-name="T810">mantendo os valores associados</text:span><text:span text:style-name="T805">. </text:span></text:p>
      <text:p text:style-name="P236"/>
      <text:p text:style-name="P237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8"/>
      <text:p text:style-name="P238"/>
      <text:p text:style-name="P238"/>
      <text:p text:style-name="P238"/>
      <text:p text:style-name="P238"/>
      <text:p text:style-name="P238"><text:line-break/></text:p>
      <text:p text:style-name="P239">Na Ordenação Associativa, <text:span text:style-name="T59">altera a ordem dos índices</text:span><text:span text:style-name="T811">, </text:span><text:span text:style-name="T812">mantendo-os em</text:span><text:span text:style-name="T59"> suas chaves</text:span>.</text:p>
      <text:p text:style-name="P240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40"/>
      <text:p text:style-name="P241"/>
      <text:p text:style-name="P242"/>
      <text:p text:style-name="P242"/>
      <text:p text:style-name="P242"/>
      <text:p text:style-name="P242"/>
      <text:p text:style-name="P242"/>
      <text:p text:style-name="P242"/>
      <text:p text:style-name="P243">Funções para <text:span text:style-name="T64">verificação de arrays</text:span>:</text:p>
      <text:list text:style-name="L21">
        <text:list-item>
          <text:p text:style-name="P244"><text:span text:style-name="Strong_20_Emphasis"><text:span text:style-name="T813">array_key_exists</text:span></text:span><text:span text:style-name="Strong_20_Emphasis"><text:span text:style-name="T814">()</text:span></text:span><text:span text:style-name="T815">: verifica se a chave existe</text:span></text:p>
        </text:list-item>
        <text:list-item>
          <text:p text:style-name="P244"><text:span text:style-name="Strong_20_Emphasis"><text:span text:style-name="T813">isset</text:span></text:span><text:span text:style-name="Strong_20_Emphasis"><text:span text:style-name="T814">()</text:span></text:span><text:span text:style-name="T815">: verifica se a chave existe e não é nula</text:span></text:p>
        </text:list-item>
        <text:list-item>
          <text:p text:style-name="P244"><text:span text:style-name="Strong_20_Emphasis"><text:span text:style-name="T813">in_array</text:span></text:span><text:span text:style-name="Strong_20_Emphasis"><text:span text:style-name="T814">()</text:span></text:span><text:span text:style-name="T815">: verifica se o valor existe</text:span></text:p>
        </text:list-item>
        <text:list-item>
          <text:p text:style-name="P244"><text:span text:style-name="Strong_20_Emphasis"><text:span text:style-name="T813">array_search</text:span></text:span><text:span text:style-name="Strong_20_Emphasis"><text:span text:style-name="T814">()</text:span></text:span><text:span text:style-name="T815">: retorna a chave de um valor</text:span></text:p>
        </text:list-item>
      </text:list>
      <text:p text:style-name="P245"><text:span text:style-name="T816">Funções para </text:span><text:span text:style-name="T817">gerenciamento</text:span><text:span text:style-name="T816"> de arrays:</text:span></text:p>
      <text:p text:style-name="P246"><text:span text:style-name="T818">$vetor</text:span><text:span text:style-name="T819">[] = </text:span><text:span text:style-name="T820">7</text:span><text:span text:style-name="T819">;             <text:tab/><text:tab/><text:tab/><text:tab/><text:tab/><text:tab/></text:span><text:span text:style-name="T821"><text:tab/><text:tab/><text:tab/></text:span></text:p>
      <text:p text:style-name="P247"><text:span text:style-name="T822">array_push</text:span><text:span text:style-name="T823">(</text:span><text:span text:style-name="T824">$vetor</text:span><text:span text:style-name="T823">, </text:span><text:span text:style-name="T825">7</text:span><text:span text:style-name="T823">);    </text:span><text:span text:style-name="T826">//adiciona elemento no final<text:tab/><text:tab/><text:tab/></text:span></text:p>
      <text:p text:style-name="P247"><text:span text:style-name="T822">array_unshift</text:span><text:span text:style-name="T823">(</text:span><text:span text:style-name="T824">$vetor</text:span><text:span text:style-name="T823">, </text:span><text:span text:style-name="T825">7</text:span><text:span text:style-name="T823">); </text:span><text:span text:style-name="T826">//adiciona elemento no início<text:tab/><text:tab/><text:tab/></text:span></text:p>
      <text:p text:style-name="P247"><text:span text:style-name="T822">array_shift</text:span><text:span text:style-name="T823">(</text:span><text:span text:style-name="T824">$vetor</text:span><text:span text:style-name="T823">);      </text:span><text:span text:style-name="T826">//elimina elemento no início<text:tab/><text:tab/><text:tab/></text:span></text:p>
      <text:p text:style-name="P247"><text:span text:style-name="T822">array_pop</text:span><text:span text:style-name="T823">(</text:span><text:span text:style-name="T824">$vetor</text:span><text:span text:style-name="T823">);        </text:span><text:span text:style-name="T826">//elimina elemento no final<text:tab/><text:tab/><text:tab/><text:tab/></text:span></text:p>
      <text:p text:style-name="P247"><text:span text:style-name="T822">unset</text:span><text:span text:style-name="T823">(</text:span><text:span text:style-name="T824">$vetor</text:span><text:span text:style-name="T823">[</text:span><text:span text:style-name="T825">1</text:span><text:span text:style-name="T823">]);         </text:span><text:span text:style-name="T826">//elimina elemento no índice especificado<text:tab/></text:span></text:p>
      <text:p text:style-name="P248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3"/>
      <text:p text:style-name="P249">Funções para <text:span text:style-name="T827">manipulação</text:span><text:span text:style-name="T64"> de arrays</text:span>:</text:p>
      <text:list text:continue-numbering="true" text:style-name="L21">
        <text:list-item>
          <text:p text:style-name="P250"><text:span text:style-name="T828">array_diff</text:span><text:span text:style-name="T829">()</text:span><text:span text:style-name="T815">: </text:span><text:span text:style-name="Strong_20_Emphasis"><text:span text:style-name="T4">retorna os valores do primeiro array que não existem nos outros arrays</text:span></text:span><text:span text:style-name="T830">, porém leva em consideração </text:span><text:span text:style-name="T831">somente o valor</text:span><text:span text:style-name="T830"> (e não as chaves)</text:span></text:p>
        </text:list-item>
        <text:list-item>
          <text:p text:style-name="P250"><text:span text:style-name="T828">array_diff_assoc</text:span><text:span text:style-name="T829">()</text:span><text:span text:style-name="T815">: </text:span><text:span text:style-name="Strong_20_Emphasis"><text:span text:style-name="T830">retorna os valores do primeiro array que não existem nos outros arrays</text:span></text:span><text:span text:style-name="T830">, considerando </text:span><text:span text:style-name="T831">tanto chave quanto valor</text:span></text:p>
        </text:list-item>
        <text:list-item>
          <text:p text:style-name="P250"><text:span text:style-name="Strong_20_Emphasis"><text:span text:style-name="T828">array_keys</text:span></text:span><text:span text:style-name="Strong_20_Emphasis"><text:span text:style-name="T829">()</text:span></text:span><text:span text:style-name="Strong_20_Emphasis"><text:span text:style-name="T830">: </text:span></text:span><text:span text:style-name="Strong_20_Emphasis"><text:span text:style-name="T832">r</text:span></text:span><text:span text:style-name="Strong_20_Emphasis"><text:span text:style-name="T830">etorna todas as chaves ou, </text:span></text:span><text:span text:style-name="Strong_20_Emphasis"><text:span text:style-name="T833">se aplicado o parâmetro de filtro,</text:span></text:span><text:span text:style-name="Strong_20_Emphasis"><text:span text:style-name="T830"> uma parte das chaves de um array</text:span></text:span></text:p>
        </text:list-item>
        <text:list-item>
          <text:p text:style-name="P251"><text:span text:style-name="Strong_20_Emphasis"><text:span text:style-name="T828">array_combine</text:span></text:span><text:span text:style-name="Strong_20_Emphasis"><text:span text:style-name="T829">()</text:span></text:span><text:span text:style-name="Strong_20_Emphasis"><text:span text:style-name="T833">: cria um array usando um array para as chaves e outro array para os valores</text:span></text:span></text:p>
        </text:list-item>
        <text:list-item>
          <text:p text:style-name="P252"><text:span text:style-name="Strong_20_Emphasis"><text:span text:style-name="T828">array_values</text:span></text:span><text:span text:style-name="Strong_20_Emphasis"><text:span text:style-name="T829">()</text:span></text:span><text:span text:style-name="Strong_20_Emphasis"><text:span text:style-name="T833">: retorna todos os valores de um array e indexa o array numericamente</text:span></text:span></text:p>
        </text:list-item>
        <text:list-item>
          <text:p text:style-name="P252"><text:span text:style-name="Strong_20_Emphasis"><text:span text:style-name="T828">array_flip</text:span></text:span><text:span text:style-name="Strong_20_Emphasis"><text:span text:style-name="T829">()</text:span></text:span><text:span text:style-name="Strong_20_Emphasis"><text:span text:style-name="T833">: troca as chaves com os seus valores</text:span></text:span></text:p>
        </text:list-item>
        <text:list-item>
          <text:p text:style-name="P253"><text:span text:style-name="Strong_20_Emphasis"><text:span text:style-name="T828">array_merge</text:span></text:span><text:span text:style-name="Strong_20_Emphasis"><text:span text:style-name="T829">()</text:span></text:span><text:span text:style-name="Strong_20_Emphasis"><text:span text:style-name="T834">: funde arrays, incrementando ou sobrescrevendo valores. Tem 2 comportamentos:</text:span></text:span></text:p>
          <text:list>
            <text:list-item>
              <text:p text:style-name="P253"><text:span text:style-name="Strong_20_Emphasis"><text:span text:style-name="T834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3"><text:span text:style-name="Strong_20_Emphasis"><text:span text:style-name="T834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4"><text:span text:style-name="Strong_20_Emphasis"><text:span text:style-name="T828">list()</text:span></text:span><text:span text:style-name="Strong_20_Emphasis"><text:span text:style-name="T835">: atribui uma lista de variáveis em uma única operação. </text:span></text:span><text:span text:style-name="Strong_20_Emphasis"><text:span text:style-name="T836">Exemplo:<text:line-break/></text:span></text:span><text:span text:style-name="Strong_20_Emphasis"><text:span text:style-name="T837">$result</text:span></text:span><text:span text:style-name="Strong_20_Emphasis"><text:span text:style-name="T838"> = </text:span></text:span><text:span text:style-name="Strong_20_Emphasis"><text:span text:style-name="T837">$pdo</text:span></text:span><text:span text:style-name="Strong_20_Emphasis"><text:span text:style-name="T838">-&gt;</text:span></text:span><text:span text:style-name="Strong_20_Emphasis"><text:span text:style-name="T839">query</text:span></text:span><text:span text:style-name="Strong_20_Emphasis"><text:span text:style-name="T838">(</text:span></text:span><text:span text:style-name="Strong_20_Emphasis"><text:span text:style-name="T840">"</text:span></text:span><text:span text:style-name="Strong_20_Emphasis"><text:span text:style-name="T841">SELECT</text:span></text:span><text:span text:style-name="Strong_20_Emphasis"><text:span text:style-name="T840"> id, </text:span></text:span><text:span text:style-name="Strong_20_Emphasis"><text:span text:style-name="T841">name</text:span></text:span><text:span text:style-name="Strong_20_Emphasis"><text:span text:style-name="T840"> </text:span></text:span><text:span text:style-name="Strong_20_Emphasis"><text:span text:style-name="T841">FROM</text:span></text:span><text:span text:style-name="Strong_20_Emphasis"><text:span text:style-name="T840"> employees"</text:span></text:span><text:span text:style-name="Strong_20_Emphasis"><text:span text:style-name="T838">);<text:line-break/></text:span></text:span><text:span text:style-name="T842">list</text:span><text:span text:style-name="T843">(</text:span><text:span text:style-name="T844">$id</text:span><text:span text:style-name="T843">, </text:span><text:span text:style-name="T844">$name</text:span><text:span text:style-name="T843">) = </text:span><text:span text:style-name="T844">$result</text:span><text:span text:style-name="T843">→f</text:span><text:span text:style-name="T842">etch(</text:span><text:span text:style-name="T845">PD</text:span><text:span text:style-name="T846">O:</text:span><text:span text:style-name="T843">:FETCH_NUM);<text:line-break/></text:span><text:span text:style-name="Strong_20_Emphasis"><text:span text:style-name="T836">A partir do PHP 7.1, é possível usar a sintaxe mais resumida para </text:span></text:span><text:span text:style-name="Strong_20_Emphasis"><text:span text:style-name="T847">atribuição por array desestruturado</text:span></text:span><text:span text:style-name="Strong_20_Emphasis"><text:span text:style-name="T836">: </text:span></text:span><text:span text:style-name="Strong_20_Emphasis"><text:span text:style-name="T838">[</text:span></text:span><text:span text:style-name="Strong_20_Emphasis"><text:span text:style-name="T837">$id</text:span></text:span><text:span text:style-name="Strong_20_Emphasis"><text:span text:style-name="T838">, </text:span></text:span><text:span text:style-name="Strong_20_Emphasis"><text:span text:style-name="T837">$name</text:span></text:span><text:span text:style-name="Strong_20_Emphasis"><text:span text:style-name="T838">] = </text:span></text:span><text:span text:style-name="Strong_20_Emphasis"><text:span text:style-name="T837">$result</text:span></text:span><text:span text:style-name="Strong_20_Emphasis"><text:span text:style-name="T838">→f</text:span></text:span><text:span text:style-name="Strong_20_Emphasis"><text:span text:style-name="T839">etch(</text:span></text:span><text:span text:style-name="Strong_20_Emphasis"><text:span text:style-name="T848">PDO:</text:span></text:span><text:span text:style-name="Strong_20_Emphasis"><text:span text:style-name="T838">:FETCH_NUM);<text:line-break/></text:span></text:span></text:p>
        </text:list-item>
        <text:list-item>
          <text:p text:style-name="P255"><text:span text:style-name="Strong_20_Emphasis"><text:span text:style-name="T813">extract</text:span></text:span><text:span text:style-name="Strong_20_Emphasis"><text:span text:style-name="T849">()</text:span></text:span><text:span text:style-name="Strong_20_Emphasis"><text:span text:style-name="T835">: Cria variáveis a partir de um array associativo, </text:span></text:span><text:span text:style-name="Strong_20_Emphasis"><text:span text:style-name="T850">tranformando </text:span></text:span><text:span text:style-name="Strong_20_Emphasis"><text:span text:style-name="T835">as chaves do array em variáveis e atribui os valores correspondentes.</text:span></text:span></text:p>
        </text:list-item>
        <text:list-item>
          <text:p text:style-name="P255"><text:span text:style-name="Strong_20_Emphasis"><text:span text:style-name="T813">compact</text:span></text:span><text:span text:style-name="Strong_20_Emphasis"><text:span text:style-name="T849">()</text:span></text:span><text:span text:style-name="Strong_20_Emphasis"><text:span text:style-name="T835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56">Objetos <text:span text:style-name="T851">podem </text:span><text:span text:style-name="T852">ser criado</text:span><text:span text:style-name="T853">s</text:span><text:span text:style-name="T852"> normalmente como resultado de um </text:span><text:span text:style-name="T854">type cast</text:span><text:span text:style-name="T852"> a partir de um array. Transformando as chaves do array em nomes de propriedades. Este tipo de cast vai resultar em um tipo </text:span><text:span text:style-name="Source_20_Text"><text:span text:style-name="T414">object(stdClass)</text:span></text:span><text:span text:style-name="T852">.</text:span></text:p>
      <text:p text:style-name="P257"><text:span text:style-name="T244">$obj</text:span><text:span text:style-name="T242"> = (</text:span><text:span text:style-name="T241">object</text:span><text:span text:style-name="T242">) [</text:span><text:span text:style-name="T421">'a'</text:span><text:span text:style-name="T242"> =&gt; </text:span><text:span text:style-name="T423">1</text:span><text:span text:style-name="T242">];<text:tab/></text:span></text:p>
      <text:p text:style-name="P258">// $obj é object(stdClass)<text:tab/></text:p>
      <text:p text:style-name="P258"><text:span text:style-name="Strong_20_Emphasis"><text:span text:style-name="T855">// $obj-&gt;a é int(1)<text:tab/><text:tab/></text:span></text:span></text:p>
      <text:h text:style-name="P259" text:outline-level="1" text:is-list-header="true"><text:span text:style-name="T5">S</text:span><text:span text:style-name="T856">paceship</text:span><text:span text:style-name="T5"> Operator</text:span></text:h>
      <text:p text:style-name="P260"><text:span text:style-name="T857">I</text:span><text:span text:style-name="T5">ntroduzido na versão </text:span><text:span text:style-name="Strong_20_Emphasis"><text:span text:style-name="T5">7.</text:span></text:span><text:span text:style-name="Strong_20_Emphasis"><text:span text:style-name="T856">0</text:span></text:span><text:span text:style-name="T5">, é representado por </text:span><text:span text:style-name="T858">&lt;=&gt;</text:span><text:span text:style-name="T5"> para comparar dois valores e retornar:</text:span></text:p>
      <text:list text:style-name="L22">
        <text:list-item>
          <text:p text:style-name="P261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2"><text:span text:style-name="T859">0</text:span> se ambos forem iguais</text:p>
        </text:list-item>
        <text:list-item>
          <text:p text:style-name="P261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3">Esse operador é útil para ordenações e comparações. <text:span text:style-name="T859">Exemplo:</text:span></text:p>
      <text:p text:style-name="P264"><text:span text:style-name="T860">$numeros</text:span><text:span text:style-name="T861"> = [</text:span><text:span text:style-name="T862">3</text:span><text:span text:style-name="T861">, </text:span><text:span text:style-name="T862">1</text:span><text:span text:style-name="T861">, </text:span><text:span text:style-name="T862">4</text:span><text:span text:style-name="T861">, </text:span><text:span text:style-name="T862">1</text:span><text:span text:style-name="T861">, </text:span><text:span text:style-name="T862">5</text:span><text:span text:style-name="T861">, </text:span><text:span text:style-name="T862">9</text:span><text:span text:style-name="T861">];<text:tab/><text:tab/><text:tab/><text:tab/><text:tab/><text:tab/><text:tab/><text:tab/><text:tab/><text:tab/></text:span></text:p>
      <text:p text:style-name="P265"><text:span text:style-name="T243">usort</text:span><text:span text:style-name="T242">(</text:span><text:span text:style-name="T244">$numeros</text:span><text:span text:style-name="T242">, </text:span><text:span text:style-name="T241">fn</text:span><text:span text:style-name="T242">(</text:span><text:span text:style-name="T244">$a</text:span><text:span text:style-name="T242">, </text:span><text:span text:style-name="T244">$b</text:span><text:span text:style-name="T242">) =&gt; </text:span><text:span text:style-name="T244">$a</text:span><text:span text:style-name="T242"> &lt;=&gt; </text:span><text:span text:style-name="T244">$b</text:span><text:span text:style-name="T242">); </text:span><text:span text:style-name="T245">// Ordena em ordem crescente<text:tab/></text:span></text:p>
      <text:p text:style-name="P266"><text:span text:style-name="T723">print_r</text:span><text:span text:style-name="T721">(</text:span><text:span text:style-name="T720">$numeros</text:span><text:span text:style-name="T721">); </text:span><text:span text:style-name="T863">// Saída: [1, </text:span><text:span text:style-name="T864">1, 3, 4, 5, 9]<text:tab/><text:tab/><text:tab/><text:tab/><text:tab/><text:tab/></text:span></text:p>
      <text:h text:style-name="P267" text:outline-level="1" text:is-list-header="true"><text:span text:style-name="T865">Spread </text:span><text:span text:style-name="T866">(ou Splat)</text:span><text:span text:style-name="T865"> Operator </text:span><text:span text:style-name="T866">ou Argument unpacking</text:span></text:h>
      <text:p text:style-name="P158"><text:span text:style-name="T867">Unpacking</text:span><text:span text:style-name="T857"> é a capacidade de passar elementos de um array como argumentos individuais para uma função ou método. </text:span><text:span text:style-name="T868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69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70">desempacotamento</text:span><text:span text:style-name="T5"> e manipulação dinâmica de dados. </text:span></text:p>
      <text:list text:style-name="L23">
        <text:list-item>
          <text:p text:style-name="P268"><text:span text:style-name="T716">P</text:span><text:span text:style-name="T871">ermite </text:span><text:span text:style-name="T716">passar um </text:span><text:span text:style-name="T872">número variável de argumentos para</text:span><text:span text:style-name="T64"> funções</text:span>:</text:p>
        </text:list-item>
      </text:list>
      <text:p text:style-name="P143"><text:span text:style-name="T241">function</text:span><text:span text:style-name="T242"> </text:span><text:span text:style-name="T243">soma</text:span><text:span text:style-name="T242">(</text:span><text:span text:style-name="T241">int</text:span><text:span text:style-name="T242"> </text:span><text:span text:style-name="T244">$a</text:span><text:span text:style-name="T242">, </text:span><text:span text:style-name="T241">int</text:span><text:span text:style-name="T242"> </text:span><text:span text:style-name="T244">$b</text:span><text:span text:style-name="T242">, </text:span><text:span text:style-name="T241">int</text:span><text:span text:style-name="T242"> </text:span><text:span text:style-name="T244">$c</text:span><text:span text:style-name="T242">): </text:span><text:span text:style-name="T241">int</text:span><text:span text:style-name="T242"> {<text:tab/></text:span></text:p>
      <text:p text:style-name="P143"><text:span text:style-name="T420"><text:s text:c="2"/>return</text:span><text:span text:style-name="T242"> </text:span><text:span text:style-name="T244">$a</text:span><text:span text:style-name="T242"> + </text:span><text:span text:style-name="T244">$b</text:span><text:span text:style-name="T242"> + </text:span><text:span text:style-name="T244">$c</text:span><text:span text:style-name="T242">;<text:tab/><text:tab/><text:tab/><text:tab/><text:tab/></text:span></text:p>
      <text:p text:style-name="P144">}<text:tab/><text:tab/><text:tab/><text:tab/><text:tab/><text:tab/><text:tab/><text:tab/></text:p>
      <text:p text:style-name="P143"><text:span text:style-name="T244">$valores</text:span><text:span text:style-name="T242"> = [</text:span><text:span text:style-name="T423">1</text:span><text:span text:style-name="T242">, </text:span><text:span text:style-name="T423">2</text:span><text:span text:style-name="T242">, </text:span><text:span text:style-name="T423">3</text:span><text:span text:style-name="T242">];<text:tab/><text:tab/><text:tab/><text:tab/><text:tab/></text:span></text:p>
      <text:p text:style-name="P269"><text:span text:style-name="T422">echo</text:span><text:span text:style-name="T307"> </text:span><text:span text:style-name="T422">soma</text:span><text:span text:style-name="T307">(...</text:span><text:span text:style-name="T305">$valores</text:span><text:span text:style-name="T307">); </text:span><text:span text:style-name="T309">// Resultado: 6<text:tab/><text:tab/></text:span></text:p>
      <text:list text:style-name="L24">
        <text:list-item>
          <text:p text:style-name="P270"><text:span text:style-name="T873">T</text:span>ambém pode ser usado para <text:span text:style-name="T874">desempacotar array</text:span><text:span text:style-name="T871"> em outro array</text:span>:</text:p>
        </text:list-item>
      </text:list>
      <text:p text:style-name="P271"><text:span text:style-name="T244">$array1</text:span><text:span text:style-name="T242"> = [</text:span><text:span text:style-name="T423">1</text:span><text:span text:style-name="T242">, </text:span><text:span text:style-name="T423">2</text:span><text:span text:style-name="T242">, </text:span><text:span text:style-name="T423">3</text:span><text:span text:style-name="T242">];<text:tab/><text:tab/><text:tab/><text:tab/><text:tab/></text:span></text:p>
      <text:p text:style-name="P269"><text:span text:style-name="T305">$array2</text:span><text:span text:style-name="T307"> = [</text:span><text:span text:style-name="T308">4</text:span><text:span text:style-name="T307">, </text:span><text:span text:style-name="T308">5</text:span><text:span text:style-name="T307">, ...</text:span><text:span text:style-name="T305">$array1</text:span><text:span text:style-name="T307">, </text:span><text:span text:style-name="T308">6</text:span><text:span text:style-name="T307">];<text:tab/><text:tab/><text:tab/></text:span></text:p>
      <text:p text:style-name="P143"><text:span text:style-name="T243">print_r</text:span><text:span text:style-name="T242">(</text:span><text:span text:style-name="T244">$array2</text:span><text:span text:style-name="T242">);<text:tab/><text:tab/><text:tab/><text:tab/><text:tab/><text:tab/></text:span></text:p>
      <text:p text:style-name="P272">/* Resultado:<text:tab/><text:tab/><text:tab/><text:tab/><text:tab/><text:tab/></text:p>
      <text:p text:style-name="P272">Array<text:tab/>(<text:tab/><text:tab/><text:tab/><text:tab/><text:tab/><text:tab/><text:tab/></text:p>
      <text:p text:style-name="P272"><text:s text:c="2"/>[0] =&gt; 4<text:tab/><text:tab/><text:tab/><text:tab/><text:tab/><text:tab/><text:tab/></text:p>
      <text:p text:style-name="P272"><text:s text:c="2"/>[1] =&gt; 5<text:tab/><text:tab/><text:tab/><text:tab/><text:tab/><text:tab/><text:tab/></text:p>
      <text:p text:style-name="P272"><text:s text:c="2"/>[2] =&gt; 1<text:tab/><text:tab/><text:tab/><text:tab/><text:tab/><text:tab/><text:tab/></text:p>
      <text:p text:style-name="P272"><text:s text:c="2"/>[3] =&gt; 2<text:tab/><text:tab/><text:tab/><text:tab/><text:tab/><text:tab/><text:tab/></text:p>
      <text:p text:style-name="P272"><text:s text:c="2"/>[4] =&gt; 3<text:tab/><text:tab/><text:tab/><text:tab/><text:tab/><text:tab/><text:tab/></text:p>
      <text:p text:style-name="P272"><text:s text:c="2"/>[5] =&gt; 6<text:tab/><text:tab/><text:tab/><text:tab/><text:tab/><text:tab/><text:tab/></text:p>
      <text:p text:style-name="P272">) */<text:tab/><text:tab/><text:tab/><text:tab/><text:tab/><text:tab/><text:tab/><text:tab/></text:p>
      <text:h text:style-name="P273" text:outline-level="1" text:is-list-header="true"><text:soft-page-break/><text:span text:style-name="Strong_20_Emphasis"><text:span text:style-name="T725">Tipagem de Argumentos Variádicos</text:span></text:span></text:h>
      <text:p text:style-name="Text_20_body">Permite que uma <text:span text:style-name="T64">função aceite </text:span><text:span text:style-name="Strong_20_Emphasis"><text:span text:style-name="T64">um número indefinido de argumentos</text:span></text:span><text:span text:style-name="T64"> do </text:span><text:span text:style-name="Strong_20_Emphasis"><text:span text:style-name="T64">mesmo tipo</text:span></text:span><text:span text:style-name="T56">. Isso é feito com </text:span><text:span text:style-name="Source_20_Text"><text:span text:style-name="T223">...$variavel</text:span></text:span><text:span text:style-name="T56"> após a definição</text:span> de tipo. <text:span text:style-name="T875">Exemplo:</text:span></text:p>
      <text:p text:style-name="P274"><text:span text:style-name="T241">function</text:span><text:span text:style-name="T242"> </text:span><text:span text:style-name="T243">adicionarProdutos</text:span><text:span text:style-name="T242">(</text:span><text:span text:style-name="T246">Produto</text:span><text:span text:style-name="T242"> ...</text:span><text:span text:style-name="T244">$produtos</text:span><text:span text:style-name="T242">) {                       <text:s/></text:span></text:p>
      <text:p text:style-name="P274"><text:span text:style-name="T420"><text:tab/>foreach</text:span><text:span text:style-name="T242"> (</text:span><text:span text:style-name="T244">$produtos</text:span><text:span text:style-name="T242"> as </text:span><text:span text:style-name="T244">$produto</text:span><text:span text:style-name="T242">) {                                   </text:span></text:p>
      <text:p text:style-name="P275"><text:tab/><text:tab/>// Aqui você tem certeza de que cada item é um Produto       <text:s/></text:p>
      <text:p text:style-name="P275"><text:tab/><text:tab/>// O ...$produtos aceita N argumentos, todos do tipo Produto. </text:p>
      <text:p text:style-name="P276"><text:tab/>}                                                                   </text:p>
      <text:p text:style-name="P276">}                                                                       <text:s text:c="2"/></text:p>
      <text:p text:style-name="P276"/>
      <text:h text:style-name="P277" text:outline-level="1" text:is-list-header="true">Closure<text:span text:style-name="T876">s</text:span></text:h>
      <text:p text:style-name="P278"><text:span text:style-name="T876">S</text:span>ão <text:span text:style-name="T876">funções</text:span> <text:span text:style-name="T876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876">Características:</text:span></text:p>
      <text:list text:style-name="L25">
        <text:list-item>
          <text:p text:style-name="P279"><text:span text:style-name="Strong_20_Emphasis">Pode</text:span><text:span text:style-name="Strong_20_Emphasis"><text:span text:style-name="T876">m</text:span></text:span><text:span text:style-name="Strong_20_Emphasis"> ser atribuída a uma variável;</text:span></text:p>
        </text:list-item>
        <text:list-item>
          <text:p text:style-name="P279"><text:span text:style-name="Strong_20_Emphasis">Não tem nome</text:span> (é anônima);</text:p>
        </text:list-item>
        <text:list-item>
          <text:p text:style-name="P280"><text:span text:style-name="Strong_20_Emphasis">Pode</text:span><text:span text:style-name="Strong_20_Emphasis"><text:span text:style-name="T876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876">Para </text:span>acessar <text:span text:style-name="T876">essas </text:span>variáveis <text:span text:style-name="T876">é necessário a </text:span>palavra-chave <text:span text:style-name="Source_20_Text"><text:span text:style-name="T223">use</text:span></text:span>.</text:p>
        </text:list-item>
      </text:list>
      <text:p text:style-name="P281"><text:span text:style-name="T876">S</text:span><text:span text:style-name="T851">intaxe básica:</text:span></text:p>
      <text:p text:style-name="P282"><text:span text:style-name="T244">$taxa</text:span><text:span text:style-name="T242"> = </text:span><text:span text:style-name="T423">0.2</text:span><text:span text:style-name="T242">;<text:tab/><text:tab/><text:tab/><text:tab/><text:tab/><text:tab/></text:span></text:p>
      <text:p text:style-name="P283"><text:span text:style-name="T244">$calcular</text:span><text:span text:style-name="T242"> = </text:span><text:span text:style-name="T241">function</text:span><text:span text:style-name="T242">(</text:span><text:span text:style-name="T244">$valor</text:span><text:span text:style-name="T242">) </text:span><text:span text:style-name="T241">use</text:span><text:span text:style-name="T242"> (</text:span><text:span text:style-name="T244">$taxa</text:span><text:span text:style-name="T242">) {<text:tab/></text:span></text:p>
      <text:p text:style-name="P283"><text:span text:style-name="T420"><text:tab/>return</text:span><text:span text:style-name="T242"> </text:span><text:span text:style-name="T244">$valor</text:span><text:span text:style-name="T242"> * </text:span><text:span text:style-name="T244">$taxa</text:span><text:span text:style-name="T242">;<text:tab/><text:tab/><text:tab/></text:span></text:p>
      <text:p text:style-name="P284">};<text:tab/><text:tab/><text:tab/><text:tab/><text:tab/><text:tab/><text:tab/></text:p>
      <text:p text:style-name="P283"><text:span text:style-name="T243">echo</text:span><text:span text:style-name="T242"> </text:span><text:span text:style-name="T244">$calcular</text:span><text:span text:style-name="T242">(</text:span><text:span text:style-name="T423">100</text:span><text:span text:style-name="T242">); </text:span><text:span text:style-name="T245">// 20<text:tab/><text:tab/><text:tab/></text:span></text:p>
      <text:h text:style-name="P285" text:outline-level="1" text:is-list-header="true">Arrow Functions</text:h>
      <text:p text:style-name="P286"><text:span text:style-name="T877">F</text:span>unções de seta são uma forma <text:span text:style-name="Strong_20_Emphasis">concisa e moderna</text:span> de declarar funções anônimas (closures). <text:span text:style-name="T877">E</text:span>las simplificam a sintaxe quando <text:span text:style-name="T877">é</text:span> precis<text:span text:style-name="T877">o</text:span> passar uma função rápida, especialmente como callback.<text:line-break/><text:span text:style-name="T877">Sintaxe básica:</text:span></text:p>
      <text:p text:style-name="P287"><text:span text:style-name="T244">$dobro</text:span><text:span text:style-name="T242"> = </text:span><text:span text:style-name="T241">fn</text:span><text:span text:style-name="T242">(</text:span><text:span text:style-name="T244">$n</text:span><text:span text:style-name="T242">) =&gt; </text:span><text:span text:style-name="T244">$n</text:span><text:span text:style-name="T242"> * </text:span><text:span text:style-name="T423">2</text:span><text:span text:style-name="T242">;<text:tab/></text:span></text:p>
      <text:p text:style-name="P283"><text:span text:style-name="T243">echo</text:span><text:span text:style-name="T242"> </text:span><text:span text:style-name="T244">$dobro</text:span><text:span text:style-name="T242">(</text:span><text:span text:style-name="T423">5</text:span><text:span text:style-name="T242">); </text:span><text:span text:style-name="T245">// 10<text:tab/><text:tab/></text:span></text:p>
      <text:p text:style-name="P288">Características principais:</text:p>
      <text:list text:style-name="L26">
        <text:list-item>
          <text:p text:style-name="P289"><text:span text:style-name="T877">Curta e expressiva: u</text:span>sa <text:span text:style-name="Source_20_Text"><text:span text:style-name="T223">fn</text:span></text:span> ao invés de <text:span text:style-name="Source_20_Text"><text:span text:style-name="T182">function</text:span></text:span>, e <text:span text:style-name="Source_20_Text"><text:span text:style-name="T223">=&gt;</text:span></text:span> para retornar um valor</text:p>
        </text:list-item>
        <text:list-item>
          <text:p text:style-name="P290">Retorno implícito: o valor da expressão é retornado automaticamente (não precisa usar <text:span text:style-name="T182">return</text:span>)</text:p>
        </text:list-item>
        <text:list-item>
          <text:p text:style-name="P290">O uso da palavra-chave <text:span text:style-name="Source_20_Text"><text:span text:style-name="T182">fn</text:span></text:span> é obrigatório </text:p>
        </text:list-item>
        <text:list-item>
          <text:p text:style-name="P290">Captura automática de variáveis: diferente de closure, adiciona implicitamente a cláusula <text:span text:style-name="T182">use</text:span></text:p>
        </text:list-item>
        <text:list-item>
          <text:p text:style-name="P290">Não suporta múltiplas instruções</text:p>
        </text:list-item>
      </text:list>
      <text:h text:style-name="P36" text:outline-level="1" text:is-list-header="true">Variáveis de Sessão</text:h>
      <text:p text:style-name="P291"/>
      <text:p text:style-name="P292"><text:span text:style-name="T878">A</text:span><text:span text:style-name="T879"> variável superglobal </text:span><text:span text:style-name="T880">$_SESSION</text:span><text:span text:style-name="T879"> é um array associativo que contém variáveis de sessão que ficam disponíveis para o script atual e para as próximas páginas acessadas por um usuário.</text:span></text:p>
      <text:p text:style-name="P293"/>
      <text:p text:style-name="P293"><text:span text:style-name="T59">Aplicação</text:span>: armazenar variável que se mantenha durante o acesso de várias páginas de um site.</text:p>
      <text:p text:style-name="P293"/>
      <text:p text:style-name="P294"><text:span text:style-name="T878">A</text:span><text:span text:style-name="T879">s variáveis de sessão correspondem a um dos possíveis itens das chamadas </text:span><text:span text:style-name="T881">variáveis superglobais</text:span><text:span text:style-name="T879">.</text:span></text:p>
      <text:p text:style-name="P294"/>
      <text:p text:style-name="P294"/>
      <text:h text:style-name="P295" text:outline-level="1" text:is-list-header="true">Variáveis <text:span text:style-name="T882">Superglobais</text:span></text:h>
      <text:h text:style-name="P295" text:outline-level="1"><text:span text:style-name="T879"><text:line-break/></text:span><text:span text:style-name="T878">S</text:span><text:span text:style-name="T883">ão var</text:span><text:span text:style-name="T879">iáveis pré-definidas, promovidas pelo ambiente PHP, acessíveis em quaisquer pontos de aplicação, estruturadas em arrays associativos:</text:span></text:h>
      <text:list text:style-name="L27">
        <text:list-item>
          <text:p text:style-name="P296">$GLOBALS</text:p>
        </text:list-item>
        <text:list-item>
          <text:p text:style-name="P296">$_SERVER</text:p>
        </text:list-item>
        <text:list-item>
          <text:p text:style-name="P296">$_GET</text:p>
        </text:list-item>
        <text:list-item>
          <text:p text:style-name="P296">$_POST</text:p>
        </text:list-item>
        <text:list-item>
          <text:p text:style-name="P296">$_FILES</text:p>
        </text:list-item>
        <text:list-item>
          <text:p text:style-name="P296">$_COOKIE</text:p>
        </text:list-item>
        <text:list-item>
          <text:p text:style-name="P296">$_SESSION</text:p>
        </text:list-item>
        <text:list-item>
          <text:p text:style-name="P296">$_REQUEST</text:p>
        </text:list-item>
        <text:list-item>
          <text:p text:style-name="P296">$_ENV</text:p>
        </text:list-item>
      </text:list>
      <text:p text:style-name="P297"/>
      <text:h text:style-name="P298" text:outline-level="1" text:is-list-header="true">Web Storage</text:h>
      <text:p text:style-name="P299"><text:span text:style-name="T884">E</text:span><text:span text:style-name="T885">xistem dois tipos de </text:span><text:span text:style-name="T886">objetos</text:span><text:span text:style-name="T885"> que permitem o </text:span><text:span text:style-name="T887">armazenamento de dados localmente</text:span><text:span text:style-name="T885"> no cliente (memória cache):</text:span></text:p>
      <text:list text:style-name="L28">
        <text:list-item>
          <text:p text:style-name="P300"><text:span text:style-name="T888">localStorage</text:span><text:span text:style-name="T879">: fica armazenada no computador do cliente (não expira)</text:span></text:p>
        </text:list-item>
        <text:list-item>
          <text:p text:style-name="P300"><text:span text:style-name="T888">sessionStorage</text:span><text:span text:style-name="T879">: e</text:span><text:span text:style-name="T889">x</text:span><text:span text:style-name="T879">pira assim que a aba do navegador é fechada<text:line-break/></text:span></text:p>
        </text:list-item>
      </text:list>
      <text:h text:style-name="P301" text:outline-level="1" text:is-list-header="true"><text:span text:style-name="Source_20_Text"><text:span text:style-name="T890">Fuso-Horários</text:span></text:span></text:h>
      <text:p text:style-name="P302"><text:span text:style-name="T891">Ao </text:span><text:span text:style-name="T883">inpecionar com</text:span><text:span text:style-name="T891"> </text:span><text:span text:style-name="T892">var_dump()</text:span><text:span text:style-name="T891"> um objeto da clas</text:span><text:span text:style-name="T893">s</text:span><text:span text:style-name="T891">e DateTime, podem ser apresentados </text:span><text:span text:style-name="T894">3 tipos</text:span><text:span text:style-name="T891"> diferentes de </text:span><text:span text:style-name="T895">timezones</text:span><text:span text:style-name="T891"> na propriedade </text:span><text:span text:style-name="T896">timezone_type</text:span><text:span text:style-name="T891">:</text:span></text:p>
      <text:list text:style-name="L29">
        <text:list-item>
          <text:p text:style-name="P303"><text:span text:style-name="T897">UTC</text:span><text:span text:style-name="T898"> (Coordinated Universal Time): Ao contrário do GMT, o UTC não se define pelo sol ou as estrelas, </text:span><text:span text:style-name="T899">pois é</text:span><text:span text:style-name="T898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900">.<text:line-break/></text:span><text:span text:style-name="T901">Exemplo: </text:span><text:span text:style-name="T902">new</text:span><text:span text:style-name="T903"> </text:span><text:span text:style-name="T904">DateTime</text:span><text:span text:style-name="T903">(</text:span><text:span text:style-name="T905">"17 July 2013 </text:span><text:span text:style-name="T906">-0300</text:span><text:span text:style-name="T905">"</text:span><text:span text:style-name="T903">);<text:line-break/></text:span><text:span text:style-name="T903"><draw:frame draw:style-name="fr1" draw:name="Figura36" text:anchor-type="as-char" svg:width="8.629cm" svg:height="3.394cm" draw:z-index="39"><draw:image xlink:href="Pictures/100000000000014D000000836AE9D34C.jpg" xlink:type="simple" xlink:show="embed" xlink:actuate="onLoad" draw:mime-type="image/jpeg"/></draw:frame></text:span><text:span text:style-name="T897"><text:line-break/></text:span></text:p>
        </text:list-item>
        <text:list-item>
          <text:p text:style-name="P304"><text:span text:style-name="T895">GMT</text:span><text:span text:style-name="T891">(Greenwich Mean Time ou Tempo Médio de Greenwich)<text:line-break/></text:span><text:span text:style-name="T907">Exemplo: </text:span><text:span text:style-name="T908">new</text:span><text:span text:style-name="T909"> </text:span><text:span text:style-name="T910">DateTime</text:span><text:span text:style-name="T909">(</text:span><text:span text:style-name="T911">"17 July 2013 </text:span><text:span text:style-name="T912">GMT</text:span><text:span text:style-name="T911">"</text:span><text:span text:style-name="T909">);</text:span><text:span text:style-name="T913"> </text:span><text:span text:style-name="T914">ou </text:span><text:span text:style-name="T908">new</text:span><text:span text:style-name="T909"> </text:span><text:span text:style-name="T910">DateTime</text:span><text:span text:style-name="T909">(</text:span><text:span text:style-name="T911">"17 July 2013 </text:span><text:span text:style-name="T915">Z</text:span><text:span text:style-name="T911">"</text:span><text:span text:style-name="T909">);</text:span><text:span text:style-name="T916"> </text:span><text:span text:style-name="T907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907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305"/>
        </text:list-item>
        <text:list-item>
          <text:p text:style-name="P306"><text:span text:style-name="T907">Identificador do</text:span><text:span text:style-name="T891"> </text:span><text:span text:style-name="T895">Fuso horário</text:span><text:span text:style-name="T891">:<text:line-break/></text:span><text:span text:style-name="T907">Exemplo: </text:span><text:span text:style-name="T908">new</text:span><text:span text:style-name="T909"> </text:span><text:span text:style-name="T910">DateTime</text:span><text:span text:style-name="T909">( </text:span><text:span text:style-name="T911">"17 July 2013"</text:span><text:span text:style-name="T909">, </text:span><text:span text:style-name="T908">new</text:span><text:span text:style-name="T909"> </text:span><text:span text:style-name="T910">DateTimeZone</text:span><text:span text:style-name="T909">(</text:span><text:span text:style-name="T911">"</text:span><text:span text:style-name="T912">Europe/London</text:span><text:span text:style-name="T911">"</text:span><text:span text:style-name="T909">));</text:span><text:span text:style-name="T891"><draw:frame draw:style-name="fr1" draw:name="Figura40" text:anchor-type="as-char" svg:width="8.758cm" svg:height="3.413cm" draw:z-index="40"><draw:image xlink:href="Pictures/100000000000014B00000081EF8AA8D3.jpg" xlink:type="simple" xlink:show="embed" xlink:actuate="onLoad" draw:mime-type="image/jpeg"/></draw:frame></text:span></text:p>
        </text:list-item>
      </text:list>
      <text:p text:style-name="P307"/>
      <text:p text:style-name="P308"><text:span text:style-name="T891">N</text:span><text:span text:style-name="T917">ota: Quando uma data for apresentada com as letras T e Z, </text:span><text:span text:style-name="T918">e</text:span><text:span text:style-name="T917">xemplo: </text:span><text:span text:style-name="T911">2023-01-31</text:span><text:span text:style-name="T912">T</text:span><text:span text:style-name="T911">16:42:59</text:span><text:span text:style-name="T912">Z</text:span><text:span text:style-name="T917">, </text:span><text:span text:style-name="T918">s</text:span><text:span text:style-name="T917">ignifica que ela está adequada à norma ISO 8601 (padrão UTC). A letra </text:span><text:span text:style-name="T919">Z</text:span><text:span text:style-name="T917"> é o designador de zona para o deslocamento </text:span><text:span text:style-name="T920">zero</text:span><text:span text:style-name="T917"> do UTC </text:span><text:span text:style-name="T918">(</text:span><text:span text:style-name="T917">meridiano de Greenwich</text:span><text:span text:style-name="T918">)</text:span><text:span text:style-name="T917">, ou seja, </text:span><text:span text:style-name="T918">o fuso horário zero</text:span><text:span text:style-name="T917">, também conhecido como "</text:span><text:span text:style-name="T921">Zulu time</text:span><text:span text:style-name="T917">" </text:span><text:span text:style-name="T918">pelos militares</text:span><text:span text:style-name="T917">.<text:line-break/></text:span></text:p>
      <text:p text:style-name="P309">Modificar timezone para padrão ISO8601:</text:p>
      <text:p text:style-name="P310"><text:span text:style-name="Source_20_Text"><text:span text:style-name="T922">$date</text:span></text:span><text:span text:style-name="Source_20_Text"><text:span text:style-name="T923">-&gt;</text:span></text:span><text:span text:style-name="Source_20_Text"><text:span text:style-name="T924">setTimezone</text:span></text:span><text:span text:style-name="Source_20_Text"><text:span text:style-name="T923">(</text:span></text:span><text:span text:style-name="Source_20_Text"><text:span text:style-name="T925">new</text:span></text:span><text:span text:style-name="Source_20_Text"><text:span text:style-name="T923"> </text:span></text:span><text:span text:style-name="Source_20_Text"><text:span text:style-name="T926">DateTimeZone</text:span></text:span><text:span text:style-name="Source_20_Text"><text:span text:style-name="T923">(</text:span></text:span><text:span text:style-name="Source_20_Text"><text:span text:style-name="T927">'</text:span></text:span><text:span text:style-name="Source_20_Text"><text:span text:style-name="T928">UTC</text:span></text:span><text:span text:style-name="Source_20_Text"><text:span text:style-name="T927">'</text:span></text:span><text:span text:style-name="Source_20_Text"><text:span text:style-name="T923">));</text:span></text:span></text:p>
      <text:p text:style-name="P311"><text:span text:style-name="Source_20_Text"/></text:p>
      <text:p text:style-name="P311"><text:span text:style-name="Source_20_Text"><text:span text:style-name="T929">Modificar timezone para </text:span></text:span><text:span text:style-name="Source_20_Text"><text:span text:style-name="T930">nossa</text:span></text:span><text:span text:style-name="Source_20_Text"><text:span text:style-name="T929"> região:</text:span></text:span></text:p>
      <text:p text:style-name="P312"><text:span text:style-name="T931">$date</text:span><text:span text:style-name="T932">-&gt;</text:span><text:span text:style-name="T933">setTimezone</text:span><text:span text:style-name="T932">(</text:span><text:span text:style-name="T934">new</text:span><text:span text:style-name="T932"> </text:span><text:span text:style-name="T935">DateTimeZone</text:span><text:span text:style-name="T932">(</text:span><text:span text:style-name="T936">'America/Sao_Paulo'</text:span><text:span text:style-name="T932">));</text:span></text:p>
      <text:p text:style-name="P313"/>
      <text:p text:style-name="P314">Converter data UTC para fuso horário brasileiro:</text:p>
      <text:p text:style-name="P315"><text:span text:style-name="T244">$objData</text:span><text:span text:style-name="T242"> = </text:span><text:span text:style-name="T241">new</text:span><text:span text:style-name="T242"> </text:span><text:span text:style-name="T246">DateTime</text:span><text:span text:style-name="T242">(</text:span><text:span text:style-name="T421">"2023-05-18 14:00:00"</text:span><text:span text:style-name="T242">, </text:span><text:span text:style-name="T241">new</text:span><text:span text:style-name="T242"> </text:span><text:span text:style-name="T246">DateTimeZone</text:span><text:span text:style-name="T242">(</text:span><text:span text:style-name="T421">'UTC'</text:span><text:span text:style-name="T242">));<text:tab/></text:span></text:p>
      <text:p text:style-name="P315"><text:span text:style-name="T243">date_default_timezone_set</text:span><text:span text:style-name="T242">(</text:span><text:span text:style-name="T421">'America/Sao_Paulo'</text:span><text:span text:style-name="T242">);<text:tab/><text:tab/><text:tab/><text:tab/><text:tab/></text:span></text:p>
      <text:p text:style-name="P316"><text:span text:style-name="T733">$objData</text:span><text:span text:style-name="T734">-&gt;</text:span><text:span text:style-name="T937">setTimezone</text:span><text:span text:style-name="T734">(</text:span><text:span text:style-name="T735">new</text:span><text:span text:style-name="T734"> </text:span><text:span text:style-name="T938">DateTimeZone</text:span><text:span text:style-name="T734">(</text:span><text:span text:style-name="T937">date_default_timezone_get</text:span><text:span text:style-name="T734">()));<text:tab/></text:span></text:p>
      <text:h text:style-name="P317" text:outline-level="1" text:is-list-header="true"><text:span text:style-name="Source_20_Text"><text:span text:style-name="T939">S</text:span></text:span><text:span text:style-name="Source_20_Text"><text:span text:style-name="T940">treams </text:span></text:span><text:span text:style-name="Source_20_Text"><text:span text:style-name="T939">e manipulação de arquivos</text:span></text:span></text:h>
      <text:p text:style-name="P318"><text:span text:style-name="Source_20_Text"><text:span text:style-name="Emphasis"><text:span text:style-name="T941">S</text:span></text:span></text:span><text:span text:style-name="Source_20_Text"><text:span text:style-name="Emphasis"><text:span text:style-name="T942">tream</text:span></text:span></text:span><text:span text:style-name="Source_20_Text"><text:span text:style-name="T943"> é uma </text:span></text:span><text:span text:style-name="Source_20_Text"><text:span text:style-name="Strong_20_Emphasis"><text:span text:style-name="T943">abstração</text:span></text:span></text:span><text:span text:style-name="Source_20_Text"><text:span text:style-name="T943"> usada para </text:span></text:span><text:span text:style-name="Source_20_Text"><text:span text:style-name="Strong_20_Emphasis"><text:span text:style-name="T943">ler ou escrever dados</text:span></text:span></text:span><text:span text:style-name="Source_20_Text"><text:span text:style-name="T943"> de forma sequencial e eficiente. Um </text:span></text:span><text:span text:style-name="Source_20_Text"><text:span text:style-name="Strong_20_Emphasis"><text:span text:style-name="T943">stream</text:span></text:span></text:span><text:span text:style-name="Source_20_Text"><text:span text:style-name="T943"> (fluxo) é um </text:span></text:span><text:span text:style-name="Source_20_Text"><text:span text:style-name="Strong_20_Emphasis"><text:span text:style-name="T943">canal de comunicação contínuo</text:span></text:span></text:span><text:span text:style-name="Source_20_Text"><text:span text:style-name="T943"> entre uma fonte de dados e um destino.<text:line-break/>Ele </text:span></text:span><text:span text:style-name="Source_20_Text"><text:span text:style-name="Strong_20_Emphasis"><text:span text:style-name="T943">não precisa carregar todo o conteúdo na memória</text:span></text:span></text:span><text:span text:style-name="Source_20_Text"><text:span text:style-name="T943"> de uma só vez — os dados </text:span></text:span><text:span text:style-name="Source_20_Text"><text:span text:style-name="T944">fluem</text:span></text:span><text:span text:style-name="Source_20_Text"><text:span text:style-name="T943"> </text:span></text:span><text:span text:style-name="Source_20_Text"><text:span text:style-name="Strong_20_Emphasis"><text:span text:style-name="T943">em blocos</text:span></text:span></text:span><text:span text:style-name="Source_20_Text"><text:span text:style-name="T943"> conforme necessário.<text:line-break/>Vantagens de usar streams:</text:span></text:span></text:p>
      <text:list text:style-name="L30">
        <text:list-item>
          <text:p text:style-name="P319"><text:span text:style-name="T945">Leitura e escrita </text:span><text:span text:style-name="Strong_20_Emphasis"><text:span text:style-name="T945">eficientes</text:span></text:span><text:span text:style-name="T945"> (sem carregar tudo na memória); </text:span></text:p>
        </text:list-item>
        <text:list-item>
          <text:p text:style-name="P319"><text:span text:style-name="T945">Suporte </text:span><text:span text:style-name="Strong_20_Emphasis"><text:span text:style-name="T945">unificado</text:span></text:span><text:span text:style-name="T945"> para arquivos, redes, memória, etc; </text:span></text:p>
        </text:list-item>
        <text:list-item>
          <text:p text:style-name="P319"><text:span text:style-name="T945">Permite </text:span><text:span text:style-name="Strong_20_Emphasis"><text:span text:style-name="T945">processar dados em tempo real</text:span></text:span><text:span text:style-name="T945"> (útil em APIs, sockets, uploads, downloads);</text:span></text:p>
        </text:list-item>
        <text:list-item>
          <text:p text:style-name="P319"><text:span text:style-name="T945"><text:s/>Flexibilidade para </text:span><text:span text:style-name="Strong_20_Emphasis"><text:span text:style-name="T945">trabalhar com protocolos personalizados</text:span></text:span><text:span text:style-name="T945"> (HTTP, FTP, etc.).</text:span></text:p>
        </text:list-item>
      </text:list>
      <text:p text:style-name="P320"><text:span text:style-name="Source_20_Text"><text:span text:style-name="T943">Exemplos de streams em PHP: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Tipo de stream</text:p>
            </table:table-cell>
            <table:table-cell table:style-name="Tabela5.A1" office:value-type="string">
              <text:p text:style-name="Table_20_Heading">Exemplo</text:p>
            </table:table-cell>
            <table:table-cell table:style-name="Tabela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Arquivo local</text:p>
          </table:table-cell>
          <table:table-cell table:style-name="Tabela5.A1" office:value-type="string">
            <text:p text:style-name="Table_20_Contents"><text:span text:style-name="Source_20_Text">fopen('dados.txt', 'r')</text:span></text:p>
          </table:table-cell>
          <table:table-cell table:style-name="Tabela5.A1" office:value-type="string">
            <text:p text:style-name="Table_20_Contents">Leitura sequencial de um arquivo</text:p>
          </table:table-cell>
        </table:table-row>
        <table:table-row>
          <table:table-cell table:style-name="Tabela5.A1" office:value-type="string">
            <text:p text:style-name="Table_20_Contents">HTTP</text:p>
          </table:table-cell>
          <table:table-cell table:style-name="Tabela5.A1" office:value-type="string">
            <text:p text:style-name="Table_20_Contents"><text:span text:style-name="Source_20_Text">fopen('https://exemplo.com', 'r')</text:span></text:p>
          </table:table-cell>
          <table:table-cell table:style-name="Tabela5.A1" office:value-type="string">
            <text:p text:style-name="Table_20_Contents">Lê dados de uma URL</text:p>
          </table:table-cell>
        </table:table-row>
        <table:table-row>
          <table:table-cell table:style-name="Tabela5.A1" office:value-type="string">
            <text:p text:style-name="Table_20_Contents">FTP</text:p>
          </table:table-cell>
          <table:table-cell table:style-name="Tabela5.A1" office:value-type="string">
            <text:p text:style-name="Table_20_Contents"><text:span text:style-name="Source_20_Text">fopen('ftp://usuario:senha@servidor/arquivo.txt', 'r')</text:span></text:p>
          </table:table-cell>
          <table:table-cell table:style-name="Tabela5.A1" office:value-type="string">
            <text:p text:style-name="Table_20_Contents">Lê arquivo remoto via FTP</text:p>
          </table:table-cell>
        </table:table-row>
        <table:table-row>
          <table:table-cell table:style-name="Tabela5.A1" office:value-type="string">
            <text:p text:style-name="Table_20_Contents">Entrada padrão</text:p>
          </table:table-cell>
          <table:table-cell table:style-name="Tabela5.A1" office:value-type="string">
            <text:p text:style-name="Table_20_Contents"><text:span text:style-name="Source_20_Text">php://stdin</text:span></text:p>
          </table:table-cell>
          <table:table-cell table:style-name="Tabela5.A1" office:value-type="string">
            <text:p text:style-name="Table_20_Contents">Dados que entram via terminal</text:p>
          </table:table-cell>
        </table:table-row>
        <table:table-row>
          <table:table-cell table:style-name="Tabela5.A1" office:value-type="string">
            <text:p text:style-name="Table_20_Contents">Saída padrão</text:p>
          </table:table-cell>
          <table:table-cell table:style-name="Tabela5.A1" office:value-type="string">
            <text:p text:style-name="Table_20_Contents"><text:span text:style-name="Source_20_Text">php://output</text:span></text:p>
          </table:table-cell>
          <table:table-cell table:style-name="Tabela5.A1" office:value-type="string">
            <text:p text:style-name="Table_20_Contents">Dados que saem para o navegador ou CLI</text:p>
          </table:table-cell>
        </table:table-row>
        <table:table-row>
          <table:table-cell table:style-name="Tabela5.A1" office:value-type="string">
            <text:p text:style-name="Table_20_Contents">Memória</text:p>
          </table:table-cell>
          <table:table-cell table:style-name="Tabela5.A1" office:value-type="string">
            <text:p text:style-name="Table_20_Contents"><text:span text:style-name="Source_20_Text">php://memory</text:span> ou <text:span text:style-name="Source_20_Text">php://temp</text:span></text:p>
          </table:table-cell>
          <table:table-cell table:style-name="Tabela5.A1" office:value-type="string">
            <text:p text:style-name="Table_20_Contents">Stream em memória temporária</text:p>
          </table:table-cell>
        </table:table-row>
      </table:table>
      <text:p text:style-name="P320"><text:span text:style-name="Source_20_Text"><text:span text:style-name="T943"/></text:span></text:p>
      <text:p text:style-name="P321"><text:span text:style-name="Source_20_Text"><text:span text:style-name="T946">wrappers</text:span></text:span><text:span text:style-name="Source_20_Text"><text:span text:style-name="T947"> </text:span></text:span><text:span text:style-name="Source_20_Text"><text:span text:style-name="T948">são </text:span></text:span><text:span text:style-name="Source_20_Text"><text:span text:style-name="T947">protocolos de stream internos </text:span></text:span><text:span text:style-name="Source_20_Text"><text:span text:style-name="T948">oferecidos pel</text:span></text:span><text:span text:style-name="Source_20_Text"><text:span text:style-name="T949">a sintaxe </text:span></text:span><text:span text:style-name="Source_20_Text"><text:span text:style-name="T950">php://</text:span></text:span><text:span text:style-name="Source_20_Text"><text:span text:style-name="T948">. </text:span></text:span><text:span text:style-name="Source_20_Text"><text:span text:style-name="T947">Alguns exemplos úteis: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Wrapper</text:p>
            </table:table-cell>
            <table:table-cell table:style-name="Tabela6.A1" office:value-type="string">
              <text:p text:style-name="Table_20_Heading">Uso</text:p>
            </table:table-cell>
            <table:table-cell table:style-name="Tabela6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php://input</text:span></text:p>
          </table:table-cell>
          <table:table-cell table:style-name="Tabela6.A1" office:value-type="string">
            <text:p text:style-name="Table_20_Contents">Lê dados brutos de requisições HTTP POST (útil em APIs REST)</text:p>
          </table:table-cell>
          <table:table-cell table:style-name="Tabela6.A1" office:value-type="string">
            <text:p text:style-name="Table_20_Contents"><text:span text:style-name="Source_20_Text">file_get_contents('php://input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output</text:span></text:p>
          </table:table-cell>
          <table:table-cell table:style-name="Tabela6.A1" office:value-type="string">
            <text:p text:style-name="Table_20_Contents">Escreve diretamente na saída padrão (navegador ou terminal)</text:p>
          </table:table-cell>
          <table:table-cell table:style-name="Tabela6.A1" office:value-type="string">
            <text:p text:style-name="Table_20_Contents"><text:span text:style-name="Source_20_Text">fwrite(fopen('php://output', 'w'), 'Olá!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memory</text:span></text:p>
          </table:table-cell>
          <table:table-cell table:style-name="Tabela6.A1" office:value-type="string">
            <text:p text:style-name="Table_20_Contents">Cria um stream em memória RAM</text:p>
          </table:table-cell>
          <table:table-cell table:style-name="Tabela6.A1" office:value-type="string">
            <text:p text:style-name="Table_20_Contents">útil para gerar arquivos temporário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temp</text:span></text:p>
          </table:table-cell>
          <table:table-cell table:style-name="Tabela6.A1" office:value-type="string">
            <text:p text:style-name="Table_20_Contents">Stream temporário (vai para disco se exceder certo tamanho)</text:p>
          </table:table-cell>
          <table:table-cell table:style-name="Tabela6.A1" office:value-type="string">
            <text:p text:style-name="Table_20_Contents">usado em processamento de uploads</text:p>
          </table:table-cell>
        </table:table-row>
      </table:table>
      <text:p text:style-name="P320"><text:span text:style-name="Source_20_Text"><text:span text:style-name="T947"/></text:span></text:p>
      <text:p text:style-name="P320"><text:span text:style-name="Source_20_Text"><text:span text:style-name="T947"/></text:span></text:p>
      <text:p text:style-name="P322"><text:span text:style-name="Source_20_Text"><text:span text:style-name="T947">Principais funções para manipular arquivos </text:span></text:span><text:span text:style-name="Source_20_Text"><text:span text:style-name="T951">e streams</text:span></text:span><text:span text:style-name="Source_20_Text"><text:span text:style-name="T947">:</text:span></text:span></text:p>
      <text:list text:style-name="L31">
        <text:list-item>
          <text:p text:style-name="P323"><text:span text:style-name="Source_20_Text"><text:span text:style-name="T944">fopen</text:span></text:span><text:span text:style-name="Source_20_Text"><text:span text:style-name="T947">(</text:span></text:span><text:span text:style-name="Source_20_Text"><text:span text:style-name="T952">$nomeArquivo, $modo</text:span></text:span><text:span text:style-name="Source_20_Text"><text:span text:style-name="T947">): </text:span></text:span><text:span text:style-name="Source_20_Text"><text:span text:style-name="T953">abre</text:span></text:span><text:span text:style-name="Source_20_Text"><text:span text:style-name="T952"> ou, se não existir, cria o arquivo<text:line-break/>O </text:span></text:span><text:span text:style-name="Source_20_Text"><text:span text:style-name="T954">parâmetro</text:span></text:span><text:span text:style-name="Source_20_Text"><text:span text:style-name="T952"> </text:span></text:span><text:span text:style-name="Source_20_Text"><text:span text:style-name="T953">a+</text:span></text:span><text:span text:style-name="Source_20_Text"><text:span text:style-name="T952"> abre o arquivo para escrita e leitura e coloca o cursor no final do arquivo. Caso o arquivo não exista, tenta criá-lo.<text:line-break/>É possível usar URLs HTTP e FTP com a maioria das funções que recebem um nome de arquivo como parâmetro. Exemplo: </text:span></text:span><text:span text:style-name="Source_20_Text"><text:span text:style-name="T955">$file</text:span></text:span><text:span text:style-name="Source_20_Text"><text:span text:style-name="T956"> = </text:span></text:span><text:span text:style-name="Source_20_Text"><text:span text:style-name="T957">fopen</text:span></text:span><text:span text:style-name="Source_20_Text"><text:span text:style-name="T956"> (</text:span></text:span><text:span text:style-name="Source_20_Text"><text:span text:style-name="T958">"http://www.example.com/"</text:span></text:span><text:span text:style-name="Source_20_Text"><text:span text:style-name="T956">, </text:span></text:span><text:span text:style-name="Source_20_Text"><text:span text:style-name="T958">"r"</text:span></text:span><text:span text:style-name="Source_20_Text"><text:span text:style-name="T956">);</text:span></text:span></text:p>
        </text:list-item>
        <text:list-item>
          <text:p text:style-name="P324"><text:span text:style-name="Source_20_Text"><text:span text:style-name="T944">fclose</text:span></text:span><text:span text:style-name="Source_20_Text"><text:span text:style-name="T947">($a</text:span></text:span><text:span text:style-name="Source_20_Text"><text:span text:style-name="T959">rquivo</text:span></text:span><text:span text:style-name="Source_20_Text"><text:span text:style-name="T947">)</text:span></text:span><text:span text:style-name="Source_20_Text"><text:span text:style-name="T960"> </text:span></text:span><text:span text:style-name="Source_20_Text"><text:span text:style-name="T961">fecha</text:span></text:span><text:span text:style-name="Source_20_Text"><text:span text:style-name="T960"> o arquivo, </text:span></text:span><text:span text:style-name="Source_20_Text"><text:span text:style-name="T962">liberando-o</text:span></text:span><text:span text:style-name="Source_20_Text"><text:span text:style-name="T960"> para que outros programas possam utilizá-lo</text:span></text:span><text:span text:style-name="Source_20_Text"><text:span text:style-name="T963">.</text:span></text:span></text:p>
        </text:list-item>
        <text:list-item>
          <text:p text:style-name="P324"><text:span text:style-name="Source_20_Text"><text:span text:style-name="T964">fread</text:span></text:span><text:span text:style-name="Source_20_Text"><text:span text:style-name="T959">($arquivo, $tamanho): </text:span></text:span><text:span text:style-name="Source_20_Text"><text:span text:style-name="T964">Lê</text:span></text:span><text:span text:style-name="Source_20_Text"><text:span text:style-name="T959"> dados binários de um stream </text:span></text:span></text:p>
        </text:list-item>
        <text:list-item>
          <text:p text:style-name="P324"><text:span text:style-name="Source_20_Text"><text:span text:style-name="T944">fgets</text:span></text:span><text:span text:style-name="Source_20_Text"><text:span text:style-name="T947">(): </text:span></text:span><text:span text:style-name="Source_20_Text"><text:span text:style-name="T944">ler uma linha</text:span></text:span><text:span text:style-name="Source_20_Text"><text:span text:style-name="T947"> de um arquivo aberto. </text:span></text:span><text:span text:style-name="Source_20_Text"><text:span text:style-name="T965">Re</text:span></text:span><text:span text:style-name="Source_20_Text"><text:span text:style-name="T947">cebe um ponteiro de arquivo como argumento.</text:span></text:span></text:p>
        </text:list-item>
        <text:list-item>
          <text:p text:style-name="P324"><text:span text:style-name="Source_20_Text"><text:span text:style-name="T953">fwrite</text:span></text:span><text:span text:style-name="Source_20_Text"><text:span text:style-name="T952">($arquivo, $conteúdo): </text:span></text:span><text:span text:style-name="Source_20_Text"><text:span text:style-name="T953">escreve</text:span></text:span><text:span text:style-name="Source_20_Text"><text:span text:style-name="T966"> </text:span></text:span><text:span text:style-name="Source_20_Text"><text:span text:style-name="T967">dados em um stream</text:span></text:span></text:p>
        </text:list-item>
        <text:list-item>
          <text:p text:style-name="P324"><text:span text:style-name="Source_20_Text"><text:span text:style-name="T944">feof</text:span></text:span><text:span text:style-name="Source_20_Text"><text:span text:style-name="T947">(): </text:span></text:span><text:span text:style-name="Source_20_Text"><text:span text:style-name="T944">verificar</text:span></text:span><text:span text:style-name="Source_20_Text"><text:span text:style-name="T947"> se </text:span></text:span><text:span text:style-name="Source_20_Text"><text:span text:style-name="T944">o </text:span></text:span><text:span text:style-name="Source_20_Text"><text:span text:style-name="Strong_20_Emphasis"><text:span text:style-name="T944">fim</text:span></text:span></text:span><text:span text:style-name="Source_20_Text"><text:span text:style-name="Strong_20_Emphasis"><text:span text:style-name="T943"> de um </text:span></text:span></text:span><text:span text:style-name="Source_20_Text"><text:span text:style-name="Strong_20_Emphasis"><text:span text:style-name="T967">stream</text:span></text:span></text:span><text:span text:style-name="Source_20_Text"><text:span text:style-name="T943"> f</text:span></text:span><text:span text:style-name="Source_20_Text"><text:span text:style-name="T947">oi atingido durante a leitura. </text:span></text:span><text:span text:style-name="Source_20_Text"><text:span text:style-name="T965">Geralmente usado em laços while </text:span></text:span><text:span text:style-name="Source_20_Text"><text:span text:style-name="T968">p</text:span></text:span><text:span text:style-name="Source_20_Text"><text:span text:style-name="T965">a</text:span></text:span><text:span text:style-name="Source_20_Text"><text:span text:style-name="T969">ra </text:span></text:span><text:span text:style-name="Source_20_Text"><text:span text:style-name="Strong_20_Emphasis"><text:span text:style-name="T969">verificar se a leitura terminou</text:span></text:span></text:span><text:span text:style-name="Source_20_Text"><text:span text:style-name="T969"> antes d</text:span></text:span><text:span text:style-name="Source_20_Text"><text:span text:style-name="T965">e tentar processar mais dados. </text:span></text:span></text:p>
        </text:list-item>
        <text:list-item>
          <text:p text:style-name="P325"><text:span text:style-name="Source_20_Text"><text:span text:style-name="T964">filesize</text:span></text:span><text:span text:style-name="Source_20_Text"><text:span text:style-name="T959">($nomeArquivo): </text:span></text:span><text:span text:style-name="Source_20_Text"><text:span text:style-name="T968">obtém o </text:span></text:span><text:span text:style-name="Source_20_Text"><text:span text:style-name="T970">tamanho</text:span></text:span><text:span text:style-name="Source_20_Text"><text:span text:style-name="T968">, </text:span></text:span><text:span text:style-name="Source_20_Text"><text:span text:style-name="T959">em bytes</text:span></text:span></text:p>
        </text:list-item>
        <text:list-item>
          <text:p text:style-name="P325"><text:span text:style-name="Source_20_Text"><text:span text:style-name="T964">file</text:span></text:span><text:span text:style-name="Source_20_Text"><text:span text:style-name="T959">($nomeArquivo): retorna </text:span></text:span><text:span text:style-name="Source_20_Text"><text:span text:style-name="T964">array</text:span></text:span><text:span text:style-name="Source_20_Text"><text:span text:style-name="T959"> onde cada índice </text:span></text:span><text:span text:style-name="Source_20_Text"><text:span text:style-name="T964">é uma linha</text:span></text:span><text:span text:style-name="Source_20_Text"><text:span text:style-name="T959"> do arquivo</text:span></text:span></text:p>
        </text:list-item>
        <text:list-item>
          <text:p text:style-name="P326"><text:span text:style-name="Source_20_Text"><text:span text:style-name="T964">file_get_contents</text:span></text:span><text:span text:style-name="Source_20_Text"><text:span text:style-name="T959">($nomeArquivo): </text:span></text:span><text:span text:style-name="Source_20_Text"><text:span text:style-name="T964">abre</text:span></text:span><text:span text:style-name="Source_20_Text"><text:span text:style-name="T959">, </text:span></text:span><text:span text:style-name="Source_20_Text"><text:span text:style-name="T964">lista, retorna</text:span></text:span><text:span text:style-name="Source_20_Text"><text:span text:style-name="T959"> </text:span></text:span><text:span text:style-name="Source_20_Text"><text:span text:style-name="T964">todo o conteúdo</text:span></text:span><text:span text:style-name="Source_20_Text"><text:span text:style-name="T959"> em string </text:span></text:span><text:span text:style-name="Source_20_Text"><text:span text:style-name="T964">e fecha</text:span></text:span><text:span text:style-name="Source_20_Text"><text:span text:style-name="T959"> </text:span></text:span><text:span text:style-name="Source_20_Text"><text:span text:style-name="T968">o </text:span></text:span><text:span text:style-name="Source_20_Text"><text:span text:style-name="T959">arquivo.</text:span></text:span></text:p>
        </text:list-item>
        <text:list-item>
          <text:p text:style-name="P327"><text:span text:style-name="Source_20_Text"><text:span text:style-name="T953">file_put_contents</text:span></text:span><text:span text:style-name="Source_20_Text"><text:span text:style-name="T952">($nomeArquivo, $conteúdo, $flags = FILE_APPEND): uma das formas mais simples e direta</text:span></text:span><text:span text:style-name="Source_20_Text"><text:span text:style-name="T966">s de </text:span></text:span><text:span text:style-name="Source_20_Text"><text:span text:style-name="Strong_20_Emphasis"><text:span text:style-name="T953">gravar dados</text:span></text:span></text:span><text:span text:style-name="Source_20_Text"><text:span text:style-name="Strong_20_Emphasis"><text:span text:style-name="T966"> em um arquivo</text:span></text:span></text:span><text:span text:style-name="Source_20_Text"><text:span text:style-name="T966">. </text:span></text:span><text:span text:style-name="Source_20_Text"><text:span text:style-name="T971">Por padr</text:span></text:span><text:span text:style-name="Source_20_Text"><text:span text:style-name="T968">ão, sobrescreve o conteúdo.</text:span></text:span><text:span text:style-name="Source_20_Text"><text:span text:style-name="T952"> </text:span></text:span></text:p>
        </text:list-item>
        <text:list-item>
          <text:p text:style-name="P327"><text:span text:style-name="Source_20_Text"><text:span text:style-name="T953">stream_filter_append()</text:span></text:span><text:span text:style-name="Source_20_Text"><text:span text:style-name="T952">: anexa filtros de fluxo (</text:span></text:span><text:span text:style-name="Source_20_Text"><text:span text:style-name="T953">stream filters</text:span></text:span><text:span text:style-name="Source_20_Text"><text:span text:style-name="T952">), </text:span></text:span><text:span text:style-name="Source_20_Text"><text:span text:style-name="T972">permitindo </text:span></text:span><text:span text:style-name="Source_20_Text"><text:span text:style-name="T973">transformar</text:span></text:span><text:span text:style-name="Source_20_Text"><text:span text:style-name="T972"> os dados antes de serem lidos ou escritos. Exemplo: <text:line-break/></text:span></text:span><text:span text:style-name="Source_20_Text"><text:span text:style-name="T974">// Adiciona o filtro de caixa alta na leitura<text:line-break/></text:span></text:span><text:span text:style-name="T422">stream_filter_append</text:span><text:span text:style-name="T307">(</text:span><text:span text:style-name="T305">$</text:span><text:span text:style-name="T975">arquivo</text:span><text:span text:style-name="T307">, </text:span><text:span text:style-name="T486">"string.toupper"</text:span><text:span text:style-name="T307">, STREAM_FILTER_READ);<text:line-break/></text:span><text:span text:style-name="Source_20_Text"><text:span text:style-name="T972">Os filtros são executados de partes em partes do stream, o que possibilita fazer a modificação gradual, conforme o dado é lido. Ideal para ler arquivos muito grandes, uma vez que filtrar os dados apenas depois de lê-los se torna inviável, pois precisaríamos ter todo o dado na memória para isso. </text:span></text:span></text:p>
        </text:list-item>
        <text:list-item>
          <text:p text:style-name="P327"><text:span text:style-name="Source_20_Text"><text:span text:style-name="T976">stream_get_contents()</text:span></text:span><text:span text:style-name="Source_20_Text"><text:span text:style-name="T972">: </text:span></text:span><text:span text:style-name="Source_20_Text"><text:span text:style-name="T976">Lê todo o conteúdo</text:span></text:span><text:span text:style-name="Source_20_Text"><text:span text:style-name="T972"> de um stream aberto </text:span></text:span></text:p>
        </text:list-item>
        <text:list-item>
          <text:p text:style-name="P328"><text:span text:style-name="Source_20_Text"><text:span text:style-name="T976">stream_copy_to_stream()</text:span></text:span><text:span text:style-name="Source_20_Text"><text:span text:style-name="T972">: </text:span></text:span><text:span text:style-name="Source_20_Text"><text:span text:style-name="T976">Copia dados entre streams</text:span></text:span></text:p>
        </text:list-item>
        <text:list-item>
          <text:p text:style-name="P328"><text:span text:style-name="Source_20_Text"><text:span text:style-name="T976">stream_context_create(</text:span></text:span><text:span text:style-name="Source_20_Text"><text:span text:style-name="T977">[‘http’ =&gt; []]</text:span></text:span><text:span text:style-name="Source_20_Text"><text:span text:style-name="T976">)</text:span></text:span><text:span text:style-name="Source_20_Text"><text:span text:style-name="T972">: </text:span></text:span><text:span text:style-name="Source_20_Text"><text:span text:style-name="T976">Cria contexto com opções</text:span></text:span><text:span text:style-name="Source_20_Text"><text:span text:style-name="T972"> </text:span></text:span><text:span text:style-name="Source_20_Text"><text:span text:style-name="T949">como, por exemplo, informar o verbo </text:span></text:span><text:span text:style-name="Source_20_Text"><text:span text:style-name="T972">HTTP, </text:span></text:span><text:span text:style-name="Source_20_Text"><text:span text:style-name="T949">cabeçalhos</text:span></text:span><text:span text:style-name="Source_20_Text"><text:span text:style-name="T972">, autenticação, </text:span></text:span><text:span text:style-name="Source_20_Text"><text:span text:style-name="T949">conteúdo, </text:span></text:span><text:span text:style-name="Source_20_Text"><text:span text:style-name="T972">etc.)<text:line-break/></text:span></text:span></text:p>
        </text:list-item>
      </text:list>
      <text:p text:style-name="P329"><text:span text:style-name="Source_20_Text"><text:span text:style-name="T952">Todo o conteúdo do arquivo é armazenado na RAM. </text:span></text:span><text:span text:style-name="Source_20_Text"><text:span text:style-name="T965">E</text:span></text:span><text:span text:style-name="Source_20_Text"><text:span text:style-name="T952">ntão, ao ler um arquivo muito grande, pode </text:span></text:span><text:span text:style-name="Source_20_Text"><text:span text:style-name="T965">ser consumido</text:span></text:span><text:span text:style-name="Source_20_Text"><text:span text:style-name="T952"> mais recursos que o desejado. Para resolver esse problema, use Generators.</text:span></text:span></text:p>
      <text:p text:style-name="P329"><text:span text:style-name="Source_20_Text"><text:span text:style-name="T952"/></text:span></text:p>
      <text:p text:style-name="P330"><text:soft-page-break/><text:span text:style-name="Source_20_Text"><text:span text:style-name="T952">Diferentes famílias de sistemas operacionais têm diferentes convenções de final de linha. Quando um arquivo </text:span></text:span><text:span text:style-name="Source_20_Text"><text:span text:style-name="T965">de</text:span></text:span><text:span text:style-name="Source_20_Text"><text:span text:style-name="T952"> texto é escrito e deseja-se inserir uma quebra de linha, é necessário usar o caractere correto de fim de linha para o sistema operacional. Sistemas baseados no Unix utilizam </text:span></text:span><text:span text:style-name="Source_20_Text"><text:span text:style-name="T953">\n</text:span></text:span><text:span text:style-name="Source_20_Text"><text:span text:style-name="T952"> como o caractere de fim de linha, sistemas baseados no Windows utilizam </text:span></text:span><text:span text:style-name="Source_20_Text"><text:span text:style-name="T953">\r\n</text:span></text:span><text:span text:style-name="Source_20_Text"><text:span text:style-name="T952"> e sistemas baseados no Macintosh (Mac OS Classic) utilizavam </text:span></text:span><text:span text:style-name="Source_20_Text"><text:span text:style-name="T953">\r</text:span></text:span><text:span text:style-name="Source_20_Text"><text:span text:style-name="T952">.</text:span></text:span></text:p>
      <text:p text:style-name="P330"><text:span text:style-name="Source_20_Text"><text:span text:style-name="T952"/></text:span></text:p>
      <text:p text:style-name="P330"><text:span text:style-name="Source_20_Text"><text:span text:style-name="T978">DirectoryIterator</text:span></text:span><text:span text:style-name="Source_20_Text"><text:span text:style-name="T952"> é uma </text:span></text:span><text:span text:style-name="Source_20_Text"><text:span text:style-name="T979">API moderna</text:span></text:span><text:span text:style-name="Source_20_Text"><text:span text:style-name="T952">, orientada a objetos e </text:span></text:span><text:span text:style-name="Source_20_Text"><text:span text:style-name="T979">mais </text:span></text:span><text:span text:style-name="Source_20_Text"><text:span text:style-name="T952">segura </text:span></text:span><text:span text:style-name="Source_20_Text"><text:span text:style-name="T979">para</text:span></text:span><text:span text:style-name="Source_20_Text"><text:span text:style-name="T952"> percorrer diretórios. El</text:span></text:span><text:span text:style-name="Source_20_Text"><text:span text:style-name="T979">a</text:span></text:span><text:span text:style-name="Source_20_Text"><text:span text:style-name="T952"> faz parte da SPL (Standard PHP Library) e substitui bem o uso da função </text:span></text:span><text:span text:style-name="Source_20_Text"><text:span text:style-name="T980">dir()</text:span></text:span><text:span text:style-name="Source_20_Text"><text:span text:style-name="T952"> ou </text:span></text:span><text:span text:style-name="Source_20_Text"><text:span text:style-name="T980">scandir()</text:span></text:span><text:span text:style-name="Source_20_Text"><text:span text:style-name="T952"> quando </text:span></text:span><text:span text:style-name="Source_20_Text"><text:span text:style-name="T979">se</text:span></text:span><text:span text:style-name="Source_20_Text"><text:span text:style-name="T952"> quer um código mais robusto e legível. </text:span></text:span></text:p>
      <text:p text:style-name="P330"><text:span text:style-name="Source_20_Text"><text:span text:style-name="T952"><text:s/>Principais Métodos:</text:span></text:span>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Método</text:p>
            </table:table-cell>
            <table:table-cell table:style-name="Tabela7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getFilename()</text:span></text:p>
          </table:table-cell>
          <table:table-cell table:style-name="Tabela7.A1" office:value-type="string">
            <text:p text:style-name="Table_20_Contents">Retorna o nome do arquivo ou pasta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Pathname()</text:span></text:p>
          </table:table-cell>
          <table:table-cell table:style-name="Tabela7.A1" office:value-type="string">
            <text:p text:style-name="Table_20_Contents">Retorna o caminho complet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Extension()</text:span></text:p>
          </table:table-cell>
          <table:table-cell table:style-name="Tabela7.A1" office:value-type="string">
            <text:p text:style-name="Table_20_Contents">Retorna a extensão do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Size()</text:span></text:p>
          </table:table-cell>
          <table:table-cell table:style-name="Tabela7.A1" office:value-type="string">
            <text:p text:style-name="Table_20_Contents">Retorna o tamanho (em bytes)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File()</text:span></text:p>
          </table:table-cell>
          <table:table-cell table:style-name="Tabela7.A1" office:value-type="string">
            <text:p text:style-name="Table_20_Contents">Verifica se é um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ir()</text:span></text:p>
          </table:table-cell>
          <table:table-cell table:style-name="Tabela7.A1" office:value-type="string">
            <text:p text:style-name="Table_20_Contents">Verifica se é um diretóri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ot()</text:span></text:p>
          </table:table-cell>
          <table:table-cell table:style-name="Tabela7.A1" office:value-type="string">
            <text:p text:style-name="Table_20_Contents">Verifica se o item é “.” ou “..”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Readable()</text:span> / <text:span text:style-name="Source_20_Text">isWritable()</text:span></text:p>
          </table:table-cell>
          <table:table-cell table:style-name="Tabela7.A1" office:value-type="string">
            <text:p text:style-name="Table_20_Contents">Verifica permissões.</text:p>
          </table:table-cell>
        </table:table-row>
      </table:table>
      <text:p text:style-name="P330"><text:span text:style-name="Source_20_Text"><text:span text:style-name="T953"/></text:span></text:p>
      <text:p text:style-name="P331"><text:span text:style-name="Source_20_Text"><text:span text:style-name="T981">$path</text:span></text:span><text:span text:style-name="Source_20_Text"><text:span text:style-name="T982"> = </text:span></text:span><text:span text:style-name="Source_20_Text"><text:span text:style-name="T983">"imagens"</text:span></text:span><text:span text:style-name="Source_20_Text"><text:span text:style-name="T982">;<text:tab/><text:tab/><text:tab/><text:tab/><text:tab/><text:tab/><text:tab/><text:tab/><text:tab/><text:tab/><text:tab/><text:tab/></text:span></text:span></text:p>
      <text:p text:style-name="P332"><text:span text:style-name="T420">foreach</text:span><text:span text:style-name="T242"> (</text:span><text:span text:style-name="T241">new</text:span><text:span text:style-name="T242"> </text:span><text:span text:style-name="T246">DirectoryIterator</text:span><text:span text:style-name="T242">(</text:span><text:span text:style-name="T244">$path</text:span><text:span text:style-name="T242">) as </text:span><text:span text:style-name="T244">$arquivo</text:span><text:span text:style-name="T242">) {<text:tab/><text:tab/><text:tab/><text:tab/><text:tab/><text:tab/><text:line-break/></text:span><text:span text:style-name="T420">if</text:span><text:span text:style-name="T242"> (</text:span><text:span text:style-name="T244">$arquivo</text:span><text:span text:style-name="T242">-&gt;</text:span><text:span text:style-name="T243">isDot</text:span><text:span text:style-name="T242">()) </text:span><text:span text:style-name="T420">continue</text:span><text:span text:style-name="T242">; </text:span><text:span text:style-name="T245">// ignora "." e ".."<text:tab/><text:tab/><text:tab/><text:tab/><text:tab/>    <text:tab/></text:span></text:p>
      <text:p text:style-name="P332"><text:span text:style-name="T420"><text:s text:c="2"/>if</text:span><text:span text:style-name="T242"> (</text:span><text:span text:style-name="T244">$arquivo</text:span><text:span text:style-name="T242">-&gt;</text:span><text:span text:style-name="T243">isDir</text:span><text:span text:style-name="T242">()) {<text:tab/><text:tab/><text:tab/><text:tab/><text:tab/><text:tab/><text:tab/><text:tab/><text:tab/><text:tab/></text:span></text:p>
      <text:p text:style-name="P332"><text:span text:style-name="T243"><text:s text:c="4"/>echo</text:span><text:span text:style-name="T242"> </text:span><text:span text:style-name="T421">"[DIRETÓRIO] {</text:span><text:span text:style-name="T244">$arquivo</text:span><text:span text:style-name="T242">→g</text:span><text:span text:style-name="T243">etFilename(</text:span><text:span text:style-name="T421">)}&lt;br&gt;";</text:span><text:span text:style-name="T242"><text:tab/><text:tab/><text:tab/><text:tab/><text:tab/><text:tab/></text:span></text:p>
      <text:p text:style-name="P332"><text:span text:style-name="T242"><text:s text:c="2"/>} </text:span><text:span text:style-name="T420">else</text:span><text:span text:style-name="T242"> {<text:tab/><text:tab/><text:tab/><text:tab/><text:tab/><text:tab/><text:tab/><text:tab/><text:tab/><text:tab/><text:tab/><text:tab/><text:tab/></text:span></text:p>
      <text:p text:style-name="P332"><text:span text:style-name="T243"><text:s text:c="4"/>echo</text:span><text:span text:style-name="T242"> </text:span><text:span text:style-name="T421">"[ARQUIVO] {</text:span><text:span text:style-name="T244">$arquivo</text:span><text:span text:style-name="T242">-&gt;</text:span><text:span text:style-name="T243">getFilename</text:span><text:span text:style-name="T421">()} ({</text:span><text:span text:style-name="T244">$arquivo</text:span><text:span text:style-name="T242">-&gt;</text:span><text:span text:style-name="T243">getSize</text:span><text:span text:style-name="T421">()} bytes)&lt;br&gt;"</text:span><text:span text:style-name="T242">;<text:tab/></text:span></text:p>
      <text:p text:style-name="P333"><text:s text:c="2"/>}<text:tab/><text:tab/><text:tab/><text:tab/><text:tab/><text:tab/><text:tab/><text:tab/><text:tab/><text:tab/><text:tab/><text:tab/><text:tab/><text:tab/></text:p>
      <text:p text:style-name="P333">}<text:tab/><text:tab/><text:tab/><text:tab/><text:tab/><text:tab/><text:tab/><text:tab/><text:tab/><text:tab/><text:tab/><text:tab/><text:tab/><text:tab/></text:p>
      <text:p text:style-name="P330"><text:span text:style-name="Source_20_Text"><text:span text:style-name="T952"/></text:span></text:p>
      <text:p text:style-name="P330"><text:span text:style-name="Source_20_Text"><text:span text:style-name="T952">A class </text:span></text:span><text:span text:style-name="Source_20_Text"><text:span text:style-name="T978">SplFileObject </text:span></text:span><text:span text:style-name="Source_20_Text"><text:span text:style-name="T952">implementa algumas interfaces de Iterators, </text:span></text:span><text:span text:style-name="Source_20_Text"><text:span text:style-name="T984">assim permite</text:span></text:span><text:span text:style-name="Source_20_Text"><text:span text:style-name="T952"> utilizar um objeto deste tipo dentro de um foreach. </text:span></text:span><text:span text:style-name="Source_20_Text"><text:span text:style-name="T984">Exemplo:</text:span></text:span></text:p>
      <text:p text:style-name="P334"><text:span text:style-name="Source_20_Text"><text:span text:style-name="T985">$arquivo</text:span></text:span><text:span text:style-name="Source_20_Text"><text:span text:style-name="T986"> = </text:span></text:span><text:span text:style-name="Source_20_Text"><text:span text:style-name="T987">new</text:span></text:span><text:span text:style-name="Source_20_Text"><text:span text:style-name="T986"> </text:span></text:span><text:span text:style-name="Source_20_Text"><text:span text:style-name="T988">SplFileObject</text:span></text:span><text:span text:style-name="Source_20_Text"><text:span text:style-name="T986">(</text:span></text:span><text:span text:style-name="Source_20_Text"><text:span text:style-name="T989">'/caminho/para/arquivo'</text:span></text:span><text:span text:style-name="Source_20_Text"><text:span text:style-name="T986">);<text:tab/></text:span></text:span></text:p>
      <text:p text:style-name="P335"><text:span text:style-name="T420">foreach</text:span><text:span text:style-name="T242"> (</text:span><text:span text:style-name="T244">$arquivo</text:span><text:span text:style-name="T242"> as </text:span><text:span text:style-name="T244">$linha</text:span><text:span text:style-name="T242">) {<text:tab/><text:tab/><text:tab/><text:tab/><text:tab/></text:span></text:p>
      <text:p text:style-name="P335"><text:span text:style-name="T243"><text:s text:c="2"/>echo</text:span><text:span text:style-name="T242"> </text:span><text:span text:style-name="T244">$linha</text:span><text:span text:style-name="T242">;<text:tab/><text:tab/><text:tab/><text:tab/><text:tab/><text:tab/><text:tab/></text:span></text:p>
      <text:p text:style-name="P336">}<text:tab/><text:tab/><text:tab/><text:tab/><text:tab/><text:tab/><text:tab/><text:tab/><text:tab/></text:p>
      <text:p text:style-name="P330"><text:span text:style-name="Source_20_Text"><text:span text:style-name="T984"/></text:span></text:p>
      <text:h text:style-name="P337" text:outline-level="1" text:is-list-header="true"><text:span text:style-name="Source_20_Text"><text:span text:style-name="T990">Generators</text:span></text:span></text:h>
      <text:p text:style-name="P330"><text:span text:style-name="Source_20_Text"><text:span text:style-name="T978">Generators</text:span></text:span><text:span text:style-name="Source_20_Text"><text:span text:style-name="T952"> são funções que usam </text:span></text:span><text:span text:style-name="Source_20_Text"><text:span text:style-name="T991">a palavra reservada</text:span></text:span><text:span text:style-name="Source_20_Text"><text:span text:style-name="T952"> </text:span></text:span><text:span text:style-name="Source_20_Text"><text:span text:style-name="T992">yield</text:span></text:span><text:span text:style-name="Source_20_Text"><text:span text:style-name="T952"> para </text:span></text:span><text:span text:style-name="Source_20_Text"><text:span text:style-name="T953">produzir valores sob demanda</text:span></text:span><text:span text:style-name="Source_20_Text"><text:span text:style-name="T966">, </text:span></text:span><text:span text:style-name="Source_20_Text"><text:span text:style-name="T993">de forma incremental</text:span></text:span><text:span text:style-name="Source_20_Text"><text:span text:style-name="T952">, um por vez, </text:span></text:span><text:span text:style-name="Source_20_Text"><text:span text:style-name="T994">sem precisar armazenar tudo na memória</text:span></text:span><text:span text:style-name="Source_20_Text"><text:span text:style-name="T952">.</text:span></text:span></text:p>
      <text:p text:style-name="P330"><text:span text:style-name="Source_20_Text"><text:span text:style-name="T952">Eles permitem pausar e retomar a execução da função, tornando o código mais eficiente — ideal para grandes volumes de dados (como arquivos ou consultas SQL).</text:span></text:span></text:p>
      <text:p text:style-name="P330"><text:span text:style-name="Source_20_Text"><text:span text:style-name="T952">Normalmente, uma função</text:span></text:span><text:span text:style-name="Source_20_Text"><text:span text:style-name="T966"> em PHP usa </text:span></text:span><text:span text:style-name="Source_20_Text"><text:span text:style-name="T995">return</text:span></text:span><text:span text:style-name="Source_20_Text"><text:span text:style-name="T966"> para devolver </text:span></text:span><text:span text:style-name="Source_20_Text"><text:span text:style-name="Strong_20_Emphasis"><text:span text:style-name="T966">um único valor</text:span></text:span></text:span><text:span text:style-name="Source_20_Text"><text:span text:style-name="T966"> e depois </text:span></text:span><text:span text:style-name="Source_20_Text"><text:span text:style-name="Strong_20_Emphasis"><text:span text:style-name="T966">encerra</text:span></text:span></text:span><text:span text:style-name="Source_20_Text"><text:span text:style-name="T966"> sua execução. Com </text:span></text:span><text:span text:style-name="Source_20_Text"><text:span text:style-name="T995">yield</text:span></text:span><text:span text:style-name="Source_20_Text"><text:span text:style-name="T966">, uma função pode </text:span></text:span><text:span text:style-name="Source_20_Text"><text:span text:style-name="Strong_20_Emphasis"><text:span text:style-name="T966">“pausar”</text:span></text:span></text:span><text:span text:style-name="Source_20_Text"><text:span text:style-name="T966"> sua execução, </text:span></text:span><text:span text:style-name="Source_20_Text"><text:span text:style-name="Strong_20_Emphasis"><text:span text:style-name="T966">devolver um valor</text:span></text:span></text:span><text:span text:style-name="Source_20_Text"><text:span text:style-name="T966">, e depois </text:span></text:span><text:span text:style-name="Source_20_Text"><text:span text:style-name="Strong_20_Emphasis"><text:span text:style-name="T966">retomar</text:span></text:span></text:span><text:span text:style-name="Source_20_Text"><text:span text:style-name="T966"> de onde parou quando for chamada novamente. </text:span></text:span><text:span text:style-name="T996">Esse tipo de função é chamada de </text:span><text:span text:style-name="Strong_20_Emphasis"><text:span text:style-name="T996">generator function</text:span></text:span><text:span text:style-name="T996">.</text:span></text:p>
      <text:h text:style-name="P338" text:outline-level="3"><text:span text:style-name="Source_20_Text"><text:span text:style-name="T997">Sintaxe Básica:</text:span></text:span></text:h>
      <text:p text:style-name="P339"><text:span text:style-name="Source_20_Text"><text:span text:style-name="T998">function</text:span></text:span><text:span text:style-name="Source_20_Text"><text:span text:style-name="T999"> </text:span></text:span><text:span text:style-name="Source_20_Text"><text:span text:style-name="T1000">numeros</text:span></text:span><text:span text:style-name="Source_20_Text"><text:span text:style-name="T999">() {<text:tab/><text:tab/><text:tab/></text:span></text:span></text:p>
      <text:p text:style-name="P335"><text:span text:style-name="T420"><text:s text:c="2"/>for</text:span><text:span text:style-name="T242"> (</text:span><text:span text:style-name="T244">$i</text:span><text:span text:style-name="T242"> = </text:span><text:span text:style-name="T423">1</text:span><text:span text:style-name="T242">; </text:span><text:span text:style-name="T244">$i</text:span><text:span text:style-name="T242"> &lt;= </text:span><text:span text:style-name="T423">3</text:span><text:span text:style-name="T242">; </text:span><text:span text:style-name="T244">$i</text:span><text:span text:style-name="T242">++) {<text:tab/></text:span></text:p>
      <text:p text:style-name="P335"><text:span text:style-name="T420"><text:s text:c="4"/>yield</text:span><text:span text:style-name="T242"> </text:span><text:span text:style-name="T244">$i</text:span><text:span text:style-name="T242">;<text:tab/><text:tab/><text:tab/><text:tab/></text:span></text:p>
      <text:p text:style-name="P336"><text:s text:c="2"/>}<text:tab/><text:tab/><text:tab/><text:tab/><text:tab/><text:tab/></text:p>
      <text:p text:style-name="P336">}<text:tab/><text:tab/><text:tab/><text:tab/><text:tab/><text:tab/></text:p>
      <text:p text:style-name="P336"><text:tab/><text:tab/><text:tab/><text:tab/><text:tab/><text:tab/></text:p>
      <text:p text:style-name="P335"><text:span text:style-name="T420">foreach</text:span><text:span text:style-name="T242"> (</text:span><text:span text:style-name="T243">numeros</text:span><text:span text:style-name="T242">() as </text:span><text:span text:style-name="T244">$num</text:span><text:span text:style-name="T242">) {<text:tab/><text:tab/></text:span></text:p>
      <text:p text:style-name="P335"><text:span text:style-name="T243"><text:s text:c="2"/>echo</text:span><text:span text:style-name="T242"> </text:span><text:span text:style-name="T244">$num</text:span><text:span text:style-name="T242"> . PHP_EOL;<text:tab/><text:tab/><text:tab/></text:span></text:p>
      <text:p text:style-name="P336">}<text:tab/><text:tab/><text:tab/><text:tab/><text:tab/><text:tab/></text:p>
      <text:p text:style-name="P340"><text:span text:style-name="Source_20_Text"><text:span text:style-name="T966">Cada vez que o foreach solicita o próximo valor, o PHP retoma a execução da função <text:line-break/>a partir do ponto onde parou (logo após o yield anterior). </text:span></text:span></text:p>
      <text:h text:style-name="P338" text:outline-level="3"><text:span text:style-name="Source_20_Text"><text:span text:style-name="T997">Diferença entre return e yield:</text:span></text:span></text:h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Comportamento</text:p>
            </table:table-cell>
            <table:table-cell table:style-name="Tabela8.A1" office:value-type="string">
              <text:p text:style-name="Table_20_Heading"><text:span text:style-name="Source_20_Text">return</text:span></text:p>
            </table:table-cell>
            <table:table-cell table:style-name="Tabela8.A1" office:value-type="string">
              <text:p text:style-name="Table_20_Heading"><text:span text:style-name="Source_20_Text">yield</text:span></text:p>
            </table:table-cell>
          </table:table-row>
        </table:table-header-rows>
        <table:table-row>
          <table:table-cell table:style-name="Tabela8.A1" office:value-type="string">
            <text:p text:style-name="Table_20_Contents">Retorna</text:p>
          </table:table-cell>
          <table:table-cell table:style-name="Tabela8.A1" office:value-type="string">
            <text:p text:style-name="Table_20_Contents">Um único valor</text:p>
          </table:table-cell>
          <table:table-cell table:style-name="Tabela8.A1" office:value-type="string">
            <text:p text:style-name="Table_20_Contents">Vários valores, um de cada vez</text:p>
          </table:table-cell>
        </table:table-row>
        <table:table-row>
          <table:table-cell table:style-name="Tabela8.A1" office:value-type="string">
            <text:p text:style-name="Table_20_Contents">Memória</text:p>
          </table:table-cell>
          <table:table-cell table:style-name="Tabela8.A1" office:value-type="string">
            <text:p text:style-name="Table_20_Contents">Armazena tudo antes de retornar</text:p>
          </table:table-cell>
          <table:table-cell table:style-name="Tabela8.A1" office:value-type="string">
            <text:p text:style-name="Table_20_Contents">Gera valores sob demanda</text:p>
          </table:table-cell>
        </table:table-row>
        <table:table-row>
          <table:table-cell table:style-name="Tabela8.A1" office:value-type="string">
            <text:p text:style-name="Table_20_Contents">Fluxo da função</text:p>
          </table:table-cell>
          <table:table-cell table:style-name="Tabela8.A1" office:value-type="string">
            <text:p text:style-name="Table_20_Contents">Encerra imediatamente</text:p>
          </table:table-cell>
          <table:table-cell table:style-name="Tabela8.A1" office:value-type="string">
            <text:p text:style-name="Table_20_Contents">Pausa e retoma</text:p>
          </table:table-cell>
        </table:table-row>
        <table:table-row>
          <table:table-cell table:style-name="Tabela8.A1" office:value-type="string">
            <text:p text:style-name="Table_20_Contents">Tipo de retorno</text:p>
          </table:table-cell>
          <table:table-cell table:style-name="Tabela8.A1" office:value-type="string">
            <text:p text:style-name="Table_20_Contents">Valor simples</text:p>
          </table:table-cell>
          <table:table-cell table:style-name="Tabela8.A1" office:value-type="string">
            <text:p text:style-name="Table_20_Contents"><text:span text:style-name="Source_20_Text">Generator</text:span></text:p>
          </table:table-cell>
        </table:table-row>
      </table:table>
      <text:p text:style-name="P330"><text:span text:style-name="Source_20_Text"><text:span text:style-name="T966"/></text:span></text:p>
      <text:h text:style-name="P338" text:outline-level="3"><text:span text:style-name="Source_20_Text"><text:span text:style-name="T997">Exemplo de leitura de arquivo grande, linha por linha, economizando memória:</text:span></text:span></text:h>
      <text:p text:style-name="P334"><text:span text:style-name="Source_20_Text"><text:span text:style-name="T1001">function</text:span></text:span><text:span text:style-name="Source_20_Text"><text:span text:style-name="T1002"> </text:span></text:span><text:span text:style-name="Source_20_Text"><text:span text:style-name="T1003">lerArquivo</text:span></text:span><text:span text:style-name="Source_20_Text"><text:span text:style-name="T1002">(</text:span></text:span><text:span text:style-name="Source_20_Text"><text:span text:style-name="T1004">$caminho</text:span></text:span><text:span text:style-name="Source_20_Text"><text:span text:style-name="T1002">) {<text:tab/><text:tab/><text:tab/></text:span></text:span></text:p>
      <text:p text:style-name="P335"><text:span text:style-name="T244"><text:s text:c="2"/>$handle</text:span><text:span text:style-name="T242"> = </text:span><text:span text:style-name="T243">fopen</text:span><text:span text:style-name="T242">(</text:span><text:span text:style-name="T244">$caminho</text:span><text:span text:style-name="T242">, </text:span><text:span text:style-name="T421">'r'</text:span><text:span text:style-name="T242">);<text:tab/><text:tab/><text:tab/></text:span></text:p>
      <text:p text:style-name="P335"><text:span text:style-name="T420"><text:s text:c="2"/>while</text:span><text:span text:style-name="T242"> ((</text:span><text:span text:style-name="T244">$linha</text:span><text:span text:style-name="T242"> = </text:span><text:span text:style-name="T243">fgets</text:span><text:span text:style-name="T242">(</text:span><text:span text:style-name="T244">$handle</text:span><text:span text:style-name="T242">)) !== </text:span><text:span text:style-name="T241">false</text:span><text:span text:style-name="T242">) {<text:tab/></text:span></text:p>
      <text:p text:style-name="P335"><text:span text:style-name="T420"><text:s text:c="4"/>yield</text:span><text:span text:style-name="T242"> </text:span><text:span text:style-name="T243">trim</text:span><text:span text:style-name="T242">(</text:span><text:span text:style-name="T244">$linha</text:span><text:span text:style-name="T242">);<text:tab/><text:tab/><text:tab/><text:tab/><text:tab/></text:span></text:p>
      <text:p text:style-name="P336"><text:s text:c="2"/>}<text:tab/><text:tab/><text:tab/><text:tab/><text:tab/><text:tab/><text:tab/><text:tab/></text:p>
      <text:p text:style-name="P335"><text:span text:style-name="T243"><text:s text:c="2"/>fclose</text:span><text:span text:style-name="T242">(</text:span><text:span text:style-name="T244">$handle</text:span><text:span text:style-name="T242">);<text:tab/><text:tab/><text:tab/><text:tab/><text:tab/><text:tab/></text:span></text:p>
      <text:p text:style-name="P336">}<text:tab/><text:tab/><text:tab/><text:tab/><text:tab/><text:tab/><text:tab/><text:tab/></text:p>
      <text:p text:style-name="P341">// Uso:<text:tab/><text:tab/><text:tab/><text:tab/><text:tab/><text:tab/><text:tab/></text:p>
      <text:p text:style-name="P335"><text:span text:style-name="T420">foreach</text:span><text:span text:style-name="T242"> (</text:span><text:span text:style-name="T243">lerArquivo</text:span><text:span text:style-name="T242">(</text:span><text:span text:style-name="T421">'clientes.txt'</text:span><text:span text:style-name="T242">) as </text:span><text:span text:style-name="T244">$linha</text:span><text:span text:style-name="T242">) {<text:tab/></text:span></text:p>
      <text:p text:style-name="P335"><text:span text:style-name="T243"><text:s text:c="2"/>echo</text:span><text:span text:style-name="T242"> </text:span><text:span text:style-name="T244">$linha</text:span><text:span text:style-name="T242"> . PHP_EOL;<text:tab/><text:tab/><text:tab/><text:tab/><text:tab/></text:span></text:p>
      <text:p text:style-name="P336">}<text:tab/><text:tab/><text:tab/><text:tab/><text:tab/><text:tab/><text:tab/><text:tab/></text:p>
      <text:h text:style-name="Heading_20_1" text:outline-level="1"><text:soft-page-break/><text:span text:style-name="Source_20_Text"><text:span text:style-name="T890">PRG</text:span></text:span></text:h>
      <text:p text:style-name="P342"/>
      <text:p text:style-name="P343"><text:span text:style-name="T1005">O padrão </text:span><text:span text:style-name="Source_20_Text"><text:span text:style-name="T1006">POST/Redirect/GET (PRG)</text:span></text:span><text:span text:style-name="T1005"> é uma prática comum no desenvolvimento web para evitar problemas ao recarregar ou navegar de volta em páginas que processam formulários via </text:span><text:span text:style-name="Strong_20_Emphasis"><text:span text:style-name="T1005">POST</text:span></text:span><text:span text:style-name="T1005">. </text:span></text:p>
      <text:p text:style-name="P343"><text:span text:style-name="Strong_20_Emphasis"><text:span text:style-name="T1007">Por usar?</text:span></text:span></text:p>
      <text:list text:style-name="L32">
        <text:list-item>
          <text:p text:style-name="P344"><text:span text:style-name="Strong_20_Emphasis"><text:span text:style-name="T5">Evitar o "Reenvio de Formulário"</text:span></text:span></text:p>
        </text:list-item>
      </text:list>
      <text:list text:style-name="L33">
        <text:list-item>
          <text:list>
            <text:list-item>
              <text:p text:style-name="P345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45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45"><text:span text:style-name="Strong_20_Emphasis"><text:span text:style-name="T5">Melhorar a Experiência do Usuário (UX)</text:span></text:span></text:p>
          <text:list>
            <text:list-item>
              <text:p text:style-name="P346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45"><text:span text:style-name="Strong_20_Emphasis"><text:span text:style-name="T5">URLs Limpas e Compartilháveis</text:span></text:span></text:p>
          <text:list>
            <text:list-item>
              <text:p text:style-name="P345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47"/>
      <text:h text:style-name="P273" text:outline-level="1" text:is-list-header="true"><text:span text:style-name="Source_20_Text"><text:span text:style-name="T890">file_get_contents x cURL</text:span></text:span></text:h>
      <text:p text:style-name="P347"/>
      <text:p text:style-name="P348"><text:span text:style-name="T1005">Tanto </text:span><text:span text:style-name="Source_20_Text"><text:span text:style-name="T1006">file_get_contents</text:span></text:span><text:span text:style-name="Source_20_Text"><text:span text:style-name="T1008">()</text:span></text:span><text:span text:style-name="T1005"> quanto </text:span><text:span text:style-name="Source_20_Text"><text:span text:style-name="T1006">cURL</text:span></text:span><text:span text:style-name="T1005"> são métodos em PHP usados para fazer requisições HTTP, mas têm diferenças importantes em termos de funcionalidade, flexibilidade e uso.</text:span></text:p>
      <text:p text:style-name="P349"/>
      <text:p text:style-name="P348"><text:span text:style-name="Strong_20_Emphasis"><text:span text:style-name="T1005">Resumindo: </text:span></text:span><text:span text:style-name="T1005">Use </text:span><text:span text:style-name="Source_20_Text"><text:span text:style-name="T1005">file_get_contents</text:span></text:span><text:span text:style-name="T1005"> para tarefas simples e rápidas. Use </text:span><text:span text:style-name="Strong_20_Emphasis"><text:span text:style-name="T1005">cURL</text:span></text:span><text:span text:style-name="T1005"> quando precisar de maior controle, flexibilidade e suporte a operações HTTP avançadas.<text:line-break/><text:line-break/></text:span><text:span text:style-name="Strong_20_Emphasis"><text:span text:style-name="T1005">Quando usar </text:span></text:span><text:span text:style-name="Strong_20_Emphasis"><text:span text:style-name="Source_20_Text"><text:span text:style-name="T1005">file_get_contents</text:span></text:span></text:span><text:span text:style-name="Strong_20_Emphasis"><text:span text:style-name="T1005">? </text:span></text:span><text:span text:style-name="T1005">Para tarefas simples, como:</text:span></text:p>
      <text:list text:style-name="L34">
        <text:list-item>
          <text:p text:style-name="P350">Buscar o conteúdo de uma URL.</text:p>
        </text:list-item>
        <text:list-item>
          <text:p text:style-name="P350">Ler arquivos locais ou remotos.</text:p>
        </text:list-item>
      </text:list>
      <text:p text:style-name="P351"><text:span text:style-name="T305">$url</text:span><text:span text:style-name="T307"> = </text:span><text:span text:style-name="T486">"https://api.example.com/data"</text:span><text:span text:style-name="T307">;<text:tab/></text:span></text:p>
      <text:p text:style-name="P143"><text:span text:style-name="T244">$response</text:span><text:span text:style-name="T242"> = </text:span><text:span text:style-name="T243">file_get_contents</text:span><text:span text:style-name="T242">(</text:span><text:span text:style-name="T244">$url</text:span><text:span text:style-name="T242">);<text:tab/><text:tab/></text:span></text:p>
      <text:p text:style-name="P352"><text:span text:style-name="T422">echo</text:span><text:span text:style-name="T307"> </text:span><text:span text:style-name="T305">$response</text:span><text:span text:style-name="T307">;<text:tab/><text:tab/><text:tab/><text:tab/><text:tab/></text:span></text:p>
      <text:p text:style-name="P353"/>
      <text:p text:style-name="P354"><text:span text:style-name="Strong_20_Emphasis"><text:span text:style-name="T1009">Quando usar cURL? </text:span></text:span><text:span text:style-name="T1009">P</text:span><text:span text:style-name="T852">ara tarefa</text:span><text:span text:style-name="T5">s complexas, como:</text:span></text:p>
      <text:list text:style-name="L35">
        <text:list-item>
          <text:p text:style-name="P355">Trabalhar com APIs RESTful que exigem autenticação, cabeçalhos personalizados, ou métodos HTTP avançados.</text:p>
        </text:list-item>
        <text:list-item>
          <text:p text:style-name="P355">Gerenciar cookies e sessões.</text:p>
        </text:list-item>
        <text:list-item>
          <text:p text:style-name="P355">Controlar redirecionamentos e timeouts.</text:p>
        </text:list-item>
        <text:list-item>
          <text:p text:style-name="P355">Upload de arquivos.</text:p>
        </text:list-item>
      </text:list>
      <text:p text:style-name="P356"><text:span text:style-name="Strong_20_Emphasis"><text:span text:style-name="T1010">$ch</text:span></text:span><text:span text:style-name="Strong_20_Emphasis"><text:span text:style-name="T1011"> = </text:span></text:span><text:span text:style-name="Strong_20_Emphasis"><text:span text:style-name="T1012">curl_init</text:span></text:span><text:span text:style-name="Strong_20_Emphasis"><text:span text:style-name="T1011">(</text:span></text:span><text:span text:style-name="Strong_20_Emphasis"><text:span text:style-name="T1013">"https://api.example.com/data"</text:span></text:span><text:span text:style-name="Strong_20_Emphasis"><text:span text:style-name="T1011">);<text:tab/></text:span></text:span></text:p>
      <text:p text:style-name="P143"><text:span text:style-name="T243">curl_setopt</text:span><text:span text:style-name="T242">(</text:span><text:span text:style-name="T244">$ch</text:span><text:span text:style-name="T242">, CURLOPT_RETURNTRANSFER, </text:span><text:span text:style-name="T241">true</text:span><text:span text:style-name="T242">);<text:tab/></text:span></text:p>
      <text:p text:style-name="P143"><text:span text:style-name="T243">curl_setopt</text:span><text:span text:style-name="T242">(</text:span><text:span text:style-name="T244">$ch</text:span><text:span text:style-name="T242">, CURLOPT_HTTPHEADER, [<text:tab/><text:tab/></text:span></text:p>
      <text:p text:style-name="P357"><text:s text:c="2"/>"Authorization: Bearer your_token_here"<text:tab/><text:tab/></text:p>
      <text:p text:style-name="P144">]);<text:tab/><text:tab/><text:tab/><text:tab/><text:tab/><text:tab/><text:tab/><text:tab/></text:p>
      <text:p text:style-name="P143"><text:span text:style-name="T244">$response</text:span><text:span text:style-name="T242"> = </text:span><text:span text:style-name="T243">curl_exec</text:span><text:span text:style-name="T242">(</text:span><text:span text:style-name="T244">$ch</text:span><text:span text:style-name="T242">);<text:tab/><text:tab/><text:tab/><text:tab/></text:span></text:p>
      <text:p text:style-name="P143"><text:span text:style-name="T243">curl_close</text:span><text:span text:style-name="T242">(</text:span><text:span text:style-name="T244">$ch</text:span><text:span text:style-name="T242">);<text:tab/><text:tab/><text:tab/><text:tab/><text:tab/><text:tab/></text:span></text:p>
      <text:p text:style-name="P143"><text:span text:style-name="T243">echo</text:span><text:span text:style-name="T242"> </text:span><text:span text:style-name="T244">$response</text:span><text:span text:style-name="T242">;<text:tab/><text:tab/><text:tab/><text:tab/><text:tab/><text:tab/></text:span></text:p>
      <text:h text:style-name="P273" text:outline-level="1" text:is-list-header="true"><text:soft-page-break/><text:span text:style-name="Source_20_Text"><text:span text:style-name="T890">Modo estrito de tipagem</text:span></text:span></text:h>
      <text:p text:style-name="P358"><text:span text:style-name="T1014">O</text:span> <text:span text:style-name="T1014">PHP</text:span> lida com tipos <text:span text:style-name="T1014">de duas formas:</text:span> Uma delas é chamada "Coercive Type Mode" <text:span text:style-name="T1015">(ou Type Juggling) </text:span>onde acontece todo aquele malabarismo e adivinhações de tipos. A outra é o <text:span text:style-name="T260">Strict Type Mode</text:span> onde o malabarismo e a adivinhação ainda acontecem, mas quando os tipos são definidos explicitamente alguns TypeErrors serão lançados quando os tipos não forem compatíveis.</text:p>
      <text:list text:style-name="L36">
        <text:list-item>
          <text:p text:style-name="P359">Quando ativado, o PHP <text:span text:style-name="Strong_20_Emphasis"><text:span text:style-name="T56">não fará conversões automáticas de tipo</text:span></text:span> (coerção de tipo),</text:p>
        </text:list-item>
        <text:list-item>
          <text:p text:style-name="P359">É útil para criar códigos mais seguros e previsíveis,</text:p>
        </text:list-item>
        <text:list-item>
          <text:p text:style-name="P359">Se os tipos não forem compatíveis, o PHP lançará um erro <text:span text:style-name="Strong_20_Emphasis"><text:span text:style-name="T56">TypeError,</text:span></text:span></text:p>
        </text:list-item>
        <text:list-item>
          <text:p text:style-name="P359"><text:span text:style-name="T1016">A </text:span><text:span text:style-name="T1017">diretiva </text:span><text:span text:style-name="T1018">declare</text:span><text:span text:style-name="T1017"> agirá</text:span> somente <text:span text:style-name="T1017">n</text:span>o arquivo onde foi declarado,</text:p>
        </text:list-item>
        <text:list-item>
          <text:p text:style-name="P359">Deve ser a <text:span text:style-name="Strong_20_Emphasis"><text:span text:style-name="T56">primeira linha do arquivo</text:span></text:span>, logo após a abertura <text:span text:style-name="T182">&lt;?</text:span><text:span text:style-name="T1019">php</text:span></text:p>
        </text:list-item>
      </text:list>
      <text:p text:style-name="P360"><text:span text:style-name="T1020">&lt;?php</text:span><text:span text:style-name="T1021"><text:tab/><text:tab/><text:tab/><text:tab/></text:span></text:p>
      <text:p text:style-name="P361"><text:span text:style-name="T420">declare</text:span><text:span text:style-name="T242">(strict_types=</text:span><text:span text:style-name="T423">1</text:span><text:span text:style-name="T242">);<text:tab/></text:span></text:p>
      <text:p text:style-name="P361"/>
      <text:h text:style-name="Heading_20_1" text:outline-level="1" text:is-list-header="true"><text:span text:style-name="Emphasis">Hierarquia de Erros e Exceções</text:span></text:h>
      <text:p text:style-name="P362"><draw:frame draw:style-name="fr9" draw:name="Figura43" text:anchor-type="as-char" svg:width="7.964cm" svg:height="4.233cm" draw:z-index="42"><draw:image xlink:href="Pictures/100000000000012D000000A8935508E9.png" xlink:type="simple" xlink:show="embed" xlink:actuate="onLoad" draw:mime-type="image/png"/></draw:frame></text:p>
      <text:p text:style-name="P363"><text:span text:style-name="Emphasis"><text:span text:style-name="T1022">I</text:span></text:span><text:span text:style-name="Emphasis"><text:span text:style-name="T1023">ntroduzida no PHP 7, o tratamento de exceções e erros é baseado na interface interna </text:span></text:span><text:span text:style-name="Emphasis"><text:span text:style-name="T1024">Throwable</text:span></text:span></text:p>
      <text:p text:style-name="P363"><text:span text:style-name="Emphasis"><text:span text:style-name="T1025">Interface Throwable:</text:span></text:span></text:p>
      <text:p text:style-name="P364"><text:span text:style-name="Emphasis"><text:span text:style-name="T1023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7">
        <text:list-item>
          <text:p text:style-name="P365"><text:span text:style-name="Emphasis"><text:span text:style-name="T1026">Error</text:span></text:span><text:span text:style-name="Emphasis"><text:span text:style-name="T1027">: </text:span></text:span><text:span text:style-name="Emphasis"><text:span text:style-name="T1023">Classe base para erros gerados pela engine do PHP (Zend Engine). </text:span></text:span><text:span text:style-name="Emphasis"><text:span text:style-name="T1028">Representa erros fatais e problemas internos que antes causavam falhas irrecuperáveis.</text:span></text:span></text:p>
        </text:list-item>
        <text:list-item>
          <text:p text:style-name="P365"><text:span text:style-name="Emphasis"><text:span text:style-name="T1026">Exception</text:span></text:span><text:span text:style-name="Emphasis"><text:span text:style-name="T1023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1029">class</text:span></text:span><text:span text:style-name="Emphasis"><text:span text:style-name="T1030"> </text:span></text:span><text:span text:style-name="Emphasis"><text:span text:style-name="T1031">MinhaExcecao</text:span></text:span><text:span text:style-name="Emphasis"><text:span text:style-name="T1030"> </text:span></text:span><text:span text:style-name="Emphasis"><text:span text:style-name="T1029">extends</text:span></text:span><text:span text:style-name="Emphasis"><text:span text:style-name="T1030"> </text:span></text:span><text:span text:style-name="Emphasis"><text:span text:style-name="T1031">Exception</text:span></text:span><text:span text:style-name="Emphasis"><text:span text:style-name="T1030"> {} <text:line-break/></text:span></text:span><text:span text:style-name="T1032">throw</text:span><text:span text:style-name="T307"> </text:span><text:span text:style-name="T1033">new</text:span><text:span text:style-name="T307"> </text:span><text:span text:style-name="T1034">MinhaExcecao</text:span><text:span text:style-name="T307">(</text:span><text:span text:style-name="T486">"Falha de negócio"</text:span><text:span text:style-name="T307">);<text:tab/></text:span></text:p>
        </text:list-item>
      </text:list>
      <text:p text:style-name="P366"><text:span text:style-name="Emphasis"><text:span text:style-name="T1035">E</text:span></text:span><text:span text:style-name="Emphasis"><text:span text:style-name="T1023">ntretanto, </text:span></text:span><text:span text:style-name="Emphasis"><text:span text:style-name="T1035">p</text:span></text:span><text:span text:style-name="Emphasis"><text:span text:style-name="T1023">odemos ser mais genéricos </text:span></text:span><text:span text:style-name="Emphasis"><text:span text:style-name="T1035">ao</text:span></text:span><text:span text:style-name="Emphasis"><text:span text:style-name="T1023"> </text:span></text:span><text:span text:style-name="Emphasis"><text:span text:style-name="T1035">lançar</text:span></text:span><text:span text:style-name="Emphasis"><text:span text:style-name="T1023">, em vez de uma </text:span></text:span><text:span text:style-name="Emphasis"><text:span text:style-name="T1036">Exception</text:span></text:span><text:span text:style-name="Emphasis"><text:span text:style-name="T1023"> </text:span></text:span><text:span text:style-name="Emphasis"><text:span text:style-name="T1035">ou </text:span></text:span><text:span text:style-name="Emphasis"><text:span text:style-name="T1036">Error</text:span></text:span><text:span text:style-name="Emphasis"><text:span text:style-name="T1023">, somente um </text:span></text:span><text:span text:style-name="Emphasis"><text:span text:style-name="T1037">Throwable</text:span></text:span><text:span text:style-name="Emphasis"><text:span text:style-name="T1023">. Com isso, conseguiremos receber qualquer classe que possa ser lançada, seja ela uma exceção </text:span></text:span><text:span text:style-name="Emphasis"><text:span text:style-name="T1035">ou</text:span></text:span><text:span text:style-name="Emphasis"><text:span text:style-name="T1023"> um erro.</text:span></text:span></text:p>
      <text:list xml:id="list361713655" text:style-name="WWNum1">
        <text:list-header>
          <text:h text:style-name="P367" text:outline-level="1"><text:soft-page-break/><text:span text:style-name="Source_20_Text"><text:span text:style-name="T1038">Erros </text:span></text:span></text:h>
        </text:list-header>
      </text:list>
      <text:p text:style-name="P158"><text:span text:style-name="Strong_20_Emphasis"><text:span text:style-name="T1039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1040">error_reporting()</text:span></text:span><text:span text:style-name="Strong_20_Emphasis"><text:span text:style-name="T1039">. Como parâmetros dessa função, sã</text:span></text:span><text:span text:style-name="T1041">o passadas constantes p</text:span><text:span text:style-name="Strong_20_Emphasis"><text:span text:style-name="T1039">redefinidas que representam cada tipo de erro no PHP. As principais são:</text:span></text:span></text:p>
      <text:list text:style-name="WWNum2">
        <text:list-item>
          <text:p text:style-name="P368"><text:span text:style-name="Source_20_Text"><text:span text:style-name="T1042">E_ERROR: </text:span></text:span><text:span text:style-name="T1041">Erros fatais em tempo de execução. </text:span><text:span text:style-name="T1043">Indicam falhas críticas que impedem a continuidade da execução do script (ex: chamada de função inexistente, erros de alocação de memória). </text:span><text:span text:style-name="Strong_20_Emphasis"><text:span text:style-name="T1043">A execução é interrompida.</text:span></text:span></text:p>
        </text:list-item>
        <text:list-item>
          <text:p text:style-name="P368"><text:span text:style-name="Source_20_Text"><text:span text:style-name="T158">E_WARNING: </text:span></text:span><text:span text:style-name="T1043">Alertas em tempo de execução. Sinalizam problemas não fatais (ex: inclusão de arquivo falhou com </text:span><text:span text:style-name="Source_20_Text"><text:span text:style-name="T158">include</text:span></text:span><text:span text:style-name="T1043">). </text:span><text:span text:style-name="Strong_20_Emphasis"><text:span text:style-name="T1043">A execução continua.</text:span></text:span></text:p>
        </text:list-item>
        <text:list-item>
          <text:p text:style-name="P368"><text:span text:style-name="Source_20_Text"><text:span text:style-name="T158">E_NOTICE: </text:span></text:span><text:span text:style-name="T1043">Notificações sobre comportamentos potencialmente incorretos. Geralmente indicam boas práticas negligenciadas (ex: uso de variável não inicializada). </text:span><text:span text:style-name="Strong_20_Emphasis"><text:span text:style-name="T1043">A execução continua normalmente.</text:span></text:span></text:p>
        </text:list-item>
        <text:list-item>
          <text:p text:style-name="P368"><text:span text:style-name="Source_20_Text"><text:span text:style-name="T158">E_DEPRECATED: </text:span></text:span><text:span text:style-name="T1043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68"><text:span text:style-name="Source_20_Text"><text:span text:style-name="T158">E_ALL: </text:span></text:span><text:span text:style-name="T1043">Reporta </text:span><text:span text:style-name="Strong_20_Emphasis"><text:span text:style-name="T1043">todos</text:span></text:span><text:span text:style-name="T1043"> os tipos de erros, alertas e avisos. É recomendado em ambientes de desenvolvimento para facilitar a detecção de falhas.</text:span></text:p>
        </text:list-item>
      </text:list>
      <text:p text:style-name="P369">Em um ambiente de <text:span text:style-name="T64">desenvolvimento</text:span>:</text:p>
      <text:list text:style-name="WWNum3">
        <text:list-item>
          <text:p text:style-name="P370"><text:span text:style-name="T1043">A diretiva </text:span><text:span text:style-name="Source_20_Text"><text:span text:style-name="T158">error_reporting</text:span></text:span><text:span text:style-name="T1043"> deve ser definida como </text:span><text:span text:style-name="Source_20_Text"><text:span text:style-name="T158">E_ALL</text:span></text:span><text:span text:style-name="T1043">, para exibir </text:span><text:span text:style-name="Strong_20_Emphasis"><text:span text:style-name="T1043">todos os erros, avisos e alertas</text:span></text:span><text:span text:style-name="T1043"> emitidos pelo PHP.</text:span></text:p>
        </text:list-item>
        <text:list-item>
          <text:p text:style-name="P370"><text:span text:style-name="T1043">A diretiva </text:span><text:span text:style-name="Source_20_Text"><text:span text:style-name="T158">display_errors</text:span></text:span><text:span text:style-name="T1043"> deve estar </text:span><text:span text:style-name="Strong_20_Emphasis"><text:span text:style-name="T1043">ativada (</text:span></text:span><text:span text:style-name="Source_20_Text"><text:span text:style-name="T158">On</text:span></text:span><text:span text:style-name="Strong_20_Emphasis"><text:span text:style-name="T1043">)</text:span></text:span><text:span text:style-name="T1043">, permitindo que os erros sejam exibidos diretamente no navegador ou terminal, facilitando a </text:span><text:span text:style-name="Strong_20_Emphasis"><text:span text:style-name="T1043">detecção e correção imediata</text:span></text:span><text:span text:style-name="T1043"> de problemas.</text:span></text:p>
        </text:list-item>
      </text:list>
      <text:p text:style-name="P369">Em um ambiente de <text:span text:style-name="T64">produção</text:span>:</text:p>
      <text:list text:style-name="WWNum4">
        <text:list-item>
          <text:p text:style-name="P371"><text:span text:style-name="T1043">A diretiva </text:span><text:span text:style-name="Source_20_Text"><text:span text:style-name="T158">display_errors</text:span></text:span><text:span text:style-name="T1043"> deve estar </text:span><text:span text:style-name="Strong_20_Emphasis"><text:span text:style-name="T1043">desativada (</text:span></text:span><text:span text:style-name="Source_20_Text"><text:span text:style-name="T158">Off</text:span></text:span><text:span text:style-name="Strong_20_Emphasis"><text:span text:style-name="T1043">)</text:span></text:span><text:span text:style-name="T1043">, pois mensagens de erro podem revelar informações sensíveis (como caminhos internos, queries SQL ou senhas). </text:span></text:p>
        </text:list-item>
        <text:list-item>
          <text:p text:style-name="P372"><text:span text:style-name="T1043">Em vez disso, utilize a diretiva </text:span><text:span text:style-name="Source_20_Text"><text:span text:style-name="T158">log_errors</text:span></text:span><text:span text:style-name="T1043"> para registrar os erros silenciosamente em um arquivo de log seguro:</text:span></text:p>
        </text:list-item>
      </text:list>
      <text:p text:style-name="P373"><text:span text:style-name="T9"><text:line-break/></text:span><text:span text:style-name="T1044">ini_set</text:span><text:span text:style-name="T1045">(</text:span><text:span text:style-name="T1046">'display_errors'</text:span><text:span text:style-name="T1045">, </text:span><text:span text:style-name="T1047">0</text:span><text:span text:style-name="T1045">);<text:tab/><text:tab/><text:tab/><text:tab/><text:tab/><text:line-break/></text:span><text:span text:style-name="T1044">ini_set</text:span><text:span text:style-name="T1045">(</text:span><text:span text:style-name="T1046">'log_errors'</text:span><text:span text:style-name="T1045">, </text:span><text:span text:style-name="T1047">1</text:span><text:span text:style-name="T1045">);<text:tab/><text:tab/><text:tab/><text:tab/><text:tab/><text:line-break/></text:span><text:span text:style-name="T1044">ini_set</text:span><text:span text:style-name="T1045">(</text:span><text:span text:style-name="T1046">'error_log'</text:span><text:span text:style-name="T1045">, </text:span><text:span text:style-name="T1046">'/caminho/para/arquivo.log'</text:span><text:span text:style-name="T1045">);<text:tab/></text:span></text:p>
      <text:p text:style-name="P374"/>
      <text:p text:style-name="P375"><text:span text:style-name="T9">Desde o PHP 7, muitos erros fatais passaram a ser representados por objetos da classe </text:span><text:span text:style-name="Source_20_Text"><text:span text:style-name="T1048">Error</text:span></text:span><text:span text:style-name="T9">, o que permite capturá-los com </text:span><text:span text:style-name="Source_20_Text"><text:span text:style-name="T1049">try/catch</text:span></text:span><text:span text:style-name="T9">, assim como exceções.<text:line-break/></text:span><text:span text:style-name="Strong_20_Emphasis"><text:span text:style-name="T9">Importante</text:span></text:span><text:span text:style-name="T9">: a classe </text:span><text:span text:style-name="Source_20_Text"><text:span text:style-name="T1049">Error</text:span></text:span><text:span text:style-name="T9"> </text:span><text:span text:style-name="Strong_20_Emphasis"><text:span text:style-name="T9">não herda</text:span></text:span><text:span text:style-name="T9"> de </text:span><text:span text:style-name="Source_20_Text"><text:span text:style-name="T1049">Exception</text:span></text:span><text:span text:style-name="T9">.</text:span></text:p>
      <text:p text:style-name="P376">A partir da versão 8 do PHP, <text:span text:style-name="T64">todos os erros serão exibidos por padrão</text:span>, o que evita os casos de erros passarem despercebidos por problemas de configuração. </text:p>
      <text:list text:continue-list="list361713655" text:style-name="WWNum1">
        <text:list-item>
          <text:h text:style-name="P377" text:outline-level="1"><text:span text:style-name="Strong_20_Emphasis">Exceções</text:span><text:span text:style-name="T5"/></text:h>
        </text:list-item>
      </text:list>
      <text:p text:style-name="P378"><text:span text:style-name="Emphasis"><text:span text:style-name="T1050">Em PHP, </text:span></text:span><text:span text:style-name="Strong_20_Emphasis"><text:span text:style-name="T1051">exceptions</text:span></text:span><text:span text:style-name="Emphasis"><text:span text:style-name="T1050"> (exceções) são um mecanismo para lidar com </text:span></text:span><text:span text:style-name="Strong_20_Emphasis"><text:span text:style-name="T1051">erros ou situações inesperadas</text:span></text:span><text:span text:style-name="Emphasis"><text:span text:style-name="T1050"> durante a execução do código, de forma estruturada e controlada. Em vez de o script quebrar silenciosamente ou exibir um erro genérico, você pode </text:span></text:span><text:span text:style-name="Strong_20_Emphasis"><text:span text:style-name="T1051">"lançar" uma exceção</text:span></text:span><text:span text:style-name="Emphasis"><text:span text:style-name="T1050"> e depois </text:span></text:span><text:span text:style-name="Strong_20_Emphasis"><text:span text:style-name="T1051">"capturá-la" (catch)</text:span></text:span><text:span text:style-name="Emphasis"><text:span text:style-name="T1050"> para tratar o problema com mais controle e clareza.</text:span></text:span></text:p>
      <text:p text:style-name="P379"><text:span text:style-name="Emphasis"/></text:p>
      <text:p text:style-name="P379"><text:span text:style-name="Emphasis"><text:span text:style-name="T1052">Conceito Básico:</text:span></text:span><text:span text:style-name="Emphasis"><text:span text:style-name="T1050"> Uma exceção representa um </text:span></text:span><text:span text:style-name="Strong_20_Emphasis"><text:span text:style-name="T1051">objeto</text:span></text:span><text:span text:style-name="Emphasis"><text:span text:style-name="T1050"> que descreve um erro ocorrido. Quando algo dá errado, você </text:span></text:span><text:span text:style-name="Strong_20_Emphasis"><text:span text:style-name="T1051">lança (</text:span></text:span><text:span text:style-name="Source_20_Text"><text:span text:style-name="T1053">throw</text:span></text:span><text:span text:style-name="Strong_20_Emphasis"><text:span text:style-name="T1051">) uma exceção</text:span></text:span><text:span text:style-name="Emphasis"><text:span text:style-name="T1050">, e depois </text:span></text:span><text:span text:style-name="Emphasis"><text:span text:style-name="T1052">pega</text:span></text:span><text:span text:style-name="Strong_20_Emphasis"><text:span text:style-name="T1051"> (</text:span></text:span><text:span text:style-name="Source_20_Text"><text:span text:style-name="T1053">catch</text:span></text:span><text:span text:style-name="Strong_20_Emphasis"><text:span text:style-name="T1051">)</text:span></text:span><text:span text:style-name="Emphasis"><text:span text:style-name="T1050"> essa exceção. </text:span></text:span></text:p>
      <text:p text:style-name="P379"><text:span text:style-name="Emphasis"/></text:p>
      <text:p text:style-name="P380"><text:span text:style-name="Emphasis"><text:span text:style-name="T1054">Dica: </text:span></text:span><text:span text:style-name="Emphasis"><text:span text:style-name="T1055">lance </text:span></text:span><text:span text:style-name="Emphasis"><text:span text:style-name="T1056">exceções na implementação</text:span></text:span><text:span text:style-name="Emphasis"><text:span text:style-name="T1055"> das funções e lance </text:span></text:span><text:span text:style-name="Emphasis"><text:span text:style-name="T1056">blocos try/catch nas chamadas</text:span></text:span><text:span text:style-name="Emphasis"><text:span text:style-name="T1055"> dessas funções</text:span></text:span></text:p>
      <text:h text:style-name="P381" text:outline-level="2" text:is-list-header="true"><text:span text:style-name="Emphasis"><text:span text:style-name="T158">Explicação da estrutura </text:span></text:span><text:span text:style-name="Emphasis"><text:span text:style-name="T1057">try/catch</text:span></text:span><text:span text:style-name="Emphasis"><text:span text:style-name="T1058">:</text:span></text:span></text:h>
      <text:p text:style-name="P382"><text:span text:style-name="Source_20_Text"><text:span text:style-name="T1059">throw new Exception(</text:span></text:span><text:span text:style-name="Source_20_Text"><text:span text:style-name="T1060">"mensagem"</text:span></text:span><text:span text:style-name="Source_20_Text"><text:span text:style-name="T1059">)</text:span></text:span><text:span text:style-name="Source_20_Text"><text:span text:style-name="T1043">: </text:span></text:span><text:span text:style-name="Source_20_Text"><text:span text:style-name="T1061">Lança</text:span></text:span><text:span text:style-name="Source_20_Text"><text:span text:style-name="T1043"> uma nova exceção com uma mensagem.<text:line-break/></text:span></text:span><text:span text:style-name="Source_20_Text"><text:span text:style-name="T1062">try { </text:span></text:span><text:span text:style-name="Source_20_Text"><text:span text:style-name="T1063">...</text:span></text:span><text:span text:style-name="Source_20_Text"><text:span text:style-name="T1062"> }</text:span></text:span><text:span text:style-name="T1043">: Bloco onde coloca o código que </text:span><text:span text:style-name="Strong_20_Emphasis"><text:span text:style-name="T1043">pode gerar uma exceção</text:span></text:span><text:span text:style-name="T1043">.<text:line-break/></text:span><text:span text:style-name="Source_20_Text"><text:span text:style-name="T1062">catch (Exception </text:span></text:span><text:span text:style-name="Source_20_Text"><text:span text:style-name="T1063">$e</text:span></text:span><text:span text:style-name="Source_20_Text"><text:span text:style-name="T1062">) { </text:span></text:span><text:span text:style-name="Source_20_Text"><text:span text:style-name="T1063">...</text:span></text:span><text:span text:style-name="Source_20_Text"><text:span text:style-name="T1062"> }</text:span></text:span><text:span text:style-name="T1043">: Bloco que </text:span><text:span text:style-name="Strong_20_Emphasis"><text:span text:style-name="T1043">captura</text:span></text:span><text:span text:style-name="T1043"> a exceção.</text:span></text:p>
      <text:p text:style-name="P383">Exemplo:</text:p>
      <text:p text:style-name="P384"><text:span text:style-name="T1064">try </text:span><text:span text:style-name="T1065">{<text:tab/><text:tab/><text:tab/><text:tab/><text:tab/><text:tab/><text:tab/><text:tab/><text:tab/><text:tab/><text:line-break/><text:tab/></text:span><text:span text:style-name="T420">if</text:span><text:span text:style-name="T242"> (!</text:span><text:span text:style-name="T243">file_exists</text:span><text:span text:style-name="T242">(</text:span><text:span text:style-name="T421">'dados.txt'</text:span><text:span text:style-name="T242">)) {<text:tab/><text:tab/><text:tab/><text:tab/></text:span></text:p>
      <text:p text:style-name="P385"><text:span text:style-name="T420"><text:tab/><text:tab/>throw</text:span><text:span text:style-name="T242"> </text:span><text:span text:style-name="T241">new</text:span><text:span text:style-name="T242"> </text:span><text:span text:style-name="T246">Exception</text:span><text:span text:style-name="T242">(</text:span><text:span text:style-name="T421">"Arquivo não encontrado!"</text:span><text:span text:style-name="T242">);<text:tab/></text:span></text:p>
      <text:p text:style-name="P386"><text:tab/>}<text:tab/><text:tab/><text:tab/><text:tab/><text:tab/><text:tab/><text:tab/><text:tab/><text:tab/></text:p>
      <text:p text:style-name="P385"><text:span text:style-name="T244"><text:tab/>$conteudo</text:span><text:span text:style-name="T242"> = </text:span><text:span text:style-name="T243">file_get_contents</text:span><text:span text:style-name="T242">(</text:span><text:span text:style-name="T421">'dados.txt'</text:span><text:span text:style-name="T242">);<text:tab/><text:tab/></text:span></text:p>
      <text:p text:style-name="P385"><text:span text:style-name="T242">} </text:span><text:span text:style-name="T420">catch</text:span><text:span text:style-name="T242"> (</text:span><text:span text:style-name="T246">Exception</text:span><text:span text:style-name="T242"> </text:span><text:span text:style-name="T244">$e</text:span><text:span text:style-name="T242">) {<text:tab/><text:tab/><text:tab/><text:tab/><text:tab/><text:tab/><text:tab/></text:span></text:p>
      <text:p text:style-name="P385"><text:span text:style-name="T243"><text:tab/>echo</text:span><text:span text:style-name="T242"> </text:span><text:span text:style-name="T421">"Erro: "</text:span><text:span text:style-name="T242"> . </text:span><text:span text:style-name="T244">$e→getMessage();</text:span><text:span text:style-name="T242"><text:tab/><text:tab/><text:tab/><text:tab/></text:span></text:p>
      <text:p text:style-name="P386">}<text:tab/><text:tab/><text:tab/><text:tab/><text:tab/><text:tab/><text:tab/><text:tab/><text:tab/><text:tab/></text:p>
      <text:p text:style-name="P387"/>
      <text:h text:style-name="P388" text:outline-level="2" text:is-list-header="true">O objeto da exceção possui métodos como:</text:h>
      <text:p text:style-name="P389"><text:span text:style-name="T1066">$e</text:span><text:span text:style-name="T1067">-&gt;</text:span><text:span text:style-name="T1068">getMessage</text:span><text:span text:style-name="T1067">(); </text:span><text:span text:style-name="T1069">//exibe a mensagem do throw<text:tab/><text:tab/></text:span></text:p>
      <text:p text:style-name="P390"><text:span text:style-name="T244">$e</text:span><text:span text:style-name="T242">-&gt;</text:span><text:span text:style-name="T243">getCode</text:span><text:span text:style-name="T242">(); </text:span><text:span text:style-name="T245">//exibe o código                   <text:tab/><text:tab/></text:span></text:p>
      <text:p text:style-name="P390"><text:span text:style-name="T244">$e</text:span><text:span text:style-name="T242">-&gt;</text:span><text:span text:style-name="T243">getLine</text:span><text:span text:style-name="T242">(); </text:span><text:span text:style-name="T245">//exibe a linha                     <text:tab/><text:tab/></text:span></text:p>
      <text:p text:style-name="P390"><text:span text:style-name="T244">$e</text:span><text:span text:style-name="T242">-&gt;</text:span><text:span text:style-name="T243">getFile</text:span><text:span text:style-name="T242">(); </text:span><text:span text:style-name="T245">//exibe o caminho do arquivo<text:tab/><text:tab/><text:tab/></text:span></text:p>
      <text:p text:style-name="P390"><text:span text:style-name="T244">$e</text:span><text:span text:style-name="T242">-&gt;</text:span><text:span text:style-name="T243">getTraceAsString</text:span><text:span text:style-name="T242">(): </text:span><text:span text:style-name="T245">//Stack trace como string.<text:tab/><text:tab/></text:span></text:p>
      <text:p text:style-name="P391"/>
      <text:p text:style-name="P392">A <text:span text:style-name="Strong_20_Emphasis">Zend Engine</text:span> do PHP mantém, <text:span text:style-name="T1070">d</text:span>urante a execução <text:span text:style-name="T1070">do código</text:span>, uma <text:span text:style-name="Strong_20_Emphasis">pilha de chamadas</text:span> <text:span text:style-name="T1071">(call stack) </text:span>que registra:</text:p>
      <text:list text:style-name="L38">
        <text:list-item>
          <text:p text:style-name="P393">Quais funções/métodos foram chamados.</text:p>
        </text:list-item>
        <text:list-item>
          <text:p text:style-name="P393">Em que ordem foram chamadas.</text:p>
        </text:list-item>
        <text:list-item>
          <text:p text:style-name="P393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182">Throwable</text:span></text:span>, permitindo rastrear <text:span text:style-name="Strong_20_Emphasis">exatamente onde e como o erro ocorreu</text:span>. O método <text:span text:style-name="Source_20_Text"><text:span text:style-name="T182">getTraceAsString()</text:span></text:span> fornece essa informação formatada como texto.</text:p>
      <text:p text:style-name="P158"/>
      <text:p text:style-name="P394"><text:span text:style-name="T852">Toda exceção em PHP possui um nome que a identifica.<text:line-break/></text:span><text:span text:style-name="T1072">U</text:span><text:span text:style-name="T852">ma exceção nada mais é do que uma classe, logo, podemos instanciar exceções.<text:line-break/>Para lançar uma exceção, além de instanciá-la, é necessário lançá-la através do </text:span><text:span text:style-name="Source_20_Text"><text:span text:style-name="T852">throw<text:line-break/></text:span></text:span><text:span text:style-name="T852">Podemos atribuir uma mensagem a uma exceção.<text:line-break/></text:span><text:span text:style-name="T1073">A partir do PHP 8, a variável de erro </text:span><text:span text:style-name="Source_20_Text"><text:span text:style-name="T1063">$e</text:span></text:span><text:span text:style-name="T1073"> é opcional.</text:span></text:p>
      <text:h text:style-name="P388" text:outline-level="2" text:is-list-header="true">Finally</text:h>
      <text:p text:style-name="P395"><text:span text:style-name="T1074">Use</text:span><text:span text:style-name="T1043"> </text:span><text:span text:style-name="Source_20_Text"><text:span text:style-name="T1059">finally</text:span></text:span><text:span text:style-name="T1043"> para executar algo </text:span><text:span text:style-name="Strong_20_Emphasis"><text:span text:style-name="T1043">independentemente</text:span></text:span><text:span text:style-name="T1043"> de o</text:span><text:span text:style-name="T1075">correr erro ou </text:span><text:span text:style-name="T1076">in</text:span><text:span text:style-name="T1075">strução </text:span><text:span text:style-name="Source_20_Text"><text:span text:style-name="T1077">return</text:span></text:span><text:span text:style-name="T1075">:</text:span></text:p>
      <text:p text:style-name="P283"><text:span text:style-name="T244">$arquivo</text:span><text:span text:style-name="T242"> = </text:span><text:span text:style-name="T243">fopen</text:span><text:span text:style-name="T242">(</text:span><text:span text:style-name="T421">'temp.txt'</text:span><text:span text:style-name="T242">, </text:span><text:span text:style-name="T421">'w'</text:span><text:span text:style-name="T242">);<text:tab/><text:tab/><text:tab/><text:tab/></text:span></text:p>
      <text:p text:style-name="P283"><text:span text:style-name="T420">try</text:span><text:span text:style-name="T242">  {<text:tab/><text:tab/><text:tab/><text:tab/><text:tab/><text:tab/><text:tab/><text:tab/><text:tab/></text:span></text:p>
      <text:p text:style-name="P396"><text:span text:style-name="T734"><text:s text:c="2"/></text:span><text:span text:style-name="T937">fwrite</text:span><text:span text:style-name="T734">(</text:span><text:span text:style-name="T733">$arquivo</text:span><text:span text:style-name="T734">, </text:span><text:span text:style-name="T1078">'Qualquer coisa'</text:span><text:span text:style-name="T734">);<text:tab/><text:tab/><text:tab/></text:span></text:p>
      <text:p text:style-name="P396"><text:span text:style-name="T734"><text:s text:c="2"/></text:span><text:span text:style-name="T1079">throw</text:span><text:span text:style-name="T734"> </text:span><text:span text:style-name="T735">new</text:span><text:span text:style-name="T734"> </text:span><text:span text:style-name="T938">Exception</text:span><text:span text:style-name="T734">(</text:span><text:span text:style-name="T1078">'Erro ao escrever no arquivo'</text:span><text:span text:style-name="T734">);<text:tab/></text:span></text:p>
      <text:p text:style-name="P283"><text:span text:style-name="T242">} </text:span><text:span text:style-name="T420">catch</text:span><text:span text:style-name="T242"> (</text:span><text:span text:style-name="T246">Throwable</text:span><text:span text:style-name="T242"> </text:span><text:span text:style-name="T244">$e</text:span><text:span text:style-name="T242">) {<text:tab/><text:tab/><text:tab/><text:tab/><text:tab/><text:tab/></text:span></text:p>
      <text:p text:style-name="P396"><text:span text:style-name="T734"><text:s text:c="2"/></text:span><text:span text:style-name="T733">$e</text:span><text:span text:style-name="T734">-&gt;</text:span><text:span text:style-name="T937">getMessage</text:span><text:span text:style-name="T734">() . PHP_EOL;<text:tab/><text:tab/><text:tab/><text:tab/><text:tab/></text:span></text:p>
      <text:p text:style-name="P283"><text:span text:style-name="T242">} </text:span><text:span text:style-name="T420">finally</text:span><text:span text:style-name="T242"> {<text:tab/><text:tab/><text:tab/><text:tab/><text:tab/><text:tab/><text:tab/><text:tab/></text:span></text:p>
      <text:p text:style-name="P396"><text:span text:style-name="T734"><text:s text:c="2"/></text:span><text:span text:style-name="T937">echo</text:span><text:span text:style-name="T734"> </text:span><text:span text:style-name="T1078">"Fechando arquivo..."</text:span><text:span text:style-name="T734"> . PHP_EOL;<text:tab/><text:tab/><text:tab/></text:span></text:p>
      <text:p text:style-name="P396"><text:span text:style-name="T734"><text:s text:c="2"/></text:span><text:span text:style-name="T937">fclose</text:span><text:span text:style-name="T734">(</text:span><text:span text:style-name="T733">$arquivo</text:span><text:span text:style-name="T734">);<text:tab/><text:tab/><text:tab/><text:tab/><text:tab/><text:tab/></text:span></text:p>
      <text:p text:style-name="P284">}<text:tab/><text:tab/><text:tab/><text:tab/><text:tab/><text:tab/><text:tab/><text:tab/><text:tab/></text:p>
      <text:h text:style-name="P397" text:outline-level="2" text:is-list-header="true"><text:span text:style-name="Emphasis"><text:span text:style-name="T1080">M</text:span></text:span><text:span text:style-name="Emphasis"><text:span text:style-name="T1081">ulti-catch</text:span></text:span><text:span text:style-name="Emphasis"><text:span text:style-name="T1082"> </text:span></text:span></text:h>
      <text:p text:style-name="P380"><text:span text:style-name="Emphasis"><text:span text:style-name="T1083">Com o operador</text:span></text:span><text:span text:style-name="Source_20_Text"><text:span text:style-name="T1062">|</text:span></text:span><text:span text:style-name="Emphasis"><text:span text:style-name="T1081">(pipe) na cláusula </text:span></text:span><text:span text:style-name="Source_20_Text"><text:span text:style-name="T1062">catch</text:span></text:span><text:span text:style-name="Emphasis"><text:span text:style-name="T1081">, é possível capturar </text:span></text:span><text:span text:style-name="Emphasis"><text:span text:style-name="T1084">múltiplas exceções em </text:span></text:span><text:span text:style-name="Emphasis"><text:span text:style-name="T1081">um único bloco.</text:span></text:span></text:p>
      <text:p text:style-name="P398"><text:span text:style-name="Source_20_Text"><text:span text:style-name="T1085">Try</text:span></text:span><text:span text:style-name="Source_20_Text"><text:span text:style-name="T1086"> {<text:tab/><text:tab/><text:tab/><text:tab/><text:tab/><text:tab/><text:tab/><text:tab/><text:tab/><text:tab/></text:span></text:span></text:p>
      <text:p text:style-name="P283"><text:span text:style-name="T243"><text:tab/>echo</text:span><text:span text:style-name="T242"> </text:span><text:span text:style-name="T243">intdiv</text:span><text:span text:style-name="T242">(</text:span><text:span text:style-name="T423">1</text:span><text:span text:style-name="T242">, </text:span><text:span text:style-name="T423">0</text:span><text:span text:style-name="T242">);<text:tab/><text:tab/><text:tab/><text:tab/><text:tab/><text:tab/><text:tab/></text:span></text:p>
      <text:p text:style-name="P283"><text:span text:style-name="T242">} </text:span><text:span text:style-name="T420">catch</text:span><text:span text:style-name="T242">(</text:span><text:span text:style-name="T246">DivisionByZeroError</text:span><text:span text:style-name="T242"> | </text:span><text:span text:style-name="T246">RuntimeException</text:span><text:span text:style-name="T242"> </text:span><text:span text:style-name="T244">$problema</text:span><text:span text:style-name="T242">) {<text:tab/></text:span></text:p>
      <text:p text:style-name="P283"><text:span text:style-name="T243"><text:tab/>echo</text:span><text:span text:style-name="T242"> </text:span><text:span text:style-name="T244">$problema→getTraceAsString();</text:span><text:span text:style-name="T242"><text:tab/><text:tab/><text:tab/><text:tab/></text:span></text:p>
      <text:p text:style-name="P284">}<text:tab/><text:tab/><text:tab/><text:tab/><text:tab/><text:tab/><text:tab/><text:tab/><text:tab/><text:tab/></text:p>
      <text:p text:style-name="P284"/>
      <text:h text:style-name="Heading_20_2" text:outline-level="2" text:is-list-header="true"><text:span text:style-name="Emphasis"><text:span text:style-name="T1087">Criando exceç</text:span></text:span><text:span text:style-name="Emphasis"><text:span text:style-name="T1088">ões</text:span></text:span><text:span text:style-name="Emphasis"><text:span text:style-name="T1089"> </text:span></text:span></text:h>
      <text:p text:style-name="P399"><text:span text:style-name="Emphasis"><text:span text:style-name="T1089">Para que uma classe possa ser lançada como uma exceção, é necessário estender de </text:span></text:span><text:span text:style-name="Emphasis"><text:span text:style-name="T1090">Exception</text:span></text:span><text:span text:style-name="Emphasis"><text:span text:style-name="T1089">, a exceção mais genér</text:span></text:span><text:span text:style-name="Emphasis"><text:span text:style-name="T1091">ica que existe, ou de outra mais específica.<text:line-break/></text:span></text:span><text:span text:style-name="Emphasis"><text:span text:style-name="T1092">Exemplo:</text:span></text:span></text:p>
      <text:p text:style-name="P400"><text:span text:style-name="Emphasis"><text:span text:style-name="T1093">namespace</text:span></text:span><text:span text:style-name="Emphasis"><text:span text:style-name="T1094"> </text:span></text:span><text:span text:style-name="Emphasis"><text:span text:style-name="T1095">App\Domain\Repositories</text:span></text:span><text:span text:style-name="Emphasis"><text:span text:style-name="T1094">;<text:tab/><text:tab/><text:tab/><text:tab/><text:tab/><text:tab/><text:tab/><text:tab/><text:tab/></text:span></text:span></text:p>
      <text:p text:style-name="P401"><text:span text:style-name="T241">use</text:span><text:span text:style-name="T242"> </text:span><text:span text:style-name="T1096">\I</text:span><text:span text:style-name="T246">nvalidArgumentException</text:span><text:span text:style-name="T242">;<text:tab/><text:tab/><text:tab/><text:tab/><text:tab/><text:tab/><text:tab/><text:tab/><text:tab/><text:tab/></text:span></text:p>
      <text:p text:style-name="P401"><text:span text:style-name="T241">use</text:span><text:span text:style-name="T242"> App\Domain\Exceptions\</text:span><text:span text:style-name="T246">UsuarioNaoEncontradoException</text:span><text:span text:style-name="T242">;<text:tab/><text:tab/><text:tab/><text:tab/><text:tab/></text:span></text:p>
      <text:p text:style-name="P401"><text:span text:style-name="T241">class</text:span><text:span text:style-name="T242"> </text:span><text:span text:style-name="T246">UsuarioRepository</text:span><text:span text:style-name="T242"> {<text:tab/><text:tab/><text:tab/><text:tab/><text:tab/><text:tab/><text:tab/><text:tab/><text:tab/><text:tab/></text:span></text:p>
      <text:p text:style-name="P401"><text:span text:style-name="T241"><text:s text:c="2"/>public</text:span><text:span text:style-name="T242"> </text:span><text:span text:style-name="T241">function</text:span><text:span text:style-name="T242"> </text:span><text:span text:style-name="T243">buscarPorId</text:span><text:span text:style-name="T242">(</text:span><text:span text:style-name="T241">int</text:span><text:span text:style-name="T242"> </text:span><text:span text:style-name="T244">$id</text:span><text:span text:style-name="T242">): </text:span><text:span text:style-name="T246">Usuario</text:span><text:span text:style-name="T242"> {<text:tab/><text:tab/><text:tab/><text:tab/><text:tab/><text:tab/><text:tab/></text:span></text:p>
      <text:p text:style-name="P402"><text:span text:style-name="T734"><text:s text:c="4"/></text:span><text:span text:style-name="T1079">if</text:span><text:span text:style-name="T734"> (!</text:span><text:span text:style-name="T937">is_int</text:span><text:span text:style-name="T734">(</text:span><text:span text:style-name="T733">$id</text:span><text:span text:style-name="T734">)) </text:span><text:span text:style-name="T1079">throw</text:span><text:span text:style-name="T734"> </text:span><text:span text:style-name="T735">new</text:span><text:span text:style-name="T734"> </text:span><text:span text:style-name="T938">InvalidArgumentException</text:span><text:span text:style-name="T734">(</text:span><text:span text:style-name="T1078">"ID deve ser um inteiro"</text:span><text:span text:style-name="T734">);<text:tab/></text:span></text:p>
      <text:p text:style-name="P402"><text:span text:style-name="T734"><text:s text:c="4"/></text:span><text:span text:style-name="T1079">if</text:span><text:span text:style-name="T734"> (!</text:span><text:span text:style-name="T733">$usuario</text:span><text:span text:style-name="T734">) </text:span><text:span text:style-name="T1079">throw</text:span><text:span text:style-name="T734"> </text:span><text:span text:style-name="T735">new</text:span><text:span text:style-name="T734"> </text:span><text:span text:style-name="T938">UsuarioNaoEncontradoException</text:span><text:span text:style-name="T734">(</text:span><text:span text:style-name="T1078">"</text:span><text:span text:style-name="T1097">ID</text:span><text:span text:style-name="T1078"> </text:span><text:span text:style-name="T733">$id</text:span><text:span text:style-name="T1078"> não encontrado"</text:span><text:span text:style-name="T734">);<text:tab/></text:span></text:p>
      <text:p text:style-name="P402"><text:span text:style-name="T734"><text:s text:c="4"/></text:span><text:span text:style-name="T1079">return</text:span><text:span text:style-name="T734"> </text:span><text:span text:style-name="T733">$usuario</text:span><text:span text:style-name="T734">;<text:tab/><text:tab/><text:tab/><text:tab/><text:tab/><text:tab/><text:tab/><text:tab/><text:tab/><text:tab/><text:tab/></text:span></text:p>
      <text:p text:style-name="P403"><text:s text:c="2"/>}<text:tab/><text:tab/><text:tab/><text:tab/><text:tab/><text:tab/><text:tab/><text:tab/><text:tab/><text:tab/><text:tab/><text:tab/><text:tab/><text:tab/></text:p>
      <text:p text:style-name="P404"><text:span text:style-name="Emphasis"><text:span text:style-name="T1098">}<text:tab/><text:tab/><text:tab/><text:tab/><text:tab/><text:tab/><text:tab/><text:tab/><text:tab/><text:tab/><text:tab/><text:tab/><text:tab/><text:tab/></text:span></text:span></text:p>
      <text:p text:style-name="P405"><text:span text:style-name="Emphasis"><text:span text:style-name="T1099">Outro exemplo:</text:span></text:span></text:p>
      <text:p text:style-name="P406"><text:span text:style-name="Emphasis"><text:span text:style-name="T1100">class</text:span></text:span><text:span text:style-name="Emphasis"><text:span text:style-name="T1101"> </text:span></text:span><text:span text:style-name="Emphasis"><text:span text:style-name="T1102">SaldoInsuficienteException</text:span></text:span><text:span text:style-name="Emphasis"><text:span text:style-name="T1101"> </text:span></text:span><text:span text:style-name="Emphasis"><text:span text:style-name="T1100">extends</text:span></text:span><text:span text:style-name="Emphasis"><text:span text:style-name="T1101"> </text:span></text:span><text:span text:style-name="Emphasis"><text:span text:style-name="T1102">\DomainException </text:span></text:span><text:span text:style-name="T307">{<text:tab/><text:tab/><text:tab/><text:tab/><text:tab/></text:span></text:p>
      <text:p text:style-name="P407"><text:span text:style-name="T241"><text:tab/>public</text:span><text:span text:style-name="T242"> </text:span><text:span text:style-name="T241">function</text:span><text:span text:style-name="T242"> </text:span><text:span text:style-name="T243">__construct</text:span><text:span text:style-name="T242">(</text:span><text:span text:style-name="T241">float</text:span><text:span text:style-name="T242"> </text:span><text:span text:style-name="T244">$valorSaque</text:span><text:span text:style-name="T242">, </text:span><text:span text:style-name="T241">float</text:span><text:span text:style-name="T242"> </text:span><text:span text:style-name="T244">$saldoAtual</text:span><text:span text:style-name="T242">) {<text:tab/><text:tab/><text:tab/></text:span></text:p>
      <text:p text:style-name="P407"><text:span text:style-name="T244">$mensagem</text:span><text:span text:style-name="T242"> = </text:span><text:span text:style-name="T421">"Você tentou sacar </text:span><text:span text:style-name="T244">$valorSaque</text:span><text:span text:style-name="T421">, mas tem apenas </text:span><text:span text:style-name="T244">$saldoAtual</text:span><text:span text:style-name="T421"> em conta."</text:span><text:span text:style-name="T242">;<text:tab/></text:span></text:p>
      <text:p text:style-name="P407"><text:span text:style-name="T241"><text:tab/><text:tab/>parent</text:span><text:span text:style-name="T242">::</text:span><text:span text:style-name="T243">__construct</text:span><text:span text:style-name="T242">(</text:span><text:span text:style-name="T244">$mensagem</text:span><text:span text:style-name="T242">);<text:tab/><text:tab/><text:tab/><text:tab/><text:tab/><text:tab/><text:tab/></text:span></text:p>
      <text:p text:style-name="P404"><text:tab/>}<text:tab/><text:tab/><text:tab/><text:tab/><text:tab/><text:tab/><text:tab/><text:tab/><text:tab/><text:tab/><text:tab/><text:tab/><text:tab/></text:p>
      <text:p text:style-name="P404">}<text:tab/><text:tab/><text:tab/><text:tab/><text:tab/><text:tab/><text:tab/><text:tab/><text:tab/><text:tab/><text:tab/><text:tab/><text:tab/><text:tab/></text:p>
      <text:h text:style-name="P408" text:outline-level="2" text:is-list-header="true"><text:span text:style-name="Emphasis"><text:span text:style-name="T1103">SPL (Standard PHP Library)</text:span></text:span></text:h>
      <text:p text:style-name="P409"><text:span text:style-name="Emphasis"><text:span text:style-name="T1104">Essa extensão vem habilitada por padrão, sendo </text:span></text:span><text:span text:style-name="Emphasis"><text:span text:style-name="T1089">uma coleção de interfaces e classes que se destinam a resolver problemas comuns. </text:span></text:span><text:span text:style-name="Emphasis"><text:span text:style-name="T1104">Ela </text:span></text:span><text:span text:style-name="Emphasis"><text:span text:style-name="T1089">fornece diversas </text:span></text:span><text:span text:style-name="Emphasis"><text:span text:style-name="Strong_20_Emphasis"><text:span text:style-name="T1089">exceções específicas</text:span></text:span></text:span><text:span text:style-name="Emphasis"><text:span text:style-name="T1089"> que ajudam a aplicar boas práticas de orientação a objetos </text:span></text:span><text:span text:style-name="Emphasis"><text:span text:style-name="T1104">pois:</text:span></text:span></text:p>
      <text:list text:style-name="L39">
        <text:list-item>
          <text:p text:style-name="P410"><text:span text:style-name="Emphasis"><text:span text:style-name="T1089">Capturam</text:span></text:span><text:span text:style-name="Emphasis"><text:span text:style-name="T1104"> </text:span></text:span><text:span text:style-name="Emphasis"><text:span text:style-name="T1089">erros com maior granularidade, </text:span></text:span></text:p>
        </text:list-item>
        <text:list-item>
          <text:p text:style-name="P410"><text:span text:style-name="Emphasis"><text:span text:style-name="Strong_20_Emphasis"><text:span text:style-name="T1105">Documentam melhor a intenção do erro</text:span></text:span></text:span><text:span text:style-name="Emphasis"><text:span text:style-name="T1105">.</text:span></text:span><text:span text:style-name="Emphasis"><text:span text:style-name="T1089"> </text:span></text:span></text:p>
        </text:list-item>
        <text:list-item>
          <text:p text:style-name="P410"><text:span text:style-name="Emphasis"><text:span text:style-name="T1089">Facilitam o uso de </text:span></text:span><text:span text:style-name="Emphasis"><text:span text:style-name="Source_20_Text"><text:span text:style-name="T1090">catch</text:span></text:span></text:span><text:span text:style-name="Emphasis"><text:span text:style-name="T1089"> específicos (por tipo). </text:span></text:span></text:p>
        </text:list-item>
        <text:list-item>
          <text:p text:style-name="P410"><text:span text:style-name="Emphasis"><text:span text:style-name="T1089">Melhoram o controle de fluxo com base na causa do erro.</text:span></text:span></text:p>
        </text:list-item>
      </text:list>
      <text:p text:style-name="P409"><text:span text:style-name="Emphasis"><text:span text:style-name="T1089">Abaixo, as </text:span></text:span><text:span text:style-name="Emphasis"><text:span text:style-name="T1106">exceções SPL mais utilizadas</text:span></text:span><text:span text:style-name="Emphasis"><text:span text:style-name="T1089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411"><text:span text:style-name="Source_20_Text"><text:span text:style-name="T1107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InvalidArgument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3.A1" office:value-type="string">
            <text:p text:style-name="Table_20_Contents"><text:span text:style-name="T64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LengthException</text:span></text:span></text:p>
          </table:table-cell>
          <table:table-cell table:style-name="Tabela3.A1" office:value-type="string">
            <text:p text:style-name="Table_20_Contents">Um valor tem <text:span text:style-name="T64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OutOfRange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3.A1" office:value-type="string">
            <text:p text:style-name="Table_20_Contents">Índice ou valor<text:span text:style-name="T64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409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411"><text:span text:style-name="Source_20_Text"><text:span text:style-name="T1107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OutOfBounds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Table_20_Contents">Acesso a <text:span text:style-name="T64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108">ArrayObject['chave_invalida']</text:span></text:span>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Overflow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Table_20_Contents">Adição a estrutura que <text:span text:style-name="T64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Underflow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UnexpectedValue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P412"><text:span text:style-name="T1109">N</text:span>ão é <text:span text:style-name="T1109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413" text:outline-level="1" text:is-list-header="true"><text:span text:style-name="Emphasis"/></text:h>
      <text:h text:style-name="P414" text:outline-level="1">Extensões PHP</text:h>
      <text:p text:style-name="P415"><text:span text:style-name="T1005">PHP é uma linguagem de programação que roda em uma máquina virtual chamada </text:span><text:span text:style-name="Emphasis"><text:span text:style-name="T1005">Zend Engine</text:span></text:span><text:span text:style-name="T1005">. Essa máquina virtual é escrita em C e permite que nós escrevamos código em C para embutir funcionalidades no PHP. Assim funcionam as extensões do PHP.</text:span></text:p>
      <text:p text:style-name="P358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58">Quem usa PHP no dia-a-dia com certeza usa alguma extensão. Alguns exemplos de extensões PHP bem comuns: PDO, Sessions, JSON, cURL, <text:span text:style-name="T1110">etc</text:span></text:p>
      <text:p text:style-name="P416"><text:span text:style-name="T1111">As extensões podem ser categorizadas, </text:span><text:span text:style-name="T1112">dentre as principais estão</text:span><text:span text:style-name="T1111">: </text:span></text:p>
      <text:p text:style-name="P417"><text:span text:style-name="Emphasis"><text:span text:style-name="T1113">Core</text:span></text:span><text:span text:style-name="Emphasis"><text:span text:style-name="T1114">: </text:span></text:span><text:span text:style-name="Emphasis"><text:span text:style-name="T1115">Essencias. Exemplo: </text:span></text:span><text:span text:style-name="Emphasis"><text:span text:style-name="T1114">Arrays, Classes/Objects, Date/Time, JSON, OPCache etc. </text:span></text:span></text:p>
      <text:p text:style-name="P417"><text:span text:style-name="Emphasis"><text:span text:style-name="T1113">Bundled</text:span></text:span><text:span text:style-name="Emphasis"><text:span text:style-name="T1114">: </text:span></text:span><text:span text:style-name="Emphasis"><text:span text:style-name="T1115">já vem empacotadas no PHP, mas é possível desabilitá-las. </text:span></text:span><text:span text:style-name="Emphasis"><text:span text:style-name="T1114">PDO, GD, FFI, intl, Sessions etc. </text:span></text:span></text:p>
      <text:p text:style-name="P417"><text:span text:style-name="Emphasis"><text:span text:style-name="T1113">External</text:span></text:span><text:span text:style-name="Emphasis"><text:span text:style-name="T1114">: </text:span></text:span><text:span text:style-name="Emphasis"><text:span text:style-name="T1115">possuem dependências externas. Exemplo: </text:span></text:span><text:span text:style-name="Emphasis"><text:span text:style-name="T1114">cURL, DOM, OpenSSL, Sodium, Zip etc. </text:span></text:span></text:p>
      <text:p text:style-name="P418"><text:span text:style-name="Emphasis"><text:span text:style-name="T1113">PECL</text:span></text:span><text:span text:style-name="Emphasis"><text:span text:style-name="T1114">: PHP Extension Community Library </text:span></text:span><text:span text:style-name="Emphasis"><text:span text:style-name="T1116">é o repositório oficial onde </text:span></text:span><text:span text:style-name="Emphasis"><text:span text:style-name="T1117">são </text:span></text:span><text:span text:style-name="Emphasis"><text:span text:style-name="T1114">mantidas </text:span></text:span><text:span text:style-name="Emphasis"><text:span text:style-name="T1116">extensões construídas </text:span></text:span><text:span text:style-name="Emphasis"><text:span text:style-name="T1114">por terceiros. </text:span></text:span><text:span text:style-name="Emphasis"><text:span text:style-name="T1115">Exemplo: </text:span></text:span><text:span text:style-name="Emphasis"><text:span text:style-name="T1118">OCI8</text:span></text:span><text:span text:style-name="Emphasis"><text:span text:style-name="T1114">, Parallel, Swoole</text:span></text:span><text:span text:style-name="Emphasis"><text:span text:style-name="T1118">, </text:span></text:span><text:span text:style-name="Emphasis"><text:span text:style-name="T1119">Yaml, </text:span></text:span><text:span text:style-name="Emphasis"><text:span text:style-name="T1120">D</text:span></text:span><text:span text:style-name="Emphasis"><text:span text:style-name="T1114">S (Data Structures), EV, Memcached etc. </text:span></text:span></text:p>
      <text:p text:style-name="P418"><text:span text:style-name="Emphasis"><text:span text:style-name="T1114">Diferente do Composer, que gerencia pacotes escritos em código PHP puro, o PECL gerencia extensões que alteram e ampliam as capacidades centrais do próprio motor do PHP. </text:span></text:span></text:p>
      <text:p text:style-name="P418"><text:span text:style-name="Emphasis"><text:span text:style-name="T1114"/></text:span></text:p>
      <text:h text:style-name="P413" text:outline-level="1"><text:span text:style-name="Emphasis"><text:span text:style-name="T1121">X</text:span></text:span><text:span text:style-name="Emphasis"><text:span text:style-name="T1122">Debug</text:span></text:span></text:h>
      <text:list text:style-name="L40">
        <text:list-item>
          <text:p text:style-name="P419"><text:span text:style-name="Emphasis"><text:span text:style-name="Strong_20_Emphasis"><text:span text:style-name="T1123">Xdebug</text:span></text:span></text:span><text:span text:style-name="Emphasis"><text:span text:style-name="T1114"> é uma </text:span></text:span><text:span text:style-name="Emphasis"><text:span text:style-name="Strong_20_Emphasis"><text:span text:style-name="T1123">extensão do PHP</text:span></text:span></text:span><text:span text:style-name="Emphasis"><text:span text:style-name="T1114"> (um módulo nativo em C) que adiciona funcionalidades avançadas de depuração e análise de código.<text:line-break/>Ele atua como uma ponte entre o PHP e seu ambiente de desenvolvimento (como VS Code, PhpStorm, NetBeans etc.), permitindo:</text:span></text:span></text:p>
        </text:list-item>
      </text:list>
      <text:list text:style-name="L41">
        <text:list-item>
          <text:p text:style-name="P420"><text:span text:style-name="Strong_20_Emphasis">Debug passo a passo</text:span> (breakpoints, inspeção de variáveis, etc.);</text:p>
        </text:list-item>
        <text:list-item>
          <text:p text:style-name="P420"><text:span text:style-name="Strong_20_Emphasis">Profiling de desempenho</text:span> (identificar gargalos);</text:p>
        </text:list-item>
        <text:list-item>
          <text:p text:style-name="P420"><text:span text:style-name="Strong_20_Emphasis">Stack traces detalhados</text:span> em erros;</text:p>
        </text:list-item>
        <text:list-item>
          <text:p text:style-name="P420"><text:span text:style-name="Strong_20_Emphasis">Cobertura de código</text:span> (para testes automatizados);</text:p>
        </text:list-item>
        <text:list-item>
          <text:p text:style-name="P420"><text:span text:style-name="Strong_20_Emphasis">Exibição melhorada de variáveis</text:span>.</text:p>
        </text:list-item>
      </text:list>
      <text:p text:style-name="P421"><text:span text:style-name="Emphasis"><text:span text:style-name="T1124">o </text:span></text:span><text:span text:style-name="Emphasis"><text:span text:style-name="Strong_20_Emphasis"><text:span text:style-name="T1124">Xdebug “sobrescreve” (na prática, estende/modifica)</text:span></text:span></text:span><text:span text:style-name="Emphasis"><text:span text:style-name="T1124"> a forma como o PHP exibe o </text:span></text:span><text:span text:style-name="Emphasis"><text:span text:style-name="Source_20_Text"><text:span text:style-name="T1125">var_dump() e print_r()</text:span></text:span></text:span><text:span text:style-name="Emphasis"><text:span text:style-name="T1124">, formatando com: </text:span></text:span><text:span text:style-name="Emphasis"><text:span text:style-name="Strong_20_Emphasis"><text:span text:style-name="T1126">Cores</text:span></text:span></text:span><text:span text:style-name="Emphasis"><text:span text:style-name="T1124"> (em HTML); </text:span></text:span><text:span text:style-name="Strong_20_Emphasis"><text:span text:style-name="T1127">Indentação</text:span></text:span><text:span text:style-name="Strong_20_Emphasis"><text:span text:style-name="T1128"> mais limpa</text:span></text:span><text:span text:style-name="T1128">; </text:span><text:span text:style-name="Strong_20_Emphasis"><text:span text:style-name="T1127">Tipos e tamanhos</text:span></text:span><text:span text:style-name="Strong_20_Emphasis"><text:span text:style-name="T1128"> de strings em destaque</text:span></text:span><text:span text:style-name="T1128">; </text:span><text:span text:style-name="Strong_20_Emphasis"><text:span text:style-name="T1128">Limite configurável de profundidade e número de elementos</text:span></text:span><text:span text:style-name="T1128">.</text:span></text:p>
      <text:p text:style-name="P422"/>
      <text:p text:style-name="P423">Principais configurações <text:span text:style-name="T1129">do Xdebug </text:span>no arquivo php.ini:</text:p>
      <text:p text:style-name="P424"><text:span text:style-name="T1130">;;;;;;;;;;;;;;;;;;;;;;;;;;;;;;;;;;;;;;;;;;;;;;;;;;;;;;;;;;;;;;;;<text:tab/><text:tab/><text:tab/><text:line-break/>; CONFIGURAÇÃO XDEBUG - AMBIENTE DE DESENVOLVIMENTO PHP<text:tab/><text:tab/><text:tab/><text:tab/><text:tab/><text:line-break/>; -------------------------------------------------------------<text:tab/><text:tab/><text:tab/><text:line-break/>; Essa configuração é voltada para depuração com VS Code ou PhpStorm.<text:tab/><text:tab/><text:line-break/>; Modos ativos: develop (melhora mensagens de erro), debug (breakpoints)<text:tab/><text:tab/><text:line-break/>; e trace (logs detalhados de execução).<text:tab/><text:tab/><text:tab/><text:tab/><text:tab/><text:tab/><text:tab/><text:line-break/>;;;;;;;;;;;;;;;;;;;;;;;;;;;;;;;;;;;;;;;;;;;;;;;;;;;;;;;;;;;;;;;;<text:tab/><text:tab/><text:tab/><text:line-break/><text:tab/><text:tab/><text:tab/><text:tab/><text:tab/><text:tab/><text:tab/><text:tab/><text:tab/><text:tab/><text:tab/><text:tab/><text:tab/><text:line-break/>; ===  Ativação da extensão ===<text:tab/><text:tab/><text:tab/><text:tab/><text:tab/><text:tab/><text:tab/><text:tab/><text:line-break/></text:span><text:span text:style-name="T1131">zend_extension = </text:span><text:span text:style-name="T1132">xdebug</text:span><text:span text:style-name="T1130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Modos de operação ===<text:tab/><text:tab/><text:tab/><text:tab/><text:tab/><text:tab/><text:tab/><text:tab/><text:tab/><text:line-break/>; Opções disponíveis: off | develop | debug | trace | profile | coverage<text:tab/><text:tab/><text:line-break/>; Combine modos com vírgula. Em dev, normalmente usamos develop,debug,trace<text:tab/><text:line-break/></text:span><text:span text:style-name="T1131">xdebug.mode = </text:span><text:span text:style-name="T1132">develop,debug,trace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===  Inicialização e comunicação ===<text:tab/><text:tab/><text:tab/><text:tab/><text:tab/><text:tab/><text:tab/><text:line-break/>; Faz o Xdebug se conectar automaticamente à IDE quando houver requisição<text:tab/><text:tab/><text:line-break/></text:span><text:span text:style-name="T1131">xdebug.start_with_request = </text:span><text:span text:style-name="T1132">yes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Descobre o IP do cliente (útil em Docker, WSL, ou IPs dinâmicos)<text:tab/><text:tab/><text:tab/><text:line-break/></text:span><text:span text:style-name="T1131">xdebug.discover_client_host = </text:span><text:span text:style-name="T1132">true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Porta de comunicação com a IDE (desde o Xdebug 3.x é 9003)<text:tab/><text:tab/><text:tab/><text:tab/><text:line-break/></text:span><text:span text:style-name="T1131">xdebug.client_port = </text:span><text:span text:style-name="T1132">9003</text:span><text:span text:style-name="T1130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Nome da IDE (usado para identificar sessões de depuração)<text:tab/><text:tab/><text:tab/><text:tab/><text:line-break/></text:span><text:span text:style-name="T1131">xdebug.idekey = </text:span><text:span text:style-name="T1132">VSCODE</text:span><text:span text:style-name="T1130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Logs e diretórios ===<text:tab/><text:tab/><text:tab/><text:tab/><text:tab/><text:tab/><text:tab/><text:tab/><text:tab/><text:line-break/>; Diretório onde serão gravados arquivos de trace e profiling<text:tab/><text:tab/><text:tab/><text:tab/><text:line-break/></text:span><text:span text:style-name="T1131">xdebug.output_dir = </text:span><text:span text:style-name="T1132">"/tmp/xdebug"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Caminho do log do Xdebug (ajuda em casos de erro de conexão)<text:tab/><text:tab/><text:tab/><text:line-break/></text:span><text:span text:style-name="T1131">xdebug.log = </text:span><text:span text:style-name="T1132">"/tmp/xdebug.log"</text:span><text:span text:style-name="T1131"><text:tab/>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===  Exibição e rastreamento ===<text:tab/><text:tab/><text:tab/><text:tab/><text:tab/><text:tab/><text:tab/><text:tab/><text:line-break/>; Mostra rastreamento de exceções diretamente no navegador<text:tab/><text:tab/><text:tab/><text:tab/><text:line-break/></text:span><text:span text:style-name="T1131">xdebug.show_exception_trace = </text:span><text:span text:style-name="T1132">1</text:span><text:span text:style-name="T1130"><text:tab/><text:tab/><text:tab/><text:tab/><text:tab/><text:tab/><text:tab/><text:tab/><text:line-break/><text:tab/><text:tab/><text:tab/><text:tab/><text:tab/><text:tab/><text:tab/><text:tab/><text:tab/><text:tab/><text:tab/><text:tab/><text:tab/><text:line-break/>; Mostra variáveis locais no contexto de erro (muito útil)<text:tab/><text:tab/><text:tab/><text:tab/><text:line-break/></text:span><text:span text:style-name="T1131">xdebug.show_local_vars = </text:span><text:span text:style-name="T1132">1</text:span><text:span text:style-name="T1130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Dumpa automaticamente algumas variáveis de ambiente quando ocorre erro<text:tab/><text:tab/><text:line-break/></text:span><text:span text:style-name="T1131">xdebug.dump.SERVER = </text:span><text:span text:style-name="T1132">REMOTE_ADDR, REQUEST_METHOD</text:span><text:span text:style-name="T1131"><text:tab/><text:tab/><text:tab/><text:tab/><text:tab/><text:tab/><text:line-break/>xdebug.dump.GET = </text:span><text:span text:style-name="T1132">*</text:span><text:span text:style-name="T1130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(Opcional) Para uso em produção ou testes de performance ===<text:tab/><text:tab/><text:tab/><text:line-break/>; Quando quiser desativar temporariamente o Xdebug:<text:tab/><text:tab/><text:tab/><text:tab/><text:tab/><text:line-break/>; </text:span><text:span text:style-name="T1131">xdebug.mode = </text:span><text:span text:style-name="T1132">off</text:span><text:span text:style-name="T1130"><text:tab/><text:tab/><text:tab/><text:tab/><text:tab/><text:tab/><text:tab/><text:tab/><text:tab/><text:tab/><text:line-break/>;;;;;;;;;;;;;;;;;;;;;;;;;;;;;;;;;;;;;;;;;;;;;;;;;;;;;;;;;;;;;;;;</text:span><text:span text:style-name="T307"><text:tab/><text:tab/><text:tab/></text:span></text:p>
      <text:p text:style-name="P425"/>
      <text:p text:style-name="P422"><text:soft-page-break/></text:p>
      <text:p text:style-name="P422"/>
      <text:p text:style-name="P422">Principais funções:</text:p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Heading">Função</text:p>
            </table:table-cell>
            <table:table-cell table:style-name="Tabela9.A1" office:value-type="string">
              <text:p text:style-name="Table_20_Heading">Descrição</text:p>
            </table:table-cell>
            <table:table-cell table:style-name="Tabela9.A1" office:value-type="string">
              <text:p text:style-name="Table_20_Heading">Uso comum</text:p>
            </table:table-cell>
          </table:table-row>
        </table:table-header-rows>
        <table:table-row>
          <table:table-cell table:style-name="Tabela9.A1" office:value-type="string">
            <text:p text:style-name="Table_20_Contents"><text:span text:style-name="Source_20_Text">xdebug_var_dump()</text:span></text:p>
          </table:table-cell>
          <table:table-cell table:style-name="Tabela9.A1" office:value-type="string">
            <text:p text:style-name="Table_20_Contents">var_dump aprimorado com cor e formato</text:p>
          </table:table-cell>
          <table:table-cell table:style-name="Tabela9.A1" office:value-type="string">
            <text:p text:style-name="Table_20_Contents">Depuração visual de arrays e objetos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info()</text:span></text:p>
          </table:table-cell>
          <table:table-cell table:style-name="Tabela9.A1" office:value-type="string">
            <text:p text:style-name="Table_20_Contents">Mostra informações de configuração do Xdebug</text:p>
          </table:table-cell>
          <table:table-cell table:style-name="Tabela9.A1" office:value-type="string">
            <text:p text:style-name="Table_20_Contents">Diagnóstico e setup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rint_function_stack()</text:span></text:p>
          </table:table-cell>
          <table:table-cell table:style-name="Tabela9.A1" office:value-type="string">
            <text:p text:style-name="Table_20_Contents">Exibe pilha de chamadas</text:p>
          </table:table-cell>
          <table:table-cell table:style-name="Tabela9.A1" office:value-type="string">
            <text:p text:style-name="Table_20_Contents">Rastrear de onde vem uma execuçã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break()</text:span></text:p>
          </table:table-cell>
          <table:table-cell table:style-name="Tabela9.A1" office:value-type="string">
            <text:p text:style-name="Table_20_Contents">Breakpoint programático</text:p>
          </table:table-cell>
          <table:table-cell table:style-name="Tabela9.A1" office:value-type="string">
            <text:p text:style-name="Table_20_Contents">Depuração condicional <text:span text:style-name="T1133">(</text:span>A execução só pausa se o VS Code estiver ouvindo na porta 9003<text:span text:style-name="T1133">)</text:span>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notify()</text:span></text:p>
          </table:table-cell>
          <table:table-cell table:style-name="Tabela9.A1" office:value-type="string">
            <text:p text:style-name="Table_20_Contents">Envia mensagem ao <text:span text:style-name="T1134">arquivo de</text:span> log</text:p>
          </table:table-cell>
          <table:table-cell table:style-name="Tabela9.A1" office:value-type="string">
            <text:p text:style-name="Table_20_Contents">Logging customizad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time_index()</text:span></text:p>
          </table:table-cell>
          <table:table-cell table:style-name="Tabela9.A1" office:value-type="string">
            <text:p text:style-name="Table_20_Contents">Tempo desde início da execução</text:p>
          </table:table-cell>
          <table:table-cell table:style-name="Tabela9.A1" office:value-type="string">
            <text:p text:style-name="Table_20_Contents">Benchmark de códig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memory_usage()</text:span></text:p>
          </table:table-cell>
          <table:table-cell table:style-name="Tabela9.A1" office:value-type="string">
            <text:p text:style-name="Table_20_Contents">Memória atual usada</text:p>
          </table:table-cell>
          <table:table-cell table:style-name="Tabela9.A1" office:value-type="string">
            <text:p text:style-name="Table_20_Contents">Monitorar consum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eak_memory_usage()</text:span></text:p>
          </table:table-cell>
          <table:table-cell table:style-name="Tabela9.A1" office:value-type="string">
            <text:p text:style-name="Table_20_Contents">Pico de memória na execução</text:p>
          </table:table-cell>
          <table:table-cell table:style-name="Tabela9.A1" office:value-type="string">
            <text:p text:style-name="Table_20_Contents">Otimização de scripts pesados</text:p>
          </table:table-cell>
        </table:table-row>
      </table:table>
      <text:p text:style-name="P426"/>
      <text:h text:style-name="P427" text:outline-level="1"><text:span text:style-name="Strong_20_Emphasis"><text:span text:style-name="T1135">C</text:span></text:span><text:span text:style-name="Strong_20_Emphasis"><text:span text:style-name="T1122">onfigurações </text:span></text:span><text:span text:style-name="Strong_20_Emphasis"><text:span text:style-name="T1135">php.ini em</text:span></text:span><text:span text:style-name="Strong_20_Emphasis"><text:span text:style-name="T1122"> ambiente de</text:span></text:span><text:span text:style-name="Strong_20_Emphasis"><text:span text:style-name="T1135">v</text:span></text:span></text:h>
      <text:p text:style-name="P428"><text:span text:style-name="Emphasis"><text:span text:style-name="T1136"/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header-rows>
          <table:table-row>
            <table:table-cell table:style-name="Tabela10.A1" office:value-type="string">
              <text:p text:style-name="Table_20_Heading">Categoria</text:p>
            </table:table-cell>
            <table:table-cell table:style-name="Tabela10.A1" office:value-type="string">
              <text:p text:style-name="Table_20_Heading">Diretiva</text:p>
            </table:table-cell>
            <table:table-cell table:style-name="Tabela10.A1" office:value-type="string">
              <text:p text:style-name="Table_20_Heading">Valor recomendado</text:p>
            </table:table-cell>
            <table:table-cell table:style-name="Tabela10.A1" office:value-type="string">
              <text:p text:style-name="Table_20_Heading">Finalidade / Observação</text:p>
            </table:table-cell>
          </table:table-row>
        </table:table-header-rows>
        <table:table-row>
          <table:table-cell table:style-name="Tabela10.A1" office:value-type="string">
            <text:p text:style-name="Table_20_Contents"><text:span text:style-name="Strong_20_Emphasis">Erros e Depuração</text:span></text:p>
          </table:table-cell>
          <table:table-cell table:style-name="Tabela10.A1" office:value-type="string">
            <text:p text:style-name="Table_20_Contents"><text:span text:style-name="Source_20_Text">error_reporting</text:span></text:p>
          </table:table-cell>
          <table:table-cell table:style-name="Tabela10.A1" office:value-type="string">
            <text:p text:style-name="Table_20_Contents"><text:span text:style-name="Source_20_Text">E_ALL</text:span></text:p>
          </table:table-cell>
          <table:table-cell table:style-name="Tabela10.A1" office:value-type="string">
            <text:p text:style-name="Table_20_Contents">Mostra todos os erros e avisos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display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Exibe erros no navegador (somente em dev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display_startup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ostra erros ocorridos na inicialização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log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Registra erros em arquivo de log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error_log</text:span></text:p>
          </table:table-cell>
          <table:table-cell table:style-name="Tabela10.A1" office:value-type="string">
            <text:p text:style-name="Table_20_Contents"><text:span text:style-name="Source_20_Text">C:\xampp\php\logs\php_error.log</text:span></text:p>
          </table:table-cell>
          <table:table-cell table:style-name="Tabela10.A1" office:value-type="string">
            <text:p text:style-name="Table_20_Contents">Caminho do log de erros (ajuste conforme o SO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html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Exibe erros formatados em HTML (melhor leitura no browser)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Performance / Limites</text:span></text:p>
          </table:table-cell>
          <table:table-cell table:style-name="Tabela10.A1" office:value-type="string">
            <text:p text:style-name="Table_20_Contents"><text:span text:style-name="Source_20_Text">max_execution_time</text:span></text:p>
          </table:table-cell>
          <table:table-cell table:style-name="Tabela10.A1" office:value-type="string">
            <text:p text:style-name="Table_20_Contents"><text:span text:style-name="Source_20_Text">300</text:span></text:p>
          </table:table-cell>
          <table:table-cell table:style-name="Tabela10.A1" office:value-type="string">
            <text:p text:style-name="Table_20_Contents">Tempo máximo de execução de scripts (5 <text:soft-page-break/>min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memory_limit</text:span></text:p>
          </table:table-cell>
          <table:table-cell table:style-name="Tabela10.A1" office:value-type="string">
            <text:p text:style-name="Table_20_Contents"><text:span text:style-name="Source_20_Text">512M</text:span></text:p>
          </table:table-cell>
          <table:table-cell table:style-name="Tabela10.A1" office:value-type="string">
            <text:p text:style-name="Table_20_Contents">Limite de memória disponível ao PHP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upload_max_filesize</text:span></text:p>
          </table:table-cell>
          <table:table-cell table:style-name="Tabela10.A1" office:value-type="string">
            <text:p text:style-name="Table_20_Contents"><text:span text:style-name="Source_20_Text">50M</text:span></text:p>
          </table:table-cell>
          <table:table-cell table:style-name="Tabela10.A1" office:value-type="string">
            <text:p text:style-name="Table_20_Contents">Tamanho máximo de upload de arquivos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post_max_size</text:span></text:p>
          </table:table-cell>
          <table:table-cell table:style-name="Tabela10.A1" office:value-type="string">
            <text:p text:style-name="Table_20_Contents"><text:span text:style-name="Source_20_Text">50M</text:span></text:p>
          </table:table-cell>
          <table:table-cell table:style-name="Tabela10.A1" office:value-type="string">
            <text:p text:style-name="Table_20_Contents">Tamanho máximo dos dados enviados por POST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Sessões e Arquivos Temporários</text:span></text:p>
          </table:table-cell>
          <table:table-cell table:style-name="Tabela10.A1" office:value-type="string">
            <text:p text:style-name="Table_20_Contents"><text:span text:style-name="Source_20_Text">session.save_path</text:span></text:p>
          </table:table-cell>
          <table:table-cell table:style-name="Tabela10.A1" office:value-type="string">
            <text:p text:style-name="Table_20_Contents"><text:span text:style-name="Source_20_Text">C:\xampp\tmp</text:span></text:p>
          </table:table-cell>
          <table:table-cell table:style-name="Tabela10.A1" office:value-type="string">
            <text:p text:style-name="Table_20_Contents">Local onde as sessões são gravadas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upload_tmp_dir</text:span></text:p>
          </table:table-cell>
          <table:table-cell table:style-name="Tabela10.A1" office:value-type="string">
            <text:p text:style-name="Table_20_Contents"><text:span text:style-name="Source_20_Text">C:\xampp\tmp</text:span></text:p>
          </table:table-cell>
          <table:table-cell table:style-name="Tabela10.A1" office:value-type="string">
            <text:p text:style-name="Table_20_Contents">Diretório temporário para uploads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Cache (Opcache)</text:span></text:p>
          </table:table-cell>
          <table:table-cell table:style-name="Tabela10.A1" office:value-type="string">
            <text:p text:style-name="Table_20_Contents"><text:span text:style-name="Source_20_Text">opcache.enable</text:span></text:p>
          </table:table-cell>
          <table:table-cell table:style-name="Tabela10.A1" office:value-type="string">
            <text:p text:style-name="Table_20_Contents"><text:span text:style-name="Source_20_Text">0</text:span></text:p>
          </table:table-cell>
          <table:table-cell table:style-name="Tabela10.A1" office:value-type="string">
            <text:p text:style-name="Table_20_Contents">Desabilita o cache para refletir alterações de código imediatamente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opcache.revalidate_freq</text:span></text:p>
          </table:table-cell>
          <table:table-cell table:style-name="Tabela10.A1" office:value-type="string">
            <text:p text:style-name="Table_20_Contents"><text:span text:style-name="Source_20_Text">Ignorado</text:span></text:p>
          </table:table-cell>
          <table:table-cell table:style-name="Tabela10.A1" office:value-type="string">
            <text:p text:style-name="Table_20_Contents">Sem efeito quando <text:span text:style-name="Source_20_Text">opcache.enable=0</text:span>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Xdebug (Depuração)</text:span></text:p>
          </table:table-cell>
          <table:table-cell table:style-name="Tabela10.A1" office:value-type="string">
            <text:p text:style-name="Table_20_Contents"><text:span text:style-name="Source_20_Text">zend_extension</text:span></text:p>
          </table:table-cell>
          <table:table-cell table:style-name="Tabela10.A1" office:value-type="string">
            <text:p text:style-name="Table_20_Contents"><text:span text:style-name="Source_20_Text">xdebug</text:span></text:p>
          </table:table-cell>
          <table:table-cell table:style-name="Tabela10.A1" office:value-type="string">
            <text:p text:style-name="Table_20_Contents">Carrega o módulo Xdebug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mode</text:span></text:p>
          </table:table-cell>
          <table:table-cell table:style-name="Tabela10.A1" office:value-type="string">
            <text:p text:style-name="Table_20_Contents"><text:span text:style-name="Source_20_Text">debug,develop</text:span></text:p>
          </table:table-cell>
          <table:table-cell table:style-name="Tabela10.A1" office:value-type="string">
            <text:p text:style-name="Table_20_Contents">Ativa depuração e melhorias de dev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start_with_request</text:span></text:p>
          </table:table-cell>
          <table:table-cell table:style-name="Tabela10.A1" office:value-type="string">
            <text:p text:style-name="Table_20_Contents"><text:span text:style-name="Source_20_Text">yes</text:span></text:p>
          </table:table-cell>
          <table:table-cell table:style-name="Tabela10.A1" office:value-type="string">
            <text:p text:style-name="Table_20_Contents">Inicia depuração automaticamente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client_host</text:span></text:p>
          </table:table-cell>
          <table:table-cell table:style-name="Tabela10.A1" office:value-type="string">
            <text:p text:style-name="Table_20_Contents"><text:span text:style-name="Source_20_Text">127.0.0.1</text:span></text:p>
          </table:table-cell>
          <table:table-cell table:style-name="Tabela10.A1" office:value-type="string">
            <text:p text:style-name="Table_20_Contents">Host da IDE (VSCode/PHPStorm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client_port</text:span></text:p>
          </table:table-cell>
          <table:table-cell table:style-name="Tabela10.A1" office:value-type="string">
            <text:p text:style-name="Table_20_Contents"><text:span text:style-name="Source_20_Text">9003</text:span></text:p>
          </table:table-cell>
          <table:table-cell table:style-name="Tabela10.A1" office:value-type="string">
            <text:p text:style-name="Table_20_Contents">Porta padrão do Xdebug 3+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idekey</text:span></text:p>
          </table:table-cell>
          <table:table-cell table:style-name="Tabela10.A1" office:value-type="string">
            <text:p text:style-name="Table_20_Contents"><text:span text:style-name="Source_20_Text">VSCODE</text:span></text:p>
          </table:table-cell>
          <table:table-cell table:style-name="Tabela10.A1" office:value-type="string">
            <text:p text:style-name="Table_20_Contents">Identificador da IDE usada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Localização / Codificação</text:span></text:p>
          </table:table-cell>
          <table:table-cell table:style-name="Tabela10.A1" office:value-type="string">
            <text:p text:style-name="Table_20_Contents"><text:span text:style-name="Source_20_Text">date.timezone</text:span></text:p>
          </table:table-cell>
          <table:table-cell table:style-name="Tabela10.A1" office:value-type="string">
            <text:p text:style-name="Table_20_Contents"><text:span text:style-name="Source_20_Text">America/Sao_Paulo</text:span></text:p>
          </table:table-cell>
          <table:table-cell table:style-name="Tabela10.A1" office:value-type="string">
            <text:p text:style-name="Table_20_Contents">Define fuso horário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default_charset</text:span></text:p>
          </table:table-cell>
          <table:table-cell table:style-name="Tabela10.A1" office:value-type="string">
            <text:p text:style-name="Table_20_Contents"><text:span text:style-name="Source_20_Text">UTF-8</text:span></text:p>
          </table:table-cell>
          <table:table-cell table:style-name="Tabela10.A1" office:value-type="string">
            <text:p text:style-name="Table_20_Contents">Padrão de codificação para páginas e logs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Outros ajustes úteis</text:span></text:p>
          </table:table-cell>
          <table:table-cell table:style-name="Tabela10.A1" office:value-type="string">
            <text:p text:style-name="Table_20_Contents"><text:span text:style-name="Source_20_Text">report_memleak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ostra alertas de vazamento de memória (dev only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track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antém mensagem do último erro em <text:span text:style-name="Source_20_Text">$php_errormsg</text:span>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short_open_tag</text:span></text:p>
          </table:table-cell>
          <table:table-cell table:style-name="Tabela10.A1" office:value-type="string">
            <text:p text:style-name="Table_20_Contents"><text:span text:style-name="Source_20_Text">Off</text:span></text:p>
          </table:table-cell>
          <table:table-cell table:style-name="Tabela10.A1" office:value-type="string">
            <text:p text:style-name="Table_20_Contents">Usa apenas tags completas <text:span text:style-name="Source_20_Text">&lt;?php ?&gt;</text:span>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zend.enable_gc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Habilita garbage collector (limpeza de memória).</text:p>
          </table:table-cell>
        </table:table-row>
      </table:table>
      <text:h text:style-name="P430" text:outline-level="1"><text:soft-page-break/><text:span text:style-name="Strong_20_Emphasis"><text:span text:style-name="T1122">WebSocket</text:span></text:span></text:h>
      <text:p text:style-name="P431"><text:span text:style-name="Emphasis"><text:span text:style-name="T1137">É </text:span></text:span><text:span text:style-name="Emphasis"><text:span text:style-name="T1005">um protocolo de comunicação que permite a </text:span></text:span><text:span text:style-name="Strong_20_Emphasis"><text:span text:style-name="T1007">troca de dados em tempo real. </text:span></text:span><text:span text:style-name="Emphasis"><text:span text:style-name="T1005">Diferentemente do HTTP tradicional, que funciona no modelo de requisição/resposta, os WebSockets estabelecem uma </text:span></text:span><text:span text:style-name="Strong_20_Emphasis"><text:span text:style-name="T1007">conexão bidirecional persistente</text:span></text:span><text:span text:style-name="Emphasis"><text:span text:style-name="T1005">, onde tanto o cliente quanto o servidor podem enviar e receber mensagens a qualquer momento. </text:span></text:span><text:span text:style-name="Strong_20_Emphasis"><text:span text:style-name="T1138">Sw</text:span></text:span><text:span text:style-name="Strong_20_Emphasis"><text:span text:style-name="T1139">oole</text:span></text:span><text:span text:style-name="Strong_20_Emphasis"><text:span text:style-name="T1005"> </text:span></text:span><text:span text:style-name="Strong_20_Emphasis"><text:span text:style-name="T1140">é u</text:span></text:span><text:span text:style-name="Emphasis"><text:span text:style-name="T1114">ma extensão </text:span></text:span><text:span text:style-name="Emphasis"><text:span text:style-name="T1115">PECL </text:span></text:span><text:span text:style-name="Emphasis"><text:span text:style-name="T1114">do PHP que permite implementar servidores WebSocket de alto desempenho. Ideal para aplicações que precisam de alta concorrência e desempenho.</text:span></text:span></text:p>
      <text:h text:style-name="P432" text:outline-level="1" text:is-list-header="true"><text:span text:style-name="Strong_20_Emphasis"><text:span text:style-name="T1122">Manipulação de XML com PHP</text:span></text:span></text:h>
      <text:p text:style-name="P158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427" text:outline-level="1" text:is-list-header="true"><text:span text:style-name="Strong_20_Emphasis"><text:span text:style-name="T1122">Extensão DOM e recursos relacionados</text:span></text:span></text:h>
      <text:p text:style-name="P158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8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8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8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8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431"><text:span text:style-name="Emphasis"/></text:p>
      <text:p text:style-name="P431"><text:span text:style-name="Emphasis"/></text:p>
      <text:h text:style-name="P433" text:outline-level="1">FastCGI</text:h>
      <text:p text:style-name="P434"/>
      <text:p text:style-name="P435"><text:span text:style-name="T1141">O </text:span><text:span text:style-name="T1142">protocolo </text:span><text:span text:style-name="T1143">FastCGI</text:span><text:span text:style-name="T1142"> <text:s/>mantém processos prontos para reutilização, ao contrário do </text:span><text:span text:style-name="T1141">tradicional</text:span><text:span text:style-name="T1142"> mod_php, que precisa inicializar o PHP a cada solicitação. </text:span><text:span text:style-name="T1141">Para extrair o máximo d</text:span><text:span text:style-name="T1142">esse</text:span><text:span text:style-name="T1141"> protocolo, foi desenvolvido o </text:span><text:span text:style-name="Strong_20_Emphasis"><text:span text:style-name="T1143">PHP-FPM</text:span></text:span><text:span text:style-name="T1141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8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6">não possui um mecanismo embutido para receber diretamente conexões HTTP</text:span></text:span><text:span text:style-name="T226">;</text:span><text:span text:style-name="T5"> essa função é delegada a um servidor web, como o Apache ou o Nginx.</text:span></text:p>
      <text:p text:style-name="P436">Funções do PHP-FPM como “Servidor de Aplicação”:</text:p>
      <text:list text:style-name="L42">
        <text:list-item>
          <text:p text:style-name="P437">Executa scripts PHP.</text:p>
        </text:list-item>
        <text:list-item>
          <text:p text:style-name="P437">Processa requisições encaminhadas por servidores web (Apache, Nginx, etc.).</text:p>
        </text:list-item>
        <text:list-item>
          <text:p text:style-name="P437">Gerencia o ciclo de vida dos processos que executam os scripts PHP.</text:p>
        </text:list-item>
      </text:list>
      <text:p text:style-name="P436"/>
      <text:p text:style-name="P436">Como ocorre a interação entre PHP-FPM e Apache:</text:p>
      <text:list text:style-name="L43">
        <text:list-item>
          <text:p text:style-name="P438"><text:span text:style-name="Strong_20_Emphasis"><text:span text:style-name="T852">Solicitação do Cliente</text:span></text:span><text:span text:style-name="T852">: O navegador do cliente envia uma solicitação HTTP para o Apache.</text:span></text:p>
        </text:list-item>
        <text:list-item>
          <text:p text:style-name="P438"><text:span text:style-name="Strong_20_Emphasis"><text:span text:style-name="T852">Encaminhamento para o PHP-FPM</text:span></text:span><text:span text:style-name="T852">: O Apache, por meio do módulo </text:span><text:span text:style-name="Source_20_Text"><text:span text:style-name="T852">mod_proxy_fcgi</text:span></text:span><text:span text:style-name="T852">, encaminha a solicitação para o PHP-FPM.</text:span></text:p>
        </text:list-item>
        <text:list-item>
          <text:p text:style-name="P438"><text:span text:style-name="Strong_20_Emphasis"><text:span text:style-name="T852">Processamento do Script</text:span></text:span><text:span text:style-name="T852">: O PHP-FPM executa o script PHP solicitado.</text:span></text:p>
        </text:list-item>
        <text:list-item>
          <text:p text:style-name="P438"><text:span text:style-name="Strong_20_Emphasis"><text:span text:style-name="T852">Resposta ao Cliente</text:span></text:span><text:span text:style-name="T852">: O resultado gerado pelo PHP-FPM é retornado ao Apache, que o envia de volta ao cliente.</text:span></text:p>
        </text:list-item>
      </text:list>
      <text:p text:style-name="P218"/>
      <text:p text:style-name="P158"><text:span text:style-name="T852">É importante lembrar que o </text:span><text:span text:style-name="Strong_20_Emphasis"><text:span text:style-name="T852">PHP-FPM não é um servidor web</text:span></text:span><text:span text:style-name="T852">. Portanto:</text:span></text:p>
      <text:list text:style-name="L44">
        <text:list-item>
          <text:p text:style-name="P439"><text:span text:style-name="T852">Ele </text:span><text:span text:style-name="Strong_20_Emphasis"><text:span text:style-name="T852">não recebe solicitações HTTP diretamente dos navegadores</text:span></text:span><text:span text:style-name="T852">.</text:span></text:p>
        </text:list-item>
        <text:list-item>
          <text:p text:style-name="P440">Depende de um servidor web (como Apache ou Nginx) para intermediar as solicitações e as respostas.</text:p>
        </text:list-item>
      </text:list>
      <text:p text:style-name="P436"/>
      <text:h text:style-name="P441" text:outline-level="1"><text:span text:style-name="Strong_20_Emphasis"/></text:h>
      <text:h text:style-name="P442" text:outline-level="1">RFC</text:h>
      <text:p text:style-name="P443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444" text:outline-level="1"><text:span text:style-name="Strong_20_Emphasis"><text:span text:style-name="T1144">PHP-FIG</text:span></text:span></text:h>
      <text:p text:style-name="P445"><text:span text:style-name="T5">PHP Framework Interop G</text:span><text:span text:style-name="T852">roup é um grupo de desenvolvedores e representantes dos principais frameworks e bibliotecas PHP (como CakePHP, Doctrine e Zend), que tem como objetivo criar padrões de código (</text:span><text:span text:style-name="T854">PSRs</text:span><text:span text:style-name="T852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444" text:outline-level="1"><text:span text:style-name="Strong_20_Emphasis"><text:span text:style-name="T1144">PSRs</text:span></text:span></text:h>
      <text:p text:style-name="P446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447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448">PSR</text:p>
            </table:table-cell>
            <table:table-cell table:style-name="Tabela1.A1" office:value-type="string">
              <text:p text:style-name="P448">Nome</text:p>
            </table:table-cell>
            <table:table-cell table:style-name="Tabela1.A1" office:value-type="string">
              <text:p text:style-name="P448">Objetivo</text:p>
            </table:table-cell>
          </table:table-row>
        </table:table-header-rows>
        <table:table-row>
          <table:table-cell table:style-name="Tabela1.A1" office:value-type="string">
            <text:p text:style-name="P449">PSR-1</text:p>
          </table:table-cell>
          <table:table-cell table:style-name="Tabela1.A1" office:value-type="string">
            <text:p text:style-name="P449">Basic Coding Standard</text:p>
          </table:table-cell>
          <table:table-cell table:style-name="Tabela1.A1" office:value-type="string">
            <text:p text:style-name="P449">Regras básicas de codificação.</text:p>
          </table:table-cell>
        </table:table-row>
        <table:table-row>
          <table:table-cell table:style-name="Tabela1.A1" office:value-type="string">
            <text:p text:style-name="P449">PSR-<text:span text:style-name="T1145">1</text:span>2</text:p>
          </table:table-cell>
          <table:table-cell table:style-name="Tabela1.A1" office:value-type="string">
            <text:p text:style-name="P449"><text:span text:style-name="T1145">Extended </text:span>Coding Style Guide</text:p>
          </table:table-cell>
          <table:table-cell table:style-name="Tabela1.A1" office:value-type="string">
            <text:p text:style-name="P449">Guia de estilo para escrita de código PHP</text:p>
          </table:table-cell>
        </table:table-row>
        <table:table-row>
          <table:table-cell table:style-name="Tabela1.A1" office:value-type="string">
            <text:p text:style-name="P449">PSR-3</text:p>
          </table:table-cell>
          <table:table-cell table:style-name="Tabela1.A1" office:value-type="string">
            <text:p text:style-name="P449">Logger Interface</text:p>
          </table:table-cell>
          <table:table-cell table:style-name="Tabela1.A1" office:value-type="string">
            <text:p text:style-name="P449">Interface padrão para sistemas de log.</text:p>
          </table:table-cell>
        </table:table-row>
        <table:table-row>
          <table:table-cell table:style-name="Tabela1.A1" office:value-type="string">
            <text:p text:style-name="P449">PSR-4</text:p>
          </table:table-cell>
          <table:table-cell table:style-name="Tabela1.A1" office:value-type="string">
            <text:p text:style-name="P449">Autoloading Standard</text:p>
          </table:table-cell>
          <table:table-cell table:style-name="Tabela1.A1" office:value-type="string">
            <text:p text:style-name="P449">Padrão para autoload de classes via namespaces.</text:p>
          </table:table-cell>
        </table:table-row>
        <table:table-row>
          <table:table-cell table:style-name="Tabela1.A1" office:value-type="string">
            <text:p text:style-name="P449">PSR-7</text:p>
          </table:table-cell>
          <table:table-cell table:style-name="Tabela1.A1" office:value-type="string">
            <text:p text:style-name="P449">HTTP Message Interface</text:p>
          </table:table-cell>
          <table:table-cell table:style-name="Tabela1.A1" office:value-type="string">
            <text:p text:style-name="P449">Interface para requisições e respostas HTTP (usada em APIs RESTful, por exemplo).</text:p>
          </table:table-cell>
        </table:table-row>
      </table:table>
      <text:p text:style-name="P445"/>
      <text:p text:style-name="P447">Benefícios na prática:</text:p>
      <text:list text:style-name="L45">
        <text:list-item>
          <text:p text:style-name="P450"><text:span text:style-name="Strong_20_Emphasis"><text:span text:style-name="T1146">Compatibilidade entre frameworks</text:span></text:span><text:span text:style-name="T1146">: por exemplo, Symfony e Laravel podem usar as mesmas bibliotecas de log que implementam a PSR-3.</text:span></text:p>
        </text:list-item>
      </text:list>
      <text:list text:style-name="L46">
        <text:list-item>
          <text:p text:style-name="P451"><text:span text:style-name="Strong_20_Emphasis"><text:span text:style-name="T1146">Facilidade para criar pacotes reutilizáveis</text:span></text:span><text:span text:style-name="T1146">.</text:span></text:p>
        </text:list-item>
        <text:list-item>
          <text:p text:style-name="P451"><text:span text:style-name="Strong_20_Emphasis"><text:span text:style-name="T1146">Uniformização do código</text:span></text:span><text:span text:style-name="T1146"> em equipes e comunidades.</text:span></text:p>
        </text:list-item>
      </text:list>
      <text:p text:style-name="P445"><text:span text:style-name="Strong_20_Emphasis"><text:span text:style-name="T11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fo:hyphenation-keep="auto" loext:hyphenation-keep-type="column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chapter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editing-duration>P3DT17H58M24S</meta:editing-duration>
    <meta:editing-cycles>296</meta:editing-cycles>
    <dc:date>2026-07-23T09:31:11.112809400</dc:date>
    <meta:document-statistic meta:table-count="10" meta:image-count="43" meta:object-count="0" meta:page-count="52" meta:paragraph-count="952" meta:word-count="11031" meta:character-count="73796" meta:non-whitespace-character-count="61982"/>
  </office:meta>
</office:document-meta>
</file>