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9" style:family="paragraph" style:parent-style-name="Standard">
      <style:text-properties fo:language="pt" fo:country="BR" officeooo:paragraph-rsid="008d7e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11" style:family="paragraph" style:parent-style-name="Title">
      <style:text-properties fo:color="#ce181e" loext:opacity="100%" fo:language="pt" fo:country="BR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15" style:family="paragraph" style:parent-style-name="Standard">
      <style:text-properties fo:language="pt" fo:country="BR" officeooo:paragraph-rsid="00034c85"/>
    </style:style>
    <style:style style:name="P16" style:family="paragraph" style:parent-style-name="Text_20_body">
      <style:text-properties officeooo:paragraph-rsid="00034c85"/>
    </style:style>
    <style:style style:name="P17" style:family="paragraph" style:parent-style-name="Text_20_body" style:list-style-name="L1">
      <style:text-properties fo:language="pt" fo:country="BR" officeooo:paragraph-rsid="00034c85"/>
    </style:style>
    <style:style style:name="P1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9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20" style:family="paragraph" style:parent-style-name="Standard">
      <style:text-properties fo:language="pt" fo:country="BR" officeooo:paragraph-rsid="00907378"/>
    </style:style>
    <style:style style:name="P21" style:family="paragraph" style:parent-style-name="Standard">
      <style:text-properties officeooo:paragraph-rsid="00907378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23" style:family="paragraph" style:parent-style-name="Standard">
      <style:text-properties fo:language="pt" fo:country="BR" officeooo:paragraph-rsid="005278f7"/>
    </style:style>
    <style:style style:name="P24" style:family="paragraph" style:parent-style-name="Standard">
      <style:text-properties fo:language="pt" fo:country="BR" officeooo:rsid="000cce9c" officeooo:paragraph-rsid="00907378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26" style:family="paragraph" style:parent-style-name="Standard">
      <style:text-properties fo:language="pt" fo:country="BR" officeooo:paragraph-rsid="00894fb0"/>
    </style:style>
    <style:style style:name="P27" style:family="paragraph" style:parent-style-name="Standard">
      <style:text-properties fo:language="pt" fo:country="BR" officeooo:rsid="001aba8d" officeooo:paragraph-rsid="00034c85"/>
    </style:style>
    <style:style style:name="P28" style:family="paragraph" style:parent-style-name="Heading_20_2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00%"/>
      <style:text-properties fo:language="pt" fo:country="BR" officeooo:paragraph-rsid="00894fb0"/>
    </style:style>
    <style:style style:name="P30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31" style:family="paragraph" style:parent-style-name="Standard">
      <style:paragraph-properties fo:line-height="100%"/>
      <style:text-properties fo:language="pt" fo:country="BR" officeooo:paragraph-rsid="00034c85"/>
    </style:style>
    <style:style style:name="P32" style:family="paragraph" style:parent-style-name="Text_20_body">
      <style:paragraph-properties fo:line-height="100%"/>
      <style:text-properties officeooo:paragraph-rsid="008410d9"/>
    </style:style>
    <style:style style:name="P33" style:family="paragraph" style:parent-style-name="Text_20_body" style:list-style-name="L2">
      <style:paragraph-properties fo:line-height="90%"/>
    </style:style>
    <style:style style:name="P34" style:family="paragraph" style:parent-style-name="Text_20_body">
      <style:text-properties officeooo:paragraph-rsid="00907378"/>
    </style:style>
    <style:style style:name="P35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36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37" style:family="paragraph" style:parent-style-name="Standard">
      <style:text-properties fo:language="pt" fo:country="BR" officeooo:rsid="0016e723" officeooo:paragraph-rsid="00034c85"/>
    </style:style>
    <style:style style:name="P38" style:family="paragraph" style:parent-style-name="Standard" style:list-style-name="L3">
      <style:text-properties fo:language="pt" fo:country="BR" officeooo:rsid="0016e723" officeooo:paragraph-rsid="00034c85"/>
    </style:style>
    <style:style style:name="P39" style:family="paragraph" style:parent-style-name="Standard" style:list-style-name="L3">
      <style:text-properties fo:language="pt" fo:country="BR" officeooo:paragraph-rsid="00034c85"/>
    </style:style>
    <style:style style:name="P40" style:family="paragraph" style:parent-style-name="Standard" style:list-style-name="L3">
      <style:text-properties fo:language="pt" fo:country="BR" officeooo:paragraph-rsid="008ae5e0"/>
    </style:style>
    <style:style style:name="P41" style:family="paragraph" style:parent-style-name="Standard" style:list-style-name="L4">
      <style:text-properties fo:language="pt" fo:country="BR" officeooo:paragraph-rsid="00034c85"/>
    </style:style>
    <style:style style:name="P42" style:family="paragraph" style:parent-style-name="Standard" style:list-style-name="L4">
      <style:text-properties fo:language="pt" fo:country="BR" officeooo:rsid="001a1828" officeooo:paragraph-rsid="001a1828"/>
    </style:style>
    <style:style style:name="P43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44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45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46" style:family="paragraph" style:parent-style-name="Standard" style:list-style-name="L5">
      <style:text-properties fo:language="pt" fo:country="BR" officeooo:paragraph-rsid="00034c85"/>
    </style:style>
    <style:style style:name="P47" style:family="paragraph" style:parent-style-name="Standard" style:list-style-name="L5">
      <style:text-properties fo:language="pt" fo:country="BR" officeooo:paragraph-rsid="001d3366"/>
    </style:style>
    <style:style style:name="P48" style:family="paragraph" style:parent-style-name="Standard" style:list-style-name="L5">
      <style:text-properties officeooo:paragraph-rsid="00034c85"/>
    </style:style>
    <style:style style:name="P49" style:family="paragraph" style:parent-style-name="Standard" style:list-style-name="L5">
      <style:text-properties officeooo:paragraph-rsid="001daa5b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51" style:family="paragraph" style:parent-style-name="Standard" style:list-style-name="L6">
      <style:text-properties fo:language="pt" fo:country="BR" officeooo:paragraph-rsid="00034c85"/>
    </style:style>
    <style:style style:name="P52" style:family="paragraph" style:parent-style-name="Standard" style:list-style-name="L6">
      <style:text-properties officeooo:paragraph-rsid="00034c85"/>
    </style:style>
    <style:style style:name="P53" style:family="paragraph" style:parent-style-name="Standard" style:list-style-name="L6">
      <style:text-properties fo:language="pt" fo:country="BR" officeooo:rsid="001db2b0" officeooo:paragraph-rsid="00034c85"/>
    </style:style>
    <style:style style:name="P54" style:family="paragraph" style:parent-style-name="Standard" style:list-style-name="L6">
      <style:text-properties fo:language="pt" fo:country="BR" officeooo:rsid="00212aa1" officeooo:paragraph-rsid="00034c85"/>
    </style:style>
    <style:style style:name="P55" style:family="paragraph" style:parent-style-name="Standard" style:list-style-name="L6">
      <style:text-properties fo:language="pt" fo:country="BR" officeooo:rsid="002acdd9" officeooo:paragraph-rsid="00034c85"/>
    </style:style>
    <style:style style:name="P56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57" style:family="paragraph" style:parent-style-name="Standard" style:list-style-name="L6"/>
    <style:style style:name="P58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60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61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62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63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64" style:family="paragraph" style:parent-style-name="Standard">
      <style:paragraph-properties fo:line-height="100%"/>
      <style:text-properties fo:language="pt" fo:country="BR" officeooo:paragraph-rsid="008be030"/>
    </style:style>
    <style:style style:name="P65" style:family="paragraph" style:parent-style-name="Standard">
      <style:paragraph-properties fo:line-height="100%"/>
      <style:text-properties fo:language="pt" fo:country="BR" officeooo:paragraph-rsid="0061d926"/>
    </style:style>
    <style:style style:name="P66" style:family="paragraph" style:parent-style-name="Standard">
      <style:paragraph-properties fo:line-height="100%"/>
      <style:text-properties officeooo:paragraph-rsid="0061d926"/>
    </style:style>
    <style:style style:name="P67" style:family="paragraph" style:parent-style-name="Standard" style:list-style-name="L8">
      <style:paragraph-properties fo:line-height="100%"/>
      <style:text-properties officeooo:paragraph-rsid="0061d926"/>
    </style:style>
    <style:style style:name="P68" style:family="paragraph" style:parent-style-name="Standard" style:list-style-name="L9">
      <style:paragraph-properties fo:line-height="100%"/>
      <style:text-properties officeooo:paragraph-rsid="0061d926"/>
    </style:style>
    <style:style style:name="P69" style:family="paragraph" style:parent-style-name="Standard" style:list-style-name="L10">
      <style:paragraph-properties fo:line-height="90%"/>
      <style:text-properties officeooo:paragraph-rsid="0061d926"/>
    </style:style>
    <style:style style:name="P70" style:family="paragraph" style:parent-style-name="Text_20_body">
      <style:paragraph-properties fo:line-height="100%"/>
      <style:text-properties fo:language="pt" fo:country="BR" officeooo:paragraph-rsid="0061d926"/>
    </style:style>
    <style:style style:name="P71" style:family="paragraph" style:parent-style-name="Text_20_body" style:list-style-name="L11">
      <style:paragraph-properties fo:line-height="90%"/>
      <style:text-properties officeooo:paragraph-rsid="0061d926"/>
    </style:style>
    <style:style style:name="P72" style:family="paragraph" style:parent-style-name="Text_20_body">
      <style:paragraph-properties fo:line-height="100%"/>
      <style:text-properties officeooo:paragraph-rsid="0061d926"/>
    </style:style>
    <style:style style:name="P73" style:family="paragraph" style:parent-style-name="Text_20_body" style:list-style-name="L12">
      <style:paragraph-properties fo:line-height="100%"/>
      <style:text-properties officeooo:paragraph-rsid="0061d926"/>
    </style:style>
    <style:style style:name="P74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75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76" style:family="paragraph" style:parent-style-name="Text_20_body">
      <style:text-properties fo:language="pt" fo:country="BR" officeooo:paragraph-rsid="0028eeb8"/>
    </style:style>
    <style:style style:name="P77" style:family="paragraph" style:parent-style-name="Text_20_body">
      <style:text-properties officeooo:rsid="0028eeb8" officeooo:paragraph-rsid="0028eeb8"/>
    </style:style>
    <style:style style:name="P78" style:family="paragraph" style:parent-style-name="Text_20_body">
      <style:text-properties fo:language="pt" fo:country="BR" officeooo:paragraph-rsid="004a3f35"/>
    </style:style>
    <style:style style:name="P79" style:family="paragraph" style:parent-style-name="Text_20_body">
      <style:text-properties officeooo:paragraph-rsid="008d83cb"/>
    </style:style>
    <style:style style:name="P80" style:family="paragraph" style:parent-style-name="Text_20_body">
      <style:paragraph-properties fo:line-height="100%"/>
      <style:text-properties officeooo:paragraph-rsid="008d83cb"/>
    </style:style>
    <style:style style:name="P81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82" style:family="paragraph" style:parent-style-name="Text_20_body" style:list-style-name="L13">
      <style:paragraph-properties fo:line-height="100%"/>
      <style:text-properties officeooo:paragraph-rsid="0028eeb8"/>
    </style:style>
    <style:style style:name="P83" style:family="paragraph" style:parent-style-name="Text_20_body" style:list-style-name="L13">
      <style:paragraph-properties fo:line-height="100%"/>
      <style:text-properties officeooo:paragraph-rsid="002d7235"/>
    </style:style>
    <style:style style:name="P84" style:family="paragraph" style:parent-style-name="Text_20_body" style:list-style-name="L13">
      <style:paragraph-properties fo:line-height="100%"/>
      <style:text-properties officeooo:paragraph-rsid="0030002c"/>
    </style:style>
    <style:style style:name="P85" style:family="paragraph" style:parent-style-name="Text_20_body" style:list-style-name="L13">
      <style:paragraph-properties fo:line-height="100%"/>
      <style:text-properties officeooo:paragraph-rsid="00319414"/>
    </style:style>
    <style:style style:name="P86" style:family="paragraph" style:parent-style-name="Text_20_body" style:list-style-name="L13">
      <style:paragraph-properties fo:line-height="100%"/>
      <style:text-properties officeooo:paragraph-rsid="00332145"/>
    </style:style>
    <style:style style:name="P87" style:family="paragraph" style:parent-style-name="Text_20_body" style:list-style-name="L13">
      <style:paragraph-properties fo:line-height="100%"/>
      <style:text-properties officeooo:paragraph-rsid="003903c6"/>
    </style:style>
    <style:style style:name="P88" style:family="paragraph" style:parent-style-name="Text_20_body" style:list-style-name="L13">
      <style:paragraph-properties fo:line-height="100%"/>
      <style:text-properties officeooo:paragraph-rsid="00395a57"/>
    </style:style>
    <style:style style:name="P89" style:family="paragraph" style:parent-style-name="Text_20_body" style:list-style-name="L13">
      <style:paragraph-properties fo:line-height="100%"/>
      <style:text-properties officeooo:paragraph-rsid="003aaf37"/>
    </style:style>
    <style:style style:name="P90" style:family="paragraph" style:parent-style-name="Text_20_body" style:list-style-name="L13">
      <style:paragraph-properties fo:line-height="100%"/>
      <style:text-properties officeooo:paragraph-rsid="008f4fa4"/>
    </style:style>
    <style:style style:name="P91" style:family="paragraph" style:parent-style-name="Text_20_body" style:list-style-name="L13">
      <style:paragraph-properties fo:line-height="100%"/>
      <style:text-properties officeooo:paragraph-rsid="003dbe03"/>
    </style:style>
    <style:style style:name="P92" style:family="paragraph" style:parent-style-name="Heading_20_2">
      <style:paragraph-properties fo:text-align="center" style:justify-single-word="false"/>
      <style:text-properties officeooo:paragraph-rsid="008f4fa4"/>
    </style:style>
    <style:style style:name="P93" style:family="paragraph" style:parent-style-name="Text_20_body" style:list-style-name="L13">
      <style:paragraph-properties fo:line-height="100%"/>
      <style:text-properties officeooo:paragraph-rsid="0044d36b"/>
    </style:style>
    <style:style style:name="P94" style:family="paragraph" style:parent-style-name="Text_20_body" style:list-style-name="L13">
      <style:paragraph-properties fo:line-height="100%"/>
      <style:text-properties officeooo:paragraph-rsid="0044c921"/>
    </style:style>
    <style:style style:name="P95" style:family="paragraph" style:parent-style-name="Text_20_body">
      <style:paragraph-properties fo:line-height="100%"/>
      <style:text-properties officeooo:paragraph-rsid="004e75a9"/>
    </style:style>
    <style:style style:name="P96" style:family="paragraph" style:parent-style-name="Heading_20_2">
      <style:paragraph-properties fo:text-align="center" style:justify-single-word="false"/>
    </style:style>
    <style:style style:name="P97" style:family="paragraph" style:parent-style-name="Text_20_body">
      <style:paragraph-properties fo:text-align="start" style:justify-single-word="false"/>
    </style:style>
    <style:style style:name="P98" style:family="paragraph" style:parent-style-name="Text_20_body">
      <style:paragraph-properties fo:line-height="100%"/>
      <style:text-properties officeooo:paragraph-rsid="0044c921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 fo:language="pt" fo:country="BR" fo:font-weight="bold" style:font-weight-asian="bold"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64cb61"/>
    </style:style>
    <style:style style:name="T9" style:family="text">
      <style:text-properties fo:language="pt" fo:country="BR" officeooo:rsid="00885e51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officeooo:rsid="003f7c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1c9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pt" fo:country="BR" fo:font-weight="normal" style:font-weight-asian="normal" style:font-weight-complex="normal"/>
    </style:style>
    <style:style style:name="T16" style:family="text">
      <style:text-properties fo:color="#2a6099" loext:opacity="100%"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5d269d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normal" officeooo:rsid="005d269d" style:font-weight-asian="normal" style:font-weight-complex="normal"/>
    </style:style>
    <style:style style:name="T21" style:family="text">
      <style:text-properties officeooo:rsid="0039db65"/>
    </style:style>
    <style:style style:name="T22" style:family="text">
      <style:text-properties officeooo:rsid="0016da62"/>
    </style:style>
    <style:style style:name="T23" style:family="text">
      <style:text-properties officeooo:rsid="00885e51"/>
    </style:style>
    <style:style style:name="T24" style:family="text">
      <style:text-properties fo:language="pt" fo:country="BR" officeooo:rsid="00664e57"/>
    </style:style>
    <style:style style:name="T25" style:family="text">
      <style:text-properties officeooo:rsid="00164e75"/>
    </style:style>
    <style:style style:name="T26" style:family="text">
      <style:text-properties officeooo:rsid="000cce9c"/>
    </style:style>
    <style:style style:name="T27" style:family="text">
      <style:text-properties officeooo:rsid="0061eb04"/>
    </style:style>
    <style:style style:name="T28" style:family="text">
      <style:text-properties officeooo:rsid="000d240d"/>
    </style:style>
    <style:style style:name="T29" style:family="text">
      <style:text-properties fo:color="#ffff00" loext:opacity="100%" fo:font-family="Consolas, 'Courier New', monospace" fo:font-size="10.5pt" fo:font-weight="normal" fo:background-color="#1f1f1f" loext:char-shading-value="0"/>
    </style:style>
    <style:style style:name="T30" style:family="text">
      <style:text-properties fo:color="#cccccc" loext:opacity="100%" fo:font-family="Consolas, 'Courier New', monospace" fo:font-size="10.5pt" fo:font-weight="normal" officeooo:rsid="000cce9c" fo:background-color="#1f1f1f" loext:char-shading-value="0"/>
    </style:style>
    <style:style style:name="T31" style:family="text">
      <style:text-properties fo:color="#ff8000" loext:opacity="100%" fo:font-family="Consolas, 'Courier New', monospace" fo:font-size="10.5pt" fo:font-weight="normal" officeooo:rsid="000cce9c" fo:background-color="#1f1f1f" loext:char-shading-value="0"/>
    </style:style>
    <style:style style:name="T32" style:family="text">
      <style:text-properties fo:color="#ff8000" loext:opacity="100%" fo:font-family="Consolas, 'Courier New', monospace" fo:font-size="10.5pt" fo:font-weight="normal" fo:background-color="#1f1f1f" loext:char-shading-value="0"/>
    </style:style>
    <style:style style:name="T33" style:family="text">
      <style:text-properties fo:color="#2a6099" loext:opacity="100%" fo:font-family="Consolas, 'Courier New', monospace" fo:font-size="10.5pt" fo:font-weight="normal" fo:background-color="#1f1f1f" loext:char-shading-value="0"/>
    </style:style>
    <style:style style:name="T34" style:family="text">
      <style:text-properties officeooo:rsid="00894fb0"/>
    </style:style>
    <style:style style:name="T35" style:family="text">
      <style:text-properties officeooo:rsid="001aba8d"/>
    </style:style>
    <style:style style:name="T36" style:family="text">
      <style:text-properties officeooo:rsid="0040a3bc"/>
    </style:style>
    <style:style style:name="T37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38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3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40" style:family="text">
      <style:text-properties fo:color="#dcdcaa" loext:opacity="100%" fo:font-family="Consolas, 'Courier New', monospace" fo:font-size="10.5pt" fo:font-weight="normal" officeooo:rsid="0039db65" fo:background-color="#1f1f1f" loext:char-shading-value="0"/>
    </style:style>
    <style:style style:name="T41" style:family="text">
      <style:text-properties fo:font-weight="bold" officeooo:rsid="0088fdb1" style:font-weight-asian="bold" style:font-weight-complex="bold"/>
    </style:style>
    <style:style style:name="T42" style:family="text">
      <style:text-properties officeooo:rsid="0088fdb1"/>
    </style:style>
    <style:style style:name="T4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4" style:family="text">
      <style:text-properties officeooo:rsid="003b0678"/>
    </style:style>
    <style:style style:name="T45" style:family="text">
      <style:text-properties fo:color="#dcdcaa" loext:opacity="100%" fo:font-family="Consolas, 'Courier New', monospace" fo:font-size="10.5pt" fo:font-weight="bold" fo:background-color="#1f1f1f" loext:char-shading-value="0" style:font-weight-asian="bold" style:font-weight-complex="bold"/>
    </style:style>
    <style:style style:name="T46" style:family="text">
      <style:text-properties fo:color="#dcdcaa" loext:opacity="100%" fo:font-family="Consolas, 'Courier New', monospace" fo:font-size="10.5pt" fo:language="pt" fo:country="BR" fo:font-weight="normal" fo:background-color="#1f1f1f" loext:char-shading-value="0"/>
    </style:style>
    <style:style style:name="T47" style:family="text">
      <style:text-properties fo:font-family="Mono" style:font-pitch="fixed" fo:language="pt" fo:country="BR"/>
    </style:style>
    <style:style style:name="T48" style:family="text">
      <style:text-properties fo:language="pt" fo:country="BR" officeooo:rsid="008410d9"/>
    </style:style>
    <style:style style:name="T49" style:family="text">
      <style:text-properties fo:font-family="Mono" style:font-pitch="fixed" fo:language="pt" fo:country="BR" officeooo:rsid="00894fb0"/>
    </style:style>
    <style:style style:name="T50" style:family="text">
      <style:text-properties fo:font-family="Mono" style:font-pitch="fixed" fo:language="pt" fo:country="BR" fo:font-weight="normal" officeooo:rsid="00867124" style:font-weight-asian="normal" style:font-weight-complex="normal"/>
    </style:style>
    <style:style style:name="T51" style:family="text">
      <style:text-properties fo:font-family="Mono" style:font-pitch="fixed"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857d49" style:font-weight-asian="normal" style:font-weight-complex="normal"/>
    </style:style>
    <style:style style:name="T53" style:family="text">
      <style:text-properties fo:font-weight="bold" officeooo:rsid="0022ea78" style:font-weight-asian="bold" style:font-weight-complex="bold"/>
    </style:style>
    <style:style style:name="T54" style:family="text">
      <style:text-properties officeooo:rsid="001c0d84"/>
    </style:style>
    <style:style style:name="T55" style:family="text">
      <style:text-properties officeooo:rsid="003c58b2"/>
    </style:style>
    <style:style style:name="T56" style:family="text">
      <style:text-properties officeooo:rsid="0016e723"/>
    </style:style>
    <style:style style:name="T57" style:family="text">
      <style:text-properties style:text-underline-style="solid" style:text-underline-width="auto" style:text-underline-color="font-color" officeooo:rsid="0016e723"/>
    </style:style>
    <style:style style:name="T58" style:family="text">
      <style:text-properties officeooo:rsid="0018b86a"/>
    </style:style>
    <style:style style:name="T59" style:family="text">
      <style:text-properties officeooo:rsid="000eac91"/>
    </style:style>
    <style:style style:name="T60" style:family="text">
      <style:text-properties fo:font-family="Mono" style:font-pitch="fixed" officeooo:rsid="000eac91"/>
    </style:style>
    <style:style style:name="T61" style:family="text">
      <style:text-properties officeooo:rsid="008ae5e0"/>
    </style:style>
    <style:style style:name="T62" style:family="text">
      <style:text-properties fo:color="#c9211e" loext:opacity="100%"/>
    </style:style>
    <style:style style:name="T63" style:family="text">
      <style:text-properties fo:color="#c9211e" loext:opacity="100%" officeooo:rsid="0016e723"/>
    </style:style>
    <style:style style:name="T64" style:family="text">
      <style:text-properties fo:color="#c9211e" loext:opacity="100%" officeooo:rsid="008ae5e0"/>
    </style:style>
    <style:style style:name="T65" style:family="text">
      <style:text-properties officeooo:rsid="001beeb5"/>
    </style:style>
    <style:style style:name="T66" style:family="text">
      <style:text-properties fo:font-weight="bold" officeooo:rsid="008ae5e0" style:font-weight-asian="bold" style:font-weight-complex="bold"/>
    </style:style>
    <style:style style:name="T67" style:family="text">
      <style:text-properties fo:font-weight="bold" officeooo:rsid="001beeb5" style:font-weight-asian="bold" style:font-weight-complex="bold"/>
    </style:style>
    <style:style style:name="T68" style:family="text">
      <style:text-properties officeooo:rsid="00246bf3"/>
    </style:style>
    <style:style style:name="T69" style:family="text">
      <style:text-properties style:text-underline-style="solid" style:text-underline-width="auto" style:text-underline-color="font-color" officeooo:rsid="00246bf3"/>
    </style:style>
    <style:style style:name="T70" style:family="text">
      <style:text-properties fo:color="#dcdcaa" loext:opacity="100%" fo:font-family="Consolas, 'Courier New', monospace" fo:font-size="10.5pt" fo:font-weight="normal" officeooo:rsid="001a1828" fo:background-color="#1f1f1f" loext:char-shading-value="0"/>
    </style:style>
    <style:style style:name="T71" style:family="text">
      <style:text-properties fo:color="#dcdcaa" loext:opacity="100%" fo:font-family="Consolas, 'Courier New', monospace" fo:font-size="10.5pt" fo:font-weight="normal" officeooo:rsid="0021ab39" fo:background-color="#1f1f1f" loext:char-shading-value="0"/>
    </style:style>
    <style:style style:name="T72" style:family="text">
      <style:text-properties officeooo:rsid="001d3366"/>
    </style:style>
    <style:style style:name="T73" style:family="text">
      <style:text-properties fo:color="#2a6099" loext:opacity="100%" fo:font-weight="bold" style:font-weight-asian="bold" style:font-weight-complex="bold"/>
    </style:style>
    <style:style style:name="T74" style:family="text">
      <style:text-properties fo:color="#2a6099" loext:opacity="100%" fo:font-weight="bold" officeooo:rsid="001d3366" style:font-weight-asian="bold" style:font-weight-complex="bold"/>
    </style:style>
    <style:style style:name="T7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76" style:family="text">
      <style:text-properties fo:language="pt" fo:country="BR" officeooo:rsid="001daa5b"/>
    </style:style>
    <style:style style:name="T77" style:family="text">
      <style:text-properties fo:font-family="Mono" style:font-pitch="fixed" fo:language="pt" fo:country="BR" officeooo:rsid="001daa5b"/>
    </style:style>
    <style:style style:name="T78" style:family="text">
      <style:text-properties officeooo:rsid="0019eb94"/>
    </style:style>
    <style:style style:name="T79" style:family="text">
      <style:text-properties fo:font-weight="bold" officeooo:rsid="0019eb94" style:font-weight-asian="bold" style:font-weight-complex="bold"/>
    </style:style>
    <style:style style:name="T80" style:family="text">
      <style:text-properties officeooo:rsid="00907378"/>
    </style:style>
    <style:style style:name="T81" style:family="text">
      <style:text-properties fo:color="#dcdcaa" loext:opacity="100%" fo:font-family="Consolas, 'Courier New', monospace" fo:font-size="10.5pt" fo:font-weight="bold" officeooo:rsid="003c58b2" fo:background-color="#1f1f1f" loext:char-shading-value="0" style:font-weight-asian="bold" style:font-weight-complex="bold"/>
    </style:style>
    <style:style style:name="T82" style:family="text">
      <style:text-properties officeooo:rsid="00202f87"/>
    </style:style>
    <style:style style:name="T83" style:family="text">
      <style:text-properties officeooo:rsid="001ee6fa"/>
    </style:style>
    <style:style style:name="T84" style:family="text">
      <style:text-properties officeooo:rsid="0029657a"/>
    </style:style>
    <style:style style:name="T85" style:family="text">
      <style:text-properties fo:color="#dcdcaa" loext:opacity="100%" fo:font-family="Consolas, 'Courier New', monospace" fo:font-size="10.5pt" fo:font-weight="bold" officeooo:rsid="0029657a" fo:background-color="#1f1f1f" loext:char-shading-value="0" style:font-weight-asian="bold" style:font-weight-complex="bold"/>
    </style:style>
    <style:style style:name="T86" style:family="text">
      <style:text-properties fo:font-family="Mono" style:font-pitch="fixed" officeooo:rsid="0029657a"/>
    </style:style>
    <style:style style:name="T87" style:family="text">
      <style:text-properties officeooo:rsid="008be030"/>
    </style:style>
    <style:style style:name="T88" style:family="text">
      <style:text-properties fo:font-family="Mono" style:font-pitch="fixed" officeooo:rsid="001c0d84"/>
    </style:style>
    <style:style style:name="T89" style:family="text">
      <style:text-properties fo:color="#dcdcaa" loext:opacity="100%" fo:font-family="Consolas, 'Courier New', monospace" fo:font-size="10.5pt" fo:language="pt" fo:country="BR" fo:font-weight="bold" officeooo:rsid="003c58b2" fo:background-color="#1f1f1f" loext:char-shading-value="0" style:font-weight-asian="bold" style:font-weight-complex="bold"/>
    </style:style>
    <style:style style:name="T90" style:family="text">
      <style:text-properties fo:language="pt" fo:country="BR" officeooo:rsid="009634de"/>
    </style:style>
    <style:style style:name="T91" style:family="text">
      <style:text-properties fo:font-weight="normal" officeooo:rsid="009634de" style:font-weight-asian="normal" style:font-weight-complex="normal"/>
    </style:style>
    <style:style style:name="T92" style:family="text">
      <style:text-properties style:use-window-font-color="true" loext:opacity="0%" fo:font-family="Consolas, 'Courier New', monospace" fo:font-size="10.5pt" fo:language="pt" fo:country="BR" fo:font-weight="bold" officeooo:rsid="003c58b2" fo:background-color="#1f1f1f" loext:char-shading-value="0" style:font-weight-asian="bold" style:font-weight-complex="bold"/>
    </style:style>
    <style:style style:name="T93" style:family="text">
      <style:text-properties officeooo:rsid="001db2b0"/>
    </style:style>
    <style:style style:name="T94" style:family="text">
      <style:text-properties officeooo:rsid="0020ac97"/>
    </style:style>
    <style:style style:name="T95" style:family="text">
      <style:text-properties fo:font-weight="bold" officeooo:rsid="001db2b0" style:font-weight-asian="bold" style:font-weight-complex="bold"/>
    </style:style>
    <style:style style:name="T96" style:family="text">
      <style:text-properties fo:color="#dcdcaa" loext:opacity="100%" fo:font-family="Consolas, 'Courier New', monospace" fo:font-size="10.5pt" fo:font-weight="bold" officeooo:rsid="003c73a2" fo:background-color="#1f1f1f" loext:char-shading-value="0" style:font-weight-asian="bold" style:font-weight-complex="bold"/>
    </style:style>
    <style:style style:name="T97" style:family="text">
      <style:text-properties fo:font-weight="normal" officeooo:rsid="002bb448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99" style:family="text">
      <style:text-properties fo:font-family="Mono" style:font-pitch="fixed" fo:font-weight="normal" officeooo:rsid="002bb448" style:font-weight-asian="normal" style:font-weight-complex="normal"/>
    </style:style>
    <style:style style:name="T100" style:family="text">
      <style:text-properties fo:font-family="Mono" style:font-pitch="fixed" fo:font-weight="normal" style:font-weight-asian="normal" style:font-weight-complex="normal"/>
    </style:style>
    <style:style style:name="T101" style:family="text">
      <style:text-properties fo:font-family="Mono" style:font-pitch="fixed"/>
    </style:style>
    <style:style style:name="T102" style:family="text">
      <style:text-properties fo:color="#ff0000" loext:opacity="100%" fo:font-family="Mono" style:font-pitch="fixed"/>
    </style:style>
    <style:style style:name="T103" style:family="text">
      <style:text-properties fo:color="#ff0000" loext:opacity="100%" fo:font-family="Mono" style:font-pitch="fixed" fo:font-weight="bold" style:font-weight-asian="bold" style:font-weight-complex="bold"/>
    </style:style>
    <style:style style:name="T104" style:family="text">
      <style:text-properties fo:color="#dcdcaa" loext:opacity="100%" fo:font-family="Consolas, 'Courier New', monospace" fo:font-size="10.5pt" fo:language="pt" fo:country="BR" fo:font-weight="bold" officeooo:rsid="003c73a2" fo:background-color="#1f1f1f" loext:char-shading-value="0" style:font-weight-asian="bold" style:font-weight-complex="bold"/>
    </style:style>
    <style:style style:name="T105" style:family="text">
      <style:text-properties fo:language="pt" fo:country="BR" officeooo:rsid="001c0d84"/>
    </style:style>
    <style:style style:name="T106" style:family="text">
      <style:text-properties fo:language="pt" fo:country="BR" officeooo:rsid="008be030"/>
    </style:style>
    <style:style style:name="T107" style:family="text">
      <style:text-properties fo:language="pt" fo:country="BR" fo:font-weight="normal" officeooo:rsid="001c0d84" style:font-weight-asian="normal" style:font-weight-complex="normal"/>
    </style:style>
    <style:style style:name="T108" style:family="text">
      <style:text-properties fo:language="pt" fo:country="BR" fo:font-weight="normal" officeooo:rsid="00942e8e" style:font-weight-asian="normal" style:font-weight-complex="normal"/>
    </style:style>
    <style:style style:name="T109" style:family="text">
      <style:text-properties fo:font-family="Mono" style:font-pitch="fixed" fo:language="pt" fo:country="BR" fo:font-weight="normal" officeooo:rsid="00942e8e" style:font-weight-asian="normal" style:font-weight-complex="normal"/>
    </style:style>
    <style:style style:name="T110" style:family="text">
      <style:text-properties officeooo:rsid="001f9cd3"/>
    </style:style>
    <style:style style:name="T111" style:family="text">
      <style:text-properties style:text-underline-style="solid" style:text-underline-width="auto" style:text-underline-color="font-color" officeooo:rsid="001f9cd3"/>
    </style:style>
    <style:style style:name="T112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13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14" style:family="text">
      <style:text-properties fo:font-weight="bold" officeooo:rsid="00266643" style:font-weight-asian="bold" style:font-weight-complex="bold"/>
    </style:style>
    <style:style style:name="T115" style:family="text">
      <style:text-properties officeooo:rsid="0027e338"/>
    </style:style>
    <style:style style:name="T116" style:family="text">
      <style:text-properties fo:color="#569cd6" loext:opacity="100%" fo:font-family="Consolas, 'Courier New', monospace" fo:font-size="10.5pt" fo:font-weight="normal" officeooo:rsid="0027e338" fo:background-color="#1f1f1f" loext:char-shading-value="0"/>
    </style:style>
    <style:style style:name="T117" style:family="text">
      <style:text-properties officeooo:rsid="00280c38"/>
    </style:style>
    <style:style style:name="T118" style:family="text">
      <style:text-properties style:text-underline-style="solid" style:text-underline-width="auto" style:text-underline-color="font-color" officeooo:rsid="00280c38"/>
    </style:style>
    <style:style style:name="T119" style:family="text">
      <style:text-properties officeooo:rsid="00266643"/>
    </style:style>
    <style:style style:name="T120" style:family="text">
      <style:text-properties fo:color="#c9211e" loext:opacity="100%" fo:font-weight="bold" style:font-weight-asian="bold" style:font-weight-complex="bold"/>
    </style:style>
    <style:style style:name="T121" style:family="text">
      <style:text-properties officeooo:rsid="00281067"/>
    </style:style>
    <style:style style:name="T122" style:family="text">
      <style:text-properties fo:font-weight="bold" officeooo:rsid="008be030" style:font-weight-asian="bold" style:font-weight-complex="bold"/>
    </style:style>
    <style:style style:name="T123" style:family="text">
      <style:text-properties fo:language="pt" fo:country="BR" fo:font-weight="normal" officeooo:rsid="005ee4d1" style:font-weight-asian="normal" style:font-weight-complex="normal"/>
    </style:style>
    <style:style style:name="T124" style:family="text">
      <style:text-properties fo:language="pt" fo:country="BR" officeooo:rsid="005ee4d1"/>
    </style:style>
    <style:style style:name="T125" style:family="text">
      <style:text-properties fo:color="#dcdcaa" loext:opacity="100%" fo:font-family="Consolas, 'Courier New', monospace" fo:font-size="10.5pt" fo:font-weight="normal" officeooo:rsid="0027e338" fo:background-color="#1f1f1f" loext:char-shading-value="0"/>
    </style:style>
    <style:style style:name="T126" style:family="text">
      <style:text-properties officeooo:rsid="005ee4d1"/>
    </style:style>
    <style:style style:name="T127" style:family="text">
      <style:text-properties fo:color="#2a6099" loext:opacity="100%" fo:font-family="Consolas, 'Courier New', monospace" fo:font-size="10.5pt" fo:font-weight="normal" officeooo:rsid="0027e338" fo:background-color="#1f1f1f" loext:char-shading-value="0"/>
    </style:style>
    <style:style style:name="T128" style:family="text">
      <style:text-properties style:font-name="Liberation Serif" officeooo:rsid="005ee4d1"/>
    </style:style>
    <style:style style:name="T129" style:family="text">
      <style:text-properties style:font-name="Liberation Serif"/>
    </style:style>
    <style:style style:name="T130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31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32" style:family="text">
      <style:text-properties fo:language="pt" fo:country="BR" officeooo:rsid="008d7e23"/>
    </style:style>
    <style:style style:name="T133" style:family="text">
      <style:text-properties fo:language="pt" fo:country="BR" officeooo:rsid="004141fd"/>
    </style:style>
    <style:style style:name="T134" style:family="text">
      <style:text-properties fo:font-weight="bold" officeooo:rsid="004a3f35" style:font-weight-asian="bold" style:font-weight-complex="bold"/>
    </style:style>
    <style:style style:name="T135" style:family="text">
      <style:text-properties officeooo:rsid="004a3f35"/>
    </style:style>
    <style:style style:name="T136" style:family="text">
      <style:text-properties fo:language="pt" fo:country="BR" officeooo:rsid="004a3f35"/>
    </style:style>
    <style:style style:name="T137" style:family="text">
      <style:text-properties fo:language="pt" fo:country="BR" officeooo:rsid="004ef07e"/>
    </style:style>
    <style:style style:name="T138" style:family="text">
      <style:text-properties fo:language="pt" fo:country="BR" officeooo:rsid="00500af1"/>
    </style:style>
    <style:style style:name="T139" style:family="text">
      <style:text-properties style:font-name="Liberation Serif" fo:language="pt" fo:country="BR" officeooo:rsid="00500af1"/>
    </style:style>
    <style:style style:name="T140" style:family="text">
      <style:text-properties style:font-name="Liberation Serif" fo:language="pt" fo:country="BR" officeooo:rsid="008d83cb"/>
    </style:style>
    <style:style style:name="T141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42" style:family="text">
      <style:text-properties style:font-name="Liberation Serif" fo:font-size="12pt" fo:language="pt" fo:country="BR" officeooo:rsid="0028eeb8" style:font-size-asian="12pt" style:font-size-complex="12pt"/>
    </style:style>
    <style:style style:name="T143" style:family="text">
      <style:text-properties style:font-name="Liberation Serif" fo:font-size="12pt" fo:language="pt" fo:country="BR" officeooo:rsid="00818493" style:font-size-asian="12pt" style:font-size-complex="12pt"/>
    </style:style>
    <style:style style:name="T144" style:family="text">
      <style:text-properties fo:font-family="Mono" style:font-pitch="fixed" fo:font-size="12pt" fo:language="pt" fo:country="BR" officeooo:rsid="0028eeb8" style:font-size-asian="12pt" style:font-size-complex="12pt"/>
    </style:style>
    <style:style style:name="T145" style:family="text">
      <style:text-properties style:font-name="Liberation Serif" fo:font-size="12pt" fo:language="pt" fo:country="BR" style:font-size-asian="12pt" style:font-size-complex="12pt"/>
    </style:style>
    <style:style style:name="T146" style:family="text">
      <style:text-properties style:font-name="Liberation Serif" fo:font-size="12pt" fo:language="pt" fo:country="BR" officeooo:rsid="003fcbff" style:font-size-asian="12pt" style:font-size-complex="12pt"/>
    </style:style>
    <style:style style:name="T147" style:family="text">
      <style:text-properties style:font-name="Liberation Serif" fo:font-size="12pt" fo:language="pt" fo:country="BR" officeooo:rsid="002bd728" style:font-size-asian="12pt" style:font-size-complex="12pt"/>
    </style:style>
    <style:style style:name="T148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49" style:family="text">
      <style:text-properties fo:font-family="Mono" style:font-pitch="fixed" fo:font-size="12pt" fo:language="pt" fo:country="BR" officeooo:rsid="002bd728" style:font-size-asian="12pt" style:font-size-complex="12pt"/>
    </style:style>
    <style:style style:name="T150" style:family="text">
      <style:text-properties style:font-name="Liberation Serif" fo:font-size="12pt" fo:language="pt" fo:country="BR" officeooo:rsid="002e2853" style:font-size-asian="12pt" style:font-size-complex="12pt"/>
    </style:style>
    <style:style style:name="T151" style:family="text">
      <style:text-properties fo:font-family="Mono" style:font-pitch="fixed" fo:font-size="12pt" fo:language="pt" fo:country="BR" officeooo:rsid="0030002c" style:font-size-asian="12pt" style:font-size-complex="12pt"/>
    </style:style>
    <style:style style:name="T152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53" style:family="text">
      <style:text-properties style:font-name="Liberation Serif" fo:font-size="12pt" fo:language="pt" fo:country="BR" officeooo:rsid="0030002c" style:font-size-asian="12pt" style:font-size-complex="12pt"/>
    </style:style>
    <style:style style:name="T154" style:family="text">
      <style:text-properties style:font-name="Liberation Serif" fo:font-size="12pt" fo:language="pt" fo:country="BR" officeooo:rsid="00319414" style:font-size-asian="12pt" style:font-size-complex="12pt"/>
    </style:style>
    <style:style style:name="T155" style:family="text">
      <style:text-properties style:font-name="Liberation Serif" fo:font-size="12pt" fo:language="pt" fo:country="BR" officeooo:rsid="00332145" style:font-size-asian="12pt" style:font-size-complex="12pt"/>
    </style:style>
    <style:style style:name="T156" style:family="text">
      <style:text-properties style:font-name="Liberation Serif" fo:font-size="12pt" fo:language="pt" fo:country="BR" officeooo:rsid="00395a57" style:font-size-asian="12pt" style:font-size-complex="12pt"/>
    </style:style>
    <style:style style:name="T157" style:family="text">
      <style:text-properties style:font-name="Liberation Serif" fo:font-size="12pt" fo:language="pt" fo:country="BR" officeooo:rsid="00345a11" style:font-size-asian="12pt" style:font-size-complex="12pt"/>
    </style:style>
    <style:style style:name="T158" style:family="text">
      <style:text-properties style:font-name="Liberation Serif" fo:font-size="12pt" fo:language="pt" fo:country="BR" officeooo:rsid="0034e4e1" style:font-size-asian="12pt" style:font-size-complex="12pt"/>
    </style:style>
    <style:style style:name="T159" style:family="text">
      <style:text-properties style:font-name="Liberation Serif" fo:font-size="12pt" fo:language="pt" fo:country="BR" officeooo:rsid="003903c6" style:font-size-asian="12pt" style:font-size-complex="12pt"/>
    </style:style>
    <style:style style:name="T160" style:family="text">
      <style:text-properties style:font-name="Liberation Serif" fo:font-size="12pt" fo:language="pt" fo:country="BR" officeooo:rsid="003bb1d0" style:font-size-asian="12pt" style:font-size-complex="12pt"/>
    </style:style>
    <style:style style:name="T161" style:family="text">
      <style:text-properties style:font-name="Liberation Serif" fo:font-size="12pt" fo:language="pt" fo:country="BR" officeooo:rsid="0039232e" style:font-size-asian="12pt" style:font-size-complex="12pt"/>
    </style:style>
    <style:style style:name="T162" style:family="text">
      <style:text-properties fo:font-family="Mono" style:font-pitch="fixed" fo:font-size="12pt" fo:language="pt" fo:country="BR" officeooo:rsid="003903c6" style:font-size-asian="12pt" style:font-size-complex="12pt"/>
    </style:style>
    <style:style style:name="T163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65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66" style:family="text">
      <style:text-properties style:font-name="Liberation Serif" fo:font-size="12pt" fo:language="pt" fo:country="BR" officeooo:rsid="003934aa" style:font-size-asian="12pt" style:font-size-complex="12pt"/>
    </style:style>
    <style:style style:name="T167" style:family="text">
      <style:text-properties style:font-name="Liberation Serif" fo:font-size="12pt" fo:language="pt" fo:country="BR" officeooo:rsid="003a2caa" style:font-size-asian="12pt" style:font-size-complex="12pt"/>
    </style:style>
    <style:style style:name="T168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69" style:family="text">
      <style:text-properties style:font-name="Liberation Serif" fo:font-size="12pt" fo:language="pt" fo:country="BR" officeooo:rsid="003c9a19" style:font-size-asian="12pt" style:font-size-complex="12pt"/>
    </style:style>
    <style:style style:name="T170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71" style:family="text">
      <style:text-properties style:font-name="Liberation Serif" fo:font-size="12pt" fo:language="pt" fo:country="BR" officeooo:rsid="003aaf37" style:font-size-asian="12pt" style:font-size-complex="12pt"/>
    </style:style>
    <style:style style:name="T172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3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74" style:family="text">
      <style:text-properties style:font-name="Liberation Serif" fo:font-size="12pt" fo:language="pt" fo:country="BR" officeooo:rsid="003dbe03" style:font-size-asian="12pt" style:font-size-complex="12pt"/>
    </style:style>
    <style:style style:name="T175" style:family="text">
      <style:text-properties fo:font-variant="normal" fo:text-transform="none" fo:color="#ffff00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6" style:family="text">
      <style:text-properties style:font-name="Liberation Serif" fo:font-size="12pt" fo:language="pt" fo:country="BR" officeooo:rsid="008d83cb" style:font-size-asian="12pt" style:font-size-complex="12pt"/>
    </style:style>
    <style:style style:name="T177" style:family="text">
      <style:text-properties style:font-name="Liberation Serif" fo:font-size="12pt" fo:language="pt" fo:country="BR" officeooo:rsid="003f1ab4" style:font-size-asian="12pt" style:font-size-complex="12pt"/>
    </style:style>
    <style:style style:name="T178" style:family="text">
      <style:text-properties style:font-name="Liberation Serif" fo:language="pt" fo:country="BR" officeooo:rsid="008f4fa4"/>
    </style:style>
    <style:style style:name="T179" style:family="text">
      <style:text-properties style:font-name="Liberation Serif" fo:font-size="12pt" fo:language="pt" fo:country="BR" officeooo:rsid="0044c921" style:font-size-asian="12pt" style:font-size-complex="12pt"/>
    </style:style>
    <style:style style:name="T180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81" style:family="text">
      <style:text-properties fo:font-family="Mono" style:font-pitch="fixed" fo:font-size="12pt" fo:language="pt" fo:country="BR" officeooo:rsid="003fcbff" style:font-size-asian="12pt" style:font-size-complex="12pt"/>
    </style:style>
    <style:style style:name="T182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83" style:family="text">
      <style:text-properties style:font-name="Liberation Serif" fo:font-size="12pt" fo:language="pt" fo:country="BR" officeooo:rsid="00435490" style:font-size-asian="12pt" style:font-size-complex="12pt"/>
    </style:style>
    <style:style style:name="T184" style:family="text">
      <style:text-properties fo:font-family="Mono" style:font-pitch="fixed" fo:font-size="12pt" fo:language="pt" fo:country="BR" officeooo:rsid="0044c921" style:font-size-asian="12pt" style:font-size-complex="12pt"/>
    </style:style>
    <style:style style:name="T185" style:family="text">
      <style:text-properties style:font-name="Liberation Serif" fo:font-size="12pt" fo:language="pt" fo:country="BR" officeooo:rsid="0042e159" style:font-size-asian="12pt" style:font-size-complex="12pt"/>
    </style:style>
    <style:style style:name="T186" style:family="text">
      <style:text-properties fo:font-family="Mono" style:font-pitch="fixed" fo:font-size="12pt" fo:language="pt" fo:country="BR" officeooo:rsid="0042e159" style:font-size-asian="12pt" style:font-size-complex="12pt"/>
    </style:style>
    <style:style style:name="T187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88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89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1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92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93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94" style:family="text">
      <style:text-properties style:font-name="Liberation Serif" fo:font-size="12pt" fo:language="pt" fo:country="BR" officeooo:rsid="0046bf40" style:font-size-asian="12pt" style:font-size-complex="12pt"/>
    </style:style>
    <style:style style:name="T195" style:family="text">
      <style:text-properties fo:font-family="Mono" style:font-pitch="fixed" fo:font-size="12pt" fo:language="pt" fo:country="BR" officeooo:rsid="0046bf40" style:font-size-asian="12pt" style:font-size-complex="12pt"/>
    </style:style>
    <style:style style:name="T196" style:family="text">
      <style:text-properties fo:font-family="Mono" style:font-pitch="fixed" fo:font-size="12pt" fo:language="pt" fo:country="BR" officeooo:rsid="00477ac7" style:font-size-asian="12pt" style:font-size-complex="12pt"/>
    </style:style>
    <style:style style:name="T197" style:family="text">
      <style:text-properties fo:font-family="Mono" style:font-pitch="fixed" fo:font-size="12pt" fo:language="pt" fo:country="BR" officeooo:rsid="004a3f35" style:font-size-asian="12pt" style:font-size-complex="12pt"/>
    </style:style>
    <style:style style:name="T198" style:family="text">
      <style:text-properties style:font-name="Liberation Serif" fo:font-size="12pt" fo:language="pt" fo:country="BR" officeooo:rsid="004a3f35" style:font-size-asian="12pt" style:font-size-complex="12pt"/>
    </style:style>
    <style:style style:name="T199" style:family="text">
      <style:text-properties style:font-name="Liberation Serif" fo:font-size="12pt" fo:language="pt" fo:country="BR" officeooo:rsid="0048fdc0" style:font-size-asian="12pt" style:font-size-complex="12pt"/>
    </style:style>
    <style:style style:name="T200" style:family="text">
      <style:text-properties fo:color="#cccccc" loext:opacity="100%" fo:font-family="Consolas, 'Courier New', monospace" fo:font-size="10pt" fo:language="pt" fo:country="BR" fo:font-weight="normal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pwd</text:p>
          </table:table-cell>
          <table:table-cell table:style-name="Tabela1.A1" office:value-type="string">
            <text:p text:style-name="P3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4">cd</text:p>
          </table:table-cell>
          <table:table-cell table:style-name="Tabela1.A1" office:value-type="string">
            <text:p text:style-name="P4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4">ls – <text:span text:style-name="T1">lha</text:span></text:p>
          </table:table-cell>
          <table:table-cell table:style-name="Tabela1.A1" office:value-type="string">
            <text:p text:style-name="P4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4">Cat <text:span text:style-name="T1">e tac</text:span></text:p>
          </table:table-cell>
          <table:table-cell table:style-name="Tabela1.A1" office:value-type="string">
            <text:p text:style-name="P4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4">whoami</text:p>
          </table:table-cell>
          <table:table-cell table:style-name="Tabela1.A1" office:value-type="string">
            <text:p text:style-name="P4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4">clear</text:p>
          </table:table-cell>
          <table:table-cell table:style-name="Tabela1.A1" office:value-type="string">
            <text:p text:style-name="P4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4">mkdir</text:p>
          </table:table-cell>
          <table:table-cell table:style-name="Tabela1.A1" office:value-type="string">
            <text:p text:style-name="P4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4">rmdir</text:p>
          </table:table-cell>
          <table:table-cell table:style-name="Tabela1.A1" office:value-type="string">
            <text:p text:style-name="P4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4">rm</text:p>
          </table:table-cell>
          <table:table-cell table:style-name="Tabela1.A1" office:value-type="string">
            <text:p text:style-name="P4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4">rm -r</text:p>
          </table:table-cell>
          <table:table-cell table:style-name="Tabela1.A1" office:value-type="string">
            <text:p text:style-name="P4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4">cp</text:p>
          </table:table-cell>
          <table:table-cell table:style-name="Tabela1.A1" office:value-type="string">
            <text:p text:style-name="P4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4">mv</text:p>
          </table:table-cell>
          <table:table-cell table:style-name="Tabela1.A1" office:value-type="string">
            <text:p text:style-name="P4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4">touch</text:p>
          </table:table-cell>
          <table:table-cell table:style-name="Tabela1.A1" office:value-type="string">
            <text:p text:style-name="P4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4">locate</text:p>
          </table:table-cell>
          <table:table-cell table:style-name="Tabela1.A1" office:value-type="string">
            <text:p text:style-name="P4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4">find</text:p>
          </table:table-cell>
          <table:table-cell table:style-name="Tabela1.A1" office:value-type="string">
            <text:p text:style-name="P4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4">grep</text:p>
          </table:table-cell>
          <table:table-cell table:style-name="Tabela1.A1" office:value-type="string">
            <text:p text:style-name="P4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4">head -n 5</text:p>
          </table:table-cell>
          <table:table-cell table:style-name="Tabela1.A1" office:value-type="string">
            <text:p text:style-name="P4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4">tail</text:p>
          </table:table-cell>
          <table:table-cell table:style-name="Tabela1.A1" office:value-type="string">
            <text:p text:style-name="P4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4">zip -r</text:p>
          </table:table-cell>
          <table:table-cell table:style-name="Tabela1.A1" office:value-type="string">
            <text:p text:style-name="P4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4">unzip</text:p>
          </table:table-cell>
          <table:table-cell table:style-name="Tabela1.A1" office:value-type="string">
            <text:p text:style-name="P4">Descompacta, ex: unzip work.zip</text:p>
          </table:table-cell>
        </table:table-row>
        <table:table-row table:style-name="Tabela1.1">
          <table:table-cell table:style-name="Tabela1.A1" office:value-type="string">
            <text:p text:style-name="P4">vi<text:span text:style-name="T4">m</text:span></text:p>
          </table:table-cell>
          <table:table-cell table:style-name="Tabela1.A1" office:value-type="string">
            <text:p text:style-name="P4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5"/>
            <text:p text:style-name="P6">Dentro</text:p>
            <text:p text:style-name="P6">do</text:p>
            <text:p text:style-name="P6">VI<text:span text:style-name="T4">M (Visual IMproved)</text:span></text:p>
          </table:table-cell>
          <table:table-cell table:style-name="Tabela1.A1" office:value-type="string">
            <text:p text:style-name="P7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7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6">:wq -&gt; salva e fecha arquivo <text:s text:c="8"/>G <text:s/>-&gt; ir p/ fim do arquivo</text:p>
            <text:p text:style-name="P6">:q! -&gt; sair sem salvar <text:s text:c="14"/>gg -&gt; ir p/ inicio do arquivo</text:p>
          </table:table-cell>
        </table:table-row>
      </table:table>
      <text:p text:style-name="P8"/>
      <text:p text:style-name="P9"/>
      <text:p text:style-name="P9"/>
      <text:p text:style-name="P10"><text:span text:style-name="T6">CLI</text:span><text:span text:style-name="T7">, ou </text:span><text:span text:style-name="Strong_20_Emphasis"><text:span text:style-name="T7">Command Line Interface</text:span></text:span><text:span text:style-name="T7">, </text:span><text:span text:style-name="T8">são</text:span><text:span text:style-name="T7"> interface</text:span><text:span text:style-name="T8">s</text:span><text:span text:style-name="T7"> de texto que permite</text:span><text:span text:style-name="T9">m</text:span><text:span text:style-name="T7"> aos usuários interagirem com o sistema executando comandos diretamente.</text:span></text:p>
      <text:p text:style-name="P11"><text:span text:style-name="T1">Contexto </text:span>Linux</text:p>
      <text:p text:style-name="P12"/>
      <text:p text:style-name="P12"><text:tab/>Assim como o Windows e o MacOS, o Linux é um sistema operacional, porém com algumas peculiaridades que o torna distinto dos sistemas desenvolvidos pela Microsoft e Apple.</text:p>
      <text:p text:style-name="P1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1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13"/>
      <text:p text:style-name="P14"><text:span text:style-name="T7">O </text:span><text:span text:style-name="T10">Manifesto GNU</text:span><text:span text:style-name="T7"> (que segue abaixo) foi escrito por </text:span><text:a xlink:type="simple" xlink:href="https://www.stallman.org/" text:style-name="Internet_20_link" text:visited-style-name="Visited_20_Internet_20_Link"><text:span text:style-name="T7">Richard Stallman</text:span></text:a><text:span text:style-name="T7"> em 1985 para pedir apoio no desenvolvimento do sistema operacional GNU.</text:span></text:p>
      <text:p text:style-name="P14"><text:span text:style-name="T7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7">iberdade dos usuários de software</text:span></text:a><text:span text:style-name="T7">, </text:span><text:span text:style-name="T11">iniciada na época como uma forma de protesto </text:span><text:span text:style-name="T7">à ação da empresa AT&amp;T de cobrar pelo uso do seu Software UNIX (já distribuído por anos).</text:span></text:p>
      <text:p text:style-name="P15"/>
      <text:p text:style-name="P15">O <text:span text:style-name="T12">GNU Linux</text:span> versão <text:span text:style-name="T12">Mint</text:span> é um fork <text:span text:style-name="T13">da distro Ubunto que, por sua vez, é um fork </text:span>da <text:span text:style-name="T13">distro</text:span> <text:span text:style-name="T14">Debian</text:span></text:p>
      <text:p text:style-name="P15"/>
      <text:p text:style-name="P16"><text:span text:style-name="Strong_20_Emphasis"><text:span text:style-name="T10">Software Livre</text:span></text:span><text:span text:style-name="Strong_20_Emphasis"><text:span text:style-name="T15"> é o software que pode ser </text:span></text:span><text:span text:style-name="Strong_20_Emphasis"><text:span text:style-name="T16">usado</text:span></text:span><text:span text:style-name="Strong_20_Emphasis"><text:span text:style-name="T15">, </text:span></text:span><text:span text:style-name="Strong_20_Emphasis"><text:span text:style-name="T16">copiado</text:span></text:span><text:span text:style-name="Strong_20_Emphasis"><text:span text:style-name="T15">, </text:span></text:span><text:span text:style-name="Strong_20_Emphasis"><text:span text:style-name="T16">estudado</text:span></text:span><text:span text:style-name="Strong_20_Emphasis"><text:span text:style-name="T15">, </text:span></text:span><text:span text:style-name="Strong_20_Emphasis"><text:span text:style-name="T16">modificado</text:span></text:span><text:span text:style-name="Strong_20_Emphasis"><text:span text:style-name="T15"> e </text:span></text:span><text:span text:style-name="Strong_20_Emphasis"><text:span text:style-name="T16">redistribuído</text:span></text:span><text:span text:style-name="Strong_20_Emphasis"><text:span text:style-name="T1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16"><text:span text:style-name="Strong_20_Emphasis"><text:span text:style-name="T17">Os 4 princípios ou</text:span></text:span><text:span text:style-name="Strong_20_Emphasis"><text:span text:style-name="T15"> liberdades básicas associadas ao software livre são:</text:span></text:span></text:p>
      <text:list text:style-name="L1">
        <text:list-item>
          <text:p text:style-name="P17"><text:span text:style-name="T18">A liberdade de </text:span><text:span text:style-name="T19">executar</text:span><text:span text:style-name="T18"> o programa, para qualquer propósito</text:span></text:p>
        </text:list-item>
        <text:list-item>
          <text:p text:style-name="P18">A liberdade de <text:span text:style-name="T14">estudar</text:span> como o programa funciona, e adaptá-lo para as suas necessidades</text:p>
        </text:list-item>
        <text:list-item>
          <text:p text:style-name="P17"><text:span text:style-name="T18">A liberdade de </text:span><text:span text:style-name="T19">redistribuir</text:span><text:span text:style-name="T18"> cópias de modo que você possa ajudar </text:span><text:span text:style-name="T20">o</text:span><text:span text:style-name="T18"> próximo.</text:span></text:p>
        </text:list-item>
        <text:list-item>
          <text:p text:style-name="P17"><text:span text:style-name="T18">A liberdade de </text:span><text:span text:style-name="T19">aperfeiçoar</text:span><text:span text:style-name="T18"> o programa e liberar os seus aperfeiçoamentos, de modo que toda a comunidade se beneficie.</text:span></text:p>
        </text:list-item>
      </text:list>
      <text:p text:style-name="P15"><text:span text:style-name="T12">GRUB</text:span> serve para inicializar o boot do Linux, inst<text:span text:style-name="T21">a</text:span>le-o direto no SDD (e não em uma partição específica)</text:p>
      <text:p text:style-name="P15"/>
      <text:p text:style-name="P15"/>
      <text:h text:style-name="P19" text:outline-level="2">CLI</text:h>
      <text:p text:style-name="P15"><text:span text:style-name="T22">Um </text:span><text:span text:style-name="T12">Terminal</text:span> <text:span text:style-name="T21">hoje </text:span>é uma <text:span text:style-name="T14">interface</text:span> de linha de comando <text:span text:style-name="T23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0"/>
      <text:p text:style-name="P21"><text:span text:style-name="Strong_20_Emphasis"><text:span text:style-name="T7">PuTTY</text:span></text:span><text:span text:style-name="T7"> </text:span><text:span text:style-name="T24">é </text:span><text:span text:style-name="T7">um cliente de terminal com interface gráfica (GUI) usado para estabelecer conexões SSH </text:span><text:span text:style-name="T24">e</text:span><text:span text:style-name="T7"> Telnet </text:span><text:span text:style-name="T24">com</text:span><text:span text:style-name="T7"> servidores remotos. </text:span><text:span text:style-name="T24">Ele também possui uma versão de linha de comando (CLI).</text:span></text:p>
      <text:p text:style-name="P15"/>
      <text:p text:style-name="P15">O <text:span text:style-name="T12">Shell</text:span> é um <text:span text:style-name="T14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9">Bash</text:span>. No Windows temos o <text:span text:style-name="T19">PowerShell</text:span>.</text:p>
      <text:p text:style-name="P2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22"/>
      <text:p text:style-name="P23"/>
      <text:p text:style-name="P24">A maneira mais comum de acessar um servidor é através de um terminal, por outra máquina mais acessível, usando o <text:span text:style-name="T12">protocolo SSH</text:span> (secure Shell), <text:span text:style-name="T25">substituto do antigo protocolo Telnet</text:span></text:p>
      <text:p text:style-name="P20"><text:span text:style-name="T26">Exemplo usando </text:span><text:span text:style-name="T27">Telnet no </text:span><text:span text:style-name="T28">P</text:span><text:span text:style-name="T26">rompt do Windows: </text:span><text:span text:style-name="T29">telnet</text:span><text:span text:style-name="T30"> </text:span><text:span text:style-name="T31">&lt;endereço IP ou hostname&gt;</text:span><text:span text:style-name="T30"> </text:span><text:span text:style-name="T31">&lt;porta&gt;</text:span></text:p>
      <text:p text:style-name="P20"><text:span text:style-name="T26">Exemplo usando SSH no Prompt do Windows: </text:span><text:span text:style-name="T29">ssh </text:span><text:span text:style-name="T32">usuario</text:span><text:span text:style-name="T33">@</text:span><text:span text:style-name="T32">192.168.31.33</text:span></text:p>
      <text:h text:style-name="P19" text:outline-level="2"><text:span text:style-name="T34">Comando x </text:span>Parâmetro x Argumento</text:h>
      <text:p text:style-name="P25">Os <text:span text:style-name="T12">comandos</text:span> são <text:span text:style-name="T35">escritos </text:span>sempre em letras minúsculas. Eles ficam armazenados dentro da pasta bin, no diretório raiz, <text:span text:style-name="T36">onde</text:span> é possível listá-los com o comando ls /bin</text:p>
      <text:p text:style-name="P26"/>
      <text:p text:style-name="P26">Os <text:span text:style-name="T12">parâmetros</text:span> alteram a saída do comando e podem ser declarados com 1 traço + 1 letra <text:span text:style-name="T21">ou</text:span> 2 traços + palavra inteira. Exemplo: <text:span text:style-name="T37">ls</text:span><text:span text:style-name="T38"> </text:span><text:span text:style-name="T39">–l</text:span> <text:span text:style-name="T21">ou </text:span><text:span text:style-name="T37">ls</text:span><text:span text:style-name="T38"> </text:span><text:span text:style-name="T39">--long</text:span></text:p>
      <text:p text:style-name="P26">Os parâmetros podem ser combinados. Exemplo: <text:span text:style-name="T37">ls -lah</text:span> <text:s text:c="4"/>combina os termos long+all+human</text:p>
      <text:p text:style-name="P26">Parâmetro vem acompanhado do caractere <text:span text:style-name="T39">-</text:span> OU <text:span text:style-name="T39">--</text:span> <text:s/>Exemplo: <text:s/><text:span text:style-name="T37">ls</text:span><text:span text:style-name="T38"> </text:span><text:span text:style-name="T39">–l</text:span></text:p>
      <text:p text:style-name="P15">Já argumento não. Exemplo: <text:s/><text:span text:style-name="T40">cd</text:span><text:span text:style-name="T38"> </text:span><text:span text:style-name="T32">..</text:span></text:p>
      <text:p text:style-name="P15"/>
      <text:p text:style-name="P27">Os <text:span text:style-name="T12">espaços</text:span> são usados para separar comandos de argumentos e/ou parâmetros</text:p>
      <text:p text:style-name="P15"/>
      <text:p text:style-name="P15">Use a <text:span text:style-name="T18">tecla</text:span><text:span text:style-name="T12"> tab</text:span> para completar seus comandos no prompt, se 1 tab não funcionar é porque existe mais de uma opção para completar</text:p>
      <text:h text:style-name="P28" text:outline-level="2"><text:span text:style-name="T34">G</text:span>erenciamento de pacotes</text:h>
      <text:p text:style-name="P26"><text:span text:style-name="T41">a</text:span><text:span text:style-name="T12">pt</text:span> é um gerenciador de pacotes <text:span text:style-name="T21">CLI</text:span> (prompt em linha de comando), el<text:span text:style-name="T21">e</text:span> manipula os repositórios para, por exemplo, baixar programas. <text:span text:style-name="T21">S</text:span>ubstituiu o Apt-get. <text:span text:style-name="T12">Synaptic</text:span> é a interface gráfica do Apt</text:p>
      <text:p text:style-name="P26"><text:span text:style-name="T42">EasterEgg</text:span>: <text:span text:style-name="T37">apt</text:span><text:span text:style-name="T38"> </text:span><text:span text:style-name="T43">moo</text:span>:have you mooed today?</text:p>
      <text:p text:style-name="P29"><text:span text:style-name="T37">sudo</text:span><text:span text:style-name="T38"> </text:span><text:span text:style-name="T43">apt</text:span><text:span text:style-name="T38"> </text:span><text:span text:style-name="T43">clean</text:span>: limpar cache (os repositorios)</text:p>
      <text:p text:style-name="P30"><text:span text:style-name="T37">sudo</text:span><text:span text:style-name="T38"> </text:span><text:span text:style-name="T43">apt</text:span><text:span text:style-name="T38"> </text:span><text:span text:style-name="T43">autoremove</text:span>: apaga pacotes que não estão sendo mais utilizados</text:p>
      <text:p text:style-name="P30"><text:span text:style-name="T37">sudo</text:span><text:span text:style-name="T38"> </text:span><text:span text:style-name="T43">dpkg</text:span><text:span text:style-name="T38"> </text:span><text:span text:style-name="T39">--install</text:span><text:span text:style-name="T38"> </text:span><text:span text:style-name="T43">programa_whatever.1.6</text:span>: instala o programa</text:p>
      <text:p text:style-name="P15"/>
      <text:p text:style-name="P15"><text:span text:style-name="T12">dpkg</text:span> é a ferrament<text:span text:style-name="T44">a</text:span> para manipular os pacotes. <text:span text:style-name="T12">gdeb</text:span> é uma interface simpática para o usar o dpkg</text:p>
      <text:p text:style-name="P31"><text:span text:style-name="T45">htop</text:span>: <text:span text:style-name="T42">ferramenta instalável que </text:span>apresenta uma espécie de gerenciador de tarefas, serve para monitorar o sistema</text:p>
      <text:h text:style-name="P28" text:outline-level="2">sudo</text:h>
      <text:p text:style-name="P32"><text:span text:style-name="T7">O comando </text:span><text:span text:style-name="Source_20_Text"><text:span text:style-name="T46">sudo</text:span></text:span><text:span text:style-name="T7"> (“superuser do”) permite a execução de tarefas administrativas com privilégios elevados, sem a necessidade de fazer login diretamente como </text:span><text:span text:style-name="Source_20_Text"><text:span text:style-name="T47">root</text:span></text:span><text:span text:style-name="T7">. Ele é fundamental para operações que exigem permissões </text:span><text:span text:style-name="T48">de administrador do sistema</text:span><text:span text:style-name="T7">, como Instalação/remoção de pacotes, </text:span><text:span text:style-name="T48">c</text:span><text:span text:style-name="T7">onfiguraç</text:span><text:span text:style-name="T48">ão do</text:span><text:span text:style-name="T7"> sistema, </text:span><text:span text:style-name="T48">gestão de </text:span><text:span text:style-name="T7">contas de usuários, </text:span><text:span text:style-name="T48">etc.<text:line-break/></text:span><text:span text:style-name="T7">Por padrão, o </text:span><text:span text:style-name="Source_20_Text"><text:span text:style-name="T47">sudo</text:span></text:span><text:span text:style-name="T7"> solicita a senha do usuário uma única vez e mantém o “timestamp” válido por 15 minutos (valor configurável em </text:span><text:span text:style-name="Source_20_Text"><text:span text:style-name="T47">/etc/sudoers</text:span></text:span><text:span text:style-name="T7"> pela diretiva </text:span><text:span text:style-name="Source_20_Text"><text:span text:style-name="T47">timestamp_timeout</text:span></text:span><text:span text:style-name="T7">). Somente usuários listados no grupo </text:span><text:span text:style-name="Source_20_Text"><text:span text:style-name="T47">sudo</text:span></text:span><text:span text:style-name="T7"> podem usar esse comando.<text:line-break/>Importância e benefícios:</text:span></text:p>
      <text:list text:style-name="L2">
        <text:list-item>
          <text:p text:style-name="P33"><text:span text:style-name="Strong_20_Emphasis"><text:span text:style-name="T7">Segurança: </text:span></text:span><text:span text:style-name="T7">Evita a divulgação da senha do usuário </text:span><text:span text:style-name="Source_20_Text"><text:span text:style-name="T47">root</text:span></text:span><text:span text:style-name="T7"> e limita o acesso irrestrito ao sistema. Permite aplicar o princípio do menor privilégio (Least Privilege).</text:span></text:p>
        </text:list-item>
        <text:list-item>
          <text:p text:style-name="P33"><text:span text:style-name="Strong_20_Emphasis"><text:span text:style-name="T7">Auditoria e rastreamento: </text:span></text:span><text:span text:style-name="T7">Todas as invocações de </text:span><text:span text:style-name="Source_20_Text"><text:span text:style-name="T47">sudo</text:span></text:span><text:span text:style-name="T7"> são registradas em </text:span><text:span text:style-name="Source_20_Text"><text:span text:style-name="T47">/var/log/auth.log</text:span></text:span><text:span text:style-name="T7">, viabilizando auditorias e identificação de quem executou cada ação administrativa.</text:span></text:p>
        </text:list-item>
        <text:list-item>
          <text:p text:style-name="P33"><text:span text:style-name="Strong_20_Emphasis"><text:span text:style-name="T7">Conveniência: </text:span></text:span><text:span text:style-name="T7">Usuários autorizados podem permanecer em suas próprias contas, sem precisar trocar de sessão ou digitar repetidamente </text:span><text:span text:style-name="Source_20_Text"><text:span text:style-name="T47">su</text:span></text:span><text:span text:style-name="Source_20_Text"><text:span text:style-name="T49">do</text:span></text:span><text:span text:style-name="Source_20_Text"><text:span text:style-name="T47"> -</text:span></text:span><text:span text:style-name="T7"> + senha do root.</text:span></text:p>
        </text:list-item>
      </text:list>
      <text:p text:style-name="P34"><text:span text:style-name="Strong_20_Emphasis"><text:span text:style-name="T15">Nunca use </text:span></text:span><text:span text:style-name="Strong_20_Emphasis"><text:span text:style-name="T50">usuario</text:span></text:span><text:span text:style-name="Strong_20_Emphasis"><text:span text:style-name="Source_20_Text"><text:span text:style-name="T51"> ALL=(ALL) ALL</text:span></text:span></text:span><text:span text:style-name="T15"> </text:span><text:span text:style-name="T52">pois</text:span><text:span text:style-name="T15"> isso d</text:span><text:span text:style-name="T7">á </text:span><text:span text:style-name="Source_20_Text"><text:span text:style-name="T47">sudo</text:span></text:span><text:span text:style-name="T7"> total, o mesmo que </text:span><text:span text:style-name="T47">root</text:span><text:span text:style-name="T7">.</text:span></text:p>
      <text:h text:style-name="P35" text:outline-level="2">Diretórios</text:h>
      <text:p text:style-name="P36"><text:span text:style-name="T45">ls</text:span><text:span text:style-name="T12"> lista</text:span> <text:span text:style-name="T53">diretórios</text:span> e arquivos no diretorio atual <text:span text:style-name="T54">ou outro se declarado. </text:span><text:span text:style-name="T55">E</text:span><text:span text:style-name="T54">xemplo: </text:span><text:span text:style-name="T37">ls</text:span><text:span text:style-name="T38"> </text:span><text:span text:style-name="T43">/Imagens</text:span> <text:line-break/><text:span text:style-name="T56">Ao adicionar os parâmetros </text:span><text:span text:style-name="T39">all + long + human</text:span><text:span text:style-name="T56"> ele apresenta os </text:span><text:span text:style-name="T57">detalhes</text:span><text:span text:style-name="T56"> dos arquivos.<text:line-break/></text:span><text:span text:style-name="T58">Macete: No Ubunto, o atalho para </text:span><text:span text:style-name="T37">ls -la</text:span><text:span text:style-name="T58"> é apenas </text:span><text:span text:style-name="T37">ll</text:span><text:span text:style-name="T56"><text:line-break/></text:span><text:span text:style-name="T59">Macete: usar o comando </text:span><text:span text:style-name="T60">ls</text:span><text:span text:style-name="T59"> ajuda a identificar o S.O. já que esse comando não é válido no Windows.</text:span></text:p>
      <text:p text:style-name="P15"><text:span text:style-name="T54">Ao adicionar o parâmetro </text:span><text:span text:style-name="T39">-R</text:span><text:span text:style-name="T54"> ele apresenta uma listagem recursiva, mostrando todas as pastas dentro de pastas.</text:span></text:p>
      <text:p text:style-name="P37"><text:span text:style-name="T61">O</text:span> primeiro caractere da linha indica o <text:span text:style-name="Strong_20_Emphasis">tipo do arquivo:</text:span></text:p>
      <text:list text:style-name="L3">
        <text:list-item>
          <text:p text:style-name="P38"><text:span text:style-name="T62">-</text:span> significa que é um arquivo</text:p>
        </text:list-item>
        <text:list-item>
          <text:p text:style-name="P38"><text:span text:style-name="T62">d</text:span> significa que é um diretório</text:p>
        </text:list-item>
        <text:list-item>
          <text:p text:style-name="P38"><text:span text:style-name="T62">l</text:span> significa que é um link (atalho, um ponteiro para outro arquivo)</text:p>
        </text:list-item>
        <text:list-item>
          <text:p text:style-name="P39"><text:span text:style-name="T63">b</text:span><text:span text:style-name="T56"> significa </text:span><text:span text:style-name="T61">a</text:span>rquivo de bloco (block device – ex: disco) </text:p>
        </text:list-item>
        <text:list-item>
          <text:p text:style-name="P40"><text:span text:style-name="T63">c</text:span><text:span text:style-name="T56"> significa </text:span><text:span text:style-name="T61">a</text:span>rquivo de caractere (character device – ex: terminal, serial)</text:p>
        </text:list-item>
        <text:list-item>
          <text:p text:style-name="P40"><text:span text:style-name="T64">s</text:span><text:span text:style-name="T56"> significa Socket (comunicação entre processos)</text:span></text:p>
          <text:p text:style-name="P39"/>
        </text:list-item>
      </text:list>
      <text:p text:style-name="P15">No Linux, se o arquivo for <text:span text:style-name="T14">nomeado iniciando com ponto</text:span>, ele fica <text:span text:style-name="T12">oculto</text:span>. Exemplo: .recycle.bin</text:p>
      <text:p text:style-name="P15"><text:span text:style-name="T37">ls</text:span><text:span text:style-name="T39"> -a</text:span><text:span text:style-name="T56"> </text:span><text:span text:style-name="T55">ou</text:span><text:span text:style-name="T56"> </text:span><text:span text:style-name="T37">ls</text:span><text:span text:style-name="T39"> --all</text:span><text:span text:style-name="T56">: mostra também os arquivos ocultos</text:span></text:p>
      <text:p text:style-name="P15"><text:span text:style-name="T65">Comandos </text:span><text:span text:style-name="T66">cd - C</text:span><text:span text:style-name="T67">hange Directory</text:span><text:span text:style-name="T55">:</text:span></text:p>
      <text:p text:style-name="P15"/>
      <text:list text:style-name="L4">
        <text:list-item>
          <text:p text:style-name="P41"><text:span text:style-name="T37">cd</text:span><text:span text:style-name="T43"> Downloads/</text:span> abre o <text:span text:style-name="T14">diretório</text:span> downloads, não esqueça da barra!</text:p>
        </text:list-item>
        <text:list-item>
          <text:p text:style-name="P42"><text:span text:style-name="T37">cd</text:span><text:span text:style-name="T38"> </text:span><text:span text:style-name="T43">/</text:span> aponta para o diretório <text:span text:style-name="T14">raiz</text:span> (o root tem acesso a todas as pastas do sistema)</text:p>
        </text:list-item>
        <text:list-item>
          <text:p text:style-name="P41"><text:span text:style-name="T37">cd</text:span><text:span text:style-name="T38"> </text:span><text:span text:style-name="T43">./</text:span> aponta para o diretório <text:span text:style-name="T14">atual</text:span></text:p>
        </text:list-item>
        <text:list-item>
          <text:p text:style-name="P43"><text:span text:style-name="T37">cd</text:span><text:span text:style-name="T38"> </text:span><text:span text:style-name="T43">../</text:span> aponta para o <text:span text:style-name="T68">diretório </text:span><text:span text:style-name="T69">pai</text:span><text:span text:style-name="T68">, subindo um nível hierarquicamente</text:span></text:p>
        </text:list-item>
        <text:list-item>
          <text:p text:style-name="P44"><text:span text:style-name="T37">cd</text:span><text:span text:style-name="T38"> </text:span><text:span text:style-name="T43">~/</text:span> aponta para a pasta do <text:span text:style-name="T14">usuário</text:span> logado. É a pasta 'home' que contém, por exemplo, as pastas 'area de trabalho', 'downloads', 'documentos', etc. <text:span text:style-name="T65">Macete: No Ubunto, utilize o atalho </text:span><text:span text:style-name="T70">cd</text:span></text:p>
        </text:list-item>
        <text:list-item>
          <text:p text:style-name="P45"><text:span text:style-name="T70">c</text:span><text:span text:style-name="T71">d –</text:span> é um atalho para voltar ao diretório anterior</text:p>
        </text:list-item>
      </text:list>
      <text:p text:style-name="P15"/>
      <text:p text:style-name="P15">No diretório raiz, <text:span text:style-name="T72">a pasta</text:span>:</text:p>
      <text:list text:style-name="L5">
        <text:list-item>
          <text:p text:style-name="P46">'<text:span text:style-name="T73">bin</text:span>' armazena todos os <text:span text:style-name="T12">comandos bash</text:span> <text:span text:style-name="T72">para o usuário</text:span></text:p>
        </text:list-item>
        <text:list-item>
          <text:p text:style-name="P46">'<text:span text:style-name="T73">boot</text:span>' armazena o <text:span text:style-name="T12">kernel do linux</text:span>: <text:span text:style-name="T72">static files of the boot loader</text:span></text:p>
        </text:list-item>
        <text:list-item>
          <text:p text:style-name="P46">'<text:span text:style-name="T73">dev</text:span>' armazena os <text:span text:style-name="T12">devices</text:span>, nela estará o SSD, cdrom, etc. Dentro dessa pasta existe a <text:span text:style-name="T12">pasta usb/</text:span> que contém todos os dispositivos conectados nas entradas USB do computado<text:span text:style-name="T55">r</text:span>, como os pendrives</text:p>
        </text:list-item>
        <text:list-item>
          <text:p text:style-name="P47"><text:span text:style-name="T72">‘</text:span><text:span text:style-name="T74">etc</text:span><text:span text:style-name="T72">’ armazena </text:span><text:span text:style-name="T12">arquivos de configuração </text:span><text:span text:style-name="T18">essenciais para o</text:span><text:span text:style-name="T12"> sistema</text:span> e para diversos programas instalados, <text:span text:style-name="T72">sendo</text:span> fundamental para a inicialização <text:span text:style-name="T72">do SO.</text:span></text:p>
        </text:list-item>
        <text:list-item>
          <text:p text:style-name="P46">'<text:span text:style-name="T73">home</text:span>' armazena os <text:span text:style-name="T12">arquivos do usuário</text:span></text:p>
        </text:list-item>
        <text:list-item>
          <text:p text:style-name="P46">'<text:span text:style-name="T73">lib</text:span>' armazena as <text:span text:style-name="T12">bibliotecas do sistema</text:span></text:p>
        </text:list-item>
        <text:list-item>
          <text:p text:style-name="P48"><text:span text:style-name="T7">’</text:span><text:span text:style-name="T75">opt</text:span><text:span text:style-name="T76">’ </text:span><text:span text:style-name="T7">armazena</text:span><text:span text:style-name="Strong_20_Emphasis"><text:span text:style-name="T7"> softwares opcionais</text:span></text:span><text:span text:style-name="T7"> que não fazem parte do sistema principal, principalmente aqueles que não estão incluídos nos repositórios da distribuição ou que precisam ser mantidos isolados das bibliotecas padrão do sistema. Enquanto </text:span><text:span text:style-name="T76">o diretório</text:span><text:span text:style-name="T7"> </text:span><text:span text:style-name="T47">/</text:span><text:span text:style-name="T77">usr</text:span><text:span text:style-name="T76"> </text:span><text:span text:style-name="T7">contém a maioria dos aplicativos e bibliotecas do sistema, o </text:span><text:span text:style-name="Source_20_Text"><text:span text:style-name="T77">/opt</text:span></text:span><text:span text:style-name="T7"> é usado especificamente para pacotes de software opcionais, muitas vezes proprietários ou de terceiros. </text:span></text:p>
        </text:list-item>
        <text:list-item>
          <text:p text:style-name="P49"><text:span text:style-name="T7">'</text:span><text:span text:style-name="T16">usr</text:span><text:span text:style-name="T7">' (abreviação de </text:span><text:span text:style-name="Strong_20_Emphasis"><text:span text:style-name="T15">Unix System Resources</text:span></text:span><text:span text:style-name="T7">) armazena aplicativos de terceiros e </text:span><text:span text:style-name="T10">software que vem com o sistema operacional</text:span><text:span text:style-name="T7">, mas que não são essenciais para inicializar o sistema. </text:span></text:p>
        </text:list-item>
        <text:list-item>
          <text:p text:style-name="P46">'<text:span text:style-name="T73">var</text:span>' armazena <text:span text:style-name="T12">arquivos de tamanho variável</text:span>, como os logs do sistema, o cache</text:p>
        </text:list-item>
        <text:list-item>
          <text:p text:style-name="P46">'<text:span text:style-name="T73">proc</text:span>' armazena arquivos que trazem <text:span text:style-name="T12">informações sobre o sistema</text:span></text:p>
        </text:list-item>
      </text:list>
      <text:p text:style-name="P15"/>
      <text:h text:style-name="P28" text:outline-level="2"><text:soft-page-break/>Comandos</text:h>
      <text:p text:style-name="P20"><text:span text:style-name="T78">Para receber </text:span><text:span text:style-name="T79">ajuda</text:span><text:span text:style-name="T78"> </text:span><text:span text:style-name="T80">sobre um</text:span><text:span text:style-name="T78"> comando, digite-o seguido do parâmetro </text:span><text:span text:style-name="T39">--help</text:span></text:p>
      <text:p text:style-name="P50"/>
      <text:list text:style-name="L6">
        <text:list-item>
          <text:p text:style-name="P51"><text:span text:style-name="T81">pwd</text:span><text:span text:style-name="T54"> </text:span><text:span text:style-name="T82">Está perdido? Esse comando </text:span><text:span text:style-name="T54">apresenta o caminho (patch) atual </text:span><text:span text:style-name="T83">do diretório</text:span></text:p>
        </text:list-item>
        <text:list-item>
          <text:p text:style-name="P51"><text:span text:style-name="T45">cat</text:span> <text:span text:style-name="T54">para somente ler</text:span> o conteúdo de um arquivo. <text:span text:style-name="T54">Esse comando pega o conteúdo do arquivo e manda para a saída padrão, que geralmente é a tela. </text:span><text:span text:style-name="T84">O comando </text:span><text:span text:style-name="T85">t</text:span><text:span text:style-name="T81">ac</text:span><text:span text:style-name="T84"> imprime o comando ao contrário, ou seja, da última linha para a primeira (útil quando se quer ler logo o final do arquivo)</text:span><text:span text:style-name="T54"><text:line-break/></text:span>Exemplo: cat proc/cpuinfo <text:s/>OU <text:s/>lscpu(formatação mais amigável)</text:p>
        </text:list-item>
        <text:list-item>
          <text:p text:style-name="P51"><text:span text:style-name="T81">less</text:span><text:span text:style-name="T84"> é alternativa ao comando cat, pois ele pagina o conteúdo antes de apresentá-lo na tela, permitindo navegar (teclas setas pgup/down) e até pesquisar dentro do conteúdo. Por exemplo, o comando </text:span><text:span text:style-name="T86">man</text:span><text:span text:style-name="T84"> (apresenta o manual de um comando) </text:span><text:span text:style-name="T87">faz uso</text:span><text:span text:style-name="T84"> do comando </text:span><text:span text:style-name="T86">less</text:span><text:span text:style-name="T84"> para mostrar o descritivo do comando pedido.</text:span></text:p>
        </text:list-item>
        <text:list-item>
          <text:p text:style-name="P51"><text:span text:style-name="T81">mkdir</text:span> cria pastas <text:span text:style-name="T54">(make directory). É possível criar, com um único comando, pastas dentro de pastas. Exemplo: </text:span><text:span text:style-name="T88">mkdir Cursos/Linux/Módulo\ 1 </text:span><text:span text:style-name="T54">(backslash indica scape character)</text:span></text:p>
        </text:list-item>
        <text:list-item>
          <text:p text:style-name="P52"><text:span text:style-name="T89">touch</text:span><text:span text:style-name="T7"> cria arquivos. </text:span><text:span text:style-name="T90">Para criar já com conteúdo e evitar o </text:span>e<text:span text:style-name="T18">rro </text:span><text:span text:style-name="T18">"Permission denied", </text:span><text:span text:style-name="T91">use o comando: </text:span><text:span text:style-name="T89">echo </text:span><text:span text:style-name="T92">'cheguei'</text:span><text:span text:style-name="T89"> | </text:span><text:span text:style-name="T92">sudo</text:span><text:span text:style-name="T89"> tee </text:span><text:span text:style-name="T92">bootstrap.php </text:span></text:p>
        </text:list-item>
        <text:list-item>
          <text:p text:style-name="P51"><text:span text:style-name="T81">rm</text:span><text:span text:style-name="T93"> remove arquivos </text:span><text:span text:style-name="T94">e </text:span><text:span text:style-name="T81">rmdir</text:span><text:span text:style-name="T93"> apaga diretórios somente se estiverem vazios. </text:span><text:span text:style-name="T94">Cuidado pois são comandos perigosos! </text:span><text:span text:style-name="T93">Para apagar diretórios com conteúdo, use os parâmetros recursive+force. Exemplo: rm </text:span><text:span text:style-name="T95">-rf</text:span><text:span text:style-name="T93"> Cursos/</text:span></text:p>
          <text:list>
            <text:list-item>
              <text:p text:style-name="P53">O parâmetro -i lança uma mensagem de confirmação toda vez que a remoção encontrar um arquivo dentro do diretório a ser excluído.</text:p>
            </text:list-item>
            <text:list-item>
              <text:p text:style-name="P53">O parâmetro -I lança uma mensagem de confirmação sempre que a remoção encontrar mais de 3 arquivos no diretório a ser excluído</text:p>
            </text:list-item>
            <text:list-item>
              <text:p text:style-name="P54">Curiosidade: um comando extremamente nocivo, que apaga tudo do root é: rm -rf /*</text:p>
            </text:list-item>
          </text:list>
        </text:list-item>
        <text:list-item>
          <text:p text:style-name="P55"><text:span text:style-name="T96">cp</text:span><text:span text:style-name="T18"> copia arquivos. Exemplo: cp arquivo.txt /pasta/subpasta/patch</text:span></text:p>
        </text:list-item>
        <text:list-item>
          <text:p text:style-name="P55"><text:span text:style-name="T96">mv</text:span><text:span text:style-name="T18"> </text:span><text:span text:style-name="T19">move</text:span><text:span text:style-name="T18"> </text:span><text:span text:style-name="T97">arquivos</text:span><text:span text:style-name="T18">(semelhante ao recortar do windows)</text:span><text:span text:style-name="T97"> ou </text:span><text:span text:style-name="T98">renomeia</text:span><text:span text:style-name="T97"> </text:span><text:span text:style-name="T18">arquivos. Exemplo:</text:span></text:p>
          <text:list>
            <text:list-item>
              <text:p text:style-name="P55"><text:span text:style-name="T99">mv</text:span><text:span text:style-name="T100"> arquivo.txt /destino</text:span><text:span text:style-name="T18"><text:tab/></text:span><text:span text:style-name="T97">move para a pasta ‘destino’</text:span></text:p>
            </text:list-item>
            <text:list-item>
              <text:p text:style-name="P56"><text:span text:style-name="T101">mv a</text:span><text:span text:style-name="T102">ru</text:span><text:span text:style-name="T101">ivo.txt a</text:span><text:span text:style-name="T102">r</text:span><text:span text:style-name="T103">q</text:span><text:span text:style-name="T102">u</text:span><text:span text:style-name="T101">ivo.txt</text:span><text:tab/>o nome arquivo não existia, então renomeia o arquivo, corrigindo seu nome</text:p>
            </text:list-item>
          </text:list>
        </text:list-item>
        <text:list-item>
          <text:p text:style-name="P52"><text:span text:style-name="T104">history</text:span><text:span text:style-name="T105"> lista o histórico de comandos. </text:span><text:span text:style-name="T106">Ideal para tarefa de auditoria.<text:line-break/></text:span><text:span text:style-name="T105">Para reaplicar algum da lista, digite exclamação seguido do nº da lista. Exemplo: !92</text:span></text:p>
        </text:list-item>
        <text:list-item>
          <text:p text:style-name="P57"><text:span text:style-name="Source_20_Text"><text:span text:style-name="T104">scp</text:span></text:span><text:span text:style-name="T107"> - </text:span><text:span text:style-name="Strong_20_Emphasis"><text:span text:style-name="T107">Secure Copy Protocol - </text:span></text:span><text:span text:style-name="T107">permite </text:span><text:span text:style-name="Strong_20_Emphasis"><text:span text:style-name="T107">copiar arquivos e pastas entre um computador local e um servidor remoto (ou entre dois servidores)</text:span></text:span><text:span text:style-name="T107"> de forma </text:span><text:span text:style-name="Strong_20_Emphasis"><text:span text:style-name="T107">segura</text:span></text:span><text:span text:style-name="T107">, utilizando o protocolo </text:span><text:span text:style-name="Strong_20_Emphasis"><text:span text:style-name="T107">SSH</text:span></text:span><text:span text:style-name="Strong_20_Emphasis"><text:span text:style-name="T15"> (Secure Shell). </text:span></text:span><text:span text:style-name="Strong_20_Emphasis"><text:span text:style-name="T108">Sintaxe:<text:line-break/></text:span></text:span><text:span text:style-name="Strong_20_Emphasis"><text:span text:style-name="T109">scp /caminho/do/arquivo usuario@servidor:/caminho/de/destino</text:span></text:span></text:p>
        </text:list-item>
      </text:list>
      <text:p text:style-name="P15"/>
      <text:p text:style-name="P15"><text:span text:style-name="T96">alias</text:span><text:span text:style-name="T110"> são apelidos para </text:span><text:span text:style-name="T111">encurtar</text:span><text:span text:style-name="T110"> declarações de comandos, assim, toda vez que executar um comando previamente configurado com um alias, não será preciso digitar seus parâmetros escolhidos na configuração. </text:span><text:span text:style-name="T94">Importante dizer que os aliases só funcionam enquanto o terminal estiver aberto! </text:span><text:span text:style-name="T110">Exemplo: </text:span><text:span text:style-name="T96">alias</text:span><text:span text:style-name="T38"> </text:span><text:span text:style-name="T112">ls</text:span><text:span text:style-name="T113">=</text:span><text:span text:style-name="T38">’ls –color=auto’</text:span></text:p>
      <text:p text:style-name="P15"><text:span text:style-name="T110">Um alias muito útil de se configurar é: </text:span><text:span text:style-name="T96">alias</text:span><text:span text:style-name="T38"> </text:span><text:span text:style-name="T112">rm</text:span><text:span text:style-name="T113">=</text:span><text:span text:style-name="T38">”rm -I”</text:span></text:p>
      <text:p text:style-name="P15"/>
      <text:p text:style-name="P15"/>
      <text:p text:style-name="P20"><text:span text:style-name="T78">Um editor de texto simples para arquivos é o GNU Nano. Exemplo: </text:span><text:span text:style-name="T37">nano</text:span><text:span text:style-name="T38"> </text:span><text:span text:style-name="T43">HelloWorld.txt</text:span></text:p>
      <text:h text:style-name="P58" text:outline-level="2"><text:span text:style-name="T114">globbing - </text:span>Argumentos <text:span text:style-name="T115">para</text:span> <text:span text:style-name="T12">referência global</text:span></text:h>
      <text:list text:style-name="L7">
        <text:list-item>
          <text:p text:style-name="P59"><text:span text:style-name="T39">*</text:span> o asterisco faz referência a um conjunto de arquivos nomeados com caracteres declarados em comum. Exemplo:</text:p>
          <text:list>
            <text:list-item>
              <text:p text:style-name="P59"><text:span text:style-name="T37">ls</text:span><text:span text:style-name="T38"> </text:span><text:span text:style-name="T43">/pasta/</text:span><text:span text:style-name="T39">*</text:span><text:span text:style-name="T43">.conf</text:span> seleciona todos os arquivos <text:span text:style-name="T14">terminados</text:span> com .conf no nome</text:p>
            </text:list-item>
            <text:list-item>
              <text:p text:style-name="P59">ls /pasta/*x* seleciona todos os arquivos que contenham ‘x’ no nome</text:p>
            </text:list-item>
            <text:list-item>
              <text:p text:style-name="P59">ls /pasta/f* seleciona todos os arquivos começados com ‘f’ no nom</text:p>
            </text:list-item>
          </text:list>
        </text:list-item>
        <text:list-item>
          <text:p text:style-name="P60"><text:span text:style-name="T116">?</text:span><text:span text:style-name="T115"> a interrogação faz referência a apenas 1 letra. Exemplo: ls /pasta/?as</text:span></text:p>
        </text:list-item>
        <text:list-item>
          <text:p text:style-name="P60"><text:span text:style-name="T116">[]</text:span><text:span text:style-name="T115"> os colchetes fazem referência </text:span><text:span text:style-name="T117">a </text:span><text:span text:style-name="T118">sequência</text:span><text:span text:style-name="T117"> </text:span><text:span text:style-name="T119">(range) </text:span><text:span text:style-name="T117">dos</text:span><text:span text:style-name="T115"> caracteres declarados. Exemplo:</text:span></text:p>
          <text:list>
            <text:list-item>
              <text:p text:style-name="P59">ls /pasta/f[a<text:span text:style-name="T120">-</text:span>j]*: <text:span text:style-name="T117">o </text:span><text:span text:style-name="T118">traço</text:span><text:span text:style-name="T117"> declara uma faixa </text:span>(busca os arquivos que iniciam com a letra f, depois o segundo caractere deve estar entre a <text:span text:style-name="T14">faixa</text:span> de ‘a’ a ‘j’ e depois qualquer caractere)</text:p>
            </text:list-item>
          </text:list>
        </text:list-item>
        <text:list-item>
          <text:p text:style-name="P61">ls /pasta/[a<text:span text:style-name="T120">,</text:span>c]*: a <text:span text:style-name="T14">vírgula</text:span> separa grupos (busca arquivos que iniciam ou com a letra ‘a’ <text:span text:style-name="T12">ou</text:span> com a letra ‘c’, e depois qualquer caractere). No exemplo a seguir, serão selecionados apenas os arquivos onde a segunda letra é uma vogal e nomeados com 5 caracteres:<text:line-break/><text:span text:style-name="T101">ls /pasta/?[a,e,i,o,u]???</text:span></text:p>
        </text:list-item>
        <text:list-item>
          <text:p text:style-name="P60"><text:span text:style-name="T116">{}</text:span><text:span text:style-name="T117"> as chaves, diferentemente dos colchetes, fazem referência a </text:span><text:span text:style-name="T118">padrões</text:span><text:span text:style-name="T117"> de strings. Exemplo:</text:span></text:p>
          <text:list>
            <text:list-item>
              <text:p text:style-name="P60"><text:span text:style-name="T117">ls /etc/</text:span><text:span text:style-name="T121">*</text:span><text:span text:style-name="T117">.{</text:span><text:span text:style-name="T121">bmp</text:span><text:span text:style-name="T117">,</text:span><text:span text:style-name="T121">jpg</text:span><text:span text:style-name="T117">}: busca todos os arquivos </text:span><text:span text:style-name="T121">com extensão bipmap ou jpeg</text:span></text:p>
            </text:list-item>
          </text:list>
        </text:list-item>
      </text:list>
      <text:p text:style-name="P62"/>
      <text:h text:style-name="P63" text:outline-level="2"><text:span text:style-name="T122">P</text:span><text:span text:style-name="T12">ermissões em Linux</text:span></text:h>
      <text:p text:style-name="P64"><text:span text:style-name="T87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65"><text:span text:style-name="Strong_20_Emphasis"/></text:p>
      <text:p text:style-name="P66"><text:span text:style-name="Strong_20_Emphasis"><text:span text:style-name="T7">Categorias de Usuários:</text:span></text:span></text:p>
      <text:list text:style-name="L8">
        <text:list-item>
          <text:p text:style-name="P67"><text:span text:style-name="Strong_20_Emphasis"><text:span text:style-name="T7">Dono (Owner)</text:span></text:span><text:span text:style-name="T7">: O usuário que criou o arquivo ou diretório.</text:span></text:p>
        </text:list-item>
        <text:list-item>
          <text:p text:style-name="P67"><text:span text:style-name="Strong_20_Emphasis"><text:span text:style-name="T7">Grupo (Group)</text:span></text:span><text:span text:style-name="T7">: Um grupo de usuários ao qual o arquivo pertence.</text:span></text:p>
        </text:list-item>
        <text:list-item>
          <text:p text:style-name="P67"><text:span text:style-name="Strong_20_Emphasis"><text:span text:style-name="T7">Outros (Others)</text:span></text:span><text:span text:style-name="T7">: Todos os demais usuários do sistema.</text:span></text:p>
          <text:p text:style-name="P67"><text:span text:style-name="Strong_20_Emphasis"/></text:p>
        </text:list-item>
      </text:list>
      <text:p text:style-name="P66"><text:span text:style-name="Strong_20_Emphasis"><text:span text:style-name="T7">Tipos de </text:span></text:span><text:span text:style-name="Strong_20_Emphasis"><text:span text:style-name="T10">Permissões</text:span></text:span><text:span text:style-name="Strong_20_Emphasis"><text:span text:style-name="T15"> </text:span></text:span><text:span text:style-name="Strong_20_Emphasis"><text:span text:style-name="T123">para c</text:span></text:span><text:span text:style-name="T15">ada</text:span><text:span text:style-name="T7"> categoria de usuário:</text:span></text:p>
      <text:list text:style-name="L9">
        <text:list-item>
          <text:p text:style-name="P68"><text:span text:style-name="Strong_20_Emphasis"><text:span text:style-name="T7">r (read)</text:span></text:span><text:span text:style-name="T7">: Permite ler o conteúdo do arquivo ou listar o conteúdo do diretório.</text:span></text:p>
        </text:list-item>
        <text:list-item>
          <text:p text:style-name="P68"><text:span text:style-name="Strong_20_Emphasis"><text:span text:style-name="T7">w (write)</text:span></text:span><text:span text:style-name="T7">: Permite modificar o arquivo ou adicionar/remover arquivos em um diretório.</text:span></text:p>
        </text:list-item>
        <text:list-item>
          <text:p text:style-name="P68"><text:span text:style-name="Strong_20_Emphasis"><text:span text:style-name="T7">x (execute)</text:span></text:span><text:span text:style-name="T7">: Permite executar o arquivo como um programa ou acessar um diretório.</text:span></text:p>
        </text:list-item>
      </text:list>
      <text:p text:style-name="P66"><text:span text:style-name="Strong_20_Emphasis"/></text:p>
      <text:p text:style-name="P66"><text:span text:style-name="Strong_20_Emphasis"><text:span text:style-name="T7">Representação Numérica</text:span></text:span></text:p>
      <text:p text:style-name="P65">As permissões podem ser representadas em formato octal (números de 0 a 7). Cada permissão é atribuída com base nos seguintes valores:</text:p>
      <text:list text:style-name="L10">
        <text:list-item>
          <text:p text:style-name="P69"><text:span text:style-name="Source_20_Text"><text:span text:style-name="T16">r</text:span></text:span><text:span text:style-name="T7"> = 4 (leitura)</text:span></text:p>
        </text:list-item>
        <text:list-item>
          <text:p text:style-name="P69"><text:span text:style-name="Source_20_Text"><text:span text:style-name="T16">w</text:span></text:span><text:span text:style-name="T7"> = 2 (escrita)</text:span></text:p>
        </text:list-item>
        <text:list-item>
          <text:p text:style-name="P69"><text:span text:style-name="Source_20_Text"><text:span text:style-name="T16">x</text:span></text:span><text:span text:style-name="T7"> = 1 (execução)</text:span></text:p>
        </text:list-item>
      </text:list>
      <text:p text:style-name="P70">Para definir as permissões de uma categoria, somam-se os valores das permissões desejadas:</text:p>
      <text:list text:style-name="L11">
        <text:list-item>
          <text:p text:style-name="P71"><text:span text:style-name="Strong_20_Emphasis"><text:span text:style-name="T16">7 </text:span></text:span><text:span text:style-name="Strong_20_Emphasis"><text:span text:style-name="T7">(</text:span></text:span><text:span text:style-name="Strong_20_Emphasis"><text:span text:style-name="T47">rwx</text:span></text:span><text:span text:style-name="Strong_20_Emphasis"><text:span text:style-name="T7">)</text:span></text:span><text:span text:style-name="T7"> = leitura, escrita e execução.</text:span></text:p>
        </text:list-item>
        <text:list-item>
          <text:p text:style-name="P71"><text:span text:style-name="Strong_20_Emphasis"><text:span text:style-name="T16">6</text:span></text:span><text:span text:style-name="Strong_20_Emphasis"><text:span text:style-name="T7"> (</text:span></text:span><text:span text:style-name="Strong_20_Emphasis"><text:span text:style-name="T47">rw-</text:span></text:span><text:span text:style-name="Strong_20_Emphasis"><text:span text:style-name="T7">)</text:span></text:span><text:span text:style-name="T7"> = leitura e escrita.</text:span></text:p>
        </text:list-item>
        <text:list-item>
          <text:p text:style-name="P71"><text:span text:style-name="Strong_20_Emphasis"><text:span text:style-name="T16">5</text:span></text:span><text:span text:style-name="Strong_20_Emphasis"><text:span text:style-name="T7"> (</text:span></text:span><text:span text:style-name="Strong_20_Emphasis"><text:span text:style-name="T47">r-x</text:span></text:span><text:span text:style-name="Strong_20_Emphasis"><text:span text:style-name="T7">)</text:span></text:span><text:span text:style-name="T7"> = leitura e execução.</text:span></text:p>
        </text:list-item>
        <text:list-item>
          <text:p text:style-name="P71"><text:span text:style-name="Strong_20_Emphasis"><text:span text:style-name="T16">4</text:span></text:span><text:span text:style-name="Strong_20_Emphasis"><text:span text:style-name="T7"> (</text:span></text:span><text:span text:style-name="Strong_20_Emphasis"><text:span text:style-name="T47">r--</text:span></text:span><text:span text:style-name="Strong_20_Emphasis"><text:span text:style-name="T7">)</text:span></text:span><text:span text:style-name="T7"> = apenas leitura.</text:span></text:p>
        </text:list-item>
        <text:list-item>
          <text:p text:style-name="P71"><text:span text:style-name="Strong_20_Emphasis"><text:span text:style-name="T16">0</text:span></text:span><text:span text:style-name="Strong_20_Emphasis"><text:span text:style-name="T7"> (</text:span></text:span><text:span text:style-name="Strong_20_Emphasis"><text:span text:style-name="T47">---</text:span></text:span><text:span text:style-name="Strong_20_Emphasis"><text:span text:style-name="T7">)</text:span></text:span><text:span text:style-name="T7"> = sem permissões.</text:span></text:p>
        </text:list-item>
      </text:list>
      <text:p text:style-name="P72"><text:soft-page-break/><text:span text:style-name="Strong_20_Emphasis"><text:span text:style-name="T7">Exemplo Prático</text:span></text:span></text:p>
      <text:p text:style-name="P72"><text:span text:style-name="T7">A representação </text:span><text:span text:style-name="Source_20_Text"><text:span text:style-name="T7">555 </text:span></text:span><text:span text:style-name="T7">corresponde a </text:span><text:span text:style-name="T124">a</text:span><text:span text:style-name="T7">rquivos ou diretórios </text:span><text:span text:style-name="T124">que </text:span><text:span text:style-name="T7">podem ser lidos e executados, mas não modificados.</text:span></text:p>
      <text:list text:style-name="L12">
        <text:list-item>
          <text:p text:style-name="P73"><text:span text:style-name="T7">Dono: </text:span><text:span text:style-name="Source_20_Text"><text:span text:style-name="T47">r-x</text:span></text:span><text:span text:style-name="T7"> (5 = 4 + 1 → leitura e execução).</text:span></text:p>
        </text:list-item>
        <text:list-item>
          <text:p text:style-name="P73"><text:span text:style-name="T7">Grupo: </text:span><text:span text:style-name="Source_20_Text"><text:span text:style-name="T47">r-x</text:span></text:span><text:span text:style-name="T7"> (leitura e execução).</text:span></text:p>
        </text:list-item>
        <text:list-item>
          <text:p text:style-name="P73"><text:span text:style-name="T7">Outros: </text:span><text:span text:style-name="Source_20_Text"><text:span text:style-name="T47">r-x</text:span></text:span><text:span text:style-name="T7"> (leitura e execução).</text:span></text:p>
        </text:list-item>
      </text:list>
      <text:p text:style-name="P72"><text:span text:style-name="Strong_20_Emphasis"><text:span text:style-name="T7">Comandos</text:span></text:span></text:p>
      <text:p text:style-name="P70"><text:span text:style-name="T125">chmod</text:span><text:span text:style-name="T126"> para alterar as permissões. Exemplo: </text:span><text:span text:style-name="T101">chmod 555 arquivo.txt<text:line-break/></text:span><text:span text:style-name="T125">ls </text:span><text:span text:style-name="T127">-l</text:span><text:span text:style-name="T125"> </text:span><text:span text:style-name="T128">p</text:span><text:span text:style-name="T129">ara ver as permissões atuais de um arquivo ou diretório</text:span></text:p>
      <text:p text:style-name="P70"/>
      <text:p text:style-name="P74"><text:span text:style-name="T12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75" text:outline-level="1"><text:span text:style-name="T130">Contexto </text:span><text:span text:style-name="T131">Windows</text:span></text:h>
      <text:p text:style-name="P76"/>
      <text:p text:style-name="P77"><text:span text:style-name="Source_20_Text"><text:span text:style-name="T10">CMD</text:span></text:span><text:span text:style-name="T7"> é uma sigla para </text:span><text:span text:style-name="Strong_20_Emphasis"><text:span text:style-name="T15">Command</text:span></text:span><text:span text:style-name="T7"> (comando) no Windows, referindo-se ao </text:span><text:span text:style-name="Strong_20_Emphasis"><text:span text:style-name="T7">Command Prompt</text:span></text:span><text:span text:style-name="T7"> ou Prompt de Comando. O CMD é a </text:span><text:span text:style-name="T132">CLI - </text:span><text:span text:style-name="T7">interface de linha de comando - do Windows, que permite executar comandos para administração, automação de tarefas e diagnóstico do sistema. </text:span></text:p>
      <text:p text:style-name="P77"><text:span text:style-name="T133">O</text:span><text:span text:style-name="T7"> CMD é </text:span><text:span text:style-name="Strong_20_Emphasis"><text:span text:style-name="T7">case-insensitive</text:span></text:span><text:span text:style-name="T7"> </text:span></text:p>
      <text:p text:style-name="P78"><text:span text:style-name="T134">PowerShell</text:span><text:span text:style-name="T135"> é a evolução do CMD, </text:span>oferecendo comandos mais avançados, suporte a scripts complexos e uma abordagem orientada a objetos, que o tornam ideal para administração e automação no Windows. </text:p>
      <text:p text:style-name="P79"><text:span text:style-name="Strong_20_Emphasis"><text:span text:style-name="T136">Windows Terminal</text:span></text:span><text:span text:style-name="T136"> é um aplicativo moderno de linha de comando da Microsoft, projetado para unificar e melhorar a experiência com shells diferentes no Windows, como CMD, PowerShell e WSL. </text:span><text:span text:style-name="T137">Principais recursos: guias (tabs), temas, </text:span><text:span text:style-name="T138">adicionar backgrounds, </text:span><text:span text:style-name="T137">cores, fontes personalizáveis, transparência, emojis,</text:span><text:span text:style-name="T138">etc</text:span></text:p>
      <text:p text:style-name="P80"><text:span text:style-name="Source_20_Text"><text:span text:style-name="T139">Tecla</text:span></text:span><text:span text:style-name="Source_20_Text"><text:span text:style-name="T140">s</text:span></text:span><text:span text:style-name="Source_20_Text"><text:span text:style-name="T139"> Control + C interrompe o processo imediatamente</text:span></text:span></text:p>
      <text:h text:style-name="P81" text:outline-level="2">Comandos</text:h>
      <text:list text:style-name="L13">
        <text:list-item>
          <text:p text:style-name="P82"><text:span text:style-name="Source_20_Text"><text:span text:style-name="T141">dir</text:span></text:span><text:span text:style-name="T142"> lista diretorios</text:span></text:p>
        </text:list-item>
        <text:list-item>
          <text:p text:style-name="P82"><text:span text:style-name="Source_20_Text"><text:span text:style-name="T141">cd</text:span></text:span><text:span text:style-name="T142"> (cha</text:span><text:span text:style-name="T143">n</text:span><text:span text:style-name="T142">ge directory) navega entre os diretórios</text:span><text:span text:style-name="T144"><text:line-break/></text:span><text:span text:style-name="Source_20_Text"><text:span text:style-name="T141">cd ..\..\</text:span></text:span><text:span text:style-name="Source_20_Text"><text:span text:style-name="T142"> volta vários diretórios</text:span></text:span><text:span text:style-name="Source_20_Text"><text:span text:style-name="T144"><text:line-break/></text:span></text:span><text:span text:style-name="Source_20_Text"><text:span text:style-name="T141">cd %userprofile%</text:span></text:span><text:span text:style-name="Source_20_Text"><text:span text:style-name="T145"> leva diretamente para a pasta principal do usuário </text:span></text:span><text:span text:style-name="Source_20_Text"><text:span text:style-name="T146">usando uma constante do sistema</text:span></text:span></text:p>
        </text:list-item>
        <text:list-item>
          <text:p text:style-name="P82"><text:span text:style-name="Source_20_Text"><text:span text:style-name="T141">tree</text:span></text:span><text:span text:style-name="Source_20_Text"><text:span text:style-name="T142"> mostra as pastas e subpastas organizadas em uma árvore</text:span></text:span></text:p>
        </text:list-item>
        <text:list-item>
          <text:p text:style-name="P82"><text:span text:style-name="Source_20_Text"><text:span text:style-name="T141">mkdir</text:span></text:span><text:span text:style-name="Source_20_Text"><text:span text:style-name="T147"> cria diretorio</text:span></text:span></text:p>
        </text:list-item>
        <text:list-item>
          <text:p text:style-name="P82"><text:span text:style-name="Source_20_Text"><text:span text:style-name="T141">type</text:span></text:span><text:span text:style-name="Source_20_Text"><text:span text:style-name="T147"> exibe o conteúdo do arquivo</text:span></text:span></text:p>
        </text:list-item>
        <text:list-item>
          <text:p text:style-name="P82"><text:span text:style-name="Source_20_Text"><text:span text:style-name="T148">more</text:span></text:span><text:span text:style-name="Source_20_Text"><text:span text:style-name="T147"> funciona de forma semelhante ao comando type, com a diferença de exibir página por página do arquivo no terminal, em vez de mostrá-lo todo de uma vez.</text:span></text:span><text:span text:style-name="Source_20_Text"><text:span text:style-name="T149"> </text:span></text:span></text:p>
        </text:list-item>
        <text:list-item>
          <text:p text:style-name="P83"><text:span text:style-name="Source_20_Text"><text:span text:style-name="T148">cls</text:span></text:span><text:span text:style-name="Source_20_Text"><text:span text:style-name="T150"> limpa a tela</text:span></text:span></text:p>
        </text:list-item>
        <text:list-item>
          <text:p text:style-name="P82"><text:span text:style-name="Source_20_Text"><text:span text:style-name="T141">move</text:span></text:span><text:span text:style-name="Source_20_Text"><text:span text:style-name="T147"> mover um arquivo:</text:span></text:span><text:span text:style-name="Source_20_Text"><text:span text:style-name="T149"> </text:span></text:span><text:span text:style-name="Source_20_Text"><text:span text:style-name="T151">[comando] [arquivo.extensão] [origem] [destino]</text:span></text:span></text:p>
        </text:list-item>
        <text:list-item>
          <text:p text:style-name="P84"><text:span text:style-name="Source_20_Text"><text:span text:style-name="T141">cop</text:span></text:span><text:span text:style-name="Source_20_Text"><text:span text:style-name="T152">y</text:span></text:span><text:span text:style-name="Source_20_Text"><text:span text:style-name="T153"> copiar arquivo:</text:span></text:span><text:span text:style-name="Source_20_Text"><text:span text:style-name="T151"> [comando] [arquivo.extensão] [novo-nome.extensão]</text:span></text:span></text:p>
        </text:list-item>
        <text:list-item>
          <text:p text:style-name="P84"><text:span text:style-name="Source_20_Text"><text:span text:style-name="T141">rename</text:span></text:span><text:span text:style-name="Source_20_Text"><text:span text:style-name="T153"> renomear arquivos ou diretórios:</text:span></text:span><text:span text:style-name="Source_20_Text"><text:span text:style-name="T151"> [comando] [arquivo.extensão] [novo-nome.extensão]</text:span></text:span></text:p>
        </text:list-item>
        <text:list-item>
          <text:p text:style-name="P85"><text:span text:style-name="Source_20_Text"><text:span text:style-name="T141">del</text:span></text:span><text:span text:style-name="Source_20_Text"><text:span text:style-name="T153"> para deletar arquivos </text:span></text:span><text:span text:style-name="Source_20_Text"><text:span text:style-name="T154">ou diretórios</text:span></text:span></text:p>
        </text:list-item>
        <text:list-item>
          <text:p text:style-name="P85"><text:span text:style-name="Source_20_Text"><text:span text:style-name="T141">rmdir</text:span></text:span><text:span text:style-name="Source_20_Text"><text:span text:style-name="T154"> para excluir somente diretórios</text:span></text:span></text:p>
        </text:list-item>
        <text:list-item>
          <text:p text:style-name="P84"><text:soft-page-break/><text:span text:style-name="Source_20_Text"><text:span text:style-name="T141">fc</text:span></text:span><text:span text:style-name="Source_20_Text"><text:span text:style-name="T153"> compara dois arquivos ou grupos de arquivos e mostra as diferenças entre eles. </text:span></text:span></text:p>
        </text:list-item>
        <text:list-item>
          <text:p text:style-name="P84"><text:span text:style-name="Source_20_Text"><text:span text:style-name="T141">systeminfo</text:span></text:span><text:span text:style-name="Source_20_Text"><text:span text:style-name="T154"> detalha informações sobre o computador</text:span></text:span></text:p>
        </text:list-item>
        <text:list-item>
          <text:p text:style-name="P84"><text:span text:style-name="Source_20_Text"><text:span text:style-name="T141">shutdown</text:span></text:span><text:span text:style-name="Source_20_Text"><text:span text:style-name="T155"> </text:span></text:span><text:span text:style-name="Source_20_Text"><text:span text:style-name="T156">combinado com os parâmetros </text:span></text:span><text:span text:style-name="Source_20_Text"><text:span text:style-name="T145">para:</text:span></text:span></text:p>
          <text:list>
            <text:list-item>
              <text:p text:style-name="P86"><text:span text:style-name="Source_20_Text"><text:span text:style-name="T141">/s</text:span></text:span><text:span text:style-name="Source_20_Text"><text:span text:style-name="T155"> </text:span></text:span><text:span text:style-name="Source_20_Text"><text:span text:style-name="T145">desligar, </text:span></text:span></text:p>
            </text:list-item>
            <text:list-item>
              <text:p text:style-name="P86"><text:span text:style-name="Source_20_Text"><text:span text:style-name="T141">/r</text:span></text:span><text:span text:style-name="Source_20_Text"><text:span text:style-name="T155"> </text:span></text:span><text:span text:style-name="Source_20_Text"><text:span text:style-name="T145">reiniciar, </text:span></text:span></text:p>
            </text:list-item>
            <text:list-item>
              <text:p text:style-name="P86"><text:span text:style-name="Source_20_Text"><text:span text:style-name="T141">/h</text:span></text:span><text:span text:style-name="Source_20_Text"><text:span text:style-name="T155"> </text:span></text:span><text:span text:style-name="Source_20_Text"><text:span text:style-name="T145">hibernar, </text:span></text:span></text:p>
            </text:list-item>
            <text:list-item>
              <text:p text:style-name="P86"><text:span text:style-name="Source_20_Text"><text:span text:style-name="T141">/l</text:span></text:span><text:span text:style-name="Source_20_Text"><text:span text:style-name="T155"> </text:span></text:span><text:span text:style-name="Source_20_Text"><text:span text:style-name="T145">encerrar </text:span></text:span><text:span text:style-name="Source_20_Text"><text:span text:style-name="T156">a</text:span></text:span><text:span text:style-name="Source_20_Text"><text:span text:style-name="T145"> sessão </text:span></text:span></text:p>
            </text:list-item>
          </text:list>
        </text:list-item>
        <text:list-item>
          <text:p text:style-name="P86"><text:span text:style-name="Source_20_Text"><text:span text:style-name="T148">find</text:span></text:span><text:span text:style-name="Source_20_Text"><text:span text:style-name="T145"> busca uma sequência de texto em um arquivo ou arquivos. </text:span></text:span><text:span text:style-name="Source_20_Text"><text:span text:style-name="T157">A string precisa ser declarada entre aspas duplas</text:span></text:span></text:p>
        </text:list-item>
        <text:list-item>
          <text:p text:style-name="P86"><text:span text:style-name="Source_20_Text"><text:span text:style-name="T148">exit</text:span></text:span><text:span text:style-name="Source_20_Text"><text:span text:style-name="T157"> fecha o </text:span></text:span><text:span text:style-name="Source_20_Text"><text:span text:style-name="T158">Prompt de comando</text:span></text:span></text:p>
        </text:list-item>
        <text:list-item>
          <text:p text:style-name="P86"><text:span text:style-name="Source_20_Text"><text:span text:style-name="T148">echo</text:span></text:span><text:span text:style-name="Source_20_Text"><text:span text:style-name="T159"> imprime uma mensagem (não precisa das aspas)<text:line-break/>O símbolo @ usado antes de echo </text:span></text:span><text:span text:style-name="Source_20_Text"><text:span text:style-name="T160">controla a exibição do comando na tela</text:span></text:span><text:span text:style-name="Source_20_Text"><text:span text:style-name="T159">, tornando o script mais organizado. </text:span></text:span><text:span text:style-name="Source_20_Text"><text:span text:style-name="T160">Exemplo: </text:span></text:span><text:span text:style-name="Source_20_Text"><text:span text:style-name="T148">@echo off</text:span></text:span></text:p>
        </text:list-item>
        <text:list-item>
          <text:p text:style-name="P86"><text:span text:style-name="Source_20_Text"><text:span text:style-name="T148">notepad</text:span></text:span><text:span text:style-name="Source_20_Text"><text:span text:style-name="T159"> abre </text:span></text:span><text:span text:style-name="Source_20_Text"><text:span text:style-name="T161">um arquivo com o programa Bloco de Notas</text:span></text:span></text:p>
          <text:p text:style-name="P87"><text:span text:style-name="Source_20_Text"><text:span text:style-name="T159">A extensão </text:span></text:span><text:span text:style-name="Source_20_Text"><text:span text:style-name="Strong_20_Emphasis"><text:span text:style-name="T162">.bat</text:span></text:span></text:span><text:span text:style-name="Source_20_Text"><text:span text:style-name="T159"> indica um arquivo de </text:span></text:span><text:span text:style-name="Source_20_Text"><text:span text:style-name="Strong_20_Emphasis"><text:span text:style-name="T163">batch</text:span></text:span></text:span><text:span text:style-name="Source_20_Text"><text:span text:style-name="T159"> (</text:span></text:span><text:span text:style-name="Source_20_Text"><text:span text:style-name="T164">lote</text:span></text:span><text:span text:style-name="Source_20_Text"><text:span text:style-name="T159">) no Windows, que contém uma série de comandos executados em sequência pelo prompt de comando (CMD). </text:span></text:span></text:p>
        </text:list-item>
        <text:list-item>
          <text:p text:style-name="P86"><text:span text:style-name="Source_20_Text"><text:span text:style-name="T148">pause</text:span></text:span><text:span text:style-name="Source_20_Text"><text:span text:style-name="T161"> </text:span></text:span><text:span text:style-name="Source_20_Text"><text:span text:style-name="T159">Parar o fluxo do terminal, esperando uma interação do usuário</text:span></text:span><text:span text:style-name="Source_20_Text"><text:span text:style-name="T162"> </text:span></text:span></text:p>
        </text:list-item>
        <text:list-item>
          <text:p text:style-name="P88"><text:span text:style-name="Source_20_Text"><text:span text:style-name="T165">t</text:span></text:span><text:span text:style-name="Source_20_Text"><text:span text:style-name="T148">ar</text:span></text:span><text:span text:style-name="Source_20_Text"><text:span text:style-name="T166"> para compactar </text:span></text:span><text:span text:style-name="Source_20_Text"><text:span text:style-name="T167">ou descompactar </text:span></text:span><text:span text:style-name="Source_20_Text"><text:span text:style-name="T166">arquivos. </text:span></text:span><text:span text:style-name="Source_20_Text"><text:span text:style-name="T156">Os parâmetros:</text:span></text:span></text:p>
          <text:list>
            <text:list-item>
              <text:p text:style-name="P88"><text:span text:style-name="Source_20_Text"><text:span text:style-name="T148">-c</text:span></text:span><text:span text:style-name="Source_20_Text"><text:span text:style-name="T168">f</text:span></text:span><text:span text:style-name="Source_20_Text"><text:span text:style-name="T156"> cria arquivo, </text:span></text:span><text:span text:style-name="Source_20_Text"><text:span text:style-name="T169">nomeando-o</text:span></text:span></text:p>
            </text:list-item>
            <text:list-item>
              <text:p text:style-name="P88"><text:span text:style-name="Source_20_Text"><text:span text:style-name="T170">-f</text:span></text:span><text:span text:style-name="Source_20_Text"><text:span text:style-name="T169"> nomeia o arquivo a ser compactado,</text:span></text:span></text:p>
            </text:list-item>
            <text:list-item>
              <text:p text:style-name="P89"><text:span text:style-name="Source_20_Text"><text:span text:style-name="T148">-x</text:span></text:span><text:span text:style-name="Source_20_Text"><text:span text:style-name="T171"> extrai arquivo,</text:span></text:span></text:p>
            </text:list-item>
            <text:list-item>
              <text:p text:style-name="P88"><text:span text:style-name="Source_20_Text"><text:span text:style-name="T148">-v</text:span></text:span><text:span text:style-name="Source_20_Text"><text:span text:style-name="T156"> mostra o progresso,</text:span></text:span></text:p>
            </text:list-item>
            <text:list-item>
              <text:p text:style-name="P88"><text:span text:style-name="Source_20_Text"><text:span text:style-name="T148">-</text:span></text:span><text:span text:style-name="Source_20_Text"><text:span text:style-name="T172">t</text:span></text:span><text:span text:style-name="Source_20_Text"><text:span text:style-name="T148">f</text:span></text:span><text:span text:style-name="Source_20_Text"><text:span text:style-name="T156"> </text:span></text:span><text:span text:style-name="Source_20_Text"><text:span text:style-name="T171">lista os</text:span></text:span><text:span text:style-name="Source_20_Text"><text:span text:style-name="T156"> arquivo</text:span></text:span><text:span text:style-name="Source_20_Text"><text:span text:style-name="T171">s dentro do arquivo compactado</text:span></text:span></text:p>
            </text:list-item>
          </text:list>
        </text:list-item>
        <text:list-item>
          <text:p text:style-name="P90"><text:span text:style-name="Strong_20_Emphasis"><text:span text:style-name="T173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72">echo texto &gt; arquivo.txt</text:span></text:span></text:p>
        </text:list-item>
        <text:list-item>
          <text:p text:style-name="P91"><text:span text:style-name="Source_20_Text"><text:span text:style-name="T174">O parâmetro </text:span></text:span><text:span text:style-name="Source_20_Text"><text:span text:style-name="T175">2&gt;</text:span></text:span><text:span text:style-name="Source_20_Text"><text:span text:style-name="T172"> arquivo.txt</text:span></text:span><text:span text:style-name="Source_20_Text"><text:span text:style-name="T174"> redireciona a saída de erros para um arquivo de logs. </text:span></text:span><text:span text:style-name="Source_20_Text"><text:span text:style-name="T176">Explicação</text:span></text:span><text:span text:style-name="Source_20_Text"><text:span text:style-name="T177"> </text:span></text:span><text:span text:style-name="Source_20_Text"><text:span text:style-name="T176">d</text:span></text:span><text:span text:style-name="Source_20_Text"><text:span text:style-name="T177">os números: 0 para entrada, 1 para saída e 2 para saída de erros.</text:span></text:span></text:p>
        </text:list-item>
        <text:list-item>
          <text:p text:style-name="P91"><text:span text:style-name="Source_20_Text"><text:span text:style-name="T176">Exemplo de validação de erros em um script: </text:span></text:span><text:span text:style-name="Source_20_Text"><text:span text:style-name="T172">IF %ERRORLEVEL% NEQ 0 (echo "Erro na execucao do script")</text:span></text:span></text:p>
        </text:list-item>
      </text:list>
      <text:h text:style-name="P92" text:outline-level="2"><text:span text:style-name="Source_20_Text"><text:span text:style-name="T178">Variáveis de Ambiente</text:span></text:span></text:h>
      <text:list text:continue-numbering="true" text:style-name="L13">
        <text:list-item>
          <text:p text:style-name="P93"><text:span text:style-name="Source_20_Text"><text:span text:style-name="T175">set</text:span></text:span><text:span text:style-name="Source_20_Text"><text:span text:style-name="T172"> mensagem=Olá Mundo!</text:span></text:span><text:span text:style-name="Source_20_Text"><text:span text:style-name="T146"> </text:span></text:span><text:span text:style-name="Source_20_Text"><text:span text:style-name="T179">Adiciona</text:span></text:span><text:span text:style-name="Source_20_Text"><text:span text:style-name="T146"> uma variável </text:span></text:span><text:span text:style-name="Source_20_Text"><text:span text:style-name="T180">não</text:span></text:span><text:span text:style-name="Source_20_Text"><text:span text:style-name="T179"> persistente, ou seja</text:span></text:span><text:span text:style-name="Source_20_Text"><text:span text:style-name="T146">, atribui os valores na sessão do cmd que está aberta e morre quando ela é finalizada.</text:span></text:span><text:span text:style-name="Source_20_Text"><text:span text:style-name="T181"><text:line-break/></text:span></text:span><text:soft-page-break/><text:span text:style-name="Source_20_Text"><text:span text:style-name="T172">echo </text:span></text:span><text:span text:style-name="Source_20_Text"><text:span text:style-name="T175">%</text:span></text:span><text:span text:style-name="Source_20_Text"><text:span text:style-name="T172">mensagem</text:span></text:span><text:span text:style-name="Source_20_Text"><text:span text:style-name="T175">%</text:span></text:span><text:span text:style-name="Source_20_Text"><text:span text:style-name="T146"> utiliza a variável</text:span></text:span><text:span text:style-name="Source_20_Text"><text:span text:style-name="T181"><text:line-break/></text:span></text:span><text:span text:style-name="Source_20_Text"><text:span text:style-name="T146">o parâmetro </text:span></text:span><text:span text:style-name="Source_20_Text"><text:span text:style-name="T172">/p</text:span></text:span><text:span text:style-name="Source_20_Text"><text:span text:style-name="T146"> aguarda a entrada do usuário</text:span></text:span></text:p>
        </text:list-item>
        <text:list-item>
          <text:p text:style-name="P94"><text:span text:style-name="Source_20_Text"><text:span text:style-name="T182">s</text:span></text:span><text:span text:style-name="Source_20_Text"><text:span text:style-name="T172">etx</text:span></text:span><text:span text:style-name="Source_20_Text"><text:span text:style-name="T183"> </text:span></text:span><text:span text:style-name="Source_20_Text"><text:span text:style-name="T179">Adiciona uma Variável de Ambiente (persistente)</text:span></text:span><text:span text:style-name="Source_20_Text"><text:span text:style-name="T184"><text:line-break/></text:span></text:span><text:span text:style-name="Source_20_Text"><text:span text:style-name="T172">%path%</text:span></text:span><text:span text:style-name="Source_20_Text"><text:span text:style-name="T185"> é uma variável de ambiente que armazena o caminho dos seus executáveis. Isso permite que você execute programas sem precisar especificar o caminho completo para o arquivo.</text:span></text:span><text:span text:style-name="Source_20_Text"><text:span text:style-name="T186"><text:line-break/></text:span></text:span><text:span text:style-name="Source_20_Text"><text:span text:style-name="T187">s</text:span></text:span><text:span text:style-name="Source_20_Text"><text:span text:style-name="T188">etx path “%path%;C:\Users\jsilva\Desktop\curso_CMD_alura\prompt\bin” /M</text:span></text:span><text:span text:style-name="Source_20_Text"><text:span text:style-name="T186">: </text:span></text:span><text:span text:style-name="Source_20_Text"><text:span text:style-name="T185">Esse comando é útil para garantir que programas no diretório especificado estejam acessíveis de qualquer lugar do CMD </text:span></text:span><text:span text:style-name="Source_20_Text"><text:span text:style-name="T189">permanentemente</text:span></text:span><text:span text:style-name="Source_20_Text"><text:span text:style-name="T185">, mesmo após reiniciar o computador.</text:span></text:span></text:p>
        </text:list-item>
      </text:list>
      <text:h text:style-name="P92" text:outline-level="2"><text:span text:style-name="Source_20_Text"><text:span text:style-name="T178">Gerenciador de Pacotes</text:span></text:span></text:h>
      <text:p text:style-name="P95"><text:span text:style-name="Source_20_Text"><text:span text:style-name="T190">winget</text:span></text:span><text:span text:style-name="Source_20_Text"><text:span text:style-name="T185"> é o </text:span></text:span><text:span text:style-name="Source_20_Text"><text:span text:style-name="Strong_20_Emphasis"><text:span text:style-name="T191">Ger</text:span></text:span></text:span><text:span text:style-name="Strong_20_Emphasis"><text:span text:style-name="T173">enciador de Pacotes </text:span></text:span><text:span text:style-name="Strong_20_Emphasis"><text:span text:style-name="T192">oficial da Microsoft (uma opção ao chocolatey)</text:span></text:span><text:span text:style-name="Strong_20_Emphasis"><text:span text:style-name="T173"> que permite, dentre outras tarefas, a instalação de pacotes de forma simples, sem a necessidade de acessar um navegador ou qualquer interface além do </text:span></text:span><text:span text:style-name="Strong_20_Emphasis"><text:span text:style-name="T193">C</text:span></text:span><text:span text:style-name="Strong_20_Emphasis"><text:span text:style-name="T173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94">is comandos: </text:span></text:span><text:span text:style-name="Source_20_Text"><text:span text:style-name="T195">search</text:span></text:span><text:span text:style-name="Source_20_Text"><text:span text:style-name="T194">, </text:span></text:span><text:span text:style-name="Source_20_Text"><text:span text:style-name="T195">list</text:span></text:span><text:span text:style-name="Source_20_Text"><text:span text:style-name="T194">, </text:span></text:span><text:span text:style-name="Source_20_Text"><text:span text:style-name="T196">i</text:span></text:span><text:span text:style-name="Source_20_Text"><text:span text:style-name="T195">nstall</text:span></text:span><text:span text:style-name="Source_20_Text"><text:span text:style-name="T194">, </text:span></text:span><text:span text:style-name="Source_20_Text"><text:span text:style-name="T195">upgrade</text:span></text:span><text:span text:style-name="Source_20_Text"><text:span text:style-name="T194">, </text:span></text:span><text:span text:style-name="Source_20_Text"><text:span text:style-name="T195">uninstall</text:span></text:span><text:span text:style-name="Source_20_Text"><text:span text:style-name="T194">, </text:span></text:span><text:span text:style-name="Source_20_Text"><text:span text:style-name="T197">import</text:span></text:span><text:span text:style-name="Source_20_Text"><text:span text:style-name="T198">, </text:span></text:span><text:span text:style-name="Source_20_Text"><text:span text:style-name="T197">export</text:span></text:span><text:span text:style-name="Source_20_Text"><text:span text:style-name="T198">. </text:span></text:span><text:span text:style-name="Source_20_Text"><text:span text:style-name="T199">Exemplo: </text:span></text:span><text:span text:style-name="Source_20_Text"><text:span text:style-name="T172">winget install -e –id Oracle.JDK.19</text:span></text:span></text:p>
      <text:h text:style-name="P96" text:outline-level="2"><text:span text:style-name="Source_20_Text"><text:span text:style-name="T7">WSL</text:span></text:span></text:h>
      <text:p text:style-name="P97"><text:span text:style-name="Strong_20_Emphasis"><text:span text:style-name="T173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200">wsl -–install -d ubuntu</text:span></text:span><text:span text:style-name="Strong_20_Emphasis"><text:span text:style-name="T173"> (com distro Ubunto).</text:span></text:span></text:p>
      <text:p text:style-name="P97"><text:span text:style-name="Strong_20_Emphasis"><text:span text:style-name="T173"/></text:span></text:p>
      <text:p text:style-name="P98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7.2$Windows_X86_64 LibreOffice_project/5cbfd1ab6520636bb5f7b99185aa69bd7456825d</meta:generator>
    <dc:date>2026-04-24T14:38:02.283727000</dc:date>
    <meta:editing-duration>P1DT5H34M51S</meta:editing-duration>
    <meta:editing-cycles>106</meta:editing-cycles>
    <meta:document-statistic meta:table-count="1" meta:image-count="1" meta:object-count="0" meta:page-count="11" meta:paragraph-count="234" meta:word-count="3485" meta:character-count="21160" meta:non-whitespace-character-count="17901"/>
  </office:meta>
</office:document-meta>
</file>