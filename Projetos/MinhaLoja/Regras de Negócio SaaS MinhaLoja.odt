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97000001ECD41085E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style:paragraph-properties fo:text-align="justify" style:justify-single-word="false" fo:break-before="page"/>
      <style:text-properties officeooo:rsid="005596e0" officeooo:paragraph-rsid="00078016"/>
    </style:style>
    <style:style style:name="P2" style:family="paragraph" style:parent-style-name="Text_20_body" style:list-style-name="">
      <style:paragraph-properties fo:text-align="start" style:justify-single-word="false"/>
      <style:text-properties officeooo:rsid="005596e0" officeooo:paragraph-rsid="00078016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5596e0" officeooo:paragraph-rsid="00078016"/>
    </style:style>
    <style:style style:name="P4" style:family="paragraph" style:parent-style-name="Heading_20_3">
      <style:text-properties officeooo:paragraph-rsid="00078016"/>
    </style:style>
    <style:style style:name="P5" style:family="paragraph" style:parent-style-name="Text_20_body" style:list-style-name="L2">
      <style:paragraph-properties fo:text-align="start" style:justify-single-word="false"/>
      <style:text-properties officeooo:rsid="005596e0" officeooo:paragraph-rsid="00078016"/>
    </style:style>
    <style:style style:name="P6" style:family="paragraph" style:parent-style-name="Heading_20_2">
      <style:paragraph-properties fo:text-align="center" style:justify-single-word="false"/>
      <style:text-properties officeooo:paragraph-rsid="00078016"/>
    </style:style>
    <style:style style:name="P7" style:family="paragraph" style:parent-style-name="Text_20_body" style:list-style-name="L3">
      <style:paragraph-properties fo:margin-top="0cm" fo:margin-bottom="0.146cm" style:contextual-spacing="false"/>
      <style:text-properties officeooo:rsid="005596e0" officeooo:paragraph-rsid="00078016"/>
    </style:style>
    <style:style style:name="P8" style:family="paragraph" style:parent-style-name="Text_20_body" style:list-style-name="L3">
      <style:paragraph-properties fo:margin-top="0cm" fo:margin-bottom="0.146cm" style:contextual-spacing="false"/>
      <style:text-properties fo:color="#00a933" loext:opacity="100%" officeooo:rsid="005596e0" officeooo:paragraph-rsid="00078016"/>
    </style:style>
    <style:style style:name="P9" style:family="paragraph" style:parent-style-name="Text_20_body" style:list-style-name="L3">
      <style:paragraph-properties fo:margin-top="0cm" fo:margin-bottom="0.146cm" style:contextual-spacing="false"/>
      <style:text-properties officeooo:paragraph-rsid="00078016"/>
    </style:style>
    <style:style style:name="P10" style:family="paragraph" style:parent-style-name="Heading_20_2">
      <style:paragraph-properties fo:text-align="center" style:justify-single-word="false"/>
      <style:text-properties officeooo:rsid="005596e0" officeooo:paragraph-rsid="00078016"/>
    </style:style>
    <style:style style:name="P11" style:family="paragraph" style:parent-style-name="Heading_20_3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12" style:family="paragraph" style:parent-style-name="Text_20_body" style:list-style-name="L4">
      <style:text-properties officeooo:rsid="005596e0" officeooo:paragraph-rsid="00078016"/>
    </style:style>
    <style:style style:name="P13" style:family="paragraph" style:parent-style-name="Text_20_body" style:list-style-name="L4">
      <style:text-properties fo:color="#00a933" loext:opacity="100%" officeooo:rsid="005596e0" officeooo:paragraph-rsid="00078016"/>
    </style:style>
    <style:style style:name="P14" style:family="paragraph" style:parent-style-name="Text_20_body" style:list-style-name="L4">
      <style:text-properties fo:color="#00a933" loext:opacity="100%" officeooo:paragraph-rsid="0018ba4c"/>
    </style:style>
    <style:style style:name="P15" style:family="paragraph" style:parent-style-name="Text_20_body" style:list-style-name="L4">
      <style:text-properties fo:color="#00a933" loext:opacity="100%" officeooo:rsid="000ee9c5" officeooo:paragraph-rsid="000ee9c5"/>
    </style:style>
    <style:style style:name="P16" style:family="paragraph" style:parent-style-name="Text_20_body" style:list-style-name="L5">
      <style:text-properties officeooo:rsid="005596e0" officeooo:paragraph-rsid="00078016"/>
    </style:style>
    <style:style style:name="P17" style:family="paragraph" style:parent-style-name="Text_20_body" style:list-style-name="L6">
      <style:text-properties fo:color="#00a933" loext:opacity="100%" officeooo:rsid="005596e0" officeooo:paragraph-rsid="00078016"/>
    </style:style>
    <style:style style:name="P18" style:family="paragraph" style:parent-style-name="Text_20_body" style:list-style-name="L7">
      <style:text-properties officeooo:paragraph-rsid="00078016"/>
    </style:style>
    <style:style style:name="P19" style:family="paragraph" style:parent-style-name="Text_20_body" style:list-style-name="L8">
      <style:text-properties officeooo:paragraph-rsid="002d6baa"/>
    </style:style>
    <style:style style:name="P20" style:family="paragraph" style:parent-style-name="Text_20_body" style:list-style-name="L9">
      <style:text-properties officeooo:paragraph-rsid="00131c02"/>
    </style:style>
    <style:style style:name="P21" style:family="paragraph" style:parent-style-name="Text_20_body" style:list-style-name="L10">
      <style:text-properties officeooo:paragraph-rsid="00078016"/>
    </style:style>
    <style:style style:name="P22" style:family="paragraph" style:parent-style-name="Text_20_body" style:list-style-name="L10">
      <style:text-properties fo:color="#00a933" loext:opacity="100%" fo:font-weight="bold" officeooo:rsid="006d3638" officeooo:paragraph-rsid="006cd21a" style:font-weight-asian="bold" style:font-weight-complex="bold"/>
    </style:style>
    <style:style style:name="P23" style:family="paragraph" style:parent-style-name="Text_20_body" style:list-style-name="L10">
      <style:text-properties fo:color="#00a933" loext:opacity="100%" officeooo:paragraph-rsid="006cd21a"/>
    </style:style>
    <style:style style:name="P24" style:family="paragraph" style:parent-style-name="Text_20_body" style:list-style-name="L10">
      <style:text-properties fo:color="#00a933" loext:opacity="100%" officeooo:rsid="006cd21a" officeooo:paragraph-rsid="006cd21a"/>
    </style:style>
    <style:style style:name="P25" style:family="paragraph" style:parent-style-name="Text_20_body" style:list-style-name="L11">
      <style:text-properties officeooo:rsid="005596e0" officeooo:paragraph-rsid="00078016"/>
    </style:style>
    <style:style style:name="P26" style:family="paragraph" style:parent-style-name="Text_20_body" style:list-style-name="L4">
      <style:text-properties officeooo:paragraph-rsid="00078016"/>
    </style:style>
    <style:style style:name="P27" style:family="paragraph" style:parent-style-name="Text_20_body" style:list-style-name="L12">
      <style:text-properties officeooo:rsid="005596e0"/>
    </style:style>
    <style:style style:name="P28" style:family="paragraph" style:parent-style-name="Text_20_body" style:list-style-name="L13">
      <style:text-properties officeooo:rsid="005596e0" officeooo:paragraph-rsid="00078016"/>
    </style:style>
    <style:style style:name="P29" style:family="paragraph" style:parent-style-name="Heading_20_2">
      <style:paragraph-properties fo:text-align="start" style:justify-single-word="false"/>
      <style:text-properties officeooo:rsid="005596e0" officeooo:paragraph-rsid="00078016"/>
    </style:style>
    <style:style style:name="P30" style:family="paragraph" style:parent-style-name="Heading_20_2">
      <style:paragraph-properties fo:text-align="center" style:justify-single-word="false" fo:break-before="page"/>
      <style:text-properties officeooo:rsid="005596e0" officeooo:paragraph-rsid="00078016"/>
    </style:style>
    <style:style style:name="P31" style:family="paragraph" style:parent-style-name="Text_20_body">
      <style:text-properties officeooo:paragraph-rsid="002ffc02"/>
    </style:style>
    <style:style style:name="P32" style:family="paragraph" style:parent-style-name="Text_20_body" style:list-style-name="L14">
      <style:text-properties officeooo:rsid="005596e0" officeooo:paragraph-rsid="00078016"/>
    </style:style>
    <style:style style:name="P33" style:family="paragraph" style:parent-style-name="Text_20_body" style:list-style-name="L15">
      <style:text-properties fo:color="#00a933" loext:opacity="100%" officeooo:rsid="005596e0" officeooo:paragraph-rsid="00078016"/>
    </style:style>
    <style:style style:name="P34" style:family="paragraph" style:parent-style-name="Text_20_body" style:list-style-name="L16">
      <style:text-properties officeooo:paragraph-rsid="006966f9"/>
    </style:style>
    <style:style style:name="P35" style:family="paragraph" style:parent-style-name="Text_20_body" style:list-style-name="L17">
      <style:text-properties officeooo:paragraph-rsid="006966f9"/>
    </style:style>
    <style:style style:name="P36" style:family="paragraph" style:parent-style-name="Text_20_body" style:list-style-name="L14">
      <style:paragraph-properties fo:margin-top="0cm" fo:margin-bottom="0cm" style:contextual-spacing="false"/>
      <style:text-properties officeooo:paragraph-rsid="00575f9e"/>
    </style:style>
    <style:style style:name="P37" style:family="paragraph" style:parent-style-name="Text_20_body" style:list-style-name="L14">
      <style:paragraph-properties fo:margin-top="0cm" fo:margin-bottom="0cm" style:contextual-spacing="false"/>
      <style:text-properties fo:color="#00a933" loext:opacity="100%" officeooo:paragraph-rsid="002389f1"/>
    </style:style>
    <style:style style:name="P38" style:family="paragraph" style:parent-style-name="Text_20_body" style:list-style-name="L18">
      <style:paragraph-properties fo:margin-top="0cm" fo:margin-bottom="0cm" style:contextual-spacing="false"/>
      <style:text-properties fo:color="#00a933" loext:opacity="100%" officeooo:paragraph-rsid="00771b46"/>
    </style:style>
    <style:style style:name="P39" style:family="paragraph" style:parent-style-name="Text_20_body" style:list-style-name="L19">
      <style:text-properties officeooo:paragraph-rsid="0021a894"/>
    </style:style>
    <style:style style:name="P40" style:family="paragraph" style:parent-style-name="Text_20_body" style:list-style-name="L20">
      <style:text-properties officeooo:paragraph-rsid="00572d05"/>
    </style:style>
    <style:style style:name="P41" style:family="paragraph" style:parent-style-name="Text_20_body" style:list-style-name="L21">
      <style:text-properties officeooo:paragraph-rsid="001d4e87"/>
    </style:style>
    <style:style style:name="P42" style:family="paragraph" style:parent-style-name="Text_20_body" style:list-style-name="L20">
      <style:text-properties officeooo:paragraph-rsid="001d4e87"/>
    </style:style>
    <style:style style:name="P43" style:family="paragraph" style:parent-style-name="Text_20_body" style:list-style-name="L20">
      <style:text-properties officeooo:paragraph-rsid="006eef87"/>
    </style:style>
    <style:style style:name="P44" style:family="paragraph" style:parent-style-name="Text_20_body" style:list-style-name="L20">
      <style:text-properties officeooo:paragraph-rsid="006e75cf"/>
    </style:style>
    <style:style style:name="P4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6" style:family="paragraph" style:parent-style-name="Text_20_body" style:list-style-name="L22">
      <style:text-properties officeooo:paragraph-rsid="001ad848"/>
    </style:style>
    <style:style style:name="P47" style:family="paragraph" style:parent-style-name="Text_20_body">
      <style:text-properties officeooo:paragraph-rsid="001ad848"/>
    </style:style>
    <style:style style:name="P48" style:family="paragraph" style:parent-style-name="Heading_20_3">
      <style:paragraph-properties fo:text-align="center" style:justify-single-word="false"/>
    </style:style>
    <style:style style:name="P49" style:family="paragraph" style:parent-style-name="Heading_20_3" style:list-style-name="L23">
      <style:paragraph-properties fo:margin-top="0cm" fo:margin-bottom="0.247cm" style:contextual-spacing="false" fo:line-height="115%"/>
      <style:text-properties officeooo:paragraph-rsid="0026c906"/>
    </style:style>
    <style:style style:name="P50" style:family="paragraph" style:parent-style-name="Heading_20_3" style:list-style-name="L24">
      <style:paragraph-properties fo:margin-top="0cm" fo:margin-bottom="0.247cm" style:contextual-spacing="false" fo:line-height="115%"/>
      <style:text-properties officeooo:paragraph-rsid="0026c906"/>
    </style:style>
    <style:style style:name="P51" style:family="paragraph" style:parent-style-name="Heading_20_3" style:list-style-name="L25">
      <style:paragraph-properties fo:margin-top="0cm" fo:margin-bottom="0.247cm" style:contextual-spacing="false" fo:line-height="115%"/>
      <style:text-properties officeooo:paragraph-rsid="0026c906"/>
    </style:style>
    <style:style style:name="P52" style:family="paragraph" style:parent-style-name="Heading_20_3" style:list-style-name="L25">
      <style:paragraph-properties fo:margin-top="0cm" fo:margin-bottom="0.247cm" style:contextual-spacing="false" fo:line-height="115%"/>
      <style:text-properties fo:font-size="12pt" fo:font-weight="normal" officeooo:rsid="00239fcf" officeooo:paragraph-rsid="0026c906" style:font-size-asian="12pt" style:font-weight-asian="normal" style:font-size-complex="12pt" style:font-weight-complex="normal"/>
    </style:style>
    <style:style style:name="P53" style:family="paragraph" style:parent-style-name="Heading_20_3" style:list-style-name="L26">
      <style:paragraph-properties fo:margin-top="0cm" fo:margin-bottom="0.247cm" style:contextual-spacing="false" fo:line-height="115%"/>
      <style:text-properties officeooo:paragraph-rsid="0026c906"/>
    </style:style>
    <style:style style:name="P54" style:family="paragraph" style:parent-style-name="Heading_20_3" style:list-style-name="L23">
      <style:paragraph-properties fo:margin-top="0cm" fo:margin-bottom="0.247cm" style:contextual-spacing="false" fo:line-height="115%"/>
      <style:text-properties officeooo:paragraph-rsid="002c67c8"/>
    </style:style>
    <style:style style:name="P55" style:family="paragraph" style:parent-style-name="Heading_20_3" style:list-style-name="L27">
      <style:paragraph-properties fo:margin-top="0cm" fo:margin-bottom="0.247cm" style:contextual-spacing="false" fo:line-height="115%"/>
      <style:text-properties officeooo:paragraph-rsid="002c67c8"/>
    </style:style>
    <style:style style:name="P56" style:family="paragraph" style:parent-style-name="Heading_20_3">
      <style:paragraph-properties fo:text-align="center" style:justify-single-word="false"/>
      <style:text-properties officeooo:rsid="002d0300" officeooo:paragraph-rsid="002d0300"/>
    </style:style>
    <style:style style:name="P57" style:family="paragraph" style:parent-style-name="Text_20_body">
      <style:paragraph-properties fo:text-align="start" style:justify-single-word="false"/>
      <style:text-properties officeooo:rsid="002d0300" officeooo:paragraph-rsid="002d0300"/>
    </style:style>
    <style:style style:name="P58" style:family="paragraph" style:parent-style-name="Text_20_body" style:list-style-name="L14">
      <style:paragraph-properties fo:break-before="page"/>
      <style:text-properties officeooo:paragraph-rsid="00078016"/>
    </style:style>
    <style:style style:name="P59" style:family="paragraph" style:parent-style-name="Text_20_body" style:list-style-name="L28">
      <style:text-properties officeooo:paragraph-rsid="0051b840"/>
    </style:style>
    <style:style style:name="P60" style:family="paragraph" style:parent-style-name="Text_20_body" style:list-style-name="L29">
      <style:text-properties officeooo:paragraph-rsid="003e9be5"/>
    </style:style>
    <style:style style:name="P61" style:family="paragraph" style:parent-style-name="Text_20_body" style:list-style-name="L30">
      <style:text-properties fo:color="#00a933" loext:opacity="100%" officeooo:paragraph-rsid="003e9be5"/>
    </style:style>
    <style:style style:name="P62" style:family="paragraph" style:parent-style-name="Text_20_body" style:list-style-name="L30">
      <style:text-properties fo:color="#00a933" loext:opacity="100%" officeooo:rsid="00356584" officeooo:paragraph-rsid="003e9be5"/>
    </style:style>
    <style:style style:name="P63" style:family="paragraph" style:parent-style-name="Text_20_body" style:list-style-name="L31">
      <style:text-properties fo:color="#00a933" loext:opacity="100%" officeooo:rsid="00356584" officeooo:paragraph-rsid="003e9be5"/>
    </style:style>
    <style:style style:name="P64" style:family="paragraph" style:parent-style-name="Text_20_body" style:list-style-name="L31">
      <style:text-properties officeooo:paragraph-rsid="00556ac2"/>
    </style:style>
    <style:style style:name="P65" style:family="paragraph" style:parent-style-name="Text_20_body" style:list-style-name="L31">
      <style:text-properties officeooo:paragraph-rsid="0072984c"/>
    </style:style>
    <style:style style:name="P66" style:family="paragraph" style:parent-style-name="Text_20_body" style:list-style-name="L32">
      <style:text-properties officeooo:paragraph-rsid="003c27bb"/>
    </style:style>
    <style:style style:name="P67" style:family="paragraph" style:parent-style-name="Text_20_body" style:list-style-name="L33">
      <style:text-properties officeooo:paragraph-rsid="003c4452"/>
    </style:style>
    <style:style style:name="P68" style:family="paragraph" style:parent-style-name="Text_20_body" style:list-style-name="L34">
      <style:text-properties officeooo:paragraph-rsid="003d38cd"/>
    </style:style>
    <style:style style:name="P69" style:family="paragraph" style:parent-style-name="Text_20_body" style:list-style-name="L35">
      <style:text-properties officeooo:paragraph-rsid="003d38cd"/>
    </style:style>
    <style:style style:name="P70" style:family="paragraph" style:parent-style-name="Text_20_body" style:list-style-name="L36">
      <style:text-properties officeooo:paragraph-rsid="006eef87"/>
    </style:style>
    <style:style style:name="P71" style:family="paragraph" style:parent-style-name="Text_20_body" style:list-style-name="L37">
      <style:text-properties officeooo:paragraph-rsid="0051b840"/>
    </style:style>
    <style:style style:name="P72" style:family="paragraph" style:parent-style-name="Text_20_body" style:list-style-name="L37">
      <style:text-properties officeooo:paragraph-rsid="00540bfb"/>
    </style:style>
    <style:style style:name="P73" style:family="paragraph" style:parent-style-name="Text_20_body" style:list-style-name="L37">
      <style:text-properties fo:color="#00a933" loext:opacity="100%" style:font-name="Liberation Serif" officeooo:rsid="00356584" officeooo:paragraph-rsid="00540bfb"/>
    </style:style>
    <style:style style:name="P74" style:family="paragraph" style:parent-style-name="Text_20_body" style:list-style-name="L37">
      <style:paragraph-properties fo:break-before="page"/>
      <style:text-properties officeooo:paragraph-rsid="0051b840"/>
    </style:style>
    <style:style style:name="P75" style:family="paragraph" style:parent-style-name="Text_20_body" style:list-style-name="L37">
      <style:text-properties officeooo:paragraph-rsid="00556ac2"/>
    </style:style>
    <style:style style:name="P76" style:family="paragraph" style:parent-style-name="Text_20_body" style:list-style-name="L37">
      <style:text-properties fo:color="#00a933" loext:opacity="100%" style:font-name="Liberation Serif" officeooo:rsid="00684597" officeooo:paragraph-rsid="00684597"/>
    </style:style>
    <style:style style:name="P77" style:family="paragraph" style:parent-style-name="Text_20_body" style:list-style-name="L37">
      <style:text-properties fo:color="#00a933" loext:opacity="100%" officeooo:paragraph-rsid="00540bfb"/>
    </style:style>
    <style:style style:name="P78" style:family="paragraph" style:parent-style-name="Text_20_body" style:list-style-name="L37">
      <style:text-properties fo:color="#000000" loext:opacity="100%" style:font-name="Liberation Serif" officeooo:rsid="00356584" officeooo:paragraph-rsid="00556ac2" style:font-size-asian="12pt"/>
    </style:style>
    <style:style style:name="P79" style:family="paragraph" style:parent-style-name="Heading_20_3">
      <style:paragraph-properties fo:text-align="center" style:justify-single-word="false"/>
      <style:text-properties style:font-name="Liberation Serif" officeooo:rsid="001ad848" officeooo:paragraph-rsid="001ad848"/>
    </style:style>
    <style:style style:name="P80" style:family="paragraph" style:parent-style-name="Text_20_body" style:list-style-name="L38">
      <style:text-properties style:font-name="Liberation Serif" officeooo:rsid="001ad848" officeooo:paragraph-rsid="0035de6d"/>
    </style:style>
    <style:style style:name="P81" style:family="paragraph" style:parent-style-name="Text_20_body" style:list-style-name="L39">
      <style:text-properties officeooo:rsid="001ad848" officeooo:paragraph-rsid="0035de6d"/>
    </style:style>
    <style:style style:name="P82" style:family="paragraph" style:parent-style-name="Text_20_body" style:list-style-name="L38">
      <style:text-properties officeooo:rsid="001ad848" officeooo:paragraph-rsid="0035de6d"/>
    </style:style>
    <style:style style:name="P83" style:family="paragraph" style:parent-style-name="Text_20_body">
      <style:text-properties officeooo:rsid="001ad848" officeooo:paragraph-rsid="0035de6d"/>
    </style:style>
    <style:style style:name="P84" style:family="paragraph" style:parent-style-name="Heading_20_2">
      <style:text-properties officeooo:rsid="00375e25" officeooo:paragraph-rsid="00375e25"/>
    </style:style>
    <style:style style:name="P85" style:family="paragraph" style:parent-style-name="Text_20_body" style:list-style-name="L40">
      <style:text-properties officeooo:paragraph-rsid="00402339"/>
    </style:style>
    <style:style style:name="P86" style:family="paragraph" style:parent-style-name="Text_20_body" style:list-style-name="L40">
      <style:text-properties fo:color="#000000" loext:opacity="100%" officeooo:rsid="00356584" officeooo:paragraph-rsid="00402339"/>
    </style:style>
    <style:style style:name="P87" style:family="paragraph" style:parent-style-name="Text_20_body" style:list-style-name="L40">
      <style:text-properties fo:color="#000000" loext:opacity="100%" officeooo:rsid="00356584" officeooo:paragraph-rsid="00419459"/>
    </style:style>
    <style:style style:name="P88" style:family="paragraph" style:parent-style-name="Text_20_body" style:list-style-name="L40">
      <style:text-properties fo:color="#000000" loext:opacity="100%" fo:font-size="12pt" fo:font-weight="bold" officeooo:rsid="00356584" officeooo:paragraph-rsid="00419459" style:font-size-asian="12pt" style:font-weight-asian="bold" style:font-size-complex="12pt" style:font-weight-complex="bold"/>
    </style:style>
    <style:style style:name="P89" style:family="paragraph" style:parent-style-name="Text_20_body" style:list-style-name="L40">
      <style:text-properties fo:color="#000000" loext:opacity="100%" fo:font-size="12pt" officeooo:rsid="00356584" officeooo:paragraph-rsid="00419459" style:font-size-asian="12pt" style:font-size-complex="12pt"/>
    </style:style>
    <style:style style:name="P90" style:family="paragraph" style:parent-style-name="Text_20_body" style:list-style-name="L40">
      <style:text-properties officeooo:rsid="001ad848" officeooo:paragraph-rsid="00402339"/>
    </style:style>
    <style:style style:name="P91" style:family="paragraph" style:parent-style-name="Text_20_body">
      <style:text-properties officeooo:rsid="005596e0" officeooo:paragraph-rsid="003acf0e"/>
    </style:style>
    <style:style style:name="P92" style:family="paragraph" style:parent-style-name="Text_20_body" style:list-style-name="L41">
      <style:text-properties officeooo:paragraph-rsid="003acf0e"/>
    </style:style>
    <style:style style:name="P93" style:family="paragraph" style:parent-style-name="Text_20_body">
      <style:text-properties officeooo:rsid="005596e0" officeooo:paragraph-rsid="00078016"/>
    </style:style>
    <style:style style:name="P94" style:family="paragraph" style:parent-style-name="Horizontal_20_Line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95" style:family="paragraph" style:parent-style-name="Text_20_body" style:list-style-name="L42">
      <style:text-properties officeooo:rsid="005596e0" officeooo:paragraph-rsid="00078016"/>
    </style:style>
    <style:style style:name="P96" style:family="paragraph" style:parent-style-name="Text_20_body" style:list-style-name="L43">
      <style:text-properties officeooo:rsid="005596e0" officeooo:paragraph-rsid="00078016"/>
    </style:style>
    <style:style style:name="P97" style:family="paragraph" style:parent-style-name="Text_20_body" style:list-style-name="L43">
      <style:text-properties officeooo:rsid="005596e0" officeooo:paragraph-rsid="005e429a"/>
    </style:style>
    <style:style style:name="P98" style:family="paragraph" style:parent-style-name="Text_20_body" style:list-style-name="L43">
      <style:text-properties officeooo:paragraph-rsid="005e429a"/>
    </style:style>
    <style:style style:name="P99" style:family="paragraph" style:parent-style-name="Text_20_body" style:list-style-name="L43">
      <style:text-properties fo:color="#000000" loext:opacity="100%" style:font-name="Liberation Serif" fo:font-size="12pt" officeooo:rsid="00356584" officeooo:paragraph-rsid="005e429a" style:font-size-asian="12pt" style:font-size-complex="12pt"/>
    </style:style>
    <style:style style:name="P100" style:family="paragraph" style:parent-style-name="Text_20_body" style:list-style-name="L43">
      <style:text-properties officeooo:rsid="00356584" officeooo:paragraph-rsid="005e429a"/>
    </style:style>
    <style:style style:name="P101" style:family="paragraph" style:parent-style-name="Text_20_body" style:list-style-name="L43">
      <style:text-properties fo:color="#000000" loext:opacity="100%" style:font-name="Liberation Serif" fo:font-size="12pt" officeooo:rsid="004a6762" officeooo:paragraph-rsid="005e429a" style:font-size-asian="12pt" style:font-size-complex="12pt"/>
    </style:style>
    <style:style style:name="P102" style:family="paragraph" style:parent-style-name="Text_20_body" style:list-style-name="L43">
      <style:text-properties fo:color="#00a933" loext:opacity="100%" officeooo:paragraph-rsid="005e429a"/>
    </style:style>
    <style:style style:name="P103" style:family="paragraph" style:parent-style-name="Text_20_body" style:list-style-name="L44">
      <style:text-properties officeooo:rsid="005596e0" officeooo:paragraph-rsid="00078016"/>
    </style:style>
    <style:style style:name="P104" style:family="paragraph" style:parent-style-name="Text_20_body">
      <style:paragraph-properties fo:text-align="center" style:justify-single-word="false"/>
      <style:text-properties officeooo:paragraph-rsid="00078016"/>
    </style:style>
    <style:style style:name="P105" style:family="paragraph" style:parent-style-name="Heading_20_1">
      <style:paragraph-properties fo:text-align="center" style:justify-single-word="false"/>
      <style:text-properties officeooo:rsid="001c24cc" officeooo:paragraph-rsid="00078016"/>
    </style:style>
    <style:style style:name="P106" style:family="paragraph" style:parent-style-name="Text_20_body">
      <style:paragraph-properties fo:text-align="start" style:justify-single-word="false"/>
      <style:text-properties officeooo:paragraph-rsid="00078016"/>
    </style:style>
    <style:style style:name="P107" style:family="paragraph" style:parent-style-name="Text_20_body" style:list-style-name="L45">
      <style:text-properties officeooo:paragraph-rsid="00078016"/>
    </style:style>
    <style:style style:name="P108" style:family="paragraph" style:parent-style-name="Heading_20_1">
      <style:text-properties fo:font-size="14pt" officeooo:paragraph-rsid="00078016" style:font-size-asian="14pt" style:font-size-complex="14pt"/>
    </style:style>
    <style:style style:name="P109" style:family="paragraph" style:parent-style-name="Text_20_body">
      <style:text-properties style:font-name="Liberation Serif"/>
    </style:style>
    <style:style style:name="P110" style:family="paragraph" style:parent-style-name="Text_20_body" style:list-style-name="L46">
      <style:text-properties style:font-name="Liberation Serif"/>
    </style:style>
    <style:style style:name="P111" style:family="paragraph" style:parent-style-name="Text_20_body" style:list-style-name="L46"/>
    <style:style style:name="P112" style:family="paragraph" style:parent-style-name="Text_20_body">
      <style:text-properties officeooo:paragraph-rsid="00078016"/>
    </style:style>
    <style:style style:name="P113" style:family="paragraph" style:parent-style-name="Heading_20_1" style:list-style-name="">
      <style:paragraph-properties fo:text-align="center" style:justify-single-word="false" fo:break-before="page"/>
      <style:text-properties officeooo:paragraph-rsid="00078016"/>
    </style:style>
    <style:style style:name="P114" style:family="paragraph" style:parent-style-name="Text_20_body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115" style:family="paragraph" style:parent-style-name="Text_20_body" style:list-style-name="L47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116" style:family="paragraph" style:parent-style-name="Text_20_body" style:list-style-name="L47">
      <style:text-properties officeooo:paragraph-rsid="00078016"/>
    </style:style>
    <style:style style:name="P117" style:family="paragraph" style:parent-style-name="Text_20_body" style:list-style-name="L48"/>
    <style:style style:name="P118" style:family="paragraph" style:parent-style-name="Text_20_body" style:list-style-name="L47">
      <style:text-properties officeooo:paragraph-rsid="006966f9"/>
    </style:style>
    <style:style style:name="P119" style:family="paragraph" style:parent-style-name="Heading_20_1">
      <style:paragraph-properties fo:text-align="center" style:justify-single-word="false" fo:break-before="page"/>
      <style:text-properties officeooo:paragraph-rsid="00078016"/>
    </style:style>
    <style:style style:name="P120" style:family="paragraph" style:parent-style-name="Heading_20_2" style:list-style-name="L49">
      <style:text-properties officeooo:paragraph-rsid="00078016"/>
    </style:style>
    <style:style style:name="P121" style:family="paragraph" style:parent-style-name="Text_20_body" style:list-style-name="L50">
      <style:text-properties officeooo:paragraph-rsid="00078016"/>
    </style:style>
    <style:style style:name="P122" style:family="paragraph" style:parent-style-name="Text_20_body" style:list-style-name="L51">
      <style:text-properties officeooo:paragraph-rsid="0007801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7534d3"/>
    </style:style>
    <style:style style:name="T4" style:family="text">
      <style:text-properties officeooo:rsid="007534d3"/>
    </style:style>
    <style:style style:name="T5" style:family="text">
      <style:text-properties fo:color="#00a933" loext:opacity="100%" officeooo:rsid="005596e0"/>
    </style:style>
    <style:style style:name="T6" style:family="text">
      <style:text-properties fo:color="#00a933" loext:opacity="100%" fo:font-weight="normal" officeooo:rsid="005596e0" style:font-weight-asian="normal" style:font-weight-complex="normal"/>
    </style:style>
    <style:style style:name="T7" style:family="text">
      <style:text-properties fo:color="#ff0000" loext:opacity="100%"/>
    </style:style>
    <style:style style:name="T8" style:family="text">
      <style:text-properties fo:color="#00a933" loext:opacity="100%" officeooo:rsid="001a27e5"/>
    </style:style>
    <style:style style:name="T9" style:family="text">
      <style:text-properties fo:color="#ff0000" loext:opacity="100%" officeooo:rsid="001a27e5"/>
    </style:style>
    <style:style style:name="T10" style:family="text">
      <style:text-properties fo:color="#00a933" loext:opacity="100%" officeooo:rsid="002e71d2"/>
    </style:style>
    <style:style style:name="T11" style:family="text">
      <style:text-properties officeooo:rsid="005596e0"/>
    </style:style>
    <style:style style:name="T12" style:family="text">
      <style:text-properties officeooo:rsid="00154bb0"/>
    </style:style>
    <style:style style:name="T13" style:family="text">
      <style:text-properties officeooo:rsid="0018ba4c"/>
    </style:style>
    <style:style style:name="T14" style:family="text">
      <style:text-properties fo:color="#00a933" loext:opacity="100%" fo:font-weight="bold" officeooo:rsid="005596e0" style:font-weight-asian="bold" style:font-weight-complex="bold"/>
    </style:style>
    <style:style style:name="T15" style:family="text">
      <style:text-properties fo:color="#00a933" loext:opacity="100%" officeooo:rsid="002d6baa"/>
    </style:style>
    <style:style style:name="T16" style:family="text">
      <style:text-properties fo:color="#00a933" loext:opacity="100%" fo:font-weight="bold" officeooo:rsid="001650d2" style:font-weight-asian="bold" style:font-weight-complex="bold"/>
    </style:style>
    <style:style style:name="T17" style:family="text">
      <style:text-properties fo:color="#00a933" loext:opacity="100%" officeooo:rsid="001650d2"/>
    </style:style>
    <style:style style:name="T18" style:family="text">
      <style:text-properties fo:color="#00a933" loext:opacity="100%" fo:font-weight="normal" officeooo:rsid="002d6baa" style:font-weight-asian="normal" style:font-weight-complex="normal"/>
    </style:style>
    <style:style style:name="T19" style:family="text">
      <style:text-properties fo:color="#00a933" loext:opacity="100%" fo:font-weight="normal" officeooo:rsid="006cd21a" style:font-weight-asian="normal" style:font-weight-complex="normal"/>
    </style:style>
    <style:style style:name="T20" style:family="text">
      <style:text-properties fo:color="#00a933" loext:opacity="100%" officeooo:rsid="006d3638"/>
    </style:style>
    <style:style style:name="T21" style:family="text">
      <style:text-properties officeooo:rsid="006d48a1"/>
    </style:style>
    <style:style style:name="T22" style:family="text">
      <style:text-properties officeooo:rsid="006cd21a"/>
    </style:style>
    <style:style style:name="T23" style:family="text">
      <style:text-properties officeooo:rsid="006d3638"/>
    </style:style>
    <style:style style:name="T24" style:family="text">
      <style:text-properties officeooo:rsid="0016c2e8"/>
    </style:style>
    <style:style style:name="T25" style:family="text">
      <style:text-properties fo:color="#00a933" loext:opacity="100%" fo:font-weight="normal" style:font-weight-asian="normal" style:font-weight-complex="normal"/>
    </style:style>
    <style:style style:name="T26" style:family="text">
      <style:text-properties fo:color="#00a933" loext:opacity="100%" fo:font-weight="normal" officeooo:rsid="002ffc02" style:font-weight-asian="normal" style:font-weight-complex="normal"/>
    </style:style>
    <style:style style:name="T27" style:family="text">
      <style:text-properties fo:color="#00a933" loext:opacity="100%" fo:font-weight="normal" officeooo:rsid="00149541" style:font-weight-asian="normal" style:font-weight-complex="normal"/>
    </style:style>
    <style:style style:name="T28" style:family="text">
      <style:text-properties fo:color="#00a933" loext:opacity="100%" fo:font-weight="normal" officeooo:rsid="001e34d5" style:font-weight-asian="normal" style:font-weight-complex="normal"/>
    </style:style>
    <style:style style:name="T29" style:family="text">
      <style:text-properties fo:color="#00a933" loext:opacity="100%" fo:font-weight="normal" officeooo:rsid="001d9412" style:font-weight-asian="normal" style:font-weight-complex="normal"/>
    </style:style>
    <style:style style:name="T30" style:family="text">
      <style:text-properties fo:color="#00a933" loext:opacity="100%" fo:font-weight="normal" officeooo:rsid="00771b46" style:font-weight-asian="normal" style:font-weight-complex="normal"/>
    </style:style>
    <style:style style:name="T31" style:family="text">
      <style:text-properties officeooo:rsid="002f7862"/>
    </style:style>
    <style:style style:name="T32" style:family="text">
      <style:text-properties fo:color="#00a933" loext:opacity="100%" fo:font-weight="normal" officeooo:rsid="006966f9" style:font-weight-asian="normal" style:font-weight-complex="normal"/>
    </style:style>
    <style:style style:name="T33" style:family="text">
      <style:text-properties fo:color="#00a933" loext:opacity="100%" fo:font-weight="normal" officeooo:rsid="006b2e32" style:font-weight-asian="normal" style:font-weight-complex="normal"/>
    </style:style>
    <style:style style:name="T34" style:family="text">
      <style:text-properties fo:color="#00a933" loext:opacity="100%" officeooo:rsid="0021a894"/>
    </style:style>
    <style:style style:name="T35" style:family="text">
      <style:text-properties fo:color="#00a933" loext:opacity="100%" fo:font-weight="normal" officeooo:rsid="001c5613" style:font-weight-asian="normal" style:font-weight-complex="normal"/>
    </style:style>
    <style:style style:name="T36" style:family="text">
      <style:text-properties fo:color="#00a933" loext:opacity="100%" officeooo:rsid="00239fcf"/>
    </style:style>
    <style:style style:name="T37" style:family="text">
      <style:text-properties fo:color="#00a933" loext:opacity="100%" officeooo:rsid="00258b4c"/>
    </style:style>
    <style:style style:name="T38" style:family="text">
      <style:text-properties fo:color="#00a933" loext:opacity="100%" officeooo:rsid="006b494d"/>
    </style:style>
    <style:style style:name="T39" style:family="text">
      <style:text-properties fo:color="#00a933" loext:opacity="100%" officeooo:rsid="002389f1"/>
    </style:style>
    <style:style style:name="T40" style:family="text">
      <style:text-properties officeooo:rsid="00771b46"/>
    </style:style>
    <style:style style:name="T41" style:family="text">
      <style:text-properties fo:color="#00a933" loext:opacity="100%" officeooo:rsid="001bd61e"/>
    </style:style>
    <style:style style:name="T42" style:family="text">
      <style:text-properties fo:color="#00a933" loext:opacity="100%" fo:font-weight="normal" officeooo:rsid="001bd61e" style:font-weight-asian="normal" style:font-weight-complex="normal"/>
    </style:style>
    <style:style style:name="T43" style:family="text">
      <style:text-properties fo:color="#00a933" loext:opacity="100%" fo:font-weight="normal" officeooo:rsid="005ddda9" style:font-weight-asian="normal" style:font-weight-complex="normal"/>
    </style:style>
    <style:style style:name="T44" style:family="text">
      <style:text-properties fo:color="#00a933" loext:opacity="100%" fo:font-weight="normal" officeooo:rsid="0021a894" style:font-weight-asian="normal" style:font-weight-complex="normal"/>
    </style:style>
    <style:style style:name="T45" style:family="text">
      <style:text-properties fo:color="#00a933" loext:opacity="100%" fo:font-weight="bold" officeooo:rsid="001c5613" style:font-weight-asian="bold" style:font-weight-complex="bold"/>
    </style:style>
    <style:style style:name="T46" style:family="text">
      <style:text-properties fo:color="#00a933" loext:opacity="100%" officeooo:rsid="0021fccf"/>
    </style:style>
    <style:style style:name="T47" style:family="text">
      <style:text-properties fo:color="#00a933" loext:opacity="100%" fo:font-weight="normal" officeooo:rsid="002f7862" style:font-weight-asian="normal" style:font-weight-complex="normal"/>
    </style:style>
    <style:style style:name="T48" style:family="text">
      <style:text-properties fo:color="#00a933" loext:opacity="100%" fo:font-weight="normal" officeooo:rsid="006eef87" style:font-weight-asian="normal" style:font-weight-complex="normal"/>
    </style:style>
    <style:style style:name="T49" style:family="text">
      <style:text-properties fo:color="#00a933" loext:opacity="100%" fo:font-weight="normal" officeooo:rsid="00344439" style:font-weight-asian="normal" style:font-weight-complex="normal"/>
    </style:style>
    <style:style style:name="T50" style:family="text">
      <style:text-properties fo:color="#00a933" loext:opacity="100%" fo:font-weight="normal" officeooo:rsid="00575f9e" style:font-weight-asian="normal" style:font-weight-complex="normal"/>
    </style:style>
    <style:style style:name="T51" style:family="text">
      <style:text-properties fo:color="#c9211e" loext:opacity="100%" fo:font-weight="normal" officeooo:rsid="006eef87" style:font-weight-asian="normal" style:font-weight-complex="normal"/>
    </style:style>
    <style:style style:name="T52" style:family="text">
      <style:text-properties fo:font-weight="normal" officeooo:rsid="001ad848" style:font-weight-asian="normal" style:font-weight-complex="normal"/>
    </style:style>
    <style:style style:name="T53" style:family="text">
      <style:text-properties fo:font-weight="normal" officeooo:rsid="00771b46" style:font-weight-asian="normal" style:font-weight-complex="normal"/>
    </style:style>
    <style:style style:name="T54" style:family="text">
      <style:text-properties fo:font-size="12pt" fo:font-weight="normal" officeooo:rsid="001ad848" style:font-size-asian="12pt" style:font-weight-asian="normal" style:font-size-complex="12pt" style:font-weight-complex="normal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2pt" fo:font-weight="normal" officeooo:rsid="00239fcf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2c67c8" style:font-size-asian="12pt" style:font-weight-asian="normal" style:font-size-complex="12pt" style:font-weight-complex="normal"/>
    </style:style>
    <style:style style:name="T58" style:family="text">
      <style:text-properties fo:font-size="12pt" fo:font-weight="normal" style:font-size-asian="12pt" style:font-weight-asian="normal" style:font-size-complex="12pt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51b840"/>
    </style:style>
    <style:style style:name="T61" style:family="text">
      <style:text-properties fo:font-size="12pt" officeooo:rsid="005596e0" style:font-size-asian="12pt" style:font-size-complex="12pt"/>
    </style:style>
    <style:style style:name="T62" style:family="text">
      <style:text-properties fo:color="#00a933" loext:opacity="100%" fo:font-weight="normal" officeooo:rsid="0031b063" style:font-weight-asian="normal" style:font-weight-complex="normal"/>
    </style:style>
    <style:style style:name="T63" style:family="text">
      <style:text-properties fo:color="#00a933" loext:opacity="100%" fo:font-weight="bold" officeooo:rsid="0031b063" style:font-weight-asian="bold" style:font-weight-complex="bold"/>
    </style:style>
    <style:style style:name="T64" style:family="text">
      <style:text-properties fo:color="#000000" loext:opacity="100%" fo:font-weight="bold" officeooo:rsid="003e9be5" style:font-weight-asian="bold" style:font-weight-complex="bold"/>
    </style:style>
    <style:style style:name="T65" style:family="text">
      <style:text-properties fo:color="#000000" loext:opacity="100%" fo:font-weight="bold" officeooo:rsid="005596e0" style:font-weight-asian="bold" style:font-weight-complex="bold"/>
    </style:style>
    <style:style style:name="T66" style:family="text">
      <style:text-properties fo:color="#000000" loext:opacity="100%" fo:font-weight="normal" officeooo:rsid="005596e0" style:font-weight-asian="normal" style:font-weight-complex="normal"/>
    </style:style>
    <style:style style:name="T67" style:family="text">
      <style:text-properties fo:color="#000000" loext:opacity="100%" style:text-underline-style="none" fo:font-weight="bold" officeooo:rsid="00356584" style:font-weight-asian="bold" style:font-weight-complex="bold"/>
    </style:style>
    <style:style style:name="T68" style:family="text">
      <style:text-properties fo:color="#00a933" loext:opacity="100%" fo:font-weight="normal" officeooo:rsid="00356584" style:font-weight-asian="normal" style:font-weight-complex="normal"/>
    </style:style>
    <style:style style:name="T69" style:family="text">
      <style:text-properties fo:color="#00a933" loext:opacity="100%" officeooo:rsid="00356584"/>
    </style:style>
    <style:style style:name="T70" style:family="text">
      <style:text-properties officeooo:rsid="00356584"/>
    </style:style>
    <style:style style:name="T71" style:family="text">
      <style:text-properties officeooo:rsid="003e9be5"/>
    </style:style>
    <style:style style:name="T72" style:family="text">
      <style:text-properties fo:color="#000000" loext:opacity="100%" style:text-underline-style="none" fo:font-weight="bold" officeooo:rsid="00402339" style:font-weight-asian="bold" style:font-weight-complex="bold"/>
    </style:style>
    <style:style style:name="T73" style:family="text">
      <style:text-properties fo:color="#000000" loext:opacity="100%" style:text-underline-style="none" fo:font-weight="bold" officeooo:rsid="003c4452" style:font-weight-asian="bold" style:font-weight-complex="bold"/>
    </style:style>
    <style:style style:name="T74" style:family="text">
      <style:text-properties fo:color="#000000" loext:opacity="100%" officeooo:rsid="003c4452"/>
    </style:style>
    <style:style style:name="T75" style:family="text">
      <style:text-properties fo:color="#000000" loext:opacity="100%" fo:font-weight="bold" officeooo:rsid="00556ac2" style:font-weight-asian="bold" style:font-weight-complex="bold"/>
    </style:style>
    <style:style style:name="T76" style:family="text">
      <style:text-properties fo:color="#000000" loext:opacity="100%" officeooo:rsid="00556ac2"/>
    </style:style>
    <style:style style:name="T77" style:family="text">
      <style:text-properties fo:color="#00a933" loext:opacity="100%" officeooo:rsid="003c4452"/>
    </style:style>
    <style:style style:name="T78" style:family="text">
      <style:text-properties fo:color="#00a933" loext:opacity="100%" officeooo:rsid="00556ac2"/>
    </style:style>
    <style:style style:name="T79" style:family="text">
      <style:text-properties fo:color="#00a933" loext:opacity="100%" fo:font-size="12pt" fo:font-weight="normal" officeooo:rsid="002ffc02"/>
    </style:style>
    <style:style style:name="T80" style:family="text">
      <style:text-properties fo:color="#00a933" loext:opacity="100%" fo:font-size="12pt" fo:font-weight="normal" officeooo:rsid="00557d41"/>
    </style:style>
    <style:style style:name="T81" style:family="text">
      <style:text-properties fo:color="#c9211e" loext:opacity="100%" fo:font-weight="normal" officeooo:rsid="0072984c" style:font-weight-asian="normal" style:font-weight-complex="normal"/>
    </style:style>
    <style:style style:name="T82" style:family="text">
      <style:text-properties fo:color="#00a933" loext:opacity="100%" fo:font-weight="normal" officeooo:rsid="0072984c" style:font-weight-asian="normal" style:font-weight-complex="normal"/>
    </style:style>
    <style:style style:name="T83" style:family="text">
      <style:text-properties fo:color="#c9211e" loext:opacity="100%" fo:font-weight="bold" officeooo:rsid="0072984c" style:font-weight-asian="bold" style:font-weight-complex="bold"/>
    </style:style>
    <style:style style:name="T84" style:family="text">
      <style:text-properties fo:color="#00a933" loext:opacity="100%" fo:font-weight="normal" officeooo:rsid="00557d41" style:font-weight-asian="normal" style:font-weight-complex="normal"/>
    </style:style>
    <style:style style:name="T85" style:family="text">
      <style:text-properties fo:color="#00a933" loext:opacity="100%" fo:font-weight="normal" officeooo:rsid="0033267e" style:font-weight-asian="normal" style:font-weight-complex="normal"/>
    </style:style>
    <style:style style:name="T86" style:family="text">
      <style:text-properties fo:color="#00a933" loext:opacity="100%" fo:font-weight="normal" officeooo:rsid="001aea42" style:font-weight-asian="normal" style:font-weight-complex="normal"/>
    </style:style>
    <style:style style:name="T87" style:family="text">
      <style:text-properties fo:color="#00a933" loext:opacity="100%" fo:font-weight="normal" officeooo:rsid="003c27bb" style:font-weight-asian="normal" style:font-weight-complex="normal"/>
    </style:style>
    <style:style style:name="T88" style:family="text">
      <style:text-properties fo:color="#00a933" loext:opacity="100%" fo:font-weight="normal" officeooo:rsid="001d4e87" style:font-weight-asian="normal" style:font-weight-complex="normal"/>
    </style:style>
    <style:style style:name="T89" style:family="text">
      <style:text-properties fo:color="#00a933" loext:opacity="100%" fo:font-weight="normal" officeooo:rsid="005f3184" style:font-weight-asian="normal" style:font-weight-complex="normal"/>
    </style:style>
    <style:style style:name="T90" style:family="text">
      <style:text-properties fo:color="#000000" loext:opacity="100%" officeooo:rsid="005ddda9"/>
    </style:style>
    <style:style style:name="T91" style:family="text">
      <style:text-properties fo:color="#000000" loext:opacity="100%" officeooo:rsid="001ad848"/>
    </style:style>
    <style:style style:name="T92" style:family="text">
      <style:text-properties fo:color="#000000" loext:opacity="100%" officeooo:rsid="00575f9e"/>
    </style:style>
    <style:style style:name="T93" style:family="text">
      <style:text-properties fo:color="#00a933" loext:opacity="100%" officeooo:rsid="005ddda9"/>
    </style:style>
    <style:style style:name="T94" style:family="text">
      <style:text-properties fo:color="#00a933" loext:opacity="100%" officeooo:rsid="003c27bb"/>
    </style:style>
    <style:style style:name="T95" style:family="text">
      <style:text-properties fo:color="#00a933" loext:opacity="100%" officeooo:rsid="001ad848"/>
    </style:style>
    <style:style style:name="T96" style:family="text">
      <style:text-properties fo:color="#00a933" loext:opacity="100%" style:font-name="Liberation Serif" officeooo:rsid="001ad848"/>
    </style:style>
    <style:style style:name="T97" style:family="text">
      <style:text-properties fo:color="#00a933" loext:opacity="100%" style:font-name="Liberation Serif" fo:font-weight="normal" officeooo:rsid="001ad848" style:font-weight-asian="normal" style:font-weight-complex="normal"/>
    </style:style>
    <style:style style:name="T98" style:family="text">
      <style:text-properties fo:color="#00a933" loext:opacity="100%" style:font-name="Liberation Serif" officeooo:rsid="005ddda9"/>
    </style:style>
    <style:style style:name="T99" style:family="text">
      <style:text-properties fo:color="#c9211e" loext:opacity="100%" style:font-name="Liberation Serif" fo:font-weight="normal" officeooo:rsid="006eef87" style:font-weight-asian="normal" style:font-weight-complex="normal"/>
    </style:style>
    <style:style style:name="T100" style:family="text">
      <style:text-properties fo:color="#c9211e" loext:opacity="100%" style:font-name="Liberation Serif" fo:font-weight="normal" officeooo:rsid="00706779" style:font-weight-asian="normal" style:font-weight-complex="normal"/>
    </style:style>
    <style:style style:name="T101" style:family="text">
      <style:text-properties fo:color="#c9211e" loext:opacity="100%" style:font-name="Liberation Serif" fo:font-weight="normal" officeooo:rsid="00771b46" style:font-weight-asian="normal" style:font-weight-complex="normal"/>
    </style:style>
    <style:style style:name="T102" style:family="text">
      <style:text-properties fo:color="#c9211e" loext:opacity="100%" style:font-name="Liberation Serif" fo:font-weight="normal" officeooo:rsid="0071e47f" style:font-weight-asian="normal" style:font-weight-complex="normal"/>
    </style:style>
    <style:style style:name="T103" style:family="text">
      <style:text-properties fo:color="#000000" loext:opacity="100%" fo:font-weight="bold" officeooo:rsid="00356584" style:font-weight-asian="bold" style:font-weight-complex="bold"/>
    </style:style>
    <style:style style:name="T104" style:family="text">
      <style:text-properties fo:color="#000000" loext:opacity="100%" officeooo:rsid="00356584"/>
    </style:style>
    <style:style style:name="T105" style:family="text">
      <style:text-properties fo:color="#00a933" loext:opacity="100%" officeooo:rsid="00540bfb"/>
    </style:style>
    <style:style style:name="T106" style:family="text">
      <style:text-properties fo:color="#00a933" loext:opacity="100%" style:font-name="Liberation Serif" officeooo:rsid="00356584"/>
    </style:style>
    <style:style style:name="T107" style:family="text">
      <style:text-properties fo:color="#000000" loext:opacity="100%" style:font-name="Liberation Serif" fo:font-weight="bold" officeooo:rsid="00356584" style:font-weight-asian="bold" style:font-weight-complex="bold"/>
    </style:style>
    <style:style style:name="T108" style:family="text">
      <style:text-properties fo:color="#000000" loext:opacity="100%" style:font-name="Liberation Serif" fo:font-weight="normal" officeooo:rsid="00356584" style:font-weight-asian="normal" style:font-weight-complex="normal"/>
    </style:style>
    <style:style style:name="T109" style:family="text">
      <style:text-properties style:font-name="Liberation Serif" fo:font-weight="normal" officeooo:rsid="005596e0" style:font-weight-asian="normal" style:font-weight-complex="normal"/>
    </style:style>
    <style:style style:name="T110" style:family="text">
      <style:text-properties fo:color="#00a933" loext:opacity="100%" style:font-name="Liberation Serif" officeooo:rsid="00419459"/>
    </style:style>
    <style:style style:name="T111" style:family="text">
      <style:text-properties fo:color="#00a933" loext:opacity="100%" style:font-name="Liberation Serif" fo:font-weight="normal" officeooo:rsid="002f7862" style:font-weight-asian="normal" style:font-weight-complex="normal"/>
    </style:style>
    <style:style style:name="T112" style:family="text">
      <style:text-properties fo:color="#00a933" loext:opacity="100%" style:font-name="Liberation Serif" fo:font-weight="normal" officeooo:rsid="005596e0" style:font-weight-asian="normal" style:font-weight-complex="normal"/>
    </style:style>
    <style:style style:name="T113" style:family="text">
      <style:text-properties fo:color="#00a933" loext:opacity="100%" style:font-name="Liberation Serif" fo:font-weight="normal" officeooo:rsid="00356584" style:font-weight-asian="normal" style:font-weight-complex="normal"/>
    </style:style>
    <style:style style:name="T114" style:family="text">
      <style:text-properties fo:color="#00a933" loext:opacity="100%" style:font-name="Liberation Serif" officeooo:rsid="00556ac2"/>
    </style:style>
    <style:style style:name="T115" style:family="text">
      <style:text-properties fo:color="#00a933" loext:opacity="100%" style:font-name="Liberation Serif" officeooo:rsid="003e9be5"/>
    </style:style>
    <style:style style:name="T116" style:family="text">
      <style:text-properties fo:color="#00a933" loext:opacity="100%" style:font-name="Liberation Serif" officeooo:rsid="005596e0"/>
    </style:style>
    <style:style style:name="T117" style:family="text">
      <style:text-properties fo:color="#00a933" loext:opacity="100%" style:font-name="Liberation Serif" officeooo:rsid="00356584" style:font-size-asian="12pt"/>
    </style:style>
    <style:style style:name="T118" style:family="text">
      <style:text-properties fo:color="#000000" loext:opacity="100%" style:font-name="Liberation Serif" officeooo:rsid="00556ac2"/>
    </style:style>
    <style:style style:name="T119" style:family="text">
      <style:text-properties fo:color="#000000" loext:opacity="100%" style:font-name="Liberation Serif" officeooo:rsid="001ad848"/>
    </style:style>
    <style:style style:name="T120" style:family="text">
      <style:text-properties style:font-name="Liberation Serif" officeooo:rsid="001ad848"/>
    </style:style>
    <style:style style:name="T121" style:family="text">
      <style:text-properties style:font-name="Liberation Serif" officeooo:rsid="005ad506"/>
    </style:style>
    <style:style style:name="T122" style:family="text">
      <style:text-properties fo:color="#2a6099" loext:opacity="100%" officeooo:rsid="001ad848"/>
    </style:style>
    <style:style style:name="T123" style:family="text">
      <style:text-properties fo:color="#2a6099" loext:opacity="100%" style:font-name="Liberation Serif" officeooo:rsid="001ad848"/>
    </style:style>
    <style:style style:name="T124" style:family="text">
      <style:text-properties officeooo:rsid="005ad506"/>
    </style:style>
    <style:style style:name="T125" style:family="text">
      <style:text-properties style:font-name="Liberation Serif"/>
    </style:style>
    <style:style style:name="T126" style:family="text">
      <style:text-properties fo:font-weight="bold" officeooo:rsid="003a7e9e" style:font-weight-asian="bold" style:font-weight-complex="bold"/>
    </style:style>
    <style:style style:name="T127" style:family="text">
      <style:text-properties fo:font-weight="bold" officeooo:rsid="001ad848" style:font-weight-asian="bold" style:font-weight-complex="bold"/>
    </style:style>
    <style:style style:name="T128" style:family="text">
      <style:text-properties officeooo:rsid="001ad848"/>
    </style:style>
    <style:style style:name="T129" style:family="text">
      <style:text-properties officeooo:rsid="003c4452"/>
    </style:style>
    <style:style style:name="T130" style:family="text">
      <style:text-properties fo:color="#ff0000" loext:opacity="100%" fo:font-weight="bold" officeooo:rsid="00356584" style:font-weight-asian="bold" style:font-weight-complex="bold"/>
    </style:style>
    <style:style style:name="T131" style:family="text">
      <style:text-properties fo:color="#ff0000" loext:opacity="100%" officeooo:rsid="00356584"/>
    </style:style>
    <style:style style:name="T132" style:family="text">
      <style:text-properties fo:color="#ff0000" loext:opacity="100%" officeooo:rsid="0041431a"/>
    </style:style>
    <style:style style:name="T133" style:family="text">
      <style:text-properties fo:color="#ff0000" loext:opacity="100%" officeooo:rsid="005596e0"/>
    </style:style>
    <style:style style:name="T134" style:family="text">
      <style:text-properties officeooo:rsid="004eec46"/>
    </style:style>
    <style:style style:name="T135" style:family="text">
      <style:text-properties fo:color="#000000" loext:opacity="100%" style:font-name="Liberation Serif" fo:font-size="12pt" fo:font-weight="normal" officeooo:rsid="004c1386" style:font-size-asian="12pt" style:font-weight-asian="normal" style:font-size-complex="12pt" style:font-weight-complex="normal"/>
    </style:style>
    <style:style style:name="T136" style:family="text">
      <style:text-properties style:font-name="Liberation Serif" officeooo:rsid="005596e0"/>
    </style:style>
    <style:style style:name="T137" style:family="text">
      <style:text-properties style:font-name="Liberation Serif" officeooo:rsid="004a6762"/>
    </style:style>
    <style:style style:name="T138" style:family="text">
      <style:text-properties fo:color="#000000" loext:opacity="100%" style:font-name="Liberation Serif" fo:font-size="12pt" style:font-size-asian="12pt" style:font-size-complex="12pt"/>
    </style:style>
    <style:style style:name="T139" style:family="text">
      <style:text-properties fo:color="#000000" loext:opacity="100%" style:font-name="Liberation Serif" fo:font-size="12pt" officeooo:rsid="0041e31a" style:font-size-asian="12pt" style:font-size-complex="12pt"/>
    </style:style>
    <style:style style:name="T140" style:family="text">
      <style:text-properties fo:color="#000000" loext:opacity="100%" style:font-name="Liberation Serif" fo:font-size="12pt" officeooo:rsid="004a6762" style:font-size-asian="12pt" style:font-size-complex="12pt"/>
    </style:style>
    <style:style style:name="T141" style:family="text">
      <style:text-properties style:font-name="Liberation Serif" fo:font-size="12pt" officeooo:rsid="004a6762" style:font-size-asian="12pt" style:font-size-complex="12pt"/>
    </style:style>
    <style:style style:name="T142" style:family="text">
      <style:text-properties style:font-name="Liberation Serif" fo:font-size="12pt" officeooo:rsid="0058dfdd" style:font-size-asian="12pt" style:font-size-complex="12pt"/>
    </style:style>
    <style:style style:name="T143" style:family="text">
      <style:text-properties fo:color="#00a933" loext:opacity="100%" style:font-name="Liberation Serif" fo:font-size="12pt" fo:font-weight="normal" officeooo:rsid="00448fe1" style:font-size-asian="12pt" style:font-weight-asian="normal" style:font-size-complex="12pt" style:font-weight-complex="normal"/>
    </style:style>
    <style:style style:name="T144" style:family="text">
      <style:text-properties fo:color="#00a933" loext:opacity="100%" style:font-name="Liberation Serif" fo:font-size="12pt" fo:font-weight="normal" officeooo:rsid="0058dfdd" style:font-size-asian="12pt" style:font-weight-asian="normal" style:font-size-complex="12pt" style:font-weight-complex="normal"/>
    </style:style>
    <style:style style:name="T145" style:family="text">
      <style:text-properties fo:color="#00a933" loext:opacity="100%" style:font-name="Liberation Serif" fo:font-size="12pt" fo:font-weight="normal" officeooo:rsid="004651e2" style:font-size-asian="12pt" style:font-weight-asian="normal" style:font-size-complex="12pt" style:font-weight-complex="normal"/>
    </style:style>
    <style:style style:name="T146" style:family="text">
      <style:text-properties fo:color="#00a933" loext:opacity="100%" style:font-name="Liberation Serif" fo:font-size="12pt" fo:font-weight="normal" officeooo:rsid="00498075" style:font-size-asian="12pt" style:font-weight-asian="normal" style:font-size-complex="12pt" style:font-weight-complex="normal"/>
    </style:style>
    <style:style style:name="T147" style:family="text">
      <style:text-properties fo:color="#00a933" loext:opacity="100%" style:font-name="Liberation Serif" fo:font-size="12pt" fo:font-weight="normal" officeooo:rsid="00356584" style:font-size-asian="12pt" style:font-weight-asian="normal" style:font-size-complex="12pt" style:font-weight-complex="normal"/>
    </style:style>
    <style:style style:name="T148" style:family="text">
      <style:text-properties fo:color="#00a933" loext:opacity="100%" style:font-name="Liberation Serif" fo:font-size="12pt" fo:font-weight="normal" officeooo:rsid="004c1386" style:font-size-asian="12pt" style:font-weight-asian="normal" style:font-size-complex="12pt" style:font-weight-complex="normal"/>
    </style:style>
    <style:style style:name="T149" style:family="text">
      <style:text-properties fo:font-weight="bold" officeooo:rsid="004eec46" style:font-weight-asian="bold" style:font-weight-complex="bold"/>
    </style:style>
    <style:style style:name="T150" style:family="text">
      <style:text-properties fo:color="#000000" loext:opacity="100%" style:font-name="Liberation Serif" officeooo:rsid="00356584" style:font-size-asian="12pt"/>
    </style:style>
    <style:style style:name="T151" style:family="text">
      <style:text-properties fo:color="#ff0000" loext:opacity="100%" style:font-name="Liberation Serif" fo:font-size="12pt" fo:font-weight="normal" officeooo:rsid="005596e0" style:font-weight-asian="normal" style:font-size-complex="12pt" style:font-weight-complex="normal"/>
    </style:style>
    <style:style style:name="T152" style:family="text">
      <style:text-properties fo:color="#ff0000" loext:opacity="100%" style:font-name="Liberation Serif" fo:font-size="12pt" fo:font-weight="normal" officeooo:rsid="004eb0e7" style:font-weight-asian="normal" style:font-size-complex="12pt" style:font-weight-complex="normal"/>
    </style:style>
    <style:style style:name="T153" style:family="text">
      <style:text-properties fo:color="#00a933" loext:opacity="100%" style:font-name="Liberation Serif" fo:font-size="12pt" fo:font-weight="normal" officeooo:rsid="004eb0e7" style:font-size-asian="12pt" style:font-weight-asian="normal" style:font-size-complex="12pt" style:font-weight-complex="normal"/>
    </style:style>
    <style:style style:name="T154" style:family="text">
      <style:text-properties fo:color="#00a933" loext:opacity="100%" style:font-name="Liberation Serif" fo:font-size="12pt" fo:font-weight="normal" officeooo:rsid="005a9a1b" style:font-size-asian="12pt" style:font-weight-asian="normal" style:font-size-complex="12pt" style:font-weight-complex="normal"/>
    </style:style>
    <style:style style:name="T155" style:family="text">
      <style:text-properties fo:color="#00a933" loext:opacity="100%" style:font-name="Liberation Serif" fo:font-weight="bold" officeooo:rsid="00356584" style:font-size-asian="12pt" style:font-weight-asian="bold" style:font-weight-complex="bold"/>
    </style:style>
    <style:style style:name="T156" style:family="text">
      <style:text-properties officeooo:rsid="005a3047"/>
    </style:style>
    <style:style style:name="T157" style:family="text">
      <style:text-properties fo:font-size="14pt" style:font-size-asian="14pt" style:font-size-complex="14pt"/>
    </style:style>
    <style:style style:name="T158" style:family="text">
      <style:text-properties fo:font-size="14pt" fo:font-weight="normal" style:font-size-asian="14pt" style:font-weight-asian="normal" style:font-size-complex="14pt" style:font-weight-complex="normal"/>
    </style:style>
    <style:style style:name="T159" style:family="text">
      <style:text-properties officeooo:rsid="0019ed71"/>
    </style:style>
    <style:style style:name="T160" style:family="text">
      <style:text-properties fo:font-size="14pt" fo:font-style="normal" style:font-size-asian="14pt" style:font-style-asian="normal" style:font-size-complex="14pt" style:font-style-complex="normal"/>
    </style:style>
    <style:style style:name="T161" style:family="text">
      <style:text-properties fo:font-size="14pt" fo:font-style="normal" officeooo:rsid="006966f9" style:font-size-asian="14pt" style:font-style-asian="normal" style:font-size-complex="14pt" style:font-style-complex="normal"/>
    </style:style>
    <style:style style:name="T162" style:family="text">
      <style:text-properties fo:font-size="18pt" style:font-size-asian="18pt" style:font-size-complex="18pt"/>
    </style:style>
    <style:style style:name="T163" style:family="text">
      <style:text-properties fo:font-size="14pt" fo:font-weight="normal" officeooo:rsid="00468366" style:font-size-asian="14pt" style:font-weight-asian="normal" style:font-size-complex="14pt" style:font-weight-complex="normal"/>
    </style:style>
    <style:style style:name="T164" style:family="text">
      <style:text-properties fo:color="#158466" loext:opacity="100%" fo:font-size="14pt" fo:font-weight="normal" style:font-size-asian="14pt" style:font-weight-asian="normal" style:font-size-complex="14pt" style:font-weight-complex="normal"/>
    </style:style>
    <style:style style:name="T165" style:family="text">
      <style:text-properties fo:color="#158466" loext:opacity="100%" fo:font-size="14pt" fo:font-weight="normal" officeooo:rsid="00468366" style:font-size-asian="14pt" style:font-weight-asian="normal" style:font-size-complex="14pt" style:font-weight-complex="normal"/>
    </style:style>
    <style:style style:name="T166" style:family="text">
      <style:text-properties style:font-name="Liberation Serif" fo:font-size="14pt" fo:font-weight="normal" officeooo:rsid="00468366" style:font-name-asian="NSimSun1" style:font-size-asian="14pt" style:font-weight-asian="normal" style:font-name-complex="Arial" style:font-size-complex="14pt" style:font-weight-complex="normal"/>
    </style:style>
    <style:style style:name="T167" style:family="text">
      <style:text-properties officeooo:rsid="00468366"/>
    </style:style>
    <style:style style:name="T168" style:family="text">
      <style:text-properties fo:font-weight="normal" officeooo:rsid="00468366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mplementação de Regras de Negócio</text:h>
      <text:h text:style-name="P2" text:outline-level="1"/>
      <text:list text:style-name="L1">
        <text:list-item>
          <text:h text:style-name="P3" text:outline-level="1"><text:span text:style-name="Strong_20_Emphasis">Cadastro</text:span> garante que todo o resto tem entidade de referência (cliente, fornecedor, vendedor).</text:h>
        </text:list-item>
        <text:list-item>
          <text:h text:style-name="P3" text:outline-level="1"><text:span text:style-name="Strong_20_Emphasis">Produto/Estoque</text:span> é o elo físico: sem ele, não há vendas consistentes.</text:h>
        </text:list-item>
        <text:list-item>
          <text:h text:style-name="P3" text:outline-level="1"><text:span text:style-name="Strong_20_Emphasis">Vendas</text:span> é o motor da receita: conecta clientes, vendedores e produtos.</text:h>
        </text:list-item>
        <text:list-item>
          <text:h text:style-name="P3" text:outline-level="1"><text:span text:style-name="Strong_20_Emphasis">Financeiro</text:span> fecha o ciclo, garantindo que cada venda e cada obrigação reflitam no caixa e no crediário.</text:h>
        </text:list-item>
      </text:list>
      <text:h text:style-name="P4" text:outline-level="3">Regras de negócio mais críticas para <text:span text:style-name="Strong_20_Emphasis">integrações entre esses módulos:</text:span></text:h>
      <text:list text:style-name="L2">
        <text:list-item>
          <text:h text:style-name="P5" text:outline-level="1"><text:span text:style-name="Strong_20_Emphasis"><text:span text:style-name="T1">Uma</text:span></text:span><text:span text:style-name="Strong_20_Emphasis"> pré-venda → </text:span><text:span text:style-name="Strong_20_Emphasis"><text:span text:style-name="T1">gera</text:span></text:span><text:span text:style-name="Strong_20_Emphasis"> reserva de estoque </text:span><text:span text:style-name="Strong_20_Emphasis"><text:span text:style-name="T1">sem ainda gerar financeiro.</text:span></text:span></text:h>
        </text:list-item>
        <text:list-item>
          <text:h text:style-name="P5" text:outline-level="1"><text:span text:style-name="Strong_20_Emphasis"><text:span text:style-name="T1">Uma</text:span></text:span><text:span text:style-name="Strong_20_Emphasis"> venda → </text:span><text:span text:style-name="Strong_20_Emphasis"><text:span text:style-name="T1">gera</text:span></text:span><text:span text:style-name="Strong_20_Emphasis"> baixa no estoque + crédito </text:span><text:span text:style-name="Strong_20_Emphasis"><text:span text:style-name="T1">a receber no financeiro.</text:span></text:span></text:h>
        </text:list-item>
        <text:list-item>
          <text:h text:style-name="P5" text:outline-level="1">Um <text:span text:style-name="Strong_20_Emphasis">pagamento</text:span> de obrigação financeira → altera situação no <text:span text:style-name="Strong_20_Emphasis">fluxo de caixa</text:span>.</text:h>
        </text:list-item>
      </text:list>
      <text:h text:style-name="P6" text:outline-level="2"><text:span text:style-name="Strong_20_Emphasis">Módulo Cadastro</text:span></text:h>
      <text:h text:style-name="P4" text:outline-level="3">Regras de negócio principais:</text:h>
      <text:list text:style-name="L3">
        <text:list-item>
          <text:p text:style-name="P7"><text:span text:style-name="Strong_20_Emphasis"><text:span text:style-name="T2">Clientes</text:span></text:span><text:span text:style-name="T2"/></text:p>
          <text:list>
            <text:list-item>
              <text:p text:style-name="P8">CPF deve ser único; validação de formato (11 dígitos numéricos).</text:p>
            </text:list-item>
            <text:list-item>
              <text:p text:style-name="P8">E-mail deve ser único e válido; permite comunicação e login no sistema futuro.</text:p>
            </text:list-item>
            <text:list-item>
              <text:p text:style-name="P8">Limite de crediário deve ser positivo ou zero.</text:p>
            </text:list-item>
            <text:list-item>
              <text:p text:style-name="P7"><text:span text:style-name="T2">Status </text:span><text:span text:style-name="Source_20_Text"><text:span text:style-name="T2">ATIVO</text:span></text:span><text:span text:style-name="T2"> define se o cliente pode ser </text:span><text:span text:style-name="T3">selecionados</text:span><text:span text:style-name="T2"> em vendas.</text:span></text:p>
            </text:list-item>
            <text:list-item>
              <text:p text:style-name="P8">Data de criação/atualização deve ser registrada automaticamente.</text:p>
            </text:list-item>
          </text:list>
        </text:list-item>
        <text:list-item>
          <text:p text:style-name="P7"><text:span text:style-name="Strong_20_Emphasis"><text:span text:style-name="T2">Fornecedores</text:span></text:span></text:p>
          <text:list>
            <text:list-item>
              <text:p text:style-name="P8">CNPJ único; validação de formato (14 dígitos).</text:p>
            </text:list-item>
            <text:list-item>
              <text:p text:style-name="P7"><text:span text:style-name="T2">Tipo de pessoa (</text:span><text:span text:style-name="Source_20_Text"><text:span text:style-name="T2">F</text:span></text:span><text:span text:style-name="T2"> ou </text:span><text:span text:style-name="Source_20_Text"><text:span text:style-name="T2">J</text:span></text:span><text:span text:style-name="T2">) obrigatório; validação no formulário.</text:span></text:p>
            </text:list-item>
            <text:list-item>
              <text:p text:style-name="P7"><text:span text:style-name="T2">Status </text:span><text:span text:style-name="Source_20_Text"><text:span text:style-name="T2">ATIVO</text:span></text:span><text:span text:style-name="T2"> define se o fornecedor pode ser utilizado em compras ou estoque.</text:span></text:p>
            </text:list-item>
            <text:list-item>
              <text:p text:style-name="P8">Endereço e contato podem ser opcionais, <text:span text:style-name="T4">com</text:span> campos longos para <text:span text:style-name="T4">+ </text:span>flexibilidade.</text:p>
            </text:list-item>
          </text:list>
        </text:list-item>
        <text:list-item>
          <text:p text:style-name="P7"><text:span text:style-name="Strong_20_Emphasis"><text:span text:style-name="T2">Vendedores</text:span></text:span></text:p>
          <text:list>
            <text:list-item>
              <text:p text:style-name="P9"><text:span text:style-name="T5">Deve estar vinculado a um usuário do sistema (</text:span><text:span text:style-name="Source_20_Text"><text:span text:style-name="T5">USUARIOS.ID</text:span></text:span><text:span text:style-name="T5">).</text:span><text:span text:style-name="Source_20_Text"><text:span text:style-name="T5">VENDEDORES.ID</text:span></text:span><text:span text:style-name="T5"> </text:span><text:span text:style-name="Strong_20_Emphasis"><text:span text:style-name="T6">é ao mesmo tempo</text:span></text:span><text:span text:style-name="T6"> PK </text:span><text:span text:style-name="T5">e FK para </text:span><text:span text:style-name="Source_20_Text"><text:span text:style-name="T5">USUARIOS</text:span></text:span><text:span text:style-name="T5">. (vendedores são usuários), isso obriga ordem de inserção (não será possível inserir vendedor sem usuário existente) </text:span></text:p>
            </text:list-item>
            <text:list-item>
              <text:p text:style-name="P8">Percentual de comissão deve ser positivo ou zero.</text:p>
            </text:list-item>
            <text:list-item>
              <text:p text:style-name="P7"><text:span text:style-name="T2">Status </text:span><text:span text:style-name="Source_20_Text"><text:span text:style-name="T2">ATIVO</text:span></text:span><text:span text:style-name="T2"> define se pode ser usado em vendas.</text:span></text:p>
            </text:list-item>
            <text:list-item>
              <text:p text:style-name="P8">Apelido ou nome para relatórios.</text:p>
            </text:list-item>
          </text:list>
        </text:list-item>
      </text:list>
      <text:h text:style-name="P10" text:outline-level="1"><text:soft-page-break/><text:span text:style-name="Strong_20_Emphasis">Módulo Estoque</text:span></text:h>
      <text:h text:style-name="P11" text:outline-level="3">Regras de negócio principais:</text:h>
      <text:list xml:id="list1232390510" text:style-name="L4">
        <text:list-item>
          <text:p text:style-name="P12"><text:span text:style-name="Strong_20_Emphasis">Produtos</text:span></text:p>
          <text:list>
            <text:list-item>
              <text:p text:style-name="P12"><text:span text:style-name="T2">Cada produto deve ter uma </text:span><text:span text:style-name="Strong_20_Emphasis"><text:span text:style-name="T2">categoria</text:span></text:span><text:span text:style-name="T2"> obrigatória.</text:span></text:p>
            </text:list-item>
            <text:list-item>
              <text:p text:style-name="P13">Fornecedor é opcional, mas caso informado, só deve aceitar fornecedores ativos.</text:p>
            </text:list-item>
            <text:list-item>
              <text:p text:style-name="P12"><text:span text:style-name="Source_20_Text"><text:span text:style-name="T2">VALOR_ATUAL</text:span></text:span><text:span text:style-name="T2"> (preço à vista) deve ser ≥ 0.</text:span></text:p>
            </text:list-item>
            <text:list-item>
              <text:p text:style-name="P12"><text:span text:style-name="T7">Se </text:span><text:span text:style-name="Source_20_Text"><text:span text:style-name="T7">PRECIFICACAO_AUTOMATICA = 'S'</text:span></text:span><text:span text:style-name="T7">, o preço do produto deve ser calculado automaticamente com base na </text:span><text:span text:style-name="Strong_20_Emphasis"><text:span text:style-name="T7">margem da categoria</text:span></text:span><text:span text:style-name="T7"> (</text:span><text:span text:style-name="Source_20_Text"><text:span text:style-name="T7">TAXA_MARGEM_LUCRO</text:span></text:span><text:span text:style-name="T7">) e possíveis regras de desconto ou parcelamento.</text:span></text:p>
            </text:list-item>
            <text:list-item>
              <text:p text:style-name="P12"><text:span text:style-name="T7">Produtos inativos (</text:span><text:span text:style-name="Source_20_Text"><text:span text:style-name="T7">ATIVO = 'N'</text:span></text:span><text:span text:style-name="T7">) não devem aparecer em vendas </text:span><text:span text:style-name="T8">e não devem permitir movimentações </text:span><text:span text:style-name="T9">manuais</text:span><text:span text:style-name="T8"> </text:span><text:span text:style-name="T10">ou automáticas</text:span></text:p>
            </text:list-item>
            <text:list-item>
              <text:p text:style-name="P14"><text:span text:style-name="T11">Ao cadastrar produto → criar registro no estoque automaticamente, </text:span><text:span text:style-name="T12">com saldo inicial zero, para evitar de </text:span>criar o estoque manualmente antes da primeira movimentação. (TRG_PRODUTO_GERA_ESTOQUE)</text:p>
            </text:list-item>
            <text:list-item>
              <text:p text:style-name="P15"><text:span text:style-name="T13">Não é permitido excluir produto se houver</text:span> movimentações <text:span text:style-name="T13">relacionadas, mas será possível desativá-lo.</text:span></text:p>
            </text:list-item>
          </text:list>
        </text:list-item>
        <text:list-item>
          <text:p text:style-name="P12"><text:span text:style-name="Strong_20_Emphasis">Estoque</text:span></text:p>
          <text:list>
            <text:list-item>
              <text:p text:style-name="P12"><text:span text:style-name="T2">Cada produto possui </text:span><text:span text:style-name="Strong_20_Emphasis"><text:span text:style-name="T2">um registro único</text:span></text:span><text:span text:style-name="T2"> em ESTOQUES.</text:span></text:p>
            </text:list-item>
          </text:list>
        </text:list-item>
      </text:list>
      <text:list text:style-name="L5">
        <text:list-item>
          <text:list>
            <text:list-item>
              <text:p text:style-name="P16"><text:span text:style-name="Source_20_Text"><text:span text:style-name="T2">QUANTIDADE_ATUAL</text:span></text:span><text:span text:style-name="T2"> </text:span><text:span text:style-name="T3">deve ser </text:span><text:span text:style-name="T2">≥ 0.</text:span></text:p>
            </text:list-item>
          </text:list>
        </text:list-item>
      </text:list>
      <text:list xml:id="list235914450601407" text:continue-list="list1232390510" text:style-name="L4">
        <text:list-item>
          <text:list>
            <text:list-item>
              <text:p text:style-name="P13">Entradas aumentam o estoque, saídas reduzem.</text:p>
            </text:list-item>
          </text:list>
        </text:list-item>
        <text:list-item>
          <text:p text:style-name="P12"><text:span text:style-name="Strong_20_Emphasis">Movimentações</text:span></text:p>
        </text:list-item>
      </text:list>
      <text:list text:style-name="L6">
        <text:list-item>
          <text:list>
            <text:list-item>
              <text:p text:style-name="P17"><text:span text:style-name="Strong_20_Emphasis">Cadastro prévio de ações e origens: </text:span>As ações (<text:span text:style-name="Source_20_Text">ENTRADA</text:span>, <text:span text:style-name="Source_20_Text">SAÍDA</text:span>, <text:span text:style-name="Source_20_Text">DEVOLUÇÃO</text:span>, <text:span text:style-name="Source_20_Text">AJUSTE</text:span>) e as origens (<text:span text:style-name="Source_20_Text">VENDA</text:span>, <text:span text:style-name="Source_20_Text">COMPRA</text:span>, <text:span text:style-name="Source_20_Text">PRÉ-VENDA</text:span>, <text:span text:style-name="Source_20_Text">DEVOLUÇÃO</text:span>, <text:span text:style-name="Source_20_Text">CORRECAO</text:span>) devem estar previamente cadastradas nas tabelas correspondentes para que as triggers funcionem corretamente.</text:p>
            </text:list-item>
          </text:list>
        </text:list-item>
      </text:list>
      <text:list text:style-name="L7">
        <text:list-item>
          <text:list>
            <text:list-item>
              <text:p text:style-name="P18"><text:span text:style-name="T14">Controle de saldo mínimo:</text:span><text:span text:style-name="T5"> Saída</text:span><text:span text:style-name="T15">s</text:span><text:span text:style-name="T5"> de estoque não pode</text:span><text:span text:style-name="T15">m</text:span><text:span text:style-name="T5"> reduzir </text:span><text:span text:style-name="Source_20_Text"><text:span text:style-name="T5">QUANTIDADE_ATUAL</text:span></text:span><text:span text:style-name="T5"> abaixo de zero. </text:span><text:span text:style-name="T2">Essa validação é garantida pela trigger </text:span><text:span text:style-name="Source_20_Text"><text:span text:style-name="T2">TRG_MOVIMENTACAO_ESTOQUE</text:span></text:span><text:span text:style-name="T2"> </text:span></text:p>
            </text:list-item>
          </text:list>
        </text:list-item>
      </text:list>
      <text:list text:style-name="L8">
        <text:list-item>
          <text:list>
            <text:list-item>
              <text:p text:style-name="P19"><text:span text:style-name="Strong_20_Emphasis"><text:span text:style-name="T2">Atualização automática do estoque: </text:span></text:span><text:span text:style-name="T2">Ao inserir uma movimentação em </text:span><text:span text:style-name="Source_20_Text"><text:span text:style-name="T2">ESTOQUE_MOVIMENTACOES</text:span></text:span><text:span text:style-name="T2">, a trigger </text:span><text:span text:style-name="Source_20_Text"><text:span text:style-name="T2">TRG_MOVIMENTACAO_ESTOQUE</text:span></text:span><text:span text:style-name="T2"> atualiza automaticamente </text:span><text:span text:style-name="Source_20_Text"><text:span text:style-name="T2">ESTOQUES.QUANTIDADE_ATUAL</text:span></text:span><text:span text:style-name="T2">. Entradas aumentam o saldo, saídas reduzem, e se não existir registro de estoque para o produto, ele é criado automatic</text:span><text:span text:style-name="T15">amente quando cadastrar o produto.(TRG_PRODUTO_GERA_ESTOQUE)</text:span></text:p>
            </text:list-item>
          </text:list>
        </text:list-item>
      </text:list>
      <text:list text:style-name="L9">
        <text:list-item>
          <text:list>
            <text:list-item>
              <text:p text:style-name="P20"><text:span text:style-name="T14">Movimentaçõ</text:span><text:span text:style-name="T16">es para produtos inativos são bloqueadas</text:span><text:span text:style-name="T17"> pela trigger TRG_MOVIMENTACAO_ESTOQUE</text:span></text:p>
            </text:list-item>
          </text:list>
        </text:list-item>
      </text:list>
      <text:list text:style-name="L10">
        <text:list-item>
          <text:list>
            <text:list-item>
              <text:p text:style-name="P21"><text:soft-page-break/><text:span text:style-name="T14">Movimentações manuais: </text:span><text:span text:style-name="T6">Ajustes manuais </text:span><text:span text:style-name="T18">são possíveis </text:span><text:span text:style-name="T19">mas</text:span><text:span text:style-name="T6"> dev</text:span><text:span text:style-name="T5">em sempre gerar registro em </text:span><text:span text:style-name="Source_20_Text"><text:span text:style-name="T5">ESTOQUE_MOVIMENTACOES</text:span></text:span><text:span text:style-name="T5"> para auditoria, garantindo rastreabilidade. </text:span><text:span text:style-name="T20">Portanto, a tabela </text:span><text:span text:style-name="Source_20_Text"><text:span text:style-name="T20">ESTOQUE_MOVIMENTACOES</text:span></text:span><text:span text:style-name="T20"> deve ser </text:span><text:span text:style-name="Strong_20_Emphasis"><text:span text:style-name="T20">imutável</text:span></text:span><text:span text:style-name="T20"> (só permitir </text:span><text:span text:style-name="Source_20_Text"><text:span text:style-name="T20">INSERT</text:span></text:span><text:span text:style-name="T20"> e leitura) </text:span></text:p>
            </text:list-item>
            <text:list-item>
              <text:p text:style-name="P22">Formulário de ajuste <text:span text:style-name="T21">do estoque</text:span>: </text:p>
              <text:list>
                <text:list-item>
                  <text:p text:style-name="P23"><text:span text:style-name="T22">modo inserção habilitado para permitir</text:span> inserir manualmente movimentações de estoque, porém com os campos já definidos: ORIGEM = 5 <text:span text:style-name="T22">(correção) e AÇÃO = 4 (ajuste)</text:span> </text:p>
                </text:list-item>
                <text:list-item>
                  <text:p text:style-name="P24">modo atualização <text:span text:style-name="T23">e exclusão </text:span>desabilitado</text:p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p text:style-name="P25"><text:span text:style-name="Strong_20_Emphasis"><text:span text:style-name="T2">Registro de origem da transação: </text:span></text:span><text:span text:style-name="T2">Movimentações automáticas geradas por </text:span><text:span text:style-name="T7">vendas</text:span><text:span text:style-name="T2"> ou pré-vendas devem registrar </text:span><text:span text:style-name="Source_20_Text"><text:span text:style-name="T2">ID_TRANSACAO_ORIGEM</text:span></text:span><text:span text:style-name="T2"> com o ID da </text:span><text:span text:style-name="T7">venda</text:span><text:span text:style-name="T2"> ou pré-venda correspondente.</text:span></text:p>
            </text:list-item>
          </text:list>
        </text:list-item>
      </text:list>
      <text:list text:continue-list="list235914450601407" text:style-name="L4">
        <text:list-item>
          <text:list>
            <text:list-item>
              <text:p text:style-name="P26"><text:span text:style-name="Strong_20_Emphasis"><text:span text:style-name="T5">Pré-venda: </text:span></text:span><text:span text:style-name="T5">Ao cadastrar um item de pré-venda com </text:span><text:span text:style-name="Source_20_Text"><text:span text:style-name="T5">RESERVADO = 'S'</text:span></text:span><text:span text:style-name="T5">, é registrada um</text:span><text:span text:style-name="T6">a </text:span><text:span text:style-name="Strong_20_Emphasis"><text:span text:style-name="T6">saída automática</text:span></text:span><text:span text:style-name="T6"> </text:span><text:span text:style-name="T5">no estoque para reservar a quantidade. Alterações em </text:span><text:span text:style-name="Source_20_Text"><text:span text:style-name="T5">RESERVADO</text:span></text:span><text:span text:style-name="T5"> (</text:span><text:span text:style-name="Source_20_Text"><text:span text:style-name="T5">N → S</text:span></text:span><text:span text:style-name="T5"> ou </text:span><text:span text:style-name="Source_20_Text"><text:span text:style-name="T5">S → N</text:span></text:span><text:span text:style-name="T5">) geram automaticamente saídas ou entradas no estoque para refletir a reserva ou devolução.</text:span></text:p>
            </text:list-item>
          </text:list>
        </text:list-item>
        <text:list-item>
          <text:p text:style-name="P12"><text:span text:style-name="Strong_20_Emphasis">Etiquetas e código de barras</text:span></text:p>
          <text:list>
            <text:list-item>
              <text:p text:style-name="P12"><text:span text:style-name="T2">Cada produto pode ter código de barras único (</text:span><text:span text:style-name="Source_20_Text"><text:span text:style-name="T2">CODIGO_BARRAS</text:span></text:span><text:span text:style-name="T2">).</text:span></text:p>
            </text:list-item>
            <text:list-item>
              <text:p text:style-name="P12">Impressão de etiquetas deve buscar dados do produto e quantidade atual em estoque.</text:p>
            </text:list-item>
            <text:list-item>
              <text:p text:style-name="P12">Produtos inativos não devem ter etiquetas impressas em operações de venda.</text:p>
            </text:list-item>
          </text:list>
        </text:list-item>
      </text:list>
      <text:h text:style-name="P11" text:outline-level="3"/>
      <text:h text:style-name="P11" text:outline-level="3">Resumo do comportamento <text:span text:style-name="T24">(após implementação de triggers)</text:span></text:h>
      <text:list text:style-name="L12">
        <text:list-item>
          <text:p text:style-name="P27">Produto cadastrado → cria registro em <text:span text:style-name="Source_20_Text">ESTOQUES</text:span> automaticamente.</text:p>
        </text:list-item>
        <text:list-item>
          <text:p text:style-name="P27">Entrada de estoque → saldo atualizado automaticamente.</text:p>
        </text:list-item>
        <text:list-item>
          <text:p text:style-name="P27">Saída de estoque válida → saldo atualizado.</text:p>
        </text:list-item>
        <text:list-item>
          <text:p text:style-name="P27">Produto inativado → movimentações futuras são bloqueadas.</text:p>
        </text:list-item>
      </text:list>
      <text:h text:style-name="P11" text:outline-level="3">Observações de implementação no Scriptcase:</text:h>
      <text:list text:style-name="L13">
        <text:list-item>
          <text:p text:style-name="P28"><text:span text:style-name="Strong_20_Emphasis">Validações</text:span>:</text:p>
          <text:list>
            <text:list-item>
              <text:p text:style-name="P28"><text:span text:style-name="Source_20_Text">QUANTIDADE</text:span> não negativa → <text:span text:style-name="Source_20_Text">onValidate</text:span> em forms de movimentação.</text:p>
            </text:list-item>
            <text:list-item>
              <text:p text:style-name="P28">Produto ativo → SQL do lookup em grids/forms.</text:p>
            </text:list-item>
          </text:list>
        </text:list-item>
        <text:list-item>
          <text:p text:style-name="P28"><text:span text:style-name="Strong_20_Emphasis">Cálculo automático de preço</text:span>:</text:p>
          <text:list>
            <text:list-item>
              <text:p text:style-name="P28">Evento <text:span text:style-name="Source_20_Text">onLoad</text:span> ou <text:span text:style-name="Source_20_Text">onBeforeInsert/Update</text:span> para aplicar <text:span text:style-name="Source_20_Text">PRECIFICACAO_AUTOMATICA</text:span>.</text:p>
            </text:list-item>
          </text:list>
        </text:list-item>
      </text:list>
      <text:h text:style-name="P29" text:outline-level="1"><text:span text:style-name="Strong_20_Emphasis"/></text:h>
      <text:h text:style-name="P30" text:outline-level="1"><text:span text:style-name="Strong_20_Emphasis">Módulo Vendas</text:span></text:h>
      <text:p text:style-name="P31"><text:span text:style-name="Strong_20_Emphasis"><text:span text:style-name="T25">Suporta cenários multi-estoque (</text:span></text:span><text:span text:style-name="Strong_20_Emphasis"><text:span text:style-name="T26">outras </text:span></text:span><text:span text:style-name="Strong_20_Emphasis"><text:span text:style-name="T25">lojas </text:span></text:span><text:span text:style-name="Strong_20_Emphasis"><text:span text:style-name="T26">ou </text:span></text:span><text:span text:style-name="Strong_20_Emphasis"><text:span text:style-name="T25">depósitos) </text:span></text:span><text:span text:style-name="Strong_20_Emphasis"><text:span text:style-name="T27">pois a movimentação não está relacionada diretamente </text:span></text:span><text:span text:style-name="Strong_20_Emphasis"><text:span text:style-name="T28">a tabela ESTOQUE</text:span></text:span><text:span text:style-name="Strong_20_Emphasis"><text:span text:style-name="T26">S</text:span></text:span><text:span text:style-name="Strong_20_Emphasis"><text:span text:style-name="T28"> </text:span></text:span><text:span text:style-name="Strong_20_Emphasis"><text:span text:style-name="T27">mas sim </text:span></text:span><text:span text:style-name="Strong_20_Emphasis"><text:span text:style-name="T28">a </text:span></text:span><text:span text:style-name="Strong_20_Emphasis"><text:span text:style-name="T26">tabela </text:span></text:span><text:span text:style-name="Strong_20_Emphasis"><text:span text:style-name="T28">PRODUTO</text:span></text:span><text:span text:style-name="Strong_20_Emphasis"><text:span text:style-name="T26">S</text:span></text:span><text:span text:style-name="Strong_20_Emphasis"><text:span text:style-name="T27">. Porém, a TRG_MOVIMENTACAO_ESTOQUE </text:span></text:span><text:span text:style-name="Strong_20_Emphasis"><text:span text:style-name="T29">contém validação que impede m</text:span></text:span><text:span text:style-name="Strong_20_Emphasis"><text:span text:style-name="T27">ovimentação se </text:span></text:span><text:span text:style-name="Strong_20_Emphasis"><text:span text:style-name="T26">saldo no </text:span></text:span><text:span text:style-name="Strong_20_Emphasis"><text:span text:style-name="T27">estoque </text:span></text:span><text:span text:style-name="Strong_20_Emphasis"><text:span text:style-name="T26">não for positivo </text:span></text:span><text:span text:style-name="Strong_20_Emphasis"><text:span text:style-name="T28">(comentar </text:span></text:span><text:span text:style-name="Strong_20_Emphasis"><text:span text:style-name="T26">essa </text:span></text:span><text:span text:style-name="Strong_20_Emphasis"><text:span text:style-name="T28">validação se for necessário </text:span></text:span><text:span text:style-name="Strong_20_Emphasis"><text:span text:style-name="T30">mudar a RN</text:span></text:span><text:span text:style-name="Strong_20_Emphasis"><text:span text:style-name="T28">)</text:span></text:span><text:span text:style-name="Strong_20_Emphasis"><text:span text:style-name="T27">. </text:span></text:span></text:p>
      <text:h text:style-name="P11" text:outline-level="3">Regras de negócio principais:</text:h>
      <text:list xml:id="list3614695514" text:style-name="L14">
        <text:list-item>
          <text:p text:style-name="P32"><text:span text:style-name="Strong_20_Emphasis">Pré-venda</text:span></text:p>
        </text:list-item>
      </text:list>
      <text:list text:style-name="L15">
        <text:list-item>
          <text:list>
            <text:list-item>
              <text:p text:style-name="P33"><text:span text:style-name="T31">C</text:span>liente e vendedor obrigatórios.</text:p>
            </text:list-item>
            <text:list-item>
              <text:p text:style-name="P33">Data de reserva e data de devolução são registradas para controle de validade da reserva:</text:p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p text:style-name="P34"><text:span text:style-name="Strong_20_Emphasis"><text:span text:style-name="Source_20_Text"><text:span text:style-name="T32">PRE_VENDA.</text:span></text:span></text:span><text:span text:style-name="Strong_20_Emphasis"><text:span text:style-name="Source_20_Text"><text:span text:style-name="T25">DATA_EXPIRACAO</text:span></text:span></text:span><text:span text:style-name="T25"> = prazo de validade global da pré-venda. </text:span><text:span text:style-name="T33">Quando</text:span><text:span text:style-name="T25"> pré-venda é </text:span><text:span text:style-name="Strong_20_Emphasis"><text:span text:style-name="T25">cancelada</text:span></text:span><text:span text:style-name="T25"> ou </text:span><text:span text:style-name="Strong_20_Emphasis"><text:span text:style-name="T25">parcialmente devolvida, </text:span></text:span><text:span text:style-name="Strong_20_Emphasis"><text:span text:style-name="T33">recebe data atual.</text:span></text:span></text:p>
                </text:list-item>
              </text:list>
            </text:list-item>
          </text:list>
        </text:list-item>
      </text:list>
      <text:list text:style-name="L17">
        <text:list-item>
          <text:list>
            <text:list-item>
              <text:list>
                <text:list-item>
                  <text:p text:style-name="P35"><text:span text:style-name="Strong_20_Emphasis"><text:span text:style-name="Source_20_Text"><text:span text:style-name="T32">PRE_VENDA_ITENS.</text:span></text:span></text:span><text:span text:style-name="Strong_20_Emphasis"><text:span text:style-name="Source_20_Text"><text:span text:style-name="T25">DATA_RESERVA</text:span></text:span></text:span><text:span text:style-name="T25"> = quando o item foi reservado (gerando saída de estoque).</text:span></text:p>
                </text:list-item>
                <text:list-item>
                  <text:p text:style-name="P35"><text:span text:style-name="Source_20_Text"><text:span text:style-name="T32">PRE_VENDA_ITENS.</text:span></text:span><text:span text:style-name="Strong_20_Emphasis"><text:span text:style-name="Source_20_Text"><text:span text:style-name="T25">DATA_DEVOLUCAO</text:span></text:span></text:span><text:span text:style-name="T25"> = quando o item foi devolvido/liberado (última devolução).</text:span></text:p>
                </text:list-item>
              </text:list>
            </text:list-item>
          </text:list>
        </text:list-item>
      </text:list>
      <text:list xml:id="list235914215016250" text:continue-list="list3614695514" text:style-name="L14">
        <text:list-item>
          <text:list>
            <text:list-item>
              <text:p text:style-name="P36"><text:span text:style-name="Source_20_Text"><text:span text:style-name="T5">FK_SITUACAO </text:span></text:span><text:span text:style-name="Source_20_Text"><text:span text:style-name="T34">é obrigatória</text:span></text:span><text:span text:style-name="T5">.</text:span></text:p>
            </text:list-item>
            <text:list-item>
              <text:p text:style-name="P36"><text:span text:style-name="T35">I</text:span><text:span text:style-name="Strong_20_Emphasis"><text:span text:style-name="T35">mpedir qualquer tipo de atualização</text:span></text:span><text:span text:style-name="T35"> quando a situação for cancelada.</text:span></text:p>
            </text:list-item>
            <text:list-item>
              <text:p text:style-name="P36"><text:span text:style-name="T36">A situação </text:span><text:span text:style-name="Source_20_Text"><text:span text:style-name="T36">DEVOLVIDA PARCIALMENTE</text:span></text:span><text:span text:style-name="T36"> significa que</text:span><text:span text:style-name="T2"> alguns itens já voltaram ao estoque (</text:span><text:span text:style-name="Source_20_Text"><text:span text:style-name="T2">RESERVADO = 'N'</text:span></text:span><text:span text:style-name="T2">), mas outros ainda estão em posse do cliente (</text:span><text:span text:style-name="Source_20_Text"><text:span text:style-name="T2">RESERVADO = 'S'</text:span></text:span><text:span text:style-name="T2">). <text:line-break/>Enquanto tiver itens em posse do cliente, a pré-venda ainda está “</text:span><text:span text:style-name="T37">em andamento</text:span><text:span text:style-name="T2">” (não finalizada). <text:line-break/>Só pode ir para </text:span><text:span text:style-name="Source_20_Text"><text:span text:style-name="T2">FINALIZADA</text:span></text:span><text:span text:style-name="T2"> quando o processo terminar (cliente </text:span><text:span text:style-name="T38">fica com os itens que gostou e a venda convertida de pré-venda é confirmada</text:span><text:span text:style-name="T2">). <text:line-break/></text:span><text:span text:style-name="Strong_20_Emphasis"><text:span text:style-name="T25">Controle de status</text:span></text:span><text:span text:style-name="T25">:</text:span><text:span text:style-name="T2"> mapa de transições permitid</text:span><text:span text:style-name="T39">as</text:span><text:span text:style-name="T2">:</text:span></text:p>
              <text:list>
                <text:list-item>
                  <text:p text:style-name="P37">RESERVADA → FINALIZADA | CANCELADA | DEVOLVIDA PARCIALMENTE</text:p>
                </text:list-item>
                <text:list-item>
                  <text:p text:style-name="P37">CANCELADA → (<text:span text:style-name="T40">imutável, </text:span>não pode sair mais daqui)</text:p>
                </text:list-item>
              </text:list>
            </text:list-item>
          </text:list>
        </text:list-item>
      </text:list>
      <text:list text:style-name="L18">
        <text:list-item>
          <text:list>
            <text:list-item>
              <text:list>
                <text:list-item>
                  <text:p text:style-name="P38">FINALIZADA → (<text:span text:style-name="T40">imutável, </text:span>não pode sair mais daqui)</text:p>
                </text:list-item>
              </text:list>
            </text:list-item>
          </text:list>
        </text:list-item>
      </text:list>
      <text:list xml:id="list235914823330000" text:continue-list="list235914215016250" text:style-name="L14">
        <text:list-item>
          <text:list>
            <text:list-item>
              <text:list>
                <text:list-item>
                  <text:p text:style-name="P37">DEVOLVIDA PARCIALMENTE → FINALIZADA (se o cliente levou parte)</text:p>
                </text:list-item>
              </text:list>
            </text:list-item>
          </text:list>
        </text:list-item>
      </text:list>
      <text:list text:style-name="L19">
        <text:list-item>
          <text:list>
            <text:list-item>
              <text:p text:style-name="P39"><text:span text:style-name="Source_20_Text"><text:span text:style-name="T2">MOTIVO_LIBERACAO</text:span></text:span><text:span text:style-name="T2"> </text:span><text:span text:style-name="T34">é obrigatório quando </text:span><text:span text:style-name="T41">PRE_</text:span><text:span text:style-name="Source_20_Text"><text:span text:style-name="T42">VENDA_ITENS.</text:span></text:span><text:span text:style-name="Source_20_Text"><text:span text:style-name="T43">RESERVADO </text:span></text:span><text:span text:style-name="Source_20_Text"><text:span text:style-name="T42">= ‘</text:span></text:span><text:span text:style-name="Source_20_Text"><text:span text:style-name="T44">N</text:span></text:span><text:span text:style-name="Source_20_Text"><text:span text:style-name="T42">’</text:span></text:span></text:p>
            </text:list-item>
          </text:list>
        </text:list-item>
      </text:list>
      <text:list xml:id="list856991174" text:style-name="L20">
        <text:list-item>
          <text:list>
            <text:list-item>
              <text:p text:style-name="P40"><text:span text:style-name="T45">Cancelamento</text:span><text:span text:style-name="T35"> da pré-venda: </text:span><text:span text:style-name="T2">Se </text:span><text:span text:style-name="Source_20_Text"><text:span text:style-name="T2">FK_SITUACAO</text:span></text:span><text:span text:style-name="T2"> mudar de RESERVADA (1) → CANCELADA (3) ou DEVOLVIDA PARCIALMENTE (4), </text:span><text:span text:style-name="T46">então </text:span><text:span text:style-name="T2">precisa devolver estoque (entrada automática), mas atenção: se alguns itens já estavam </text:span><text:span text:style-name="Source_20_Text"><text:span text:style-name="T2">RESERVADO = 'N';</text:span></text:span><text:span text:style-name="T2"> só deve devolver os </text:span><text:span text:style-name="T36">itens </text:span><text:span text:style-name="T2">que </text:span><text:span text:style-name="T36">ainda </text:span><text:span text:style-name="T2">estavam reservados (</text:span><text:span text:style-name="Source_20_Text"><text:span text:style-name="T2">RESERVADO = 'S'</text:span></text:span><text:span text:style-name="T2">). A trigger TRG_PRE_VENDA_CANCELADA_DEVOLVIDA percorre os itens da pré-venda e lança devoluções condicionais.</text:span></text:p>
            </text:list-item>
          </text:list>
        </text:list-item>
      </text:list>
      <text:list text:style-name="L21">
        <text:list-item>
          <text:list>
            <text:list-item>
              <text:p text:style-name="P41"><text:soft-page-break/><text:span text:style-name="Strong_20_Emphasis"><text:span text:style-name="T25">Exclusão de pré-venda é proibida. Se necessário, aplica-se situação CANCELADA.</text:span></text:span></text:p>
            </text:list-item>
          </text:list>
        </text:list-item>
      </text:list>
      <text:list text:continue-list="list856991174" text:style-name="L20">
        <text:list-item>
          <text:list>
            <text:list-item>
              <text:p text:style-name="P42"><text:span text:style-name="Strong_20_Emphasis"><text:span text:style-name="T25">PRE_</text:span></text:span><text:span text:style-name="Source_20_Text"><text:span text:style-name="T25">VENDA_ITENS.RESERVADO impacta, dependendo de seu valor </text:span></text:span><text:span text:style-name="Source_20_Text"><text:span text:style-name="T47">S ou N</text:span></text:span><text:span text:style-name="Source_20_Text"><text:span text:style-name="T25">, </text:span></text:span><text:span text:style-name="Strong_20_Emphasis"><text:span text:style-name="T25">no saldo do estoque</text:span></text:span></text:p>
            </text:list-item>
            <text:list-item>
              <text:p text:style-name="P42"><text:span text:style-name="Strong_20_Emphasis"><text:span text:style-name="T48">impedir</text:span></text:span><text:span text:style-name="Strong_20_Emphasis"><text:span text:style-name="T25"> </text:span></text:span><text:span text:style-name="Strong_20_Emphasis"><text:span text:style-name="T49">pré-</text:span></text:span><text:span text:style-name="Strong_20_Emphasis"><text:span text:style-name="T25">venda sem itens </text:span></text:span><text:span text:style-name="Strong_20_Emphasis"><text:span text:style-name="T50">(</text:span></text:span><text:span text:style-name="Strong_20_Emphasis"><text:span text:style-name="T30">implementado somente na </text:span></text:span><text:span text:style-name="Strong_20_Emphasis"><text:span text:style-name="T50">camada </text:span></text:span><text:span text:style-name="Strong_20_Emphasis"><text:span text:style-name="T30">de </text:span></text:span><text:span text:style-name="Strong_20_Emphasis"><text:span text:style-name="T50">aplicação)</text:span></text:span></text:p>
            </text:list-item>
            <text:list-item>
              <text:p text:style-name="P43"><text:span text:style-name="Strong_20_Emphasis"><text:span text:style-name="T51">impedir quantidade de itens reservados superior ao saldo atual do estoque</text:span></text:span></text:p>
            </text:list-item>
            <text:list-item>
              <text:p text:style-name="P44"><text:span text:style-name="Strong_20_Emphasis"><text:span text:style-name="T25">se o cliente desejar um produto que, no momento, está sem estoque; então registrar pre-venda com PRE_VENDA_ITENS.RESERVADO = N para que, no futuro, quando chegar o produto ao estoque, entregar ao cliente e atualizar reservado = S </text:span></text:span></text:p>
            </text:list-item>
          </text:list>
        </text:list-item>
      </text:list>
      <text:p text:style-name="P45">Fluxo Pré-venda:</text:p>
      <text:list text:style-name="L22">
        <text:list-item>
          <text:list>
            <text:list-item>
              <text:list>
                <text:list-item>
                  <text:p text:style-name="P46"><text:span text:style-name="Strong_20_Emphasis"><text:span text:style-name="T52">Pré-venda reserva → Saída do estoque</text:span></text:span></text:p>
                </text:list-item>
                <text:list-item>
                  <text:p text:style-name="P46"><text:span text:style-name="Strong_20_Emphasis"><text:span text:style-name="T52">Cancelamento da reserva → Devolução automática </text:span></text:span><text:span text:style-name="Strong_20_Emphasis"><text:span text:style-name="T53">ao estoque</text:span></text:span></text:p>
                </text:list-item>
                <text:list-item>
                  <text:p text:style-name="P46"><text:span text:style-name="Strong_20_Emphasis"><text:span text:style-name="T54">Conversão em venda → só financeiro, estoque já foi tratado</text:span></text:span></text:p>
                </text:list-item>
              </text:list>
            </text:list-item>
          </text:list>
        </text:list-item>
      </text:list>
      <text:p text:style-name="P47"/>
      <text:h text:style-name="P48" text:outline-level="3"><text:soft-page-break/><text:span text:style-name="T55">Mapa de estados — PRE_VENDA_ITENS x ESTOQUE</text:span></text:h>
      <text:list xml:id="list2038829934" text:style-name="L23">
        <text:list-item>
          <text:h text:style-name="P49" text:outline-level="3"><text:span text:style-name="Strong_20_Emphasis"><text:span text:style-name="T56">Criação de item (</text:span></text:span><text:span text:style-name="Strong_20_Emphasis"><text:span text:style-name="Source_20_Text"><text:span text:style-name="T56">INSERT</text:span></text:span></text:span><text:span text:style-name="Strong_20_Emphasis"><text:span text:style-name="T56">)</text:span></text:span></text:h>
        </text:list-item>
      </text:list>
      <text:list text:style-name="L24">
        <text:list-item>
          <text:list>
            <text:list-item>
              <text:h text:style-name="P50" text:outline-level="3"><text:span text:style-name="Source_20_Text"><text:span text:style-name="T56">RESERVADO = 'S'</text:span></text:span><text:span text:style-name="T56"> → Saída imediata do estoque (origem = PRÉ-VENDA).</text:span></text:h>
            </text:list-item>
            <text:list-item>
              <text:h text:style-name="P50" text:outline-level="3"><text:span text:style-name="Source_20_Text"><text:span text:style-name="T56">RESERVADO = 'N'</text:span></text:span><text:span text:style-name="T56"> → Nenhum impacto no estoque.</text:span></text:h>
            </text:list-item>
          </text:list>
        </text:list-item>
      </text:list>
      <text:list xml:id="list235913763560581" text:continue-list="list2038829934" text:style-name="L23">
        <text:list-item>
          <text:h text:style-name="P49" text:outline-level="3"><text:span text:style-name="Strong_20_Emphasis"><text:span text:style-name="T56">Alteração de item (</text:span></text:span><text:span text:style-name="Strong_20_Emphasis"><text:span text:style-name="Source_20_Text"><text:span text:style-name="T56">UPDATE</text:span></text:span></text:span><text:span text:style-name="Strong_20_Emphasis"><text:span text:style-name="T56">)</text:span></text:span></text:h>
        </text:list-item>
      </text:list>
      <text:list text:style-name="L25">
        <text:list-item>
          <text:list>
            <text:list-item>
              <text:h text:style-name="P51" text:outline-level="3"><text:span text:style-name="Source_20_Text"><text:span text:style-name="T56">N → S</text:span></text:span><text:span text:style-name="T56"> → Saída do estoque.</text:span></text:h>
            </text:list-item>
            <text:list-item>
              <text:h text:style-name="P51" text:outline-level="3"><text:span text:style-name="Source_20_Text"><text:span text:style-name="T56">S → N</text:span></text:span><text:span text:style-name="T56"> →Entrada no estoque (devolução).</text:span></text:h>
            </text:list-item>
            <text:list-item>
              <text:h text:style-name="P51" text:outline-level="3"><text:span text:style-name="T56">Quantidade alterada e </text:span><text:span text:style-name="Source_20_Text"><text:span text:style-name="T56">RESERVADO = 'S'</text:span></text:span><text:span text:style-name="T56">, é preciso </text:span><text:span text:style-name="Strong_20_Emphasis"><text:span text:style-name="T56">ajustar a diferença</text:span></text:span><text:span text:style-name="T56"> no estoque.</text:span></text:h>
              <text:list>
                <text:list-item>
                  <text:list>
                    <text:list-item>
                      <text:h text:style-name="P51" text:outline-level="3"><text:span text:style-name="T56">Ex.: </text:span><text:span text:style-name="Source_20_Text"><text:span text:style-name="T56">QTD 2 → 3</text:span></text:span><text:span text:style-name="T56"> → </text:span><text:span text:style-name="T57">movimentação de </text:span><text:span text:style-name="T56">saída </text:span><text:span text:style-name="T57">no estoque </text:span><text:span text:style-name="T56">de </text:span><text:span text:style-name="Strong_20_Emphasis"><text:span text:style-name="T56">+1</text:span></text:span><text:span text:style-name="T56">.</text:span></text:h>
                    </text:list-item>
                    <text:list-item>
                      <text:h text:style-name="P51" text:outline-level="3"><text:span text:style-name="T56">Ex.: </text:span><text:span text:style-name="Source_20_Text"><text:span text:style-name="T56">QTD 3 → 1</text:span></text:span><text:span text:style-name="T56"> → </text:span><text:span text:style-name="T57">movimentação de </text:span><text:span text:style-name="T56">entrada </text:span><text:span text:style-name="T57">no estoque </text:span><text:span text:style-name="T56">de </text:span><text:span text:style-name="Strong_20_Emphasis"><text:span text:style-name="T56">+2</text:span></text:span><text:span text:style-name="T56">.</text:span></text:h>
                    </text:list-item>
                  </text:list>
                </text:list-item>
              </text:list>
              <text:h text:style-name="P52" text:outline-level="3">Demais mudanças (ex.: preço, observações) → sem efeito no estoque.</text:h>
            </text:list-item>
          </text:list>
        </text:list-item>
      </text:list>
      <text:list xml:id="list235914121024811" text:continue-list="list235913763560581" text:style-name="L23">
        <text:list-item>
          <text:h text:style-name="P49" text:outline-level="3"><text:span text:style-name="Strong_20_Emphasis"><text:span text:style-name="T56">Exclusão de item (</text:span></text:span><text:span text:style-name="Strong_20_Emphasis"><text:span text:style-name="Source_20_Text"><text:span text:style-name="T56">DELETE</text:span></text:span></text:span><text:span text:style-name="Strong_20_Emphasis"><text:span text:style-name="T56">)</text:span></text:span></text:h>
        </text:list-item>
      </text:list>
      <text:list text:style-name="L26">
        <text:list-item>
          <text:list>
            <text:list-item>
              <text:h text:style-name="P53" text:outline-level="3"><text:span text:style-name="Source_20_Text"><text:span text:style-name="T56">RESERVADO = 'S'</text:span></text:span><text:span text:style-name="T56"> → Entrada no estoque (estorno).</text:span></text:h>
            </text:list-item>
            <text:list-item>
              <text:h text:style-name="P53" text:outline-level="3"><text:span text:style-name="Source_20_Text"><text:span text:style-name="T56">RESERVADO = 'N'</text:span></text:span><text:span text:style-name="T56"> → Nenhum impacto.</text:span></text:h>
            </text:list-item>
          </text:list>
        </text:list-item>
      </text:list>
      <text:list text:continue-list="list235914121024811" text:style-name="L23">
        <text:list-item>
          <text:h text:style-name="P54" text:outline-level="3"><text:span text:style-name="Strong_20_Emphasis"><text:span text:style-name="T56">Mudança de situação da pré-venda (</text:span></text:span><text:span text:style-name="Strong_20_Emphasis"><text:span text:style-name="Source_20_Text"><text:span text:style-name="T56">UPDATE PRE_VENDAS.FK_SITUACAO</text:span></text:span></text:span><text:span text:style-name="Strong_20_Emphasis"><text:span text:style-name="T56">)</text:span></text:span></text:h>
        </text:list-item>
      </text:list>
      <text:list text:style-name="L27">
        <text:list-item>
          <text:list>
            <text:list-item>
              <text:h text:style-name="P55" text:outline-level="3"><text:span text:style-name="Source_20_Text"><text:span text:style-name="T56">RESERVADA → CANCELADA</text:span></text:span><text:span text:style-name="T56"> → devolve ao estoque todos os itens ainda </text:span><text:span text:style-name="Source_20_Text"><text:span text:style-name="T56">RESERVADO = 'S'</text:span></text:span><text:span text:style-name="T56">.</text:span></text:h>
            </text:list-item>
            <text:list-item>
              <text:h text:style-name="P55" text:outline-level="3"><text:span text:style-name="Source_20_Text"><text:span text:style-name="T56">RESERVADA → DEVOLVIDA PARCIALMENTE</text:span></text:span><text:span text:style-name="T56"> → devolve ao estoque todos os itens ainda </text:span><text:span text:style-name="Source_20_Text"><text:span text:style-name="T56">RESERVADO = 'S'</text:span></text:span><text:span text:style-name="T56">.</text:span></text:h>
            </text:list-item>
            <text:list-item>
              <text:h text:style-name="P55" text:outline-level="3"><text:span text:style-name="Source_20_Text"><text:span text:style-name="T56">RESERVADA → FINALIZADA</text:span></text:span><text:span text:style-name="T56"> → </text:span><text:span text:style-name="T58">não gera movimentação, porque os itens já saíram do estoque na reserva.</text:span></text:h>
            </text:list-item>
          </text:list>
        </text:list-item>
      </text:list>
      <text:h text:style-name="P56" text:outline-level="3">Triggers</text:h>
      <text:p text:style-name="P57">As triggers de pré-venda se preocupa<text:span text:style-name="T1">m </text:span><text:span text:style-name="Strong_20_Emphasis"><text:span text:style-name="T1">somente com a lógica de negócios de reservas, </text:span></text:span><text:span text:style-name="Strong_20_Emphasis"><text:span text:style-name="T59">devoluções</text:span></text:span><text:span text:style-name="Strong_20_Emphasis"><text:span text:style-name="T1"> e ajustes de quantidade.</text:span></text:span><text:line-break/><text:span text:style-name="T60">Já a </text:span>trigger de estoque garante integridade física do <text:span text:style-name="T59">saldo</text:span>.</text:p>
      <text:list xml:id="list235914136731990" text:continue-list="list235914823330000" text:style-name="L14">
        <text:list-item>
          <text:p text:style-name="P58"><text:span text:style-name="Strong_20_Emphasis"><text:span text:style-name="T61">Venda efetiva</text:span></text:span></text:p>
        </text:list-item>
      </text:list>
      <text:list text:style-name="L28">
        <text:list-item>
          <text:list>
            <text:list-item>
              <text:p text:style-name="P59"><text:span text:style-name="Strong_20_Emphasis"><text:span text:style-name="T62">Campos</text:span></text:span><text:span text:style-name="Strong_20_Emphasis"><text:span text:style-name="T43"> </text:span></text:span><text:span text:style-name="Strong_20_Emphasis"><text:span text:style-name="T63">obrigatórios</text:span></text:span><text:span text:style-name="Strong_20_Emphasis"><text:span text:style-name="T62">:</text:span></text:span><text:span text:style-name="Strong_20_Emphasis"><text:span text:style-name="T43"> cliente, vendedor, origem situação </text:span></text:span><text:span text:style-name="Strong_20_Emphasis"><text:span text:style-name="T62">e</text:span></text:span><text:span text:style-name="Strong_20_Emphasis"><text:span text:style-name="T43"> </text:span></text:span><text:span text:style-name="Strong_20_Emphasis"><text:span text:style-name="T62">valor total</text:span></text:span><text:span text:style-name="Strong_20_Emphasis"><text:span text:style-name="T43">. </text:span></text:span></text:p>
            </text:list-item>
            <text:list-item>
              <text:p text:style-name="P59"><text:span text:style-name="Strong_20_Emphasis"><text:span text:style-name="T64">Estoque</text:span></text:span><text:span text:style-name="Strong_20_Emphasis"><text:span text:style-name="T65">:</text:span></text:span><text:span text:style-name="Strong_20_Emphasis"><text:span text:style-name="T66"> </text:span></text:span><text:span text:style-name="T5">Uma venda pode nascer de duas formas:</text:span></text:p>
            </text:list-item>
          </text:list>
        </text:list-item>
      </text:list>
      <text:list text:style-name="L29">
        <text:list-item>
          <text:list>
            <text:list-item>
              <text:p text:style-name="P60"><text:span text:style-name="Strong_20_Emphasis"><text:span text:style-name="T67">Venda direta</text:span></text:span><text:span text:style-name="Strong_20_Emphasis"><text:span text:style-name="T66"> </text:span></text:span><text:span text:style-name="Strong_20_Emphasis"><text:span text:style-name="T6">(FK_ORIGEM &lt;&gt; </text:span></text:span><text:span text:style-name="Strong_20_Emphasis"><text:span text:style-name="T50">pré-venda</text:span></text:span><text:span text:style-name="Strong_20_Emphasis"><text:span text:style-name="T6">)</text:span></text:span><text:span text:style-name="T68">: ger</text:span><text:span text:style-name="T69">a saída de estoque em </text:span><text:span text:style-name="Source_20_Text"><text:span text:style-name="T69">ESTOQUE_MOVIMENTACOES</text:span></text:span><text:span text:style-name="T69">.</text:span></text:p>
            </text:list-item>
          </text:list>
        </text:list-item>
      </text:list>
      <text:list text:style-name="L30">
        <text:list-item>
          <text:list>
            <text:list-item>
              <text:list>
                <text:list-item>
                  <text:p text:style-name="P61"><text:span text:style-name="T70">FK_ACAO = </text:span><text:span text:style-name="T71">2 (</text:span><text:span text:style-name="T70">saída.</text:span><text:span text:style-name="T71">)</text:span></text:p>
                </text:list-item>
                <text:list-item>
                  <text:p text:style-name="P62">FK_ORIGEM = <text:span text:style-name="T71">1 (venda)</text:span></text:p>
                </text:list-item>
              </text:list>
            </text:list-item>
          </text:list>
        </text:list-item>
      </text:list>
      <text:list text:style-name="L31">
        <text:list-item>
          <text:list>
            <text:list-item>
              <text:list>
                <text:list-item>
                  <text:p text:style-name="P63">ID_TRANSACAO_ORIGEM = <text:span text:style-name="T71">VENDAS.ID</text:span></text:p>
                </text:list-item>
              </text:list>
            </text:list-item>
            <text:list-item>
              <text:p text:style-name="P64"><text:span text:style-name="T72">Pré</text:span><text:span text:style-name="T73">-venda</text:span><text:span text:style-name="T74"> </text:span><text:span text:style-name="T75">convertida</text:span><text:span text:style-name="T76"> </text:span><text:span text:style-name="T6">(FK</text:span><text:span text:style-name="T5">_ORIGEM = </text:span><text:span text:style-name="T77">2 </text:span><text:span text:style-name="T78">+ </text:span><text:span text:style-name="Source_20_Text"><text:span text:style-name="T79">FK_PRE_VENDA </text:span></text:span><text:span text:style-name="Source_20_Text"><text:span text:style-name="T80">informado</text:span></text:span><text:span text:style-name="T77">)</text:span></text:p>
              <text:list>
                <text:list-item>
                  <text:p text:style-name="P65"><text:span text:style-name="Strong_20_Emphasis"><text:span text:style-name="T81">No formulário, selecionar a pre-venda e então carregar pre-venda itens</text:span></text:span><text:span text:style-name="Strong_20_Emphasis"><text:span text:style-name="T82"> </text:span></text:span></text:p>
                </text:list-item>
                <text:list-item>
                  <text:p text:style-name="P65"><text:span text:style-name="Strong_20_Emphasis"><text:span text:style-name="T83">problema</text:span></text:span><text:span text:style-name="Strong_20_Emphasis"><text:span text:style-name="T81">: e se carregar pre venda itens (que já foram movimentados) e o cliente quiser levar novos itens (não movimentados)?</text:span></text:span></text:p>
                </text:list-item>
                <text:list-item>
                  <text:p text:style-name="P64"><text:span text:style-name="Strong_20_Emphasis"><text:span text:style-name="T6">Quando uma pré-venda é convertida em venda, </text:span></text:span><text:span text:style-name="Strong_20_Emphasis"><text:span text:style-name="T62">VENDA_ITENS </text:span></text:span><text:span text:style-name="Strong_20_Emphasis"><text:span text:style-name="T6">não devem gerar movimentação de estoque, porque já foram tratados na pré-venda.</text:span></text:span></text:p>
                </text:list-item>
              </text:list>
            </text:list-item>
          </text:list>
        </text:list-item>
      </text:list>
      <text:list xml:id="list2568130992" text:style-name="L32">
        <text:list-item>
          <text:list>
            <text:list-item>
              <text:list>
                <text:list-item>
                  <text:p text:style-name="P66"><text:span text:style-name="Strong_20_Emphasis"><text:span text:style-name="T84">Gera títulos financeiros apenas quando venda é confirmada</text:span></text:span><text:span text:style-name="Strong_20_Emphasis"><text:span text:style-name="T6">.</text:span></text:span></text:p>
                </text:list-item>
              </text:list>
            </text:list-item>
          </text:list>
        </text:list-item>
      </text:list>
      <text:list text:style-name="L33">
        <text:list-item>
          <text:list>
            <text:list-item>
              <text:list>
                <text:list-item>
                  <text:p text:style-name="P67"><text:span text:style-name="Strong_20_Emphasis"><text:span text:style-name="T85">Para isso, a</text:span></text:span><text:span text:style-name="Strong_20_Emphasis"><text:span text:style-name="T86">o abrir formulário ‘</text:span></text:span><text:span text:style-name="Strong_20_Emphasis"><text:span text:style-name="T87">pre-venda convertida em venda’</text:span></text:span><text:span text:style-name="Strong_20_Emphasis"><text:span text:style-name="T86">, </text:span></text:span><text:span text:style-name="Strong_20_Emphasis"><text:span text:style-name="T68">FK_ORIGEM = 2 e o vendedor deve </text:span></text:span><text:span text:style-name="Strong_20_Emphasis"><text:span text:style-name="T87">preencher</text:span></text:span><text:span text:style-name="Strong_20_Emphasis"><text:span text:style-name="T68"> </text:span></text:span><text:span text:style-name="Strong_20_Emphasis"><text:span text:style-name="T87">qual é a </text:span></text:span><text:span text:style-name="Strong_20_Emphasis"><text:span text:style-name="T68">VENDAS.FK_PRE_VENDA;</text:span></text:span></text:p>
                </text:list-item>
              </text:list>
            </text:list-item>
          </text:list>
        </text:list-item>
      </text:list>
      <text:list text:continue-list="list2568130992" text:style-name="L32">
        <text:list-item>
          <text:list>
            <text:list-item>
              <text:list>
                <text:list-item>
                  <text:p text:style-name="P66"><text:span text:style-name="Strong_20_Emphasis"><text:span text:style-name="T43">Se efetivar </text:span></text:span><text:span text:style-name="Strong_20_Emphasis"><text:span text:style-name="T68">ess</text:span></text:span><text:span text:style-name="Strong_20_Emphasis"><text:span text:style-name="T43">a Venda, altera</text:span></text:span><text:span text:style-name="Strong_20_Emphasis"><text:span text:style-name="T88">r</text:span></text:span><text:span text:style-name="Strong_20_Emphasis"><text:span text:style-name="T43"> PRE_VENDA</text:span></text:span><text:span text:style-name="Strong_20_Emphasis"><text:span text:style-name="T89">S.FK_SITUACAO para ‘finalizada’(2) </text:span></text:span><text:span text:style-name="Strong_20_Emphasis"><text:span text:style-name="T84">automaticamente</text:span></text:span><text:span text:style-name="Strong_20_Emphasis"><text:span text:style-name="T89">.</text:span></text:span></text:p>
                </text:list-item>
              </text:list>
            </text:list-item>
          </text:list>
        </text:list-item>
      </text:list>
      <text:list text:style-name="L34">
        <text:list-item>
          <text:list>
            <text:list-item>
              <text:p text:style-name="P68"><text:span text:style-name="Strong_20_Emphasis"><text:span text:style-name="T90">Validações de estoque: </text:span></text:span><text:span text:style-name="T91">Controle de estoque disponível: O que acontece se produto estiver sem estoque </text:span><text:span text:style-name="T92">ou inativo</text:span><text:span text:style-name="T91">?</text:span></text:p>
            </text:list-item>
          </text:list>
        </text:list-item>
      </text:list>
      <text:list text:style-name="L35">
        <text:list-item>
          <text:list>
            <text:list-item>
              <text:list>
                <text:list-item>
                  <text:p text:style-name="P69"><text:span text:style-name="T93">Venda </text:span><text:span text:style-name="Strong_20_Emphasis"><text:span text:style-name="T93">bloqueada</text:span></text:span><text:span text:style-name="T93"> se <text:s/></text:span><text:span text:style-name="Source_20_Text"><text:span text:style-name="T94">ESTOQUES.QUANTIDADE</text:span></text:span><text:span text:style-name="Source_20_Text"><text:span text:style-name="T95">_ATUAL &lt; VENDA_ITENS.QUANTIDADE. </text:span></text:span><text:span text:style-name="Source_20_Text"><text:span text:style-name="T96">Trigg</text:span></text:span><text:span text:style-name="Source_20_Text"><text:span text:style-name="T97">er </text:span></text:span><text:span text:style-name="Strong_20_Emphasis"><text:span text:style-name="T97">BEFORE INSERT em VENDA_ITENS</text:span></text:span><text:span text:style-name="Source_20_Text"><text:span text:style-name="T97"> que</text:span></text:span><text:span text:style-name="Source_20_Text"><text:span text:style-name="T96"> verifica o estoque. Caso o estoque seja insuficiente, lançar erro (SIGNAL SQLSTATE '45000'). </text:span></text:span></text:p>
                </text:list-item>
              </text:list>
            </text:list-item>
          </text:list>
        </text:list-item>
      </text:list>
      <text:list text:style-name="L36">
        <text:list-item>
          <text:list>
            <text:list-item>
              <text:list>
                <text:list-item>
                  <text:p text:style-name="P70"><text:span text:style-name="Source_20_Text"><text:span text:style-name="T98">Se produto estiver inativo (</text:span></text:span><text:span text:style-name="Source_20_Text"><text:span text:style-name="T93">PRODUTOS.ATIVO = 'N'</text:span></text:span><text:span text:style-name="Source_20_Text"><text:span text:style-name="T98">), bloqueia a venda.</text:span></text:span></text:p>
                </text:list-item>
                <text:list-item>
                  <text:p text:style-name="P70"><text:span text:style-name="Strong_20_Emphasis"><text:span text:style-name="T99">impedir quantidade de itens a vender superior ao saldo atual do estoque. </text:span></text:span><text:span text:style-name="Strong_20_Emphasis"><text:span text:style-name="T100">Impedir furar validação quando adicionar 1 item de cada vez. </text:span></text:span><text:span text:style-name="Strong_20_Emphasis"><text:span text:style-name="T101">[</text:span></text:span><text:span text:style-name="Strong_20_Emphasis"><text:span text:style-name="T102">Corrigir bug que permite extrapolar saldo</text:span></text:span><text:span text:style-name="Strong_20_Emphasis"><text:span text:style-name="T101">]</text:span></text:span></text:p>
                </text:list-item>
              </text:list>
            </text:list-item>
          </text:list>
        </text:list-item>
      </text:list>
      <text:list text:style-name="L37">
        <text:list-item>
          <text:list>
            <text:list-item>
              <text:p text:style-name="P71"><text:span text:style-name="T103">Situações: </text:span><text:span text:style-name="T104">(VENDA_SITUACOES): Apenas VENDA_SITUACOES .</text:span><text:span text:style-name="Source_20_Text"><text:span text:style-name="T104">ATIVO = 'S'</text:span></text:span><text:span text:style-name="T104"> são válidas para uso.</text:span></text:p>
              <text:list>
                <text:list-item>
                  <text:p text:style-name="P71"><text:span text:style-name="Strong_20_Emphasis"><text:span text:style-name="T69">Em aberto (1)</text:span></text:span><text:span text:style-name="T69"> → aguardando pagamento/ação. Venda iniciada, mas ainda sem movimentação de estoque e sem efeitos financeiros.</text:span></text:p>
                </text:list-item>
                <text:list-item>
                  <text:p text:style-name="P71"><text:span text:style-name="Strong_20_Emphasis"><text:span text:style-name="T69">Confirmada (2)</text:span></text:span><text:span text:style-name="T69"> → </text:span><text:span text:style-name="T105">movimenta estoque e gera titulos financeiros</text:span></text:p>
                </text:list-item>
                <text:list-item>
                  <text:p text:style-name="P72"><text:span text:style-name="Strong_20_Emphasis"><text:span text:style-name="T69">Cancelada (3)</text:span></text:span><text:span text:style-name="T69"> → </text:span><text:span text:style-name="Source_20_Text"><text:span text:style-name="T106">gera efeitos inversos:</text:span></text:span></text:p>
                  <text:list>
                    <text:list-item>
                      <text:p text:style-name="P72"><text:soft-page-break/><text:span text:style-name="T106">Estoque: entrada compensatória (</text:span><text:span text:style-name="Source_20_Text"><text:span text:style-name="T69">FK_ACAO = 1</text:span></text:span><text:span text:style-name="T106">, </text:span><text:span text:style-name="Source_20_Text"><text:span text:style-name="T69">FK_ORIGEM = 4</text:span></text:span><text:span text:style-name="T106">).</text:span></text:p>
                    </text:list-item>
                    <text:list-item>
                      <text:p text:style-name="P73">Financeiro: marcar títulos como cancelados (mantém histórico).</text:p>
                    </text:list-item>
                  </text:list>
                </text:list-item>
                <text:list-item>
                  <text:p text:style-name="P72"><text:span text:style-name="Strong_20_Emphasis"><text:span text:style-name="T106">Exclusão proibida</text:span></text:span><text:span text:style-name="T106"> → apenas alterar situação para cancelada.</text:span></text:p>
                </text:list-item>
              </text:list>
            </text:list-item>
            <text:list-item>
              <text:p text:style-name="P74"><text:span text:style-name="Strong_20_Emphasis"><text:span text:style-name="T107">Itens da Venda</text:span></text:span><text:span text:style-name="Strong_20_Emphasis"><text:span text:style-name="T108">: Cada item deve registrar:</text:span></text:span><text:span text:style-name="Strong_20_Emphasis"><text:span text:style-name="T109"> </text:span></text:span></text:p>
              <text:list>
                <text:list-item>
                  <text:p text:style-name="P71"><text:span text:style-name="T110">QUANTIDADE </text:span><text:span text:style-name="Strong_20_Emphasis"><text:span text:style-name="T111">deve ser maior que zero</text:span></text:span><text:span text:style-name="Strong_20_Emphasis"><text:span text:style-name="T112">.</text:span></text:span></text:p>
                </text:list-item>
                <text:list-item>
                  <text:p text:style-name="P71"><text:span text:style-name="Strong_20_Emphasis"><text:span text:style-name="T113">VENDA_ITENS.</text:span></text:span><text:span text:style-name="Source_20_Text"><text:span text:style-name="T113">PRECO_ORIGINAL</text:span></text:span><text:span text:style-name="Strong_20_Emphasis"><text:span text:style-name="T106"> </text:span></text:span><text:span text:style-name="T106">= PRODUTOS.VALOR_ATUAL n</text:span><text:span text:style-name="T114">a data</text:span><text:span text:style-name="T106"> </text:span><text:span text:style-name="T115">da venda</text:span><text:span text:style-name="T106">.</text:span></text:p>
                </text:list-item>
                <text:list-item>
                  <text:p text:style-name="P71"><text:span text:style-name="Strong_20_Emphasis"><text:span text:style-name="T113">VENDA_ITENS.</text:span></text:span><text:span text:style-name="Source_20_Text"><text:span text:style-name="T106">VALOR_DESCONTO </text:span></text:span><text:span text:style-name="Source_20_Text"><text:span text:style-name="T116">aplicáveis apenas ao ite</text:span></text:span><text:span text:style-name="Source_20_Text"><text:span text:style-name="T110">m</text:span></text:span></text:p>
                </text:list-item>
                <text:list-item>
                  <text:p text:style-name="P71"><text:span text:style-name="Strong_20_Emphasis"><text:span text:style-name="T113">VENDA_ITENS.</text:span></text:span><text:span text:style-name="Source_20_Text"><text:span text:style-name="T106">PRECO_UNITARIO_FINAL</text:span></text:span></text:p>
                </text:list-item>
                <text:list-item>
                  <text:p text:style-name="P75"><text:span text:style-name="Strong_20_Emphasis"><text:span text:style-name="T113">VENDA_ITENS.</text:span></text:span><text:span text:style-name="Source_20_Text"><text:span text:style-name="T115">VALOR_TOTAL_ITEM</text:span></text:span><text:span text:style-name="Source_20_Text"><text:span text:style-name="T106"> = QUANTIDADE × PRECO_UNITARIO_FINAL (calculado </text:span></text:span><text:span text:style-name="Source_20_Text"><text:span text:style-name="T110">automaticamente</text:span></text:span><text:span text:style-name="Source_20_Text"><text:span text:style-name="T106">).</text:span></text:span></text:p>
                </text:list-item>
                <text:list-item>
                  <text:p text:style-name="P75"><text:span text:style-name="T117">Sempre recalcular e atualizar </text:span><text:span text:style-name="Source_20_Text"><text:span text:style-name="T117">VENDAS.VALOR_TOTAL</text:span></text:span><text:span text:style-name="T117">.</text:span></text:p>
                </text:list-item>
              </text:list>
            </text:list-item>
            <text:list-item>
              <text:p text:style-name="P72"><text:span text:style-name="Strong_20_Emphasis"><text:span text:style-name="T118">L</text:span></text:span><text:span text:style-name="Strong_20_Emphasis"><text:span text:style-name="T119">imite de crédito</text:span></text:span><text:span text:style-name="T119"> (crediário do cliente):</text:span></text:p>
              <text:list>
                <text:list-item>
                  <text:p text:style-name="P76">Não é permitido confirmar uma venda a prazo se seu valor total exceder o limite de crédito do cliente</text:p>
                </text:list-item>
                <text:list-item>
                  <text:p text:style-name="P77"><text:span text:style-name="T120">LIMITE_CREDIARIO_DISPONIVEL = CLIENTES.LIMITE_CREDIARIO - SOMA(CREDITOS_RECEBER.VALOR_TOTAL – CREDITOS_RECEBER.VALOR_PAGO). </text:span><text:span text:style-name="T121">Implementado pela t</text:span><text:span text:style-name="T120">rigger SP_VALIDAR_LIMITE_CREDIARIO</text:span></text:p>
                </text:list-item>
                <text:list-item>
                  <text:p text:style-name="P78"><text:span text:style-name="T122">Opcional: criar um campo materializado em </text:span><text:span text:style-name="Source_20_Text"><text:span text:style-name="T123">CLIENTES.SALDO_LIMITE_ATUAL</text:span></text:span><text:span text:style-name="T122"> que seja atualizado a cada movimentação de </text:span><text:span text:style-name="Source_20_Text"><text:span text:style-name="T123">CREDITOS_RECEBER</text:span></text:span><text:span text:style-name="T122">.</text:span></text:p>
                </text:list-item>
              </text:list>
            </text:list-item>
          </text:list>
        </text:list-item>
      </text:list>
      <text:h text:style-name="P79" text:outline-level="3">Fluxo Venda:</text:h>
      <text:list xml:id="list999897294" text:style-name="L38">
        <text:list-item>
          <text:p text:style-name="P80">Criar Venda → <text:span text:style-name="T124">inserir itens da venda</text:span>. Dependendo da origem:</text:p>
        </text:list-item>
      </text:list>
      <text:list text:style-name="L39">
        <text:list-item>
          <text:list>
            <text:list-item>
              <text:p text:style-name="P81"><text:span text:style-name="T125">D</text:span>ireta → movimentar estoque <text:span text:style-name="T124">+ titulos financeiros</text:span>.</text:p>
            </text:list-item>
            <text:list-item>
              <text:p text:style-name="P81">Pré-venda convertida → apenas <text:span text:style-name="T124">titulos</text:span> financeiro<text:span text:style-name="T124">s</text:span>.</text:p>
            </text:list-item>
          </text:list>
        </text:list-item>
      </text:list>
      <text:list text:continue-list="list999897294" text:style-name="L38">
        <text:list-item>
          <text:p text:style-name="P82">Confirmar → gerar crédito a receber.</text:p>
        </text:list-item>
        <text:list-item>
          <text:p text:style-name="P82">Receber pagamento → lançar recebimento.</text:p>
        </text:list-item>
        <text:list-item>
          <text:p text:style-name="P82">Cancelar/Devolver/Estornar → reverter estoque e financeiro.</text:p>
        </text:list-item>
      </text:list>
      <text:p text:style-name="P83"/>
      <text:h text:style-name="P84" text:outline-level="2">Perguntas</text:h>
      <text:list text:style-name="L40">
        <text:list-item>
          <text:p text:style-name="P85"><text:span text:style-name="T126">D</text:span><text:span text:style-name="T127">evolução parcial: </text:span><text:span text:style-name="T128">como tratar VENDA_ITENS e estoque? </text:span><text:span text:style-name="T129">Implementar 3 tabelas no futuro para controlar devoluções:</text:span></text:p>
        </text:list-item>
        <text:list-item>
          <text:p text:style-name="P85"><text:span text:style-name="Strong_20_Emphasis"><text:span text:style-name="T130">Estoque → </text:span></text:span><text:span text:style-name="Strong_20_Emphasis"><text:span text:style-name="T131">Estorno/Devolução</text:span></text:span><text:span text:style-name="T131">: Isso precisa ser tratado </text:span><text:span text:style-name="T132">depois!</text:span></text:p>
          <text:list>
            <text:list-item>
              <text:p text:style-name="P86">Se a venda já baixou estoque → gerar movimentação inversa (entrada).</text:p>
            </text:list-item>
            <text:list-item>
              <text:p text:style-name="P87">Se não baixou estoque (caso da pré-venda convertida) → não gera reversão de estoque.</text:p>
            </text:list-item>
          </text:list>
        </text:list-item>
        <text:list-item>
          <text:p text:style-name="P88">Estornos/devoluções:</text:p>
          <text:list>
            <text:list-item>
              <text:p text:style-name="P87"><text:soft-page-break/><text:span text:style-name="T55">Atualizar </text:span><text:span text:style-name="Source_20_Text"><text:span text:style-name="T55">CREDITOS_RECEBER</text:span></text:span><text:span text:style-name="T55"> para “CANCELADA” ou “ESTORNADA”.</text:span></text:p>
            </text:list-item>
            <text:list-item>
              <text:p text:style-name="P89">Se já houve pagamento → gerar registro negativo ou devolução em RECEBIMENTOS.</text:p>
            </text:list-item>
          </text:list>
          <text:p text:style-name="P90"/>
        </text:list-item>
      </text:list>
      <text:list text:continue-list="list235914136731990" text:style-name="L14">
        <text:list-header>
          <text:p text:style-name="P32"><text:span text:style-name="Strong_20_Emphasis"/></text:p>
        </text:list-header>
        <text:list-item>
          <text:p text:style-name="P32"><text:span text:style-name="Strong_20_Emphasis">Validações gerais</text:span></text:p>
          <text:list>
            <text:list-item>
              <text:p text:style-name="P32">Produto ativo e com estoque suficiente.</text:p>
            </text:list-item>
            <text:list-item>
              <text:p text:style-name="P32">Vendedor ativo.</text:p>
            </text:list-item>
            <text:list-item>
              <text:p text:style-name="P32">Cliente ativo e dentro do limite de crediário (para vendas a prazo).</text:p>
            </text:list-item>
            <text:list-item>
              <text:p text:style-name="P32">Observações opcionais, mas podem ser usadas em auditoria ou histórico.</text:p>
            </text:list-item>
          </text:list>
        </text:list-item>
      </text:list>
      <text:p text:style-name="P91"><text:span text:style-name="Strong_20_Emphasis">Resumo das regras: </text:span></text:p>
      <text:list text:style-name="L41">
        <text:list-item>
          <text:p text:style-name="P92"><text:span text:style-name="Strong_20_Emphasis"><text:span text:style-name="T11">Crédito insuficiente:</text:span></text:span><text:span text:style-name="T11"> bloquear antes de confirmar venda.</text:span></text:p>
        </text:list-item>
        <text:list-item>
          <text:p text:style-name="P92"><text:span text:style-name="Strong_20_Emphasis"><text:span text:style-name="T11">Estoque insuficiente:</text:span></text:span><text:span text:style-name="T11"> bloquear antes de inserir item.</text:span></text:p>
        </text:list-item>
        <text:list-item>
          <text:p text:style-name="P92"><text:span text:style-name="Strong_20_Emphasis"><text:span text:style-name="T11">Estoque negativo:</text:span></text:span><text:span text:style-name="T11"> proibir qualquer saída que leve a &lt; 0.</text:span></text:p>
        </text:list-item>
        <text:list-item>
          <text:p text:style-name="P92"><text:span text:style-name="Strong_20_Emphasis"><text:span text:style-name="T133">Devolução parcial:</text:span></text:span><text:span text:style-name="T133"> modelar em tabelas específicas (</text:span><text:span text:style-name="Source_20_Text"><text:span text:style-name="T133">DEVOLUCOES</text:span></text:span><text:span text:style-name="T133"> e </text:span><text:span text:style-name="Source_20_Text"><text:span text:style-name="T133">DEVOLUCOES_ITENS</text:span></text:span><text:span text:style-name="T133">), com reflexo automático em estoque e financeiro.</text:span></text:p>
        </text:list-item>
      </text:list>
      <text:p text:style-name="P93"/>
      <text:p text:style-name="P94"/>
      <text:h text:style-name="P11" text:outline-level="3">Observações de implementação no Scriptcase:</text:h>
      <text:list text:style-name="L42">
        <text:list-item>
          <text:p text:style-name="P95"><text:span text:style-name="Strong_20_Emphasis">Eventos em forms/grids</text:span>:</text:p>
          <text:list>
            <text:list-item>
              <text:p text:style-name="P95"><text:span text:style-name="Source_20_Text">onBeforeInsert</text:span> → valida se cliente, vendedor e produtos estão ativos.</text:p>
            </text:list-item>
            <text:list-item>
              <text:p text:style-name="P95"><text:span text:style-name="Source_20_Text">onAfterInsert</text:span> → gerar movimentação de estoque, atualizar pré-venda e criar créditos a receber.</text:p>
            </text:list-item>
            <text:list-item>
              <text:p text:style-name="P95"><text:span text:style-name="Source_20_Text">onBeforeUpdate</text:span> → impedir alteração de venda já concluída ou cancelada, validar estoque.</text:p>
            </text:list-item>
          </text:list>
        </text:list-item>
        <text:list-item>
          <text:p text:style-name="P95"><text:span text:style-name="Strong_20_Emphasis">Macros úteis</text:span>:</text:p>
          <text:list>
            <text:list-item>
              <text:p text:style-name="P95"><text:span text:style-name="Source_20_Text">sc_lookup_field</text:span> → validações de estoque, cliente, vendedor.</text:p>
            </text:list-item>
            <text:list-item>
              <text:p text:style-name="P95"><text:span text:style-name="Source_20_Text">sc_exec_sql</text:span> → gerar entradas em <text:span text:style-name="Source_20_Text">ESTOQUE_MOVIMENTACOES</text:span> e <text:span text:style-name="Source_20_Text">CREDITOS_RECEBER</text:span>.</text:p>
            </text:list-item>
            <text:list-item>
              <text:p text:style-name="P95"><text:span text:style-name="Source_20_Text">sc_redir</text:span> → redirecionamento após venda concluída para dashboard ou relatório.</text:p>
            </text:list-item>
          </text:list>
        </text:list-item>
      </text:list>
      <text:h text:style-name="P2" text:outline-level="1"><text:span text:style-name="Strong_20_Emphasis"/></text:h>
      <text:h text:style-name="P30" text:outline-level="1"><text:span text:style-name="Strong_20_Emphasis">Módulo Financeiro</text:span></text:h>
      <text:h text:style-name="P11" text:outline-level="3">Regras de negócio principais:</text:h>
      <text:list text:style-name="L43">
        <text:list-item>
          <text:p text:style-name="P96"><text:span text:style-name="Strong_20_Emphasis">Integração com Vendas</text:span></text:p>
          <text:list>
            <text:list-item>
              <text:p text:style-name="P96"><text:span text:style-name="T2">Cada venda a prazo → cria </text:span><text:span text:style-name="Source_20_Text"><text:span text:style-name="T2">CREDITOS_RECEBER</text:span></text:span><text:span text:style-name="T2">.</text:span></text:p>
            </text:list-item>
            <text:list-item>
              <text:p text:style-name="P96"><text:span text:style-name="Strong_20_Emphasis"><text:span text:style-name="T25">Cada pagamento → atualiza o crédito</text:span></text:span><text:span text:style-name="Strong_20_Emphasis"><text:span text:style-name="T2"> </text:span></text:span><text:span text:style-name="Strong_20_Emphasis"><text:span text:style-name="T7">e o fluxo de caixa.</text:span></text:span></text:p>
            </text:list-item>
          </text:list>
        </text:list-item>
        <text:list-item>
          <text:p text:style-name="P97"><text:span text:style-name="Strong_20_Emphasis"><text:span text:style-name="T134">Créditos a receber</text:span></text:span><text:span text:style-name="T107"/></text:p>
          <text:list>
            <text:list-item>
              <text:p text:style-name="P98"><text:span text:style-name="Strong_20_Emphasis"><text:span text:style-name="T117">Geração de títulos (CREDITOS_RECEBER)</text:span></text:span><text:span text:style-name="Source_20_Text"><text:span text:style-name="T117"> </text:span></text:span><text:span text:style-name="T117">Apenas quando </text:span><text:span text:style-name="Source_20_Text"><text:span text:style-name="T117">VENDAS.FK_SITUACAO = 2 (confirmada)</text:span></text:span><text:span text:style-name="T117">.</text:span></text:p>
            </text:list-item>
            <text:list-item>
              <text:p text:style-name="P98"><text:span text:style-name="Source_20_Text"><text:span text:style-name="T135">Explicação dos campos da tabela CREDITOS_RECEBER:</text:span></text:span></text:p>
              <text:list>
                <text:list-item>
                  <text:p text:style-name="P99">FK_VENDA = ID da venda.</text:p>
                </text:list-item>
                <text:list-item>
                  <text:p text:style-name="P100"><text:span text:style-name="Source_20_Text"><text:span text:style-name="T136">FK_SITUACAO</text:span></text:span><text:span text:style-name="T136"> → </text:span><text:span text:style-name="T137">chave estrangeira de SITUACOES_FINANCEIRAS. Registros ativos</text:span><text:span text:style-name="T136">: </text:span><text:span text:style-name="T137">aberta, paga, cancelada, atrasada</text:span></text:p>
                </text:list-item>
                <text:list-item>
                  <text:p text:style-name="P100"><text:span text:style-name="Source_20_Text"><text:span text:style-name="T138">VENDAS.VALOR_TOTAL </text:span></text:span><text:span text:style-name="Source_20_Text"><text:span text:style-name="T139">é o valor total d</text:span></text:span><text:span text:style-name="Source_20_Text"><text:span text:style-name="T140">a parcela / título.</text:span></text:span></text:p>
                </text:list-item>
                <text:list-item>
                  <text:p text:style-name="P101">DATA_EMISSAO = DATA_VENDA</text:p>
                </text:list-item>
                <text:list-item>
                  <text:p text:style-name="P102"><text:span text:style-name="T141">DATA_VENCIMENTO, NUMERO_PARCELA e TOTAL_PARCELA </text:span><text:span text:style-name="T142">são calculados pela procedure SP_GERAR_CREDITOS_VENDA</text:span></text:p>
                </text:list-item>
                <text:list-item>
                  <text:p text:style-name="P98"><text:span text:style-name="Source_20_Text"><text:span text:style-name="T143">CREDITOS_RECEBER.FORMA_PREVISTA_PAGAMENTO </text:span></text:span><text:span text:style-name="Source_20_Text"><text:span text:style-name="T144">se relaciona com</text:span></text:span><text:span text:style-name="Source_20_Text"><text:span text:style-name="T145"> FORMAS_PAGAMENTO.NATUREZA, </text:span></text:span><text:span text:style-name="Source_20_Text"><text:span text:style-name="T144">condicionando os valores, se</text:span></text:span><text:span text:style-name="Source_20_Text"><text:span text:style-name="T145">:</text:span></text:span></text:p>
                  <text:list>
                    <text:list-item>
                      <text:p text:style-name="P98"><text:span text:style-name="Source_20_Text"><text:span text:style-name="T145">‘V’: significa que o pagamento será à vista, então gerar registro único na tabela CREDITOS_RECEBER, </text:span></text:span><text:span text:style-name="Source_20_Text"><text:span text:style-name="T146">com </text:span></text:span><text:span text:style-name="Source_20_Text"><text:span text:style-name="T147">FK_SITUACAO = </text:span></text:span><text:span text:style-name="Source_20_Text"><text:span text:style-name="T146">2 (paga),</text:span></text:span><text:span text:style-name="Source_20_Text"><text:span text:style-name="T143">CREDITOS_RECEBER.</text:span></text:span><text:span text:style-name="Source_20_Text"><text:span text:style-name="T148">VALOR_TOTAL = VENDAS.VALOR_TOTAL</text:span></text:span><text:span text:style-name="Source_20_Text"><text:span text:style-name="T146"> <text:s/></text:span></text:span><text:span text:style-name="Source_20_Text"><text:span text:style-name="T145"><text:s/>+ registro único na tabela RECEBIMENTOS</text:span></text:span></text:p>
                    </text:list-item>
                    <text:list-item>
                      <text:p text:style-name="P98"><text:span text:style-name="Source_20_Text"><text:span text:style-name="T145">‘P’: significa que o pagamento será a prazo, então gerar múltiplos registros na tabela CREDITOS_RECEBER, </text:span></text:span><text:span text:style-name="Source_20_Text"><text:span text:style-name="T146">com F</text:span></text:span><text:span text:style-name="Source_20_Text"><text:span text:style-name="T147">K_SITUACAO = </text:span></text:span><text:span text:style-name="Source_20_Text"><text:span text:style-name="T146">1 (aberta) </text:span></text:span><text:span text:style-name="Source_20_Text"><text:span text:style-name="T148">e </text:span></text:span><text:span text:style-name="Source_20_Text"><text:span text:style-name="T143">CREDITOS_RECEBER.</text:span></text:span><text:span text:style-name="Source_20_Text"><text:span text:style-name="T148">VALOR_TOTAL = (VENDAS.VALOR_TOTAL / CREDITOS_RECEBER.TOTAL_PARCELAS)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<text:span text:style-name="T149">Recebimentos </text:span><text:span text:style-name="Strong_20_Emphasis"><text:span text:style-name="T150">(pagamentos do cliente)</text:span></text:span></text:p>
          <text:list>
            <text:list-item>
              <text:p text:style-name="P98"><text:span text:style-name="Source_20_Text"><text:span text:style-name="T151">Cada pagamento gera registro em RECEBIMENTOS com forma</text:span></text:span><text:span text:style-name="Source_20_Text"><text:span text:style-name="T152">_</text:span></text:span><text:span text:style-name="Source_20_Text"><text:span text:style-name="T151">pagamento, data</text:span></text:span><text:span text:style-name="Source_20_Text"><text:span text:style-name="T152">_pagamento, valor_pago, </text:span></text:span><text:span text:style-name="Source_20_Text"><text:span text:style-name="T151">observaçõe</text:span></text:span><text:span text:style-name="Source_20_Text"><text:span text:style-name="T152">s e FK_CREDITO_RECEBER</text:span></text:span></text:p>
            </text:list-item>
            <text:list-item>
              <text:p text:style-name="P98"><text:span text:style-name="Source_20_Text"><text:span text:style-name="T153">Atualiza</text:span></text:span><text:span text:style-name="Source_20_Text"><text:span text:style-name="T154">r</text:span></text:span><text:span text:style-name="Source_20_Text"><text:span text:style-name="T153"> situação da parcela após quitação da dívida. CREDITOS_RECEBER.FK_SITUACAO = 2 (p</text:span></text:span><text:span text:style-name="Source_20_Text"><text:span text:style-name="T155">ago). TRG_RECEBIMENTOS_ATUALIZAR_SITUACAO_CREDITO</text:span></text:span></text:p>
            </text:list-item>
          </text:list>
        </text:list-item>
        <text:list-item>
          <text:p text:style-name="P96"><text:span text:style-name="Strong_20_Emphasis">Obrigações financeiras (contas a pagar)</text:span></text:p>
          <text:list>
            <text:list-item>
              <text:p text:style-name="P96"><text:soft-page-break/>Toda compra ou obrigação com fornecedor gera registro em <text:span text:style-name="Source_20_Text">OBRIGACOES_FINANCEIRAS</text:span>.</text:p>
            </text:list-item>
            <text:list-item>
              <text:p text:style-name="P96">Valor total = valor da compra ou despesa.</text:p>
            </text:list-item>
            <text:list-item>
              <text:p text:style-name="P96">Situação obrigatória → <text:span text:style-name="Source_20_Text">EM_ABERTO</text:span>, <text:span text:style-name="Source_20_Text">PAGO</text:span>, <text:span text:style-name="Source_20_Text">ATRASADO</text:span>.</text:p>
            </text:list-item>
            <text:list-item>
              <text:p text:style-name="P96">Categoria financeira opcional, mas recomendada para relatórios e fluxo de caixa.</text:p>
            </text:list-item>
            <text:list-item>
              <text:p text:style-name="P96">Pagamentos podem ser parciais → cada pagamento gera registro em <text:span text:style-name="Source_20_Text">PAGAMENTOS</text:span>.</text:p>
            </text:list-item>
          </text:list>
        </text:list-item>
        <text:list-item>
          <text:p text:style-name="P96"><text:span text:style-name="Strong_20_Emphasis">Pagamentos</text:span></text:p>
          <text:list>
            <text:list-item>
              <text:p text:style-name="P96">Valor pago ≤ valor da obrigação.</text:p>
            </text:list-item>
            <text:list-item>
              <text:p text:style-name="P96">Cada pagamento atualiza o valor pago e a situação da obrigação.</text:p>
            </text:list-item>
            <text:list-item>
              <text:p text:style-name="P96">Forma de pagamento obrigatória.</text:p>
            </text:list-item>
            <text:list-item>
              <text:p text:style-name="P96">Atualização de datas e logs automáticos.</text:p>
            </text:list-item>
          </text:list>
        </text:list-item>
        <text:list-item>
          <text:p text:style-name="P96"><text:span text:style-name="Strong_20_Emphasis">Fluxo de Caixa</text:span></text:p>
          <text:list>
            <text:list-item>
              <text:p text:style-name="P96">Soma de recebimentos e pagamentos por dia/mês.</text:p>
            </text:list-item>
            <text:list-item>
              <text:p text:style-name="P96">Deve refletir valores reais atualizados, considerando pagamentos parciais, antecipações e atrasos.</text:p>
            </text:list-item>
            <text:list-item>
              <text:p text:style-name="P96">Pode gerar alertas para saldo negativo ou inadimplência.</text:p>
            </text:list-item>
          </text:list>
        </text:list-item>
        <text:list-item>
          <text:p text:style-name="P96"><text:span text:style-name="Strong_20_Emphasis">Controle de inadimplência</text:span></text:p>
          <text:list>
            <text:list-item>
              <text:p text:style-name="P96">Créditos vencidos alteram automaticamente a situação (<text:span text:style-name="Source_20_Text">ATRASADO</text:span>).</text:p>
            </text:list-item>
            <text:list-item>
              <text:p text:style-name="P96">Alertas podem ser enviados por e-mail ou mostrados no dashboard.</text:p>
            </text:list-item>
          </text:list>
        </text:list-item>
      </text:list>
      <text:p text:style-name="P94"/>
      <text:h text:style-name="P11" text:outline-level="3">Observações de implementação no Scriptcase:</text:h>
      <text:list text:style-name="L44">
        <text:list-item>
          <text:p text:style-name="P103"><text:span text:style-name="Strong_20_Emphasis">Eventos em forms/grids</text:span></text:p>
          <text:list>
            <text:list-item>
              <text:p text:style-name="P103"><text:span text:style-name="Source_20_Text">onBeforeInsert</text:span> → validações de valores, datas, cliente ou fornecedor ativo.</text:p>
            </text:list-item>
            <text:list-item>
              <text:p text:style-name="P103"><text:span text:style-name="Source_20_Text">onAfterInsert</text:span> → atualizar fluxo de caixa e gerar alertas de inadimplência.</text:p>
            </text:list-item>
            <text:list-item>
              <text:p text:style-name="P103"><text:span text:style-name="Source_20_Text">onAfterUpdate</text:span> → atualizar status da obrigação ou crédito (ex.: <text:span text:style-name="Source_20_Text">PAGO</text:span>, <text:span text:style-name="Source_20_Text">ATRASADO</text:span>).</text:p>
            </text:list-item>
          </text:list>
        </text:list-item>
        <text:list-item>
          <text:p text:style-name="P103"><text:span text:style-name="Strong_20_Emphasis">Macros úteis</text:span></text:p>
          <text:list>
            <text:list-item>
              <text:p text:style-name="P103"><text:span text:style-name="Source_20_Text">sc_lookup_field</text:span> → validar cliente/fornecedor ativo e limite de crédito.</text:p>
            </text:list-item>
            <text:list-item>
              <text:p text:style-name="P103"><text:span text:style-name="Source_20_Text">sc_exec_sql</text:span> → inserir recebimentos, pagamentos e atualizar saldo no fluxo de caixa.</text:p>
            </text:list-item>
            <text:list-item>
              <text:p text:style-name="P103"><text:span text:style-name="Source_20_Text">sc_alert</text:span> → mostrar avisos de inconsistência, como pagamento maior que o crédito.</text:p>
            </text:list-item>
          </text:list>
        </text:list-item>
      </text:list>
      <text:h text:style-name="P2" text:outline-level="1"><text:span text:style-name="Strong_20_Emphasis"/></text:h>
      <text:h text:style-name="P6" text:outline-level="2"><text:soft-page-break/><text:span text:style-name="Strong_20_Emphasis"><text:span text:style-name="T156">F</text:span></text:span><text:span text:style-name="Strong_20_Emphasis">luxo operacional do MVP:<text:line-break/>mapa de regras de negócio para implementação prática</text:span></text:h>
      <text:p text:style-name="P104"><text:span text:style-name="Strong_20_Emphasis"><draw:frame draw:style-name="fr1" draw:name="Figura1" text:anchor-type="as-char" svg:width="10.77cm" svg:height="13.019cm" draw:z-index="0"><draw:image xlink:href="Pictures/1000000100000197000001ECD41085E8.png" xlink:type="simple" xlink:show="embed" xlink:actuate="onLoad" draw:mime-type="image/png"/></draw:frame></text:span></text:p>
      <text:h text:style-name="P105" text:outline-level="1">Simulação de Cenários</text:h>
      <text:p text:style-name="P106"><text:span text:style-name="T157">Simular um flu</text:span><text:span text:style-name="T158">xo </text:span><text:span text:style-name="Strong_20_Emphasis"><text:span text:style-name="T158">completo de venda a prazo</text:span></text:span><text:span text:style-name="T158">, env</text:span><text:span text:style-name="T157">olvendo:</text:span></text:p>
      <text:list text:style-name="L45">
        <text:list-item>
          <text:p text:style-name="P107"><text:span text:style-name="T157">Cadastro de um </text:span><text:span text:style-name="Strong_20_Emphasis"><text:span text:style-name="T157">cliente</text:span></text:span><text:span text:style-name="T157">.</text:span></text:p>
        </text:list-item>
        <text:list-item>
          <text:p text:style-name="P107"><text:span text:style-name="T157">Cadastro de um </text:span><text:span text:style-name="Strong_20_Emphasis"><text:span text:style-name="T157">usuário</text:span></text:span><text:span text:style-name="T157"> com perfil de </text:span><text:span text:style-name="Strong_20_Emphasis"><text:span text:style-name="T157">vendedor</text:span></text:span><text:span text:style-name="T157">.</text:span></text:p>
        </text:list-item>
        <text:list-item>
          <text:p text:style-name="P107"><text:span text:style-name="T157">Realização de uma </text:span><text:span text:style-name="Strong_20_Emphasis"><text:span text:style-name="T157">venda</text:span></text:span><text:span text:style-name="T157"> com produtos.</text:span></text:p>
        </text:list-item>
        <text:list-item>
          <text:p text:style-name="P107"><text:span text:style-name="T157">Geração de </text:span><text:span text:style-name="Strong_20_Emphasis"><text:span text:style-name="T157">contas a receber</text:span></text:span><text:span text:style-name="T157"> associadas à venda.</text:span></text:p>
        </text:list-item>
        <text:list-item>
          <text:p text:style-name="P107"><text:span text:style-name="T157">Definição da </text:span><text:span text:style-name="Strong_20_Emphasis"><text:span text:style-name="T157">forma de pagamento</text:span></text:span><text:span text:style-name="T157"> e da </text:span><text:span text:style-name="Strong_20_Emphasis"><text:span text:style-name="T157">situação financeira</text:span></text:span><text:span text:style-name="T157">.</text:span></text:p>
        </text:list-item>
      </text:list>
      <text:h text:style-name="P108" text:outline-level="1">Plano de testes (cenários essenciais)</text:h>
      <text:p text:style-name="P109">Para cada trigger, crie scripts de teste:</text:p>
      <text:list text:style-name="L46">
        <text:list-item>
          <text:p text:style-name="P110">Teste A — Venda direta à vista:</text:p>
          <text:list>
            <text:list-item>
              <text:p text:style-name="P110">Criar produto com estoque suficiente.</text:p>
            </text:list-item>
            <text:list-item>
              <text:p text:style-name="P110"><text:soft-page-break/>Criar venda (origem direta), inserir itens (suficiente estoque).</text:p>
            </text:list-item>
            <text:list-item>
              <text:p text:style-name="P111"><text:span text:style-name="T125">Atualizar </text:span><text:span text:style-name="Source_20_Text"><text:span text:style-name="T125">VENDAS.FK_SITUACAO = 2</text:span></text:span><text:span text:style-name="T125"> (confirmada).</text:span></text:p>
            </text:list-item>
            <text:list-item>
              <text:p text:style-name="P111"><text:span text:style-name="T125">Verificar </text:span><text:span text:style-name="Source_20_Text"><text:span text:style-name="T125">CREDITOS_RECEBER</text:span></text:span><text:span text:style-name="T125"> (1 parcela, pago) e </text:span><text:span text:style-name="Source_20_Text"><text:span text:style-name="T125">RECEBIMENTOS</text:span></text:span><text:span text:style-name="T125"> (registro criado).</text:span></text:p>
            </text:list-item>
            <text:list-item>
              <text:p text:style-name="P111"><text:span text:style-name="T125">Verificar </text:span><text:span text:style-name="Source_20_Text"><text:span text:style-name="T125">ESTOQUE_MOVIMENTACOES</text:span></text:span><text:span text:style-name="T125"> e </text:span><text:span text:style-name="Source_20_Text"><text:span text:style-name="T125">ESTOQUES</text:span></text:span><text:span text:style-name="T125"> saldo.</text:span></text:p>
            </text:list-item>
          </text:list>
        </text:list-item>
        <text:list-item>
          <text:p text:style-name="P110">Teste B — Venda direta parcelada:</text:p>
          <text:list>
            <text:list-item>
              <text:p text:style-name="P111"><text:span text:style-name="T125">Criar venda com </text:span><text:span text:style-name="Source_20_Text"><text:span text:style-name="T125">QUANTIDADE_PARCELAS = N</text:span></text:span><text:span text:style-name="T125">, </text:span><text:span text:style-name="Source_20_Text"><text:span text:style-name="T125">FK_FORMA_PAGAMENTO_PREVISTA</text:span></text:span><text:span text:style-name="T125"> com </text:span><text:span text:style-name="Source_20_Text"><text:span text:style-name="T125">NATUREZA='P'</text:span></text:span><text:span text:style-name="T125">.</text:span></text:p>
            </text:list-item>
            <text:list-item>
              <text:p text:style-name="P110">Confirmar venda (situacao=2).</text:p>
            </text:list-item>
            <text:list-item>
              <text:p text:style-name="P111"><text:span text:style-name="T125">Verificar </text:span><text:span text:style-name="Source_20_Text"><text:span text:style-name="T125">CREDITOS_RECEBER</text:span></text:span><text:span text:style-name="T125"> N registros com datas e valores corretos.</text:span></text:p>
            </text:list-item>
            <text:list-item>
              <text:p text:style-name="P111"><text:span text:style-name="T125">Inserir </text:span><text:span text:style-name="Source_20_Text"><text:span text:style-name="T125">RECEBIMENTOS</text:span></text:span><text:span text:style-name="T125"> para 1 parcela e validar </text:span><text:span text:style-name="Source_20_Text"><text:span text:style-name="T125">CREDITOS_RECEBER</text:span></text:span><text:span text:style-name="T125"> muda para pago quando soma &gt;= parcela.</text:span></text:p>
            </text:list-item>
          </text:list>
        </text:list-item>
        <text:list-item>
          <text:p text:style-name="P110">Teste C — Pré-venda convertida:</text:p>
          <text:list>
            <text:list-item>
              <text:p text:style-name="P110">Criar pré-venda com itens reservados (já gera estoque).</text:p>
            </text:list-item>
            <text:list-item>
              <text:p text:style-name="P111"><text:span text:style-name="T125">Criar venda com </text:span><text:span text:style-name="Source_20_Text"><text:span text:style-name="T125">FK_PRE_VENDA</text:span></text:span><text:span text:style-name="T125"> preenchido e </text:span><text:span text:style-name="Source_20_Text"><text:span text:style-name="T125">FK_ORIGEM = 2</text:span></text:span><text:span text:style-name="T125">.</text:span></text:p>
            </text:list-item>
            <text:list-item>
              <text:p text:style-name="P110">Confirmar venda (situacao=2).</text:p>
            </text:list-item>
            <text:list-item>
              <text:p text:style-name="P111"><text:span text:style-name="T125">Verificar que </text:span><text:span text:style-name="Strong_20_Emphasis"><text:span text:style-name="T125">não</text:span></text:span><text:span text:style-name="T125"> foi gerado </text:span><text:span text:style-name="Source_20_Text"><text:span text:style-name="T125">ESTOQUE_MOVIMENTACOES</text:span></text:span><text:span text:style-name="T125"> a partir de </text:span><text:span text:style-name="Source_20_Text"><text:span text:style-name="T125">VENDA_ITENS</text:span></text:span><text:span text:style-name="T125"> (porque pré-venda já registrou), mas </text:span><text:span text:style-name="Source_20_Text"><text:span text:style-name="T125">CREDITOS_RECEBER</text:span></text:span><text:span text:style-name="T125"> foi gerado e </text:span><text:span text:style-name="Source_20_Text"><text:span text:style-name="T125">PRE_VENDAS.FK_SITUACAO = 2</text:span></text:span><text:span text:style-name="T125">.</text:span></text:p>
            </text:list-item>
          </text:list>
        </text:list-item>
        <text:list-item>
          <text:p text:style-name="P110">Teste D — Bloqueio por estoque insuficiente:</text:p>
          <text:list>
            <text:list-item>
              <text:p text:style-name="P111"><text:span text:style-name="T125">Criar venda direta com item acima do estoque → tentativa de inserir </text:span><text:span text:style-name="Source_20_Text"><text:span text:style-name="T125">VENDA_ITENS</text:span></text:span><text:span text:style-name="T125"> deve falhar com SIGNAL.</text:span></text:p>
            </text:list-item>
          </text:list>
        </text:list-item>
        <text:list-item>
          <text:p text:style-name="P110">Teste E — Bloqueio por limite de crédito:</text:p>
          <text:list>
            <text:list-item>
              <text:p text:style-name="P111"><text:span text:style-name="T125">Definir cliente com </text:span><text:span text:style-name="Source_20_Text"><text:span text:style-name="T125">LIMITE_CREDIARIO</text:span></text:span><text:span text:style-name="T125"> baixo.</text:span></text:p>
            </text:list-item>
            <text:list-item>
              <text:p text:style-name="P111"><text:span text:style-name="T125">Criar venda com </text:span><text:span text:style-name="Source_20_Text"><text:span text:style-name="T125">VALOR_TOTAL</text:span></text:span><text:span text:style-name="T125"> maior que disponibilidade → trigger </text:span><text:span text:style-name="Source_20_Text"><text:span text:style-name="T125">BEFORE INSERT/UPDATE VENDAS</text:span></text:span><text:span text:style-name="T125"> deve bloquear.</text:span></text:p>
            </text:list-item>
          </text:list>
        </text:list-item>
        <text:list-item>
          <text:p text:style-name="P110">Teste F — Cancelamento:</text:p>
          <text:list>
            <text:list-item>
              <text:p text:style-name="P110">Confirmar venda que baixou estoque.</text:p>
            </text:list-item>
            <text:list-item>
              <text:p text:style-name="P111"><text:span text:style-name="T125">Mudar para </text:span><text:span text:style-name="Source_20_Text"><text:span text:style-name="T125">FK_SITUACAO=3</text:span></text:span><text:span text:style-name="T125"> → verificar inserção de entradas compensatórias e atualização de </text:span><text:span text:style-name="Source_20_Text"><text:span text:style-name="T125">CREDITOS_RECEBER</text:span></text:span><text:span text:style-name="T125"> para cancelado.</text:span></text:p>
            </text:list-item>
          </text:list>
        </text:list-item>
      </text:list>
      <text:p text:style-name="P112"/>
      <text:h text:style-name="P113" text:outline-level="1"><text:span text:style-name="Strong_20_Emphasis"><text:span text:style-name="T11">Implementar Relatórios</text:span></text:span></text:h>
      <text:p text:style-name="P114">Gera<text:span text:style-name="T159">r</text:span> relatórios como:</text:p>
      <text:list xml:id="list634053239" text:style-name="L47">
        <text:list-item>
          <text:p text:style-name="P115">“Pré-vendas pendentes de devolução há mais de 3 dias”</text:p>
        </text:list-item>
        <text:list-item>
          <text:p text:style-name="P115">“Tempo médio entre retirada e devolução”</text:p>
        </text:list-item>
        <text:list-item>
          <text:p text:style-name="P115">“Percentual de pré-vendas que viraram vendas”</text:p>
        </text:list-item>
        <text:list-item>
          <text:p text:style-name="P116"><text:span text:style-name="Emphasis"><text:span text:style-name="T160">Total vendido</text:span></text:span><text:span text:style-name="T160">, </text:span><text:span text:style-name="Emphasis"><text:span text:style-name="T160">inadimplência, parcelas em aberto, faturamento diário/mensal </text:span></text:span></text:p>
        </text:list-item>
        <text:list-item>
          <text:p text:style-name="P116"><text:span text:style-name="Emphasis"><text:span text:style-name="T160">Relatórios futuros: identificar clientes que frequentemente reservam e não compram, por exemplo. </text:span></text:span></text:p>
        </text:list-item>
        <text:list-item>
          <text:p text:style-name="P116"><text:span text:style-name="Emphasis"><text:span text:style-name="T160">"Quando exatamente o cliente reservou o produto X?"</text:span></text:span></text:p>
        </text:list-item>
        <text:list-item text:style-override="L48">
          <text:p text:style-name="P117">"Quantos itens de pré-venda foram liberados no mês passado?"</text:p>
        </text:list-item>
        <text:list-item>
          <text:p text:style-name="P118"><text:span text:style-name="Emphasis"><text:span text:style-name="T161">Quais pre-venda expiradas não foram finalizadas?</text:span></text:span></text:p>
        </text:list-item>
      </text:list>
      <text:p text:style-name="P112"><text:span text:style-name="Emphasis"/></text:p>
      <text:h text:style-name="P119" text:outline-level="1">Sugestões de melhoria e próximos passos </text:h>
      <text:list xml:id="list2472731859" text:style-name="L49">
        <text:list-item>
          <text:h text:style-name="P120" text:outline-level="2"><text:span text:style-name="Strong_20_Emphasis"><text:span text:style-name="T162">Documentar o dicionário de dados<text:line-break/></text:span></text:span><text:span text:style-name="T163">Após a</text:span><text:span text:style-name="T158"> descrição funcional dos campos, </text:span><text:span text:style-name="T163">g</text:span><text:span text:style-name="T158">erar uma versão formal com: Nome da tabela, Nome do campo, Tipo e tamanho (ex: </text:span><text:span text:style-name="Source_20_Text"><text:span text:style-name="T158">VARCHAR(100)</text:span></text:span><text:span text:style-name="T158">), </text:span><text:span text:style-name="T163">constraints como </text:span><text:span text:style-name="Source_20_Text"><text:span text:style-name="T158">NOT NULL</text:span></text:span><text:span text:style-name="T158">, </text:span><text:span text:style-name="Source_20_Text"><text:span text:style-name="T158">DEFAULT</text:span></text:span><text:span text:style-name="T158">, etc., Descrição técnica. Isso ajuda a automatizar geração de scripts, ORMs, e documentação técnica no futuro.</text:span></text:h>
        </text:list-item>
        <text:list-item>
          <text:h text:style-name="P120" text:outline-level="2"><text:span text:style-name="Strong_20_Emphasis"><text:span text:style-name="T162">Pensar no versionamento e deploy<text:line-break/></text:span></text:span><text:span text:style-name="Strong_20_Emphasis"><text:span text:style-name="T163">Co</text:span></text:span><text:span text:style-name="Strong_20_Emphasis"><text:span text:style-name="T158">mo o projeto é SaaS:</text:span></text:span></text:h>
        </text:list-item>
      </text:list>
      <text:list text:style-name="L50">
        <text:list-item>
          <text:p text:style-name="P121"><text:span text:style-name="Strong_20_Emphasis"><text:span text:style-name="T164">Cri</text:span></text:span><text:span text:style-name="Strong_20_Emphasis"><text:span text:style-name="T165">ar</text:span></text:span><text:span text:style-name="Strong_20_Emphasis"><text:span text:style-name="T164"> um script SQL incremental de criação e atualização de estrutura</text:span></text:span></text:p>
        </text:list-item>
        <text:list-item>
          <text:p text:style-name="P121"><text:span text:style-name="T158">Us</text:span><text:span text:style-name="T163">ar</text:span><text:span text:style-name="T158"> </text:span><text:span text:style-name="Strong_20_Emphasis"><text:span text:style-name="T158">Git</text:span></text:span><text:span text:style-name="T158"> para versionar código + estrutura (DDL)</text:span></text:p>
        </text:list-item>
        <text:list-item>
          <text:p text:style-name="P121"><text:span text:style-name="Strong_20_Emphasis"><text:span text:style-name="T158">Avali</text:span></text:span><text:span text:style-name="Strong_20_Emphasis"><text:span text:style-name="T163">ar</text:span></text:span><text:span text:style-name="Strong_20_Emphasis"><text:span text:style-name="T158"> o uso de migrations no PHP (ex: </text:span></text:span><text:a xlink:type="simple" xlink:href="https://phinx.org/" text:style-name="Internet_20_link" text:visited-style-name="Visited_20_Internet_20_Link"><text:span text:style-name="Strong_20_Emphasis"><text:span text:style-name="T158">Phinx</text:span></text:span></text:a><text:span text:style-name="Strong_20_Emphasis"><text:span text:style-name="T158"> ou Laravel Migrations mesmo em projeto fora do Laravel)</text:span></text:span></text:p>
        </text:list-item>
      </text:list>
      <text:list text:continue-list="list2472731859" text:style-name="L49">
        <text:list-item>
          <text:h text:style-name="P120" text:outline-level="2"><text:span text:style-name="Strong_20_Emphasis">Relacionamento com arquivos (imagens, etiquetas)<text:line-break/></text:span><text:span text:style-name="Strong_20_Emphasis"><text:span text:style-name="T163">Considerando</text:span></text:span><text:span text:style-name="Strong_20_Emphasis"><text:span text:style-name="T158"> etiquetas e código de barras, pode valer adicionar </text:span></text:span><text:span text:style-name="Strong_20_Emphasis"><text:span text:style-name="T163">tabela de imagens de prod</text:span></text:span><text:span text:style-name="Strong_20_Emphasis"><text:span text:style-name="T166">utos e controle de etiquetas (com histórico de impressão se desejar rastrear).</text:span></text:span></text:h>
        </text:list-item>
        <text:list-item>
          <text:h text:style-name="P120" text:outline-level="2"><text:span text:style-name="Strong_20_Emphasis"><text:span text:style-name="T167">I</text:span></text:span><text:span text:style-name="Strong_20_Emphasis">ntegrações futuras<text:line-break/></text:span><text:span text:style-name="Strong_20_Emphasis"><text:span text:style-name="T168">Implementar:</text:span></text:span></text:h>
        </text:list-item>
      </text:list>
      <text:list text:style-name="L51">
        <text:list-item>
          <text:p text:style-name="P122"><text:span text:style-name="Strong_20_Emphasis"><text:span text:style-name="T158">Envio de mensagens via WhatsApp</text:span></text:span><text:span text:style-name="T158"> (cobrança, confirmação, etc.)</text:span></text:p>
        </text:list-item>
        <text:list-item>
          <text:p text:style-name="P122"><text:span text:style-name="Strong_20_Emphasis"><text:span text:style-name="T158">Gateway de pagamento</text:span></text:span><text:span text:style-name="T158"> (integração com API para PIX, boleto)</text:span></text:p>
        </text:list-item>
        <text:list-item>
          <text:p text:style-name="P122"><text:span text:style-name="Strong_20_Emphasis"><text:span text:style-name="T158">API REST</text:span></text:span><text:span text:style-name="T158"> para acesso externo</text:span></text:p>
        </text:list-item>
        <text:list-item>
          <text:p text:style-name="P122"><text:span text:style-name="Strong_20_Emphasis"><text:span text:style-name="T158">Painel PWA ou mobile no futuro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6T16:00:58.996556600</meta:creation-date>
    <dc:date>2026-03-25T23:59:12.508213500</dc:date>
    <meta:editing-duration>P2DT9H19M1S</meta:editing-duration>
    <meta:editing-cycles>63</meta:editing-cycles>
    <meta:generator>LibreOffice/25.8.4.1$Windows_X86_64 LibreOffice_project/6ab4ab096601e7cd763971a4dad5a6c7322a1a59</meta:generator>
    <meta:document-statistic meta:table-count="0" meta:image-count="1" meta:object-count="0" meta:page-count="16" meta:paragraph-count="288" meta:word-count="3096" meta:character-count="20521" meta:non-whitespace-character-count="17939"/>
  </office:meta>
</office:document-meta>
</file>