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1bbf55" officeooo:paragraph-rsid="001bbf55"/>
    </style:style>
    <style:style style:name="P2" style:family="paragraph" style:parent-style-name="Standard" style:list-style-name="L1">
      <style:text-properties officeooo:rsid="001bbfb9" officeooo:paragraph-rsid="001bbfb9"/>
    </style:style>
    <style:style style:name="P3" style:family="paragraph" style:parent-style-name="Standard" style:list-style-name="L1">
      <style:text-properties officeooo:rsid="001c842e" officeooo:paragraph-rsid="001c842e"/>
    </style:style>
    <style:style style:name="P4" style:family="paragraph" style:parent-style-name="Standard" style:list-style-name="L1">
      <style:text-properties officeooo:rsid="001e3123" officeooo:paragraph-rsid="001e3123"/>
    </style:style>
    <style:style style:name="P5" style:family="paragraph" style:parent-style-name="Standard" style:list-style-name="L1">
      <style:text-properties officeooo:rsid="001ec8dc" officeooo:paragraph-rsid="001ec8dc"/>
    </style:style>
    <style:style style:name="P6" style:family="paragraph" style:parent-style-name="Standard" style:list-style-name="L1">
      <style:text-properties officeooo:rsid="001f103b" officeooo:paragraph-rsid="001f103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Mostrar tabela parcelamento</text:p>
        </text:list-item>
        <text:list-item>
          <text:p text:style-name="P1">multitenant: vai ter cadastro de empresa? <text:s text:c="2"/>Vira PDV (regiao de atuação. Frente de trabalho que fica abaixo a empresa). Considerar criação entidade EMPRESA</text:p>
        </text:list-item>
        <text:list-item>
          <text:p text:style-name="P2">IMPLEMENTAR TOOLTIP PARA TODOS OS CAMPOS, MELHORANDO EXPLICAÇÃO</text:p>
        </text:list-item>
        <text:list-item>
          <text:p text:style-name="P2">implementar base de conhecimento</text:p>
        </text:list-item>
        <text:list-item>
          <text:p text:style-name="P2">além de vendas, implementar módulo de COMPRAS (e suas requisições) + FATURAMENTO</text:p>
        </text:list-item>
        <text:list-item>
          <text:p text:style-name="P2">ouvir explicação do Jeiel sobre processo de compra</text:p>
        </text:list-item>
        <text:list-item>
          <text:p text:style-name="P3">trocar alert() JS por sweetAlert()</text:p>
        </text:list-item>
        <text:list-item>
          <text:p text:style-name="P4">pesquisar precificação software prateleira omie</text:p>
        </text:list-item>
        <text:list-item>
          <text:p text:style-name="P5">implementar dashboard na homepage com bom desempenho</text:p>
        </text:list-item>
        <text:list-item>
          <text:p text:style-name="P6">implementar nu moderno scriptcas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6T20:12:21.893721500</meta:creation-date>
    <dc:date>2026-03-26T23:12:47.737445300</dc:date>
    <meta:editing-duration>PT24M58S</meta:editing-duration>
    <meta:editing-cycles>2</meta:editing-cycles>
    <meta:generator>LibreOffice/25.8.4.1$Windows_X86_64 LibreOffice_project/6ab4ab096601e7cd763971a4dad5a6c7322a1a59</meta:generator>
    <meta:document-statistic meta:table-count="0" meta:image-count="0" meta:object-count="0" meta:page-count="1" meta:paragraph-count="10" meta:word-count="89" meta:character-count="583" meta:non-whitespace-character-count="512"/>
  </office:meta>
</office:document-meta>
</file>